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1D1D1F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color="#6E6E73" fo:font-size="10pt" style:font-size-asian="10pt" style:font-size-complex="10pt" fo:font-style="italic" style:font-style-asian="italic" style:font-style-complex="italic"/>
    </style:style>
    <style:style style:name="ce4" style:family="table-cell" style:parent-style-name="Default" style:data-style-name="N0">
      <style:table-cell-properties fo:background-color="#0071E3"/>
      <style:text-properties fo:color="#FFFFFF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71E3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2F2F7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background-color="#F2F2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0071E3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1D1D1F"/>
    </style:style>
    <style:style style:name="ce11" style:family="table-cell" style:parent-style-name="Default" style:data-style-name="N0">
      <style:table-cell-properties style:vertical-align="middle" fo:background-color="#1D1D1F"/>
      <style:text-properties fo:color="#FFFFFF"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5856D6"/>
      <style:text-properties fo:color="#FFFFF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0071E3"/>
      <style:text-properties fo:color="#FFFFF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5856D6"/>
      <style:text-properties fo:color="#FFFFF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1D1D1F"/>
      <style:text-properties fo:color="#FFFFF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1D1D1F"/>
      <style:text-properties fo:color="#FFFFF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6">
      <style:text-properties fo:color="#0000FF"/>
    </style:style>
    <style:style style:name="ce19" style:family="table-cell" style:parent-style-name="Default" style:data-style-name="N30">
      <style:table-cell-properties style:vertical-align="automatic" fo:background-color="#0071E3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0" style:family="table-cell" style:parent-style-name="Default" style:data-style-name="N47"/>
    <style:style style:name="ce21" style:family="table-cell" style:parent-style-name="Default" style:data-style-name="N0">
      <style:table-cell-properties fo:background-color="#F1F1F4"/>
    </style:style>
    <style:style style:name="ce22" style:family="table-cell" style:parent-style-name="Default" style:data-style-name="N0">
      <style:table-cell-properties style:vertical-align="middle" fo:background-color="#F1F1F4"/>
    </style:style>
    <style:style style:name="ce23" style:family="table-cell" style:parent-style-name="Default" style:data-style-name="N0">
      <style:table-cell-properties style:vertical-align="middle" fo:background-color="#E8E8ED"/>
    </style:style>
    <style:style style:name="ce24" style:family="table-cell" style:parent-style-name="Default" style:data-style-name="N0">
      <style:table-cell-properties style:vertical-align="middle" fo:background-color="#FFFFFF"/>
    </style:style>
    <style:style style:name="ce25" style:family="table-cell" style:parent-style-name="Default" style:data-style-name="N0">
      <style:table-cell-properties fo:background-color="#1D8A3F"/>
      <style:text-properties fo:color="#FFFFFF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30">
      <style:table-cell-properties style:vertical-align="automatic" fo:background-color="#1D8A3F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5856D6"/>
    </style:style>
    <style:style style:name="ce28" style:family="table-cell" style:parent-style-name="Default" style:data-style-name="N30">
      <style:table-cell-properties style:vertical-align="automatic" fo:background-color="#5856D6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8A8A8E"/>
      <style:text-properties fo:color="#FFFFFF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8A8A8E"/>
    </style:style>
    <style:style style:name="ce31" style:family="table-cell" style:parent-style-name="Default" style:data-style-name="N0">
      <style:table-cell-properties fo:background-color="#1D1D1F"/>
    </style:style>
    <style:style style:name="ce32" style:family="table-cell" style:parent-style-name="Default" style:data-style-name="N0">
      <style:table-cell-properties style:vertical-align="middle" fo:background-color="#1D1D1F" style:repeat-content="false"/>
      <style:paragraph-properties fo:text-align="start" fo:margin-left="0.353cm"/>
      <style:text-properties fo:color="#FFFFFF" fo:font-size="18pt" style:font-size-asian="18pt" style:font-size-complex="18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1D1D1F"/>
      <style:text-properties fo:color="#A1A1A6" fo:font-size="10pt" style:font-size-asian="10pt" style:font-size-complex="10pt" fo:font-style="italic" style:font-style-asian="italic" style:font-style-complex="italic"/>
    </style:style>
    <style:style style:name="ce34" style:family="table-cell" style:parent-style-name="Default" style:data-style-name="N0">
      <style:table-cell-properties style:vertical-align="middle" fo:background-color="#1D1D1F"/>
      <style:text-properties fo:color="#A1A1A6" fo:font-size="10pt" style:font-size-asian="10pt" style:font-size-complex="10pt"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thin solid #C7C7CC" fo:border-bottom="thin solid #E6E6EB" fo:border-left="thin solid #C7C7CC" fo:border-right="none" style:vertical-align="middle" fo:background-color="#E8E8ED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C7C7CC" fo:border-bottom="thin solid #E6E6EB" fo:border-left="none" fo:border-right="none" style:vertical-align="middle" fo:background-color="#E8E8ED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thin solid #C7C7CC" fo:border-bottom="thin solid #E6E6EB" fo:border-left="none" fo:border-right="none" style:vertical-align="middle" fo:background-color="#E8E8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0">
      <style:table-cell-properties fo:border-top="thin solid #C7C7CC" fo:border-bottom="thin solid #E6E6EB" fo:border-left="none" fo:border-right="none" style:vertical-align="middle" fo:background-color="#E8E8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0">
      <style:table-cell-properties fo:border-top="thin solid #C7C7CC" fo:border-bottom="thin solid #E6E6EB" fo:border-left="none" fo:border-right="thin solid #C7C7CC" style:vertical-align="middle" fo:background-color="#E8E8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E6E6EB" fo:border-bottom="thin solid #E6E6EB" fo:border-left="thin solid #C7C7CC" fo:border-right="none" style:vertical-align="middle" fo:background-color="#FFFFFF"/>
      <style:text-properties fo:color="#008000"/>
    </style:style>
    <style:style style:name="ce41" style:family="table-cell" style:parent-style-name="Default" style:data-style-name="N0">
      <style:table-cell-properties fo:border-top="thin solid #E6E6EB" fo:border-bottom="thin solid #E6E6EB" fo:border-left="none" fo:border-right="none" style:vertical-align="middle" fo:background-color="#FFFFFF"/>
      <style:text-properties fo:color="#008000"/>
    </style:style>
    <style:style style:name="ce42" style:family="table-cell" style:parent-style-name="Default" style:data-style-name="N44">
      <style:table-cell-properties fo:border-top="thin solid #E6E6EB" fo:border-bottom="thin solid #E6E6EB" fo:border-left="none" fo:border-right="none" style:vertical-align="middle" fo:background-color="#FFFFFF" style:repeat-content="false"/>
      <style:paragraph-properties fo:text-align="end" fo:margin-right="0cm"/>
    </style:style>
    <style:style style:name="ce43" style:family="table-cell" style:parent-style-name="Default" style:data-style-name="N40">
      <style:table-cell-properties fo:border-top="thin solid #E6E6EB" fo:border-bottom="thin solid #E6E6EB" fo:border-left="none" fo:border-right="thin solid #C7C7CC" style:vertical-align="middle" fo:background-color="#FFFFFF" style:repeat-content="false"/>
      <style:paragraph-properties fo:text-align="end" fo:margin-right="0cm"/>
    </style:style>
    <style:style style:name="ce44" style:family="table-cell" style:parent-style-name="Default" style:data-style-name="N0">
      <style:table-cell-properties fo:border-top="thin solid #E6E6EB" fo:border-bottom="thin solid #C7C7CC" fo:border-left="thin solid #C7C7CC" fo:border-right="none" style:vertical-align="middle" fo:background-color="#FFFFFF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E6E6EB" fo:border-bottom="thin solid #C7C7CC" fo:border-left="none" fo:border-right="none" style:vertical-align="middle" fo:background-color="#FFFFFF"/>
      <style:text-properties fo:font-weight="bold" style:font-weight-asian="bold" style:font-weight-complex="bold"/>
    </style:style>
    <style:style style:name="ce46" style:family="table-cell" style:parent-style-name="Default" style:data-style-name="N44">
      <style:table-cell-properties fo:border-top="thin solid #E6E6EB" fo:border-bottom="thin solid #C7C7CC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40">
      <style:table-cell-properties fo:border-top="thin solid #E6E6EB" fo:border-bottom="thin solid #C7C7CC" fo:border-left="none" fo:border-right="thin solid #C7C7CC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1D8A3F"/>
      <style:text-properties fo:color="#FFFFFF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C7C7CC" fo:border-bottom="thin solid #E6E6EB" fo:border-left="none" fo:border-right="none" style:vertical-align="middle" fo:background-color="#E8E8ED"/>
    </style:style>
    <style:style style:name="ce50" style:family="table-cell" style:parent-style-name="Default" style:data-style-name="N0">
      <style:table-cell-properties fo:border-top="thin solid #C7C7CC" fo:border-bottom="thin solid #E6E6EB" fo:border-left="none" fo:border-right="thin solid #C7C7CC" style:vertical-align="middle" fo:background-color="#E8E8ED"/>
    </style:style>
    <style:style style:name="ce51" style:family="table-cell" style:parent-style-name="Default" style:data-style-name="N0">
      <style:table-cell-properties fo:border-top="thin solid #E6E6EB" fo:border-bottom="thin solid #E6E6EB" fo:border-left="thin solid #C7C7CC" fo:border-right="none" style:vertical-align="middle" fo:background-color="#FFFFFF"/>
    </style:style>
    <style:style style:name="ce52" style:family="table-cell" style:parent-style-name="Default" style:data-style-name="N0">
      <style:table-cell-properties fo:border-top="thin solid #E6E6EB" fo:border-bottom="thin solid #E6E6EB" fo:border-left="none" fo:border-right="none" style:vertical-align="middle" fo:background-color="#FFFFFF"/>
    </style:style>
    <style:style style:name="ce53" style:family="table-cell" style:parent-style-name="Default" style:data-style-name="N40">
      <style:table-cell-properties fo:border-top="thin solid #E6E6EB" fo:border-bottom="thin solid #E6E6EB" fo:border-left="none" fo:border-right="none" style:vertical-align="middle" fo:background-color="#FFFFFF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order-top="thin solid #E6E6EB" fo:border-bottom="thin solid #E6E6EB" fo:border-left="none" fo:border-right="none" style:vertical-align="middle" fo:background-color="#FFFFFF"/>
    </style:style>
    <style:style style:name="ce55" style:family="table-cell" style:parent-style-name="Default" style:data-style-name="N0">
      <style:table-cell-properties fo:border-top="thin solid #E6E6EB" fo:border-bottom="thin solid #E6E6EB" fo:border-left="none" fo:border-right="thin solid #C7C7CC" style:vertical-align="middle" fo:background-color="#FFFFFF"/>
    </style:style>
    <style:style style:name="ce56" style:family="table-cell" style:parent-style-name="Default" style:data-style-name="N0">
      <style:table-cell-properties fo:border-top="thin solid #E6E6EB" fo:border-bottom="thin solid #C7C7CC" fo:border-left="thin solid #C7C7CC" fo:border-right="none" style:vertical-align="middle" fo:background-color="#FFFFFF"/>
    </style:style>
    <style:style style:name="ce57" style:family="table-cell" style:parent-style-name="Default" style:data-style-name="N0">
      <style:table-cell-properties fo:border-top="thin solid #E6E6EB" fo:border-bottom="thin solid #C7C7CC" fo:border-left="none" fo:border-right="none" style:vertical-align="middle" fo:background-color="#FFFFFF"/>
    </style:style>
    <style:style style:name="ce58" style:family="table-cell" style:parent-style-name="Default" style:data-style-name="N40">
      <style:table-cell-properties fo:border-top="thin solid #E6E6EB" fo:border-bottom="thin solid #C7C7CC" fo:border-left="none" fo:border-right="none" style:vertical-align="middle" fo:background-color="#FFFFFF" style:repeat-content="false"/>
      <style:paragraph-properties fo:text-align="end" fo:margin-right="0cm"/>
    </style:style>
    <style:style style:name="ce59" style:family="table-cell" style:parent-style-name="Default" style:data-style-name="N0">
      <style:table-cell-properties fo:border-top="thin solid #E6E6EB" fo:border-bottom="thin solid #C7C7CC" fo:border-left="none" fo:border-right="none" style:vertical-align="middle" fo:background-color="#FFFFFF"/>
    </style:style>
    <style:style style:name="ce60" style:family="table-cell" style:parent-style-name="Default" style:data-style-name="N0">
      <style:table-cell-properties fo:border-top="thin solid #E6E6EB" fo:border-bottom="thin solid #C7C7CC" fo:border-left="none" fo:border-right="thin solid #C7C7CC" style:vertical-align="middle" fo:background-color="#FFFFFF"/>
    </style:style>
    <style:style style:name="ce61" style:family="table-cell" style:parent-style-name="Default" style:data-style-name="N30"/>
    <style:style style:name="ce62" style:family="table-cell" style:parent-style-name="Default" style:data-style-name="N0">
      <style:text-properties fo:color="#1D1D1F" fo:font-size="16pt" style:font-size-asian="16pt" style:font-size-complex="16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fo:background-color="#1D1D1F"/>
      <style:text-properties fo:color="#FFFFFF" fo:font-size="16pt" style:font-size-asian="16pt" style:font-size-complex="16pt" fo:font-weight="bold" style:font-weight-asian="bold" style:font-weight-complex="bold"/>
    </style:style>
    <style:style style:name="ce64" style:family="table-cell" style:parent-style-name="Default" style:data-style-name="N0">
      <style:text-properties fo:color="#6E6E73" fo:font-size="10pt" style:font-size-asian="10pt" style:font-size-complex="10pt" fo:font-style="italic" style:font-style-asian="italic" style:font-style-complex="italic"/>
    </style:style>
    <style:style style:name="ce65" style:family="table-cell" style:parent-style-name="Default" style:data-style-name="N0">
      <style:table-cell-properties fo:border-top="thin solid #C7C7CC" fo:border-bottom="thin solid #ECECF0" fo:border-left="thin solid #C7C7CC" fo:border-right="none" fo:background-color="#E8E8ED"/>
      <style:text-properties fo:color="#1D1D1F" fo:font-weight="bold" style:font-weight-asian="bold" style:font-weight-complex="bold"/>
    </style:style>
    <style:style style:name="ce66" style:family="table-cell" style:parent-style-name="Default" style:data-style-name="N30">
      <style:table-cell-properties fo:border-top="thin solid #C7C7CC" fo:border-bottom="thin solid #ECECF0" fo:border-left="none" fo:border-right="none" style:vertical-align="automatic" fo:background-color="#E8E8ED" style:repeat-content="false"/>
      <style:paragraph-properties fo:text-align="end" fo:margin-right="0cm"/>
      <style:text-properties fo:color="#1D1D1F" fo:font-weight="bold" style:font-weight-asian="bold" style:font-weight-complex="bold"/>
    </style:style>
    <style:style style:name="ce67" style:family="table-cell" style:parent-style-name="Default" style:data-style-name="N30">
      <style:table-cell-properties fo:border-top="thin solid #C7C7CC" fo:border-bottom="thin solid #ECECF0" fo:border-left="none" fo:border-right="none" style:vertical-align="automatic" fo:background-color="#E8E8ED" style:repeat-content="false"/>
      <style:paragraph-properties fo:text-align="end" fo:margin-right="0cm"/>
      <style:text-properties fo:color="#1D1D1F" fo:font-weight="bold" style:font-weight-asian="bold" style:font-weight-complex="bold"/>
    </style:style>
    <style:style style:name="ce68" style:family="table-cell" style:parent-style-name="Default" style:data-style-name="N30">
      <style:table-cell-properties fo:border-top="thin solid #C7C7CC" fo:border-bottom="thin solid #ECECF0" fo:border-left="none" fo:border-right="thin solid #C7C7CC" style:vertical-align="automatic" fo:background-color="#E8E8ED" style:repeat-content="false"/>
      <style:paragraph-properties fo:text-align="end" fo:margin-right="0cm"/>
      <style:text-properties fo:color="#1D1D1F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ECECF0" fo:border-bottom="thin solid #ECECF0" fo:border-left="thin solid #C7C7CC" fo:border-right="none"/>
      <style:text-properties fo:color="#008000"/>
    </style:style>
    <style:style style:name="ce70" style:family="table-cell" style:parent-style-name="Default" style:data-style-name="N38">
      <style:table-cell-properties fo:border-top="thin solid #ECECF0" fo:border-bottom="thin solid #ECECF0" fo:border-left="none" fo:border-right="none" style:vertical-align="automatic" fo:background-color="transparent" style:repeat-content="false"/>
      <style:paragraph-properties fo:text-align="end" fo:margin-right="0cm"/>
      <style:text-properties fo:color="#1D1D1F"/>
    </style:style>
    <style:style style:name="ce71" style:family="table-cell" style:parent-style-name="Default" style:data-style-name="N38">
      <style:table-cell-properties fo:border-top="thin solid #ECECF0" fo:border-bottom="thin solid #ECECF0" fo:border-left="none" fo:border-right="thin solid #C7C7CC" fo:background-color="transparent"/>
      <style:text-properties fo:color="#1D1D1F"/>
    </style:style>
    <style:style style:name="ce72" style:family="table-cell" style:parent-style-name="Default" style:data-style-name="N38">
      <style:table-cell-properties fo:border-top="thin solid #ECECF0" fo:border-bottom="thin solid #ECECF0" fo:border-left="none" fo:border-right="none" fo:background-color="transparent"/>
      <style:text-properties fo:color="#1D1D1F"/>
    </style:style>
    <style:style style:name="ce73" style:family="table-cell" style:parent-style-name="Default" style:data-style-name="N0">
      <style:table-cell-properties fo:border-top="thin solid #C7C7CC" fo:border-bottom="thin solid #ECECF0" fo:border-left="none" fo:border-right="none" fo:background-color="#E8E8ED"/>
      <style:text-properties fo:color="#1D1D1F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C7C7CC" fo:border-bottom="thin solid #ECECF0" fo:border-left="none" fo:border-right="thin solid #C7C7CC" fo:background-color="#E8E8ED"/>
      <style:text-properties fo:color="#1D1D1F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ECECF0" fo:border-bottom="thin solid #ECECF0" fo:border-left="thin solid #C7C7CC" fo:border-right="none"/>
    </style:style>
    <style:style style:name="ce76" style:family="table-cell" style:parent-style-name="Default" style:data-style-name="N38">
      <style:table-cell-properties fo:border-top="thin solid #ECECF0" fo:border-bottom="thin solid #ECECF0" fo:border-left="none" fo:border-right="none"/>
    </style:style>
    <style:style style:name="ce77" style:family="table-cell" style:parent-style-name="Default" style:data-style-name="N0">
      <style:table-cell-properties fo:border-top="thin solid #ECECF0" fo:border-bottom="thin solid #ECECF0" fo:border-left="none" fo:border-right="none"/>
    </style:style>
    <style:style style:name="ce78" style:family="table-cell" style:parent-style-name="Default" style:data-style-name="N0">
      <style:table-cell-properties fo:border-top="thin solid #ECECF0" fo:border-bottom="thin solid #ECECF0" fo:border-left="none" fo:border-right="thin solid #C7C7CC"/>
    </style:style>
    <style:style style:name="ce79" style:family="table-cell" style:parent-style-name="Default" style:data-style-name="N0">
      <style:table-cell-properties fo:border-top="thin solid #ECECF0" fo:border-bottom="thin solid #C7C7CC" fo:border-left="thin solid #C7C7CC" fo:border-right="none"/>
    </style:style>
    <style:style style:name="ce80" style:family="table-cell" style:parent-style-name="Default" style:data-style-name="N38">
      <style:table-cell-properties fo:border-top="thin solid #ECECF0" fo:border-bottom="thin solid #C7C7CC" fo:border-left="none" fo:border-right="none"/>
    </style:style>
    <style:style style:name="ce81" style:family="table-cell" style:parent-style-name="Default" style:data-style-name="N0">
      <style:table-cell-properties fo:border-top="thin solid #ECECF0" fo:border-bottom="thin solid #C7C7CC" fo:border-left="none" fo:border-right="none"/>
    </style:style>
    <style:style style:name="ce82" style:family="table-cell" style:parent-style-name="Default" style:data-style-name="N0">
      <style:table-cell-properties fo:border-top="thin solid #ECECF0" fo:border-bottom="thin solid #C7C7CC" fo:border-left="none" fo:border-right="thin solid #C7C7CC"/>
    </style:style>
    <style:style style:name="ce83" style:family="table-cell" style:parent-style-name="Default" style:data-style-name="N0">
      <style:table-cell-properties fo:border-top="thin solid #ECECF0" fo:border-bottom="thin solid #ECECF0" fo:border-left="none" fo:border-right="none" style:vertical-align="automatic" style:repeat-content="false"/>
      <style:paragraph-properties fo:text-align="end" fo:margin-right="0cm"/>
      <style:text-properties fo:color="#8A8A8E"/>
    </style:style>
    <style:style style:name="ce84" style:family="table-cell" style:parent-style-name="Default" style:data-style-name="N0">
      <style:table-cell-properties fo:border-top="thin solid #ECECF0" fo:border-bottom="thin solid #C7C7CC" fo:border-left="none" fo:border-right="none" style:vertical-align="automatic" style:repeat-content="false"/>
      <style:paragraph-properties fo:text-align="end" fo:margin-right="0cm"/>
      <style:text-properties fo:color="#8A8A8E"/>
    </style:style>
    <style:style style:name="ce85" style:family="table-cell" style:parent-style-name="Default" style:data-style-name="N0">
      <style:table-cell-properties fo:border-top="thin solid #ECECF0" fo:border-bottom="none" fo:border-left="thin solid #C7C7CC" fo:border-right="none"/>
      <style:text-properties fo:color="#008000"/>
    </style:style>
    <style:style style:name="ce86" style:family="table-cell" style:parent-style-name="Default" style:data-style-name="N38">
      <style:table-cell-properties fo:border-top="thin solid #ECECF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1D1D1F"/>
    </style:style>
    <style:style style:name="ce87" style:family="table-cell" style:parent-style-name="Default" style:data-style-name="N38">
      <style:table-cell-properties fo:border-top="thin solid #ECECF0" fo:border-bottom="none" fo:border-left="none" fo:border-right="thin solid #C7C7CC" fo:background-color="transparent"/>
      <style:text-properties fo:color="#1D1D1F"/>
    </style:style>
    <style:style style:name="ce88" style:family="table-cell" style:parent-style-name="Default" style:data-style-name="N0">
      <style:table-cell-properties fo:border-top="2pt solid #8A8A8E" fo:border-bottom="thin solid #C7C7CC" fo:border-left="thin solid #C7C7CC" fo:border-right="none" fo:background-color="#F2F2F7"/>
      <style:text-properties fo:font-weight="bold" style:font-weight-asian="bold" style:font-weight-complex="bold"/>
    </style:style>
    <style:style style:name="ce89" style:family="table-cell" style:parent-style-name="Default" style:data-style-name="N38">
      <style:table-cell-properties fo:border-top="2pt solid #8A8A8E" fo:border-bottom="thin solid #C7C7CC" fo:border-left="none" fo:border-right="none" fo:background-color="#F2F2F7"/>
      <style:text-properties fo:font-weight="bold" style:font-weight-asian="bold" style:font-weight-complex="bold"/>
    </style:style>
    <style:style style:name="ce90" style:family="table-cell" style:parent-style-name="Default" style:data-style-name="N38">
      <style:table-cell-properties fo:border-top="2pt solid #8A8A8E" fo:border-bottom="thin solid #C7C7CC" fo:border-left="none" fo:border-right="thin solid #C7C7CC" fo:background-color="#F2F2F7"/>
      <style:text-properties fo:font-weight="bold" style:font-weight-asian="bold" style:font-weight-complex="bold"/>
    </style:style>
    <style:style style:name="ce91" style:family="table-cell" style:parent-style-name="Default" style:data-style-name="N38">
      <style:table-cell-properties fo:border-top="thin solid #ECECF0" fo:border-bottom="none" fo:border-left="none" fo:border-right="none" fo:background-color="transparent"/>
      <style:text-properties fo:color="#1D1D1F"/>
    </style:style>
    <style:style style:name="ce92" style:family="table-cell" style:parent-style-name="Default" style:data-style-name="N48">
      <style:table-cell-properties fo:border-top="thin solid #ECECF0" fo:border-bottom="thin solid #ECECF0" fo:border-left="none" fo:border-right="none" fo:background-color="transparent"/>
      <style:text-properties fo:color="#1D1D1F"/>
    </style:style>
    <style:style style:name="ce93" style:family="table-cell" style:parent-style-name="Default" style:data-style-name="N48">
      <style:table-cell-properties fo:border-top="thin solid #ECECF0" fo:border-bottom="thin solid #ECECF0" fo:border-left="none" fo:border-right="none" style:vertical-align="automatic" fo:background-color="transparent" style:repeat-content="false"/>
      <style:paragraph-properties fo:text-align="end" fo:margin-right="0cm"/>
      <style:text-properties fo:color="#1D1D1F"/>
    </style:style>
    <style:style style:name="ce94" style:family="table-cell" style:parent-style-name="Default" style:data-style-name="N48">
      <style:table-cell-properties fo:border-top="thin solid #ECECF0" fo:border-bottom="none" fo:border-left="none" fo:border-right="none" fo:background-color="transparent"/>
      <style:text-properties fo:color="#1D1D1F"/>
    </style:style>
    <style:style style:name="ce95" style:family="table-cell" style:parent-style-name="Default" style:data-style-name="N48">
      <style:table-cell-properties fo:border-top="thin solid #ECECF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1D1D1F"/>
    </style:style>
    <style:style style:name="ce96" style:family="table-cell" style:parent-style-name="Default" style:data-style-name="N48">
      <style:table-cell-properties fo:border-top="2pt solid #8A8A8E" fo:border-bottom="thin solid #C7C7CC" fo:border-left="none" fo:border-right="none" fo:background-color="#F2F2F7"/>
      <style:text-properties fo:color="#1D1D1F" fo:font-weight="bold" style:font-weight-asian="bold" style:font-weight-complex="bold"/>
    </style:style>
    <style:style style:name="ce97" style:family="table-cell" style:parent-style-name="Default" style:data-style-name="N48">
      <style:table-cell-properties fo:border-top="thin solid #E6E6EB" fo:border-bottom="thin solid #E6E6EB" fo:border-left="none" fo:border-right="none" style:vertical-align="middle" fo:background-color="#FFFFFF"/>
    </style:style>
    <style:style style:name="ce98" style:family="table-cell" style:parent-style-name="Default" style:data-style-name="N48">
      <style:table-cell-properties fo:border-top="thin solid #E6E6EB" fo:border-bottom="thin solid #C7C7CC" fo:border-left="none" fo:border-right="none" style:vertical-align="middle" fo:background-color="#FFFFFF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F1F1F4"/>
    </style:style>
    <style:style style:name="ce10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71E3"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49">
      <style:table-cell-properties style:vertical-align="middle" fo:background-color="#FFFFFF" style:repeat-content="false"/>
      <style:paragraph-properties fo:text-align="center"/>
      <style:text-properties fo:color="#1D1D1F" fo:font-size="20pt" style:font-size-asian="20pt" style:font-size-complex="20pt" fo:font-weight="bold" style:font-weight-asian="bold" style:font-weight-complex="bold"/>
    </style:style>
    <style:style style:name="ce102" style:family="table-cell" style:parent-style-name="Default" style:data-style-name="N49">
      <style:table-cell-properties fo:border-top="2pt solid #0071E3" fo:border-bottom="none" fo:border-left="none" fo:border-right="none" style:vertical-align="middle" fo:background-color="#FFFFFF" style:repeat-content="false"/>
      <style:paragraph-properties fo:text-align="center"/>
      <style:text-properties fo:color="#1D1D1F" fo:font-size="20pt" style:font-size-asian="20pt" style:font-size-complex="20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1D8A3F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49">
      <style:table-cell-properties fo:border-top="2pt solid #1D8A3F" fo:border-bottom="none" fo:border-left="none" fo:border-right="none" style:vertical-align="middle" fo:background-color="#FFFFFF" style:repeat-content="false"/>
      <style:paragraph-properties fo:text-align="center"/>
      <style:text-properties fo:color="#1D1D1F" fo:font-size="20pt" style:font-size-asian="20pt" style:font-size-complex="20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5856D6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0">
      <style:table-cell-properties style:vertical-align="middle" fo:background-color="#FFFFFF" style:repeat-content="false"/>
      <style:paragraph-properties fo:text-align="center"/>
      <style:text-properties fo:color="#1D1D1F" fo:font-size="20pt" style:font-size-asian="20pt" style:font-size-complex="20pt" fo:font-weight="bold" style:font-weight-asian="bold" style:font-weight-complex="bold"/>
    </style:style>
    <style:style style:name="ce107" style:family="table-cell" style:parent-style-name="Default" style:data-style-name="N40">
      <style:table-cell-properties fo:border-top="2pt solid #5856D6" fo:border-bottom="none" fo:border-left="none" fo:border-right="none" style:vertical-align="middle" fo:background-color="#FFFFFF" style:repeat-content="false"/>
      <style:paragraph-properties fo:text-align="center"/>
      <style:text-properties fo:color="#1D1D1F" fo:font-size="20pt" style:font-size-asian="20pt" style:font-size-complex="20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9688" fo:font-size="9pt" style:font-size-asian="9pt" style:font-size-complex="9pt" fo:font-weight="bold" style:font-weight-asian="bold" style:font-weight-complex="bold"/>
    </style:style>
    <style:style style:name="ce109" style:family="table-cell" style:parent-style-name="Default" style:data-style-name="N49">
      <style:table-cell-properties fo:border-top="2pt solid #009688" fo:border-bottom="none" fo:border-left="none" fo:border-right="none" style:vertical-align="middle" fo:background-color="#FFFFFF" style:repeat-content="false"/>
      <style:paragraph-properties fo:text-align="center"/>
      <style:text-properties fo:color="#1D1D1F" fo:font-size="20pt" style:font-size-asian="20pt" style:font-size-complex="20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9500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40">
      <style:table-cell-properties fo:border-top="2pt solid #FF9500" fo:border-bottom="none" fo:border-left="none" fo:border-right="none" style:vertical-align="middle" fo:background-color="#FFFFFF" style:repeat-content="false"/>
      <style:paragraph-properties fo:text-align="center"/>
      <style:text-properties fo:color="#1D1D1F" fo:font-size="20pt" style:font-size-asian="20pt" style:font-size-complex="20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middle" fo:background-color="#0071E3" style:repeat-content="false"/>
      <style:paragraph-properties fo:text-align="start" fo:margin-left="0.353cm"/>
      <style:text-properties fo:color="#FFFFFF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wrap-option="wrap" fo:background-color="#FFFFFF"/>
      <style:text-properties fo:color="#1D1D1F"/>
    </style:style>
    <style:style style:name="ce114" style:family="table-cell" style:parent-style-name="Default" style:data-style-name="N0">
      <style:table-cell-properties fo:border-top="thin solid #ECECF0" fo:border-bottom="thin solid #ECECF0" fo:border-left="none" fo:border-right="none" style:vertical-align="middle" fo:wrap-option="wrap" fo:background-color="#FFFFFF"/>
      <style:text-properties fo:color="#1D1D1F"/>
    </style:style>
    <style:style style:name="ce115" style:family="table-cell" style:parent-style-name="Default" style:data-style-name="N0">
      <style:table-cell-properties fo:border-top="thin solid #ECECF0" fo:border-bottom="none" fo:border-left="none" fo:border-right="none" style:vertical-align="middle" fo:wrap-option="wrap" fo:background-color="#FFFFFF"/>
      <style:text-properties fo:color="#1D1D1F"/>
    </style:style>
    <style:style style:name="ce116" style:family="table-cell" style:parent-style-name="Default" style:data-style-name="N0">
      <style:table-cell-properties fo:border-top="thin solid #C7C7CC" fo:border-bottom="thin solid #ECECF0" fo:border-left="thin solid #C7C7CC" fo:border-right="none" fo:background-color="#E8E8ED"/>
      <style:text-properties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C7C7CC" fo:border-bottom="thin solid #ECECF0" fo:border-left="none" fo:border-right="none" fo:background-color="#E8E8ED"/>
      <style:text-properties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30">
      <style:table-cell-properties fo:border-top="thin solid #C7C7CC" fo:border-bottom="thin solid #ECECF0" fo:border-left="none" fo:border-right="none" style:vertical-align="automatic" fo:background-color="#E8E8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30">
      <style:table-cell-properties fo:border-top="thin solid #C7C7CC" fo:border-bottom="thin solid #ECECF0" fo:border-left="none" fo:border-right="thin solid #C7C7CC" style:vertical-align="automatic" fo:background-color="#E8E8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ECECF0" fo:border-bottom="thin solid #ECECF0" fo:border-left="thin solid #C7C7CC" fo:border-right="none" fo:background-color="#FFFFFF"/>
    </style:style>
    <style:style style:name="ce121" style:family="table-cell" style:parent-style-name="Default" style:data-style-name="N0">
      <style:table-cell-properties fo:border-top="thin solid #ECECF0" fo:border-bottom="thin solid #ECECF0" fo:border-left="none" fo:border-right="none" fo:background-color="#FFFFFF"/>
    </style:style>
    <style:style style:name="ce122" style:family="table-cell" style:parent-style-name="Default" style:data-style-name="N49">
      <style:table-cell-properties fo:border-top="thin solid #ECECF0" fo:border-bottom="thin solid #ECECF0" fo:border-left="none" fo:border-right="none" fo:background-color="#FFFFFF"/>
    </style:style>
    <style:style style:name="ce123" style:family="table-cell" style:parent-style-name="Default" style:data-style-name="N49">
      <style:table-cell-properties fo:border-top="thin solid #ECECF0" fo:border-bottom="thin solid #ECECF0" fo:border-left="none" fo:border-right="none" fo:background-color="#FFFFFF"/>
      <style:text-properties fo:font-weight="bold" style:font-weight-asian="bold" style:font-weight-complex="bold"/>
    </style:style>
    <style:style style:name="ce124" style:family="table-cell" style:parent-style-name="Default" style:data-style-name="N40">
      <style:table-cell-properties fo:border-top="thin solid #ECECF0" fo:border-bottom="thin solid #ECECF0" fo:border-left="none" fo:border-right="thin solid #C7C7CC" style:vertical-align="automatic" fo:background-color="#FFFFFF" style:repeat-content="false"/>
      <style:paragraph-properties fo:text-align="end" fo:margin-right="0cm"/>
    </style:style>
    <style:style style:name="ce125" style:family="table-cell" style:parent-style-name="Default" style:data-style-name="N46">
      <style:table-cell-properties fo:border-top="thin solid #ECECF0" fo:border-bottom="thin solid #ECECF0" fo:border-left="none" fo:border-right="none" fo:background-color="#FFFFFF"/>
    </style:style>
    <style:style style:name="ce126" style:family="table-cell" style:parent-style-name="Default" style:data-style-name="N46">
      <style:table-cell-properties fo:border-top="thin solid #ECECF0" fo:border-bottom="thin solid #ECECF0" fo:border-left="none" fo:border-right="none" fo:background-color="#FFFFFF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ECECF0" fo:border-bottom="thin solid #C7C7CC" fo:border-left="thin solid #C7C7CC" fo:border-right="none" fo:background-color="#FFFFFF"/>
    </style:style>
    <style:style style:name="ce128" style:family="table-cell" style:parent-style-name="Default" style:data-style-name="N0">
      <style:table-cell-properties fo:border-top="thin solid #ECECF0" fo:border-bottom="thin solid #C7C7CC" fo:border-left="none" fo:border-right="none" fo:background-color="#FFFFFF"/>
    </style:style>
    <style:style style:name="ce129" style:family="table-cell" style:parent-style-name="Default" style:data-style-name="N49">
      <style:table-cell-properties fo:border-top="thin solid #ECECF0" fo:border-bottom="thin solid #C7C7CC" fo:border-left="none" fo:border-right="none" fo:background-color="#FFFFFF"/>
    </style:style>
    <style:style style:name="ce130" style:family="table-cell" style:parent-style-name="Default" style:data-style-name="N49">
      <style:table-cell-properties fo:border-top="thin solid #ECECF0" fo:border-bottom="thin solid #C7C7CC" fo:border-left="none" fo:border-right="none" fo:background-color="#FFFFFF"/>
      <style:text-properties fo:font-weight="bold" style:font-weight-asian="bold" style:font-weight-complex="bold"/>
    </style:style>
    <style:style style:name="ce131" style:family="table-cell" style:parent-style-name="Default" style:data-style-name="N40">
      <style:table-cell-properties fo:border-top="thin solid #ECECF0" fo:border-bottom="thin solid #C7C7CC" fo:border-left="none" fo:border-right="thin solid #C7C7CC" style:vertical-align="automatic" fo:background-color="#FFFFFF" style:repeat-content="false"/>
      <style:paragraph-properties fo:text-align="end" fo:margin-right="0cm"/>
    </style:style>
    <style:style style:name="ce132" style:family="table-cell" style:parent-style-name="Default" style:data-style-name="N0">
      <style:table-cell-properties style:vertical-align="middle" fo:background-color="#0071E3"/>
      <style:text-properties fo:color="#FFFFFF"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1F1F4"/>
      <style:text-properties fo:color="#8A8A8E" fo:font-size="9pt" style:font-size-asian="9pt" style:font-size-complex="9pt" fo:font-style="italic" style:font-style-asian="italic" style:font-style-complex="italic"/>
    </style:style>
    <style:style style:name="ce134" style:family="table-cell" style:parent-style-name="Default" style:data-style-name="N0">
      <style:table-cell-properties fo:border-top="thin solid #C7C7CC" fo:border-bottom="thin solid #ECECF0" fo:border-left="none" fo:border-right="none" style:vertical-align="middle" fo:background-color="#FFFFFF"/>
      <style:text-properties fo:color="#0071E3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C7C7CC" fo:border-bottom="thin solid #ECECF0" fo:border-left="none" fo:border-right="none" style:vertical-align="middle" fo:background-color="#FFFFFF"/>
      <style:text-properties fo:color="#1D1D1F" fo:font-size="10pt" style:font-size-asian="10pt" style:font-size-complex="10pt"/>
    </style:style>
    <style:style style:name="ce136" style:family="table-cell" style:parent-style-name="Default" style:data-style-name="N0">
      <style:table-cell-properties fo:border-top="thin solid #C7C7CC" fo:border-bottom="thin solid #ECECF0" fo:border-left="none" fo:border-right="none" fo:background-color="#F1F1F4"/>
    </style:style>
    <style:style style:name="ce137" style:family="table-cell" style:parent-style-name="Default" style:data-style-name="N0">
      <style:table-cell-properties fo:border-top="thin solid #ECECF0" fo:border-bottom="thin solid #ECECF0" fo:border-left="none" fo:border-right="none" style:vertical-align="middle" fo:background-color="#FFFFFF"/>
      <style:text-properties fo:color="#0071E3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ECECF0" fo:border-bottom="thin solid #ECECF0" fo:border-left="none" fo:border-right="none" style:vertical-align="middle" fo:background-color="#FFFFFF"/>
      <style:text-properties fo:color="#1D1D1F" fo:font-size="10pt" style:font-size-asian="10pt" style:font-size-complex="10pt"/>
    </style:style>
    <style:style style:name="ce139" style:family="table-cell" style:parent-style-name="Default" style:data-style-name="N0">
      <style:table-cell-properties fo:border-top="thin solid #ECECF0" fo:border-bottom="thin solid #ECECF0" fo:border-left="none" fo:border-right="none" fo:background-color="#F1F1F4"/>
    </style:style>
    <style:style style:name="ce140" style:family="table-cell" style:parent-style-name="Default" style:data-style-name="N0">
      <style:table-cell-properties fo:border-top="thin solid #ECECF0" fo:border-bottom="thin solid #C7C7CC" fo:border-left="none" fo:border-right="none" style:vertical-align="middle" fo:background-color="#FFFFFF"/>
      <style:text-properties fo:color="#0071E3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ECECF0" fo:border-bottom="thin solid #C7C7CC" fo:border-left="none" fo:border-right="none" style:vertical-align="middle" fo:background-color="#FFFFFF"/>
      <style:text-properties fo:color="#1D1D1F" fo:font-size="10pt" style:font-size-asian="10pt" style:font-size-complex="10pt"/>
    </style:style>
    <style:style style:name="ce142" style:family="table-cell" style:parent-style-name="Default" style:data-style-name="N0">
      <style:table-cell-properties fo:border-top="thin solid #ECECF0" fo:border-bottom="thin solid #C7C7CC" fo:border-left="none" fo:border-right="none" fo:background-color="#F1F1F4"/>
    </style:style>
    <style:style style:name="ce143" style:family="table-cell" style:parent-style-name="Default" style:data-style-name="N48">
      <style:text-properties fo:color="#0000FF"/>
    </style:style>
    <style:style style:name="ce144" style:family="table-cell" style:parent-style-name="Default" style:data-style-name="N4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45" style:family="table-cell" style:parent-style-name="Default" style:data-style-name="N48">
      <style:text-properties fo:color="#008000" fo:font-weight="bold" style:font-weight-asian="bold" style:font-weight-complex="bold"/>
    </style:style>
    <style:style style:name="ce146" style:family="table-cell" style:parent-style-name="Default" style:data-style-name="N48"/>
    <style:style style:name="ce147" style:family="table-cell" style:parent-style-name="Default" style:data-style-name="N48">
      <style:text-properties fo:color="#0000FF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4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5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5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5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53" style:family="table-cell" style:parent-style-name="Default" style:data-style-name="N49">
      <style:table-cell-properties fo:border-top="thin solid #999999" fo:border-bottom="none" fo:border-left="thin solid #999999" fo:border-right="thin solid #999999"/>
    </style:style>
    <style:style style:name="ce154" style:family="table-cell" style:parent-style-name="Default" style:data-style-name="N49">
      <style:table-cell-properties fo:border-top="thin solid #FFFFFF" fo:border-bottom="none" fo:border-left="thin solid #999999" fo:border-right="thin solid #999999"/>
    </style:style>
    <style:style style:name="ce155" style:family="table-cell" style:parent-style-name="Default" style:data-style-name="N49">
      <style:table-cell-properties fo:border="thin solid #999999"/>
    </style:style>
    <style:style style:name="ce156" style:family="table-cell" style:parent-style-name="Default" style:data-style-name="N0">
      <style:table-cell-properties style:vertical-align="middle" fo:background-color="#1D1D1F"/>
      <style:text-properties fo:color="#FFFFFF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63361111111111cm"/>
    </style:style>
    <style:style style:name="co3" style:family="table-column">
      <style:table-column-properties fo:break-before="auto" style:column-width="3.24555555555556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6.45583333333333cm" style:use-optimal-column-width="true"/>
    </style:style>
    <style:style style:name="co6" style:family="table-column">
      <style:table-column-properties fo:break-before="auto" style:column-width="2.83986111111111cm" style:use-optimal-column-width="true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2.89277777777778cm"/>
    </style:style>
    <style:style style:name="co9" style:family="table-column">
      <style:table-column-properties fo:break-before="auto" style:column-width="7.05555555555556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1.99319444444444cm"/>
    </style:style>
    <style:style style:name="co12" style:family="table-column">
      <style:table-column-properties fo:break-before="auto" style:column-width="1.97555555555556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1.94027777777778cm"/>
    </style:style>
    <style:style style:name="co15" style:family="table-column">
      <style:table-column-properties fo:break-before="auto" style:column-width="5.3975cm" style:use-optimal-column-width="true"/>
    </style:style>
    <style:style style:name="co16" style:family="table-column">
      <style:table-column-properties fo:break-before="auto" style:column-width="2.78694444444444cm" style:use-optimal-column-width="true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20pt" style:use-optimal-row-height="false" fo:break-before="auto"/>
    </style:style>
    <style:style style:name="ro3" style:family="table-row">
      <style:table-row-properties style:row-height="10pt" style:use-optimal-row-height="false" fo:break-before="auto"/>
    </style:style>
    <style:style style:name="ro4" style:family="table-row">
      <style:table-row-properties style:row-height="16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2pt" style:use-optimal-row-height="false" fo:break-before="auto"/>
    </style:style>
    <style:style style:name="ro10" style:family="table-row">
      <style:table-row-properties style:row-height="38pt" style:use-optimal-row-height="false" fo:break-before="auto"/>
    </style:style>
    <style:style style:name="ro11" style:family="table-row">
      <style:table-row-properties style:row-height="8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9pt" style:use-optimal-row-height="false" fo:break-before="auto"/>
    </style:style>
    <style:style style:name="ro14" style:family="table-row">
      <style:table-row-properties style:row-height="26pt" style:use-optimal-row-height="false" fo:break-before="auto"/>
    </style:style>
    <style:style style:name="ro15" style:family="table-row">
      <style:table-row-properties style:row-height="21pt" style:use-optimal-row-height="true" fo:break-before="auto"/>
    </style:style>
    <style:style style:name="ro16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57" style:family="table-cell" style:parent-style-name="Default" style:data-style-name="N44">
      <style:table-cell-properties fo:border-top="thin solid #E6E6EB" fo:border-bottom="thin solid #E6E6EB" fo:border-left="none" fo:border-right="none" style:vertical-align="middle" fo:background-color="#FFFFFF" style:repeat-content="false"/>
      <style:paragraph-properties fo:text-align="end" fo:margin-right="0cm"/>
      <style:map style:condition="of:cell-content()&gt;0" style:apply-style-name="cf1"/>
      <style:map style:condition="of:cell-content()&lt;0" style:apply-style-name="cf2"/>
    </style:style>
    <style:style style:name="ce158" style:family="table-cell" style:parent-style-name="Default" style:data-style-name="N44">
      <style:table-cell-properties fo:border-top="thin solid #E6E6EB" fo:border-bottom="thin solid #E6E6EB" fo:border-left="none" fo:border-right="none" style:vertical-align="middle" fo:background-color="#FFFFFF" style:repeat-content="false"/>
      <style:paragraph-properties fo:text-align="end" fo:margin-right="0cm"/>
      <style:map style:condition="of:cell-content()&gt;0" style:apply-style-name="cf1"/>
      <style:map style:condition="of:cell-content()&lt;0" style:apply-style-name="cf2"/>
    </style:style>
    <style:style style:name="ce159" style:family="table-cell" style:parent-style-name="Default" style:data-style-name="N38">
      <style:table-cell-properties fo:border-top="thin solid #ECECF0" fo:border-bottom="thin solid #ECECF0" fo:border-left="none" fo:border-right="none" style:vertical-align="automatic" fo:background-color="transparent" style:repeat-content="false"/>
      <style:paragraph-properties fo:text-align="end" fo:margin-right="0cm"/>
      <style:text-properties fo:color="#1D1D1F"/>
      <style:map style:condition="of:cell-content()&gt;0" style:apply-style-name="cf1"/>
      <style:map style:condition="of:cell-content()&lt;0" style:apply-style-name="cf2"/>
    </style:style>
    <style:style style:name="ce160" style:family="table-cell" style:parent-style-name="Default" style:data-style-name="N38">
      <style:table-cell-properties fo:border-top="thin solid #ECECF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1D1D1F"/>
      <style:map style:condition="of:cell-content()&gt;0" style:apply-style-name="cf1"/>
      <style:map style:condition="of:cell-content()&lt;0" style:apply-style-name="cf2"/>
    </style:style>
    <style:style style:name="ce161" style:family="table-cell" style:parent-style-name="Default" style:data-style-name="N38">
      <style:table-cell-properties fo:border-top="thin solid #ECECF0" fo:border-bottom="thin solid #ECECF0" fo:border-left="none" fo:border-right="none" fo:background-color="transparent"/>
      <style:text-properties fo:color="#1D1D1F"/>
      <style:map style:condition="of:cell-content()&gt;0" style:apply-style-name="cf1"/>
      <style:map style:condition="of:cell-content()&lt;0" style:apply-style-name="cf2"/>
    </style:style>
    <style:style style:name="ce162" style:family="table-cell" style:parent-style-name="Default" style:data-style-name="N38">
      <style:table-cell-properties fo:border-top="thin solid #ECECF0" fo:border-bottom="none" fo:border-left="none" fo:border-right="none" fo:background-color="transparent"/>
      <style:text-properties fo:color="#1D1D1F"/>
      <style:map style:condition="of:cell-content()&gt;0" style:apply-style-name="cf1"/>
      <style:map style:condition="of:cell-content()&lt;0" style:apply-style-name="cf2"/>
    </style:style>
    <style:style style:family="text" style:name="a30">
      <style:text-properties fo:font-variant="normal" fo:text-transform="none" fo:color="#1d8a3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5e5e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5856d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draw:fill="none" draw:stroke="non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5e5e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solid" draw:fill-color="#ff95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" style:parent-style-name="Graphics">
      <style:graphic-properties draw:fill="none" draw:stroke="none"/>
    </style:style>
    <style:style style:family="text" style:name="a88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1d1d1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1d8a3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1d1d1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1d8a3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">
      <style:graphic-properties/>
    </style:style>
    <style:style style:family="graphic" style:name="a98">
      <style:graphic-properties/>
    </style:style>
    <style:style style:family="graphic" style:name="a99">
      <style:graphic-properties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5e5e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solid" draw:fill-color="#00968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1d1d1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5e5e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0071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draw:stroke="non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">
      <style:graphic-properties draw:stroke="solid" svg:stroke-color="#000000" draw:auto-grow-width="false" draw:auto-grow-height="false"/>
    </style:style>
    <style:style style:family="text" style:name="a11">
      <style:text-properties fo:font-variant="normal" fo:text-transform="none" fo:color="#1d1d1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draw:stroke="solid" svg:stroke-color="#000000" draw:auto-grow-width="false" draw:auto-grow-height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stroke="solid" svg:stroke-color="#000000" draw:auto-grow-width="false" draw:auto-grow-height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">
      <style:graphic-properties draw:stroke="solid" svg:stroke-color="#000000" draw:auto-grow-width="false" draw:auto-grow-height="false"/>
    </style:style>
    <style:style style:family="text" style:name="a14">
      <style:text-properties fo:font-variant="normal" fo:text-transform="none" fo:color="#1d8a3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5e5e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5e5e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stroke="solid" svg:stroke-color="#000000" draw:auto-grow-width="false" draw:auto-grow-height="false"/>
    </style:style>
    <style:style style:family="graphic" style:name="a111">
      <style:graphic-properties draw:stroke="solid" svg:stroke-color="#000000" draw:auto-grow-width="false" draw:auto-grow-height="false"/>
    </style:style>
    <style:style style:family="graphic" style:name="a112">
      <style:graphic-properties draw:stroke="solid" svg:stroke-color="#000000" draw:auto-grow-width="false" draw:auto-grow-height="false"/>
    </style:style>
    <style:style style:family="graphic" style:name="a113">
      <style:graphic-properties draw:stroke="solid" svg:stroke-color="#000000" draw:auto-grow-width="false" draw:auto-grow-height="false"/>
    </style:style>
    <style:style style:family="graphic" style:name="a114">
      <style:graphic-properties draw:stroke="solid" svg:stroke-color="#000000" draw:auto-grow-width="false" draw:auto-grow-height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solid" draw:fill-color="#1d8a3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draw:fill="none" draw:stroke="none"/>
    </style:style>
    <style:style style:family="text" style:name="a24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1d1d1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left" draw:fill="solid" draw:fill-color="#8e44d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" style:parent-style-name="Graphics">
      <style:graphic-properties draw:fill="none" draw:stroke="none"/>
    </style:style>
    <style:style style:family="text" style:name="a72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1d1d1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8a8a8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ecutive_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1" table:default-cell-style-name="ce1"/>
        <table:table-column table:style-name="co4" table:number-columns-repeated="16372" table:default-cell-style-name="ce1"/>
        <table:table-row table:style-name="ro1">
          <table:table-cell table:style-name="ce31"/>
          <table:table-cell office:value-type="string" table:number-columns-spanned="10" table:number-rows-spanned="1" table:style-name="ce11">
            <text:p>Apple Inc. <text:s/>— <text:s/>Performance &amp; Investment Summary</text:p>
          </table:table-cell>
          <table:covered-table-cell table:number-columns-repeated="9"/>
          <table:table-cell table:style-name="ce31"/>
          <table:table-cell table:number-columns-repeated="16372"/>
        </table:table-row>
        <table:table-row table:style-name="ro2">
          <table:table-cell table:style-name="ce31"/>
          <table:table-cell office:value-type="string" table:number-columns-spanned="10" table:number-rows-spanned="1" table:style-name="ce33">
            <text:p>Five-year review, FY2021–FY2025 <text:s/>· <text:s/>$ in billions unless noted <text:s/>· <text:s/>Source: Apple SEC Form 10-K filings (EDGAR)</text:p>
          </table:table-cell>
          <table:covered-table-cell table:number-columns-repeated="9"/>
          <table:table-cell table:style-name="ce31"/>
          <table:table-cell table:number-columns-repeated="16372"/>
        </table:table-row>
        <table:table-row table:style-name="ro3">
          <table:table-cell table:number-columns-repeated="12" table:style-name="ce21"/>
          <table:table-cell table:number-columns-repeated="16372"/>
        </table:table-row>
        <table:table-row table:style-name="ro4">
          <table:table-cell table:style-name="ce21"/>
          <table:table-cell office:value-type="string" table:number-columns-spanned="2" table:number-rows-spanned="1" table:style-name="ce100">
            <text:p>FY2025 REVENUE</text:p>
          </table:table-cell>
          <table:covered-table-cell/>
          <table:table-cell office:value-type="string" table:number-columns-spanned="2" table:number-rows-spanned="1" table:style-name="ce103">
            <text:p>NET INCOME</text:p>
          </table:table-cell>
          <table:covered-table-cell/>
          <table:table-cell office:value-type="string" table:number-columns-spanned="2" table:number-rows-spanned="1" table:style-name="ce105">
            <text:p>GROSS MARGIN</text:p>
          </table:table-cell>
          <table:covered-table-cell/>
          <table:table-cell office:value-type="string" table:number-columns-spanned="2" table:number-rows-spanned="1" table:style-name="ce108">
            <text:p>FREE CASH FLOW</text:p>
          </table:table-cell>
          <table:covered-table-cell/>
          <table:table-cell office:value-type="string" table:number-columns-spanned="2" table:number-rows-spanned="1" table:style-name="ce110">
            <text:p>RETURN ON EQUITY</text:p>
          </table:table-cell>
          <table:covered-table-cell/>
          <table:table-cell table:style-name="ce21"/>
          <table:table-cell table:number-columns-repeated="16372"/>
        </table:table-row>
        <table:table-row table:style-name="ro5">
          <table:table-cell table:style-name="ce21"/>
          <table:table-cell office:value-type="float" office:value="416161" table:formula="of:=[Raw_Data.F11]" table:number-columns-spanned="2" table:number-rows-spanned="2" table:style-name="ce102">
            <text:p>$416.2B</text:p>
          </table:table-cell>
          <table:covered-table-cell/>
          <table:table-cell office:value-type="float" office:value="112010" table:formula="of:=[Raw_Data.F30]" table:number-columns-spanned="2" table:number-rows-spanned="2" table:style-name="ce104">
            <text:p>$112.0B</text:p>
          </table:table-cell>
          <table:covered-table-cell/>
          <table:table-cell office:value-type="percentage" office:value="0.46905164107160452" table:formula="of:=[Analysis.F24]" table:number-columns-spanned="2" table:number-rows-spanned="2" table:style-name="ce107">
            <text:p>46.9%</text:p>
          </table:table-cell>
          <table:covered-table-cell/>
          <table:table-cell office:value-type="float" office:value="98767" table:formula="of:=[Raw_Data.F36]" table:number-columns-spanned="2" table:number-rows-spanned="2" table:style-name="ce109">
            <text:p>$98.8B</text:p>
          </table:table-cell>
          <table:covered-table-cell/>
          <table:table-cell office:value-type="percentage" office:value="1.5191298333175105" table:formula="of:=[Analysis.F35]" table:number-columns-spanned="2" table:number-rows-spanned="2" table:style-name="ce111">
            <text:p>151.9%</text:p>
          </table:table-cell>
          <table:covered-table-cell/>
          <table:table-cell table:style-name="ce21"/>
          <table:table-cell table:number-columns-repeated="16372"/>
        </table:table-row>
        <table:table-row table:style-name="ro3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1"/>
          <table:table-cell table:number-columns-repeated="16372"/>
        </table:table-row>
        <table:table-row table:style-name="ro6">
          <table:table-cell table:number-columns-repeated="12" table:style-name="ce21"/>
          <table:table-cell table:number-columns-repeated="16372"/>
        </table:table-row>
        <table:table-row table:style-name="ro7">
          <table:table-cell table:style-name="ce21"/>
          <table:table-cell office:value-type="string" table:number-columns-spanned="10" table:number-rows-spanned="1" table:style-name="ce112">
            <text:p>Key Takeaways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style-name="ro5">
          <table:table-cell table:style-name="ce21"/>
          <table:table-cell office:value-type="string" table:number-columns-spanned="10" table:number-rows-spanned="1" table:style-name="ce113">
            <text:p>▸ <text:s text:c="2"/>Record revenue of $416.2B in FY2025, up 6.4% YoY and +13.8% over five years (3.3% CAGR).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style-name="ro5">
          <table:table-cell table:style-name="ce21"/>
          <table:table-cell office:value-type="string" table:number-columns-spanned="10" table:number-rows-spanned="1" table:style-name="ce113">
            <text:p>▸ <text:s text:c="2"/>Services is the growth engine — up ~60% since FY2021 to $109.2B, now 26% of revenue (vs. 19% in FY2021) at a ~75% gross margin.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style-name="ro5">
          <table:table-cell table:style-name="ce21"/>
          <table:table-cell office:value-type="string" table:number-columns-spanned="10" table:number-rows-spanned="1" table:style-name="ce113">
            <text:p>▸ <text:s text:c="2"/>iPhone remains the cornerstone at ~50% of revenue ($209.6B), returning to growth (+4.2%) on strong Pro demand.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style-name="ro5">
          <table:table-cell table:style-name="ce21"/>
          <table:table-cell office:value-type="string" table:number-columns-spanned="10" table:number-rows-spanned="1" table:style-name="ce113">
            <text:p>▸ <text:s text:c="2"/>Profitability at a 5-year high: gross margin 46.9% and net margin 26.9% — net income $112.0B (+19.5%), diluted EPS $7.46 (+22.7%).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style-name="ro5">
          <table:table-cell table:style-name="ce21"/>
          <table:table-cell office:value-type="string" table:number-columns-spanned="10" table:number-rows-spanned="1" table:style-name="ce113">
            <text:p>▸ <text:s text:c="2"/>Greater China is the key watch item — revenue fell to $64.4B (−3.8%), the only contracting segment.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style-name="ro5">
          <table:table-cell table:style-name="ce21"/>
          <table:table-cell office:value-type="string" table:number-columns-spanned="10" table:number-rows-spanned="1" table:style-name="ce113">
            <text:p>▸ <text:s text:c="2"/>Exceptional cash generation: $98.8B free cash flow and ~$106B returned to shareholders (dividends + buybacks); ROE 152%.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style-name="ro6">
          <table:table-cell table:number-columns-repeated="12" table:style-name="ce21"/>
          <table:table-cell table:number-columns-repeated="16372"/>
        </table:table-row>
        <table:table-row table:style-name="ro7">
          <table:table-cell table:style-name="ce21"/>
          <table:table-cell office:value-type="string" table:style-name="ce4">
            <text:p>Five-Year Snapshot</text:p>
          </table:table-cell>
          <table:table-cell table:number-columns-repeated="10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number-columns-spanned="4" table:number-rows-spanned="1" table:style-name="ce116">
            <text:p>Metric</text:p>
          </table:table-cell>
          <table:covered-table-cell table:number-columns-repeated="3"/>
          <table:table-cell office:value-type="string" table:style-name="ce118">
            <text:p>FY2021</text:p>
          </table:table-cell>
          <table:table-cell office:value-type="string" table:style-name="ce118">
            <text:p>FY2025</text:p>
          </table:table-cell>
          <table:table-cell office:value-type="string" table:style-name="ce119">
            <text:p>5-Yr CAGR</text:p>
          </table:table-cell>
          <table:table-cell table:number-columns-repeated="4" table:style-name="ce21"/>
          <table:table-cell table:number-columns-repeated="16372"/>
        </table:table-row>
        <table:table-row table:style-name="ro8">
          <table:table-cell table:style-name="ce21"/>
          <table:table-cell office:value-type="string" table:number-columns-spanned="4" table:number-rows-spanned="1" table:style-name="ce120">
            <text:p>Revenue</text:p>
          </table:table-cell>
          <table:covered-table-cell table:number-columns-repeated="3"/>
          <table:table-cell office:value-type="float" office:value="365817" table:formula="of:=[Raw_Data.B11]" table:style-name="ce122">
            <text:p>$365.8B</text:p>
          </table:table-cell>
          <table:table-cell office:value-type="float" office:value="416161" table:formula="of:=[Raw_Data.F11]" table:style-name="ce123">
            <text:p>$416.2B</text:p>
          </table:table-cell>
          <table:table-cell office:value-type="percentage" office:value="3.275991627577457E-2" table:formula="of:=[Analysis.H11]" table:style-name="ce124">
            <text:p>3.3%</text:p>
          </table:table-cell>
          <table:table-cell table:number-columns-repeated="4" table:style-name="ce21"/>
          <table:table-cell table:number-columns-repeated="16372"/>
        </table:table-row>
        <table:table-row table:style-name="ro8">
          <table:table-cell table:style-name="ce21"/>
          <table:table-cell office:value-type="string" table:number-columns-spanned="4" table:number-rows-spanned="1" table:style-name="ce120">
            <text:p>Net income</text:p>
          </table:table-cell>
          <table:covered-table-cell table:number-columns-repeated="3"/>
          <table:table-cell office:value-type="float" office:value="94680" table:formula="of:=[Raw_Data.B30]" table:style-name="ce122">
            <text:p>$94.7B</text:p>
          </table:table-cell>
          <table:table-cell office:value-type="float" office:value="112010" table:formula="of:=[Raw_Data.F30]" table:style-name="ce123">
            <text:p>$112.0B</text:p>
          </table:table-cell>
          <table:table-cell office:value-type="percentage" office:value="4.2916736540760114E-2" table:formula="of:=([.G19]/[.F19])^(1/4)-1" table:style-name="ce124">
            <text:p>4.3%</text:p>
          </table:table-cell>
          <table:table-cell table:number-columns-repeated="4" table:style-name="ce21"/>
          <table:table-cell table:number-columns-repeated="16372"/>
        </table:table-row>
        <table:table-row table:style-name="ro8">
          <table:table-cell table:style-name="ce21"/>
          <table:table-cell office:value-type="string" table:number-columns-spanned="4" table:number-rows-spanned="1" table:style-name="ce120">
            <text:p>Diluted EPS</text:p>
          </table:table-cell>
          <table:covered-table-cell table:number-columns-repeated="3"/>
          <table:table-cell office:value-type="float" office:value="5.61" table:formula="of:=[Raw_Data.B31]" table:style-name="ce125">
            <text:p>$5.61</text:p>
          </table:table-cell>
          <table:table-cell office:value-type="float" office:value="7.46" table:formula="of:=[Raw_Data.F31]" table:style-name="ce126">
            <text:p>$7.46</text:p>
          </table:table-cell>
          <table:table-cell office:value-type="percentage" office:value="7.3850915073183421E-2" table:formula="of:=([.G20]/[.F20])^(1/4)-1" table:style-name="ce124">
            <text:p>7.4%</text:p>
          </table:table-cell>
          <table:table-cell table:number-columns-repeated="4" table:style-name="ce21"/>
          <table:table-cell table:number-columns-repeated="16372"/>
        </table:table-row>
        <table:table-row table:style-name="ro8">
          <table:table-cell table:style-name="ce21"/>
          <table:table-cell office:value-type="string" table:number-columns-spanned="4" table:number-rows-spanned="1" table:style-name="ce120">
            <text:p>Free cash flow</text:p>
          </table:table-cell>
          <table:covered-table-cell table:number-columns-repeated="3"/>
          <table:table-cell office:value-type="float" office:value="92953" table:formula="of:=[Raw_Data.B36]" table:style-name="ce122">
            <text:p>$93.0B</text:p>
          </table:table-cell>
          <table:table-cell office:value-type="float" office:value="98767" table:formula="of:=[Raw_Data.F36]" table:style-name="ce123">
            <text:p>$98.8B</text:p>
          </table:table-cell>
          <table:table-cell office:value-type="percentage" office:value="1.5282996532510085E-2" table:formula="of:=([.G21]/[.F21])^(1/4)-1" table:style-name="ce124">
            <text:p>1.5%</text:p>
          </table:table-cell>
          <table:table-cell table:number-columns-repeated="4" table:style-name="ce21"/>
          <table:table-cell table:number-columns-repeated="16372"/>
        </table:table-row>
        <table:table-row table:style-name="ro8">
          <table:table-cell table:style-name="ce21"/>
          <table:table-cell office:value-type="string" table:number-columns-spanned="4" table:number-rows-spanned="1" table:style-name="ce127">
            <text:p>Services revenue</text:p>
          </table:table-cell>
          <table:covered-table-cell table:number-columns-repeated="3"/>
          <table:table-cell office:value-type="float" office:value="68425" table:formula="of:=[Raw_Data.B10]" table:style-name="ce129">
            <text:p>$68.4B</text:p>
          </table:table-cell>
          <table:table-cell office:value-type="float" office:value="109158" table:formula="of:=[Raw_Data.F10]" table:style-name="ce130">
            <text:p>$109.2B</text:p>
          </table:table-cell>
          <table:table-cell office:value-type="percentage" office:value="0.12385476417353836" table:formula="of:=[Analysis.H10]" table:style-name="ce131">
            <text:p>12.4%</text:p>
          </table:table-cell>
          <table:table-cell table:number-columns-repeated="4" table:style-name="ce21"/>
          <table:table-cell table:number-columns-repeated="16372"/>
        </table:table-row>
        <table:table-row table:style-name="ro6">
          <table:table-cell table:number-columns-repeated="12" table:style-name="ce21"/>
          <table:table-cell table:number-columns-repeated="16372"/>
        </table:table-row>
        <table:table-row table:style-name="ro7">
          <table:table-cell table:style-name="ce21"/>
          <table:table-cell office:value-type="string" table:number-columns-spanned="10" table:number-rows-spanned="1" table:style-name="ce132">
            <text:p>How to Navigate This Workbook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style-name="ro9">
          <table:table-cell table:style-name="ce21"/>
          <table:table-cell office:value-type="string" table:number-columns-spanned="2" table:number-rows-spanned="1" table:style-name="ce134">
            <text:p>Dashboard</text:p>
          </table:table-cell>
          <table:covered-table-cell/>
          <table:table-cell office:value-type="string" table:number-columns-spanned="8" table:number-rows-spanned="1" table:style-name="ce135">
            <text:p>Visual KPI tiles, 5-year product &amp; geography tables, and charts — the main presentation view.</text:p>
          </table:table-cell>
          <table:covered-table-cell table:number-columns-repeated="7"/>
          <table:table-cell table:style-name="ce21"/>
          <table:table-cell table:number-columns-repeated="16372"/>
        </table:table-row>
        <table:table-row table:style-name="ro9">
          <table:table-cell table:style-name="ce21"/>
          <table:table-cell office:value-type="string" table:number-columns-spanned="2" table:number-rows-spanned="1" table:style-name="ce137">
            <text:p>Analysis</text:p>
          </table:table-cell>
          <table:covered-table-cell/>
          <table:table-cell office:value-type="string" table:number-columns-spanned="8" table:number-rows-spanned="1" table:style-name="ce138">
            <text:p>Growth, revenue mix, margins, and key ratios (ROE, ROA, FCF margin) for FY2021–FY2025.</text:p>
          </table:table-cell>
          <table:covered-table-cell table:number-columns-repeated="7"/>
          <table:table-cell table:style-name="ce21"/>
          <table:table-cell table:number-columns-repeated="16372"/>
        </table:table-row>
        <table:table-row table:style-name="ro9">
          <table:table-cell table:style-name="ce21"/>
          <table:table-cell office:value-type="string" table:number-columns-spanned="2" table:number-rows-spanned="1" table:style-name="ce140">
            <text:p>Raw Data</text:p>
          </table:table-cell>
          <table:covered-table-cell/>
          <table:table-cell office:value-type="string" table:number-columns-spanned="8" table:number-rows-spanned="1" table:style-name="ce141">
            <text:p>Source figures: income statement, cash flow, and balance sheet from SEC 10-K filings.</text:p>
          </table:table-cell>
          <table:covered-table-cell table:number-columns-repeated="7"/>
          <table:table-cell table:style-name="ce21"/>
          <table:table-cell table:number-columns-repeated="16372"/>
        </table:table-row>
        <table:table-row table:number-rows-repeated="3" table:style-name="ro6">
          <table:table-cell table:number-columns-repeated="12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number-columns-spanned="10" table:number-rows-spanned="1" table:style-name="ce133">
            <text:p>Source: Apple Inc. SEC Form 10-K filings (FY2021–FY2025), EDGAR. <text:s/>Figures in USD; $B = billions. <text:s/>Green = source links, black = calculated.</text:p>
          </table:table-cell>
          <table:covered-table-cell table:number-columns-repeated="9"/>
          <table:table-cell table:style-name="ce21"/>
          <table:table-cell table:number-columns-repeated="16372"/>
        </table:table-row>
        <table:table-row table:number-rows-repeated="29" table:style-name="ro6">
          <table:table-cell table:number-columns-repeated="12" table:style-name="ce21"/>
          <table:table-cell table:number-columns-repeated="16372"/>
        </table:table-row>
        <table:table-row table:number-rows-repeated="1048516" table:style-name="ro6">
          <table:table-cell table:number-columns-repeated="16384"/>
        </table:table-row>
      </table:table>
      <table:table table:name="Dashboard" table:style-name="ta2"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1" table:default-cell-style-name="ce1"/>
        <table:table-column table:style-name="co4" table:number-columns-repeated="16370" table:default-cell-style-name="ce1"/>
        <table:table-row table:style-name="ro10">
          <table:table-cell office:value-type="string" table:number-columns-spanned="12" table:number-rows-spanned="1" table:style-name="ce32">
            <text:p>Apple Inc. <text:s/>— <text:s/>Financial Performance Dashboard</text:p>
          </table:table-cell>
          <table:covered-table-cell table:number-columns-repeated="7"/>
          <table:covered-table-cell>
            <draw:frame draw:z-index="1" draw:id="id0" draw:style-name="a0" draw:name="BrandIcon" svg:x="0.62037in" svg:y="0.09722in" svg:width="0.55556in" svg:height="0.54398in" style:rel-width="scale" style:rel-height="scale">
              <draw:image xlink:href="media/image1.tmp" xlink:type="simple" xlink:show="embed" xlink:actuate="onLoad"/>
              <svg:title/>
              <svg:desc/>
            </draw:frame>
          </table:covered-table-cell>
          <table:covered-table-cell table:number-columns-repeated="3"/>
          <table:table-cell table:number-columns-repeated="16372"/>
        </table:table-row>
        <table:table-row table:style-name="ro8">
          <table:table-cell office:value-type="string" table:number-columns-spanned="12" table:number-rows-spanned="1" table:style-name="ce34">
            <text:p>Fiscal years 2021–2025 <text:s/>· <text:s/>$ in billions unless noted <text:s/>· <text:s/>Source: Apple SEC 10-K filings (FY2023 &amp; FY2025)</text:p>
          </table:table-cell>
          <table:covered-table-cell table:number-columns-repeated="11"/>
          <table:table-cell table:number-columns-repeated="16372"/>
        </table:table-row>
        <table:table-row table:style-name="ro11">
          <table:table-cell table:style-name="ce21">
            <draw:custom-shape svg:x="0.11111in" svg:y="0.10185in" svg:width="4.8287in" svg:height="1.12732in" draw:z-index="2" draw:id="id1" draw:style-name="a3" draw:name="tile_base_0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 table:style-name="ce21"/>
          <table:table-cell table:style-name="ce21">
            <draw:custom-shape svg:x="0.13889in" svg:y="0.10185in" svg:width="3.71528in" svg:height="1.12732in" draw:z-index="8" draw:id="id7" draw:style-name="a19" draw:name="tile_base_1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 table:style-name="ce21"/>
          <table:table-cell table:style-name="ce21">
            <draw:custom-shape svg:x="0.16667in" svg:y="0.10185in" svg:width="3.71528in" svg:height="1.12732in" draw:z-index="14" draw:id="id13" draw:style-name="a35" draw:name="tile_base_2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5" table:style-name="ce21"/>
          <table:table-cell table:number-columns-repeated="16372"/>
        </table:table-row>
        <table:table-row table:style-name="ro12">
          <table:table-cell table:style-name="ce21">
            <draw:custom-shape svg:x="0.11111in" svg:y="0.06944in" svg:width="0.06944in" svg:height="0.97222in" draw:z-index="3" draw:id="id2" draw:style-name="a6" draw:name="tile_strip_0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z-index="5" draw:id="id4" draw:style-name="a10" draw:name="tile_lab_0" svg:x="0.97222in" svg:y="0.13889in" svg:width="3.9537in" svg:height="0.19444in">
              <draw:text-box>
                <text:p text:style-name="a9" text:class-names="" text:cond-style-name=""><text:span text:style-name="a8" text:class-names="">FY2025 REVENUE</text:span></text:p>
              </draw:text-box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11" draw:id="id10" draw:style-name="a26" draw:name="tile_lab_1" svg:x="1in" svg:y="0.13889in" svg:width="2.7037in" svg:height="0.19444in">
              <draw:text-box>
                <text:p text:style-name="a25" text:class-names="" text:cond-style-name=""><text:span text:style-name="a24" text:class-names="">NET INCOME</text:span></text:p>
              </draw:text-box>
              <svg:title/>
              <svg:desc/>
            </draw:frame>
            <draw:custom-shape svg:x="0.13889in" svg:y="0.06944in" svg:width="0.06944in" svg:height="0.97222in" draw:z-index="9" draw:id="id8" draw:style-name="a22" draw:name="tile_strip_1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 table:style-name="ce21"/>
          <table:table-cell table:style-name="ce21">
            <draw:frame draw:z-index="17" draw:id="id16" draw:style-name="a42" draw:name="tile_lab_2" svg:x="1.02778in" svg:y="0.13889in" svg:width="2.7037in" svg:height="0.19444in">
              <draw:text-box>
                <text:p text:style-name="a41" text:class-names="" text:cond-style-name=""><text:span text:style-name="a40" text:class-names="">GROSS MARGIN</text:span></text:p>
              </draw:text-box>
              <svg:title/>
              <svg:desc/>
            </draw:frame>
            <draw:custom-shape svg:x="0.16667in" svg:y="0.06944in" svg:width="0.06944in" svg:height="0.97222in" draw:z-index="15" draw:id="id14" draw:style-name="a38" draw:name="tile_strip_2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5" table:style-name="ce21"/>
          <table:table-cell table:number-columns-repeated="16372"/>
        </table:table-row>
        <table:table-row table:style-name="ro12">
          <table:table-cell table:style-name="ce21">
            <draw:frame draw:z-index="6" draw:id="id5" draw:style-name="a13" draw:name="tile_val_0" svg:x="0.95833in" svg:y="0.18056in" svg:width="3.98148in" svg:height="0.36111in">
              <draw:text-box>
                <text:p text:style-name="a12" text:class-names="" text:cond-style-name=""><text:span text:style-name="a11" text:class-names="">$416B</text:span></text:p>
              </draw:text-box>
              <svg:title/>
              <svg:desc/>
            </draw:frame>
            <draw:frame draw:z-index="4" draw:id="id3" draw:style-name="a7" draw:name="tile_icon_0" svg:x="0.30556in" svg:y="0.05556in" svg:width="0.55556in" svg:height="0.55556in" style:rel-width="scale" style:rel-height="scale">
              <draw:image xlink:href="media/image2.tmp" xlink:type="simple" xlink:show="embed" xlink:actuate="onLoad"/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10" draw:id="id9" draw:style-name="a23" draw:name="tile_icon_1" svg:x="0.33333in" svg:y="0.05556in" svg:width="0.55556in" svg:height="0.55556in" style:rel-width="scale" style:rel-height="scale">
              <draw:image xlink:href="media/image3.tmp" xlink:type="simple" xlink:show="embed" xlink:actuate="onLoad"/>
              <svg:title/>
              <svg:desc/>
            </draw:frame>
            <draw:frame draw:z-index="12" draw:id="id11" draw:style-name="a29" draw:name="tile_val_1" svg:x="0.98611in" svg:y="0.18056in" svg:width="2.73148in" svg:height="0.36111in">
              <draw:text-box>
                <text:p text:style-name="a28" text:class-names="" text:cond-style-name=""><text:span text:style-name="a27" text:class-names="">$112B</text:span></text:p>
              </draw:text-box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16" draw:id="id15" draw:style-name="a39" draw:name="tile_icon_2" svg:x="0.36111in" svg:y="0.05556in" svg:width="0.55556in" svg:height="0.55556in" style:rel-width="scale" style:rel-height="scale">
              <draw:image xlink:href="media/image4.tmp" xlink:type="simple" xlink:show="embed" xlink:actuate="onLoad"/>
              <svg:title/>
              <svg:desc/>
            </draw:frame>
            <draw:frame draw:z-index="18" draw:id="id17" draw:style-name="a45" draw:name="tile_val_2" svg:x="1.01389in" svg:y="0.18056in" svg:width="2.73148in" svg:height="0.36111in">
              <draw:text-box>
                <text:p text:style-name="a44" text:class-names="" text:cond-style-name=""><text:span text:style-name="a43" text:class-names="">46.9%</text:span></text:p>
              </draw:text-box>
              <svg:title/>
              <svg:desc/>
            </draw:frame>
          </table:table-cell>
          <table:table-cell table:number-columns-repeated="5" table:style-name="ce21"/>
          <table:table-cell table:number-columns-repeated="16372"/>
        </table:table-row>
        <table:table-row table:style-name="ro12">
          <table:table-cell table:number-columns-repeated="12" table:style-name="ce21"/>
          <table:table-cell table:number-columns-repeated="16372"/>
        </table:table-row>
        <table:table-row table:style-name="ro12">
          <table:table-cell table:style-name="ce21">
            <draw:frame draw:z-index="7" draw:id="id6" draw:style-name="a16" draw:name="tile_sub_0" svg:x="0.97222in" svg:y="0.16667in" svg:width="3.96759in" svg:height="0.19444in">
              <draw:text-box>
                <text:p text:style-name="a15" text:class-names="" text:cond-style-name=""><text:span text:style-name="a14" text:class-names="">▲ 6.4% vs FY24</text:span></text:p>
              </draw:text-box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13" draw:id="id12" draw:style-name="a32" draw:name="tile_sub_1" svg:x="1in" svg:y="0.16667in" svg:width="2.73148in" svg:height="0.19444in">
              <draw:text-box>
                <text:p text:style-name="a31" text:class-names="" text:cond-style-name=""><text:span text:style-name="a30" text:class-names="">▲ 19.5% vs FY24</text:span></text:p>
              </draw:text-box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19" draw:id="id18" draw:style-name="a48" draw:name="tile_sub_2" svg:x="1.02778in" svg:y="0.16667in" svg:width="2.73148in" svg:height="0.19444in">
              <draw:text-box>
                <text:p text:style-name="a47" text:class-names="" text:cond-style-name=""><text:span text:style-name="a46" text:class-names="">▲ 0.7pp vs FY24</text:span></text:p>
              </draw:text-box>
              <svg:title/>
              <svg:desc/>
            </draw:frame>
          </table:table-cell>
          <table:table-cell table:number-columns-repeated="5" table:style-name="ce21"/>
          <table:table-cell table:number-columns-repeated="16372"/>
        </table:table-row>
        <table:table-row table:number-rows-repeated="2" table:style-name="ro12">
          <table:table-cell table:number-columns-repeated="12" table:style-name="ce21"/>
          <table:table-cell table:number-columns-repeated="16372"/>
        </table:table-row>
        <table:table-row table:style-name="ro13">
          <table:table-cell table:style-name="ce21">
            <draw:custom-shape svg:x="0.11111in" svg:y="0.125in" svg:width="0.06944in" svg:height="0.99537in" draw:z-index="21" draw:id="id20" draw:style-name="a54" draw:name="tile_strip_3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z-index="23" draw:id="id22" draw:style-name="a58" draw:name="tile_lab_3" svg:x="0.97222in" svg:y="0.19444in" svg:width="3.9537in" svg:height="0.20023in">
              <draw:text-box>
                <text:p text:style-name="a57" text:class-names="" text:cond-style-name=""><text:span text:style-name="a56" text:class-names="">FREE CASH FLOW</text:span></text:p>
              </draw:text-box>
              <svg:title/>
              <svg:desc/>
            </draw:frame>
            <draw:custom-shape svg:x="0.11111in" svg:y="0.04167in" svg:width="4.8287in" svg:height="1.16204in" draw:z-index="20" draw:id="id19" draw:style-name="a51" draw:name="tile_base_3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 table:style-name="ce21"/>
          <table:table-cell table:style-name="ce21">
            <draw:custom-shape svg:x="0.13889in" svg:y="0.04167in" svg:width="3.71528in" svg:height="1.16204in" draw:z-index="26" draw:id="id25" draw:style-name="a67" draw:name="tile_base_4">
              <svg:title/>
              <svg:desc/>
              <text:p text:style-name="a66" text:class-names="" text:cond-style-name=""><text:span text:style-name="a6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0.13889in" svg:y="0.125in" svg:width="0.06944in" svg:height="0.99537in" draw:z-index="27" draw:id="id26" draw:style-name="a70" draw:name="tile_strip_4">
              <svg:title/>
              <svg:desc/>
              <text:p text:style-name="a69" text:class-names="" text:cond-style-name=""><text:span text:style-name="a6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z-index="29" draw:id="id28" draw:style-name="a74" draw:name="tile_lab_4" svg:x="1in" svg:y="0.19444in" svg:width="2.7037in" svg:height="0.20023in">
              <draw:text-box>
                <text:p text:style-name="a73" text:class-names="" text:cond-style-name=""><text:span text:style-name="a72" text:class-names="">CAPITAL RETURNED</text:span></text:p>
              </draw:text-box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35" draw:id="id34" draw:style-name="a90" draw:name="tile_lab_5" svg:x="1.02778in" svg:y="0.19444in" svg:width="2.7037in" svg:height="0.20023in">
              <draw:text-box>
                <text:p text:style-name="a89" text:class-names="" text:cond-style-name=""><text:span text:style-name="a88" text:class-names="">DILUTED EPS</text:span></text:p>
              </draw:text-box>
              <svg:title/>
              <svg:desc/>
            </draw:frame>
            <draw:custom-shape svg:x="0.16667in" svg:y="0.125in" svg:width="0.06944in" svg:height="0.99537in" draw:z-index="33" draw:id="id32" draw:style-name="a86" draw:name="tile_strip_5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0.16667in" svg:y="0.04167in" svg:width="3.71528in" svg:height="1.16204in" draw:z-index="32" draw:id="id31" draw:style-name="a83" draw:name="tile_base_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5" table:style-name="ce21"/>
          <table:table-cell table:number-columns-repeated="16372"/>
        </table:table-row>
        <table:table-row table:style-name="ro13">
          <table:table-cell table:style-name="ce21">
            <draw:frame draw:z-index="24" draw:id="id23" draw:style-name="a61" draw:name="tile_val_3" svg:x="0.95833in" svg:y="0.18982in" svg:width="3.98148in" svg:height="0.37268in">
              <draw:text-box>
                <text:p text:style-name="a60" text:class-names="" text:cond-style-name=""><text:span text:style-name="a59" text:class-names="">$98.8B</text:span></text:p>
              </draw:text-box>
              <svg:title/>
              <svg:desc/>
            </draw:frame>
            <draw:frame draw:z-index="22" draw:id="id21" draw:style-name="a55" draw:name="tile_icon_3" svg:x="0.30556in" svg:y="0.06482in" svg:width="0.55556in" svg:height="0.56713in" style:rel-width="scale" style:rel-height="scale">
              <draw:image xlink:href="media/image5.tmp" xlink:type="simple" xlink:show="embed" xlink:actuate="onLoad"/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28" draw:id="id27" draw:style-name="a71" draw:name="tile_icon_4" svg:x="0.33333in" svg:y="0.06482in" svg:width="0.55556in" svg:height="0.56713in" style:rel-width="scale" style:rel-height="scale">
              <draw:image xlink:href="media/image6.tmp" xlink:type="simple" xlink:show="embed" xlink:actuate="onLoad"/>
              <svg:title/>
              <svg:desc/>
            </draw:frame>
            <draw:frame draw:z-index="30" draw:id="id29" draw:style-name="a77" draw:name="tile_val_4" svg:x="0.98611in" svg:y="0.18982in" svg:width="2.73148in" svg:height="0.37268in">
              <draw:text-box>
                <text:p text:style-name="a76" text:class-names="" text:cond-style-name=""><text:span text:style-name="a75" text:class-names="">$106B</text:span></text:p>
              </draw:text-box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34" draw:id="id33" draw:style-name="a87" draw:name="tile_icon_5" svg:x="0.36111in" svg:y="0.06482in" svg:width="0.55556in" svg:height="0.56713in" style:rel-width="scale" style:rel-height="scale">
              <draw:image xlink:href="media/image7.tmp" xlink:type="simple" xlink:show="embed" xlink:actuate="onLoad"/>
              <svg:title/>
              <svg:desc/>
            </draw:frame>
            <draw:frame draw:z-index="36" draw:id="id35" draw:style-name="a93" draw:name="tile_val_5" svg:x="1.01389in" svg:y="0.18982in" svg:width="2.73148in" svg:height="0.37268in">
              <draw:text-box>
                <text:p text:style-name="a92" text:class-names="" text:cond-style-name=""><text:span text:style-name="a91" text:class-names="">$7.46</text:span></text:p>
              </draw:text-box>
              <svg:title/>
              <svg:desc/>
            </draw:frame>
          </table:table-cell>
          <table:table-cell table:number-columns-repeated="5" table:style-name="ce21"/>
          <table:table-cell table:number-columns-repeated="16372"/>
        </table:table-row>
        <table:table-row table:style-name="ro13">
          <table:table-cell table:number-columns-repeated="12" table:style-name="ce21"/>
          <table:table-cell table:number-columns-repeated="16372"/>
        </table:table-row>
        <table:table-row table:style-name="ro13">
          <table:table-cell table:style-name="ce21">
            <draw:frame draw:z-index="25" draw:id="id24" draw:style-name="a64" draw:name="tile_sub_3" svg:x="0.97222in" svg:y="0.08333in" svg:width="3.96759in" svg:height="0.20023in">
              <draw:text-box>
                <text:p text:style-name="a63" text:class-names="" text:cond-style-name=""><text:span text:style-name="a62" text:class-names="">FY2025 (OCF − capex)</text:span></text:p>
              </draw:text-box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31" draw:id="id30" draw:style-name="a80" draw:name="tile_sub_4" svg:x="1in" svg:y="0.08333in" svg:width="2.73148in" svg:height="0.20023in">
              <draw:text-box>
                <text:p text:style-name="a79" text:class-names="" text:cond-style-name=""><text:span text:style-name="a78" text:class-names="">Dividends + buybacks</text:span></text:p>
              </draw:text-box>
              <svg:title/>
              <svg:desc/>
            </draw:frame>
          </table:table-cell>
          <table:table-cell table:number-columns-repeated="2" table:style-name="ce21"/>
          <table:table-cell table:style-name="ce21">
            <draw:frame draw:z-index="37" draw:id="id36" draw:style-name="a96" draw:name="tile_sub_5" svg:x="1.02778in" svg:y="0.08333in" svg:width="2.73148in" svg:height="0.20023in">
              <draw:text-box>
                <text:p text:style-name="a95" text:class-names="" text:cond-style-name=""><text:span text:style-name="a94" text:class-names="">▲ 22.7% vs FY24</text:span></text:p>
              </draw:text-box>
              <svg:title/>
              <svg:desc/>
            </draw:frame>
          </table:table-cell>
          <table:table-cell table:number-columns-repeated="5" table:style-name="ce21"/>
          <table:table-cell table:number-columns-repeated="16372"/>
        </table:table-row>
        <table:table-row table:style-name="ro13">
          <table:table-cell table:number-columns-repeated="12" table:style-name="ce21"/>
          <table:table-cell table:number-columns-repeated="16372"/>
        </table:table-row>
        <table:table-row table:style-name="ro14">
          <table:table-cell table:number-columns-repeated="12" table:style-name="ce21"/>
          <table:table-cell table:number-columns-repeated="16372"/>
        </table:table-row>
        <table:table-row table:style-name="ro9">
          <table:table-cell office:value-type="string" table:number-columns-spanned="12" table:number-rows-spanned="1" table:style-name="ce13">
            <text:p>Performance by Product Line <text:s/>($ in billions)</text:p>
          </table:table-cell>
          <table:covered-table-cell table:number-columns-repeated="11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35">
            <text:p>Product</text:p>
          </table:table-cell>
          <table:covered-table-cell table:number-columns-repeated="2"/>
          <table:table-cell office:value-type="string" table:style-name="ce37">
            <text:p>FY2021</text:p>
          </table:table-cell>
          <table:table-cell office:value-type="string" table:style-name="ce37">
            <text:p>FY2022</text:p>
          </table:table-cell>
          <table:table-cell office:value-type="string" table:style-name="ce37">
            <text:p>FY2023</text:p>
          </table:table-cell>
          <table:table-cell office:value-type="string" table:style-name="ce37">
            <text:p>FY2024</text:p>
          </table:table-cell>
          <table:table-cell office:value-type="string" table:style-name="ce37">
            <text:p>FY2025</text:p>
          </table:table-cell>
          <table:table-cell office:value-type="string" table:style-name="ce37">
            <text:p>YoY '25</text:p>
          </table:table-cell>
          <table:table-cell office:value-type="string" table:style-name="ce38">
            <text:p>21-'25 CAGR</text:p>
          </table:table-cell>
          <table:table-cell office:value-type="string" table:style-name="ce39">
            <text:p>% Rev</text:p>
          </table:table-cell>
          <table:table-cell table:style-name="ce23"/>
          <table:table-cell table:number-columns-repeated="16372"/>
        </table:table-row>
        <table:table-row table:style-name="ro8">
          <table:table-cell office:value-type="string" office:string-value="iPhone" table:formula="of:=[Analysis.A6]" table:number-columns-spanned="3" table:number-rows-spanned="1" table:style-name="ce40">
            <text:p>iPhone</text:p>
          </table:table-cell>
          <table:covered-table-cell table:number-columns-repeated="2"/>
          <table:table-cell office:value-type="float" office:value="191973" table:formula="of:=[Analysis.B6]" table:style-name="ce97">
            <text:p>$192.0B</text:p>
          </table:table-cell>
          <table:table-cell office:value-type="float" office:value="205489" table:formula="of:=[Analysis.C6]" table:style-name="ce97">
            <text:p>$205.5B</text:p>
          </table:table-cell>
          <table:table-cell office:value-type="float" office:value="200583" table:formula="of:=[Analysis.D6]" table:style-name="ce97">
            <text:p>$200.6B</text:p>
          </table:table-cell>
          <table:table-cell office:value-type="float" office:value="201183" table:formula="of:=[Analysis.E6]" table:style-name="ce97">
            <text:p>$201.2B</text:p>
          </table:table-cell>
          <table:table-cell office:value-type="float" office:value="209586" table:formula="of:=[Analysis.F6]" table:style-name="ce97">
            <text:p>$209.6B</text:p>
          </table:table-cell>
          <table:table-cell office:value-type="percentage" office:value="4.1767942619406195E-2" table:formula="of:=[Analysis.G6]" table:style-name="ce158">
            <text:p>4.2%</text:p>
          </table:table-cell>
          <table:table-cell office:value-type="percentage" office:value="2.2187414182641252E-2" table:formula="of:=[Analysis.H6]" table:style-name="ce158">
            <text:p>2.2%</text:p>
          </table:table-cell>
          <table:table-cell office:value-type="percentage" office:value="0.50361759030759734" table:formula="of:=[Analysis.I6]" table:style-name="ce43">
            <text:p>50.4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office:string-value="Mac" table:formula="of:=[Analysis.A7]" table:number-columns-spanned="3" table:number-rows-spanned="1" table:style-name="ce40">
            <text:p>Mac</text:p>
          </table:table-cell>
          <table:covered-table-cell table:number-columns-repeated="2"/>
          <table:table-cell office:value-type="float" office:value="35190" table:formula="of:=[Analysis.B7]" table:style-name="ce97">
            <text:p>$35.2B</text:p>
          </table:table-cell>
          <table:table-cell office:value-type="float" office:value="40177" table:formula="of:=[Analysis.C7]" table:style-name="ce97">
            <text:p>$40.2B</text:p>
          </table:table-cell>
          <table:table-cell office:value-type="float" office:value="29357" table:formula="of:=[Analysis.D7]" table:style-name="ce97">
            <text:p>$29.4B</text:p>
          </table:table-cell>
          <table:table-cell office:value-type="float" office:value="29984" table:formula="of:=[Analysis.E7]" table:style-name="ce97">
            <text:p>$30.0B</text:p>
          </table:table-cell>
          <table:table-cell office:value-type="float" office:value="33708" table:formula="of:=[Analysis.F7]" table:style-name="ce97">
            <text:p>$33.7B</text:p>
          </table:table-cell>
          <table:table-cell office:value-type="percentage" office:value="0.12419957310565644" table:formula="of:=[Analysis.G7]" table:style-name="ce158">
            <text:p>12.4%</text:p>
          </table:table-cell>
          <table:table-cell office:value-type="percentage" office:value="-1.0699042063201936E-2" table:formula="of:=[Analysis.H7]" table:style-name="ce158">
            <text:p>(1.1%)</text:p>
          </table:table-cell>
          <table:table-cell office:value-type="percentage" office:value="8.0997498564257586E-2" table:formula="of:=[Analysis.I7]" table:style-name="ce43">
            <text:p>8.1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office:string-value="iPad" table:formula="of:=[Analysis.A8]" table:number-columns-spanned="3" table:number-rows-spanned="1" table:style-name="ce40">
            <text:p>iPad</text:p>
          </table:table-cell>
          <table:covered-table-cell table:number-columns-repeated="2"/>
          <table:table-cell office:value-type="float" office:value="31862" table:formula="of:=[Analysis.B8]" table:style-name="ce97">
            <text:p>$31.9B</text:p>
          </table:table-cell>
          <table:table-cell office:value-type="float" office:value="29292" table:formula="of:=[Analysis.C8]" table:style-name="ce97">
            <text:p>$29.3B</text:p>
          </table:table-cell>
          <table:table-cell office:value-type="float" office:value="28300" table:formula="of:=[Analysis.D8]" table:style-name="ce97">
            <text:p>$28.3B</text:p>
          </table:table-cell>
          <table:table-cell office:value-type="float" office:value="26694" table:formula="of:=[Analysis.E8]" table:style-name="ce97">
            <text:p>$26.7B</text:p>
          </table:table-cell>
          <table:table-cell office:value-type="float" office:value="28023" table:formula="of:=[Analysis.F8]" table:style-name="ce97">
            <text:p>$28.0B</text:p>
          </table:table-cell>
          <table:table-cell office:value-type="percentage" office:value="4.9786468869408962E-2" table:formula="of:=[Analysis.G8]" table:style-name="ce158">
            <text:p>5.0%</text:p>
          </table:table-cell>
          <table:table-cell office:value-type="percentage" office:value="-3.1587473645362962E-2" table:formula="of:=[Analysis.H8]" table:style-name="ce158">
            <text:p>(3.2%)</text:p>
          </table:table-cell>
          <table:table-cell office:value-type="percentage" office:value="6.7336920086216626E-2" table:formula="of:=[Analysis.I8]" table:style-name="ce43">
            <text:p>6.7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office:string-value="Wearables, Home &amp; Accessories" table:formula="of:=[Analysis.A9]" table:number-columns-spanned="3" table:number-rows-spanned="1" table:style-name="ce40">
            <text:p>Wearables, Home &amp; Accessories</text:p>
          </table:table-cell>
          <table:covered-table-cell table:number-columns-repeated="2"/>
          <table:table-cell office:value-type="float" office:value="38367" table:formula="of:=[Analysis.B9]" table:style-name="ce97">
            <text:p>$38.4B</text:p>
          </table:table-cell>
          <table:table-cell office:value-type="float" office:value="41241" table:formula="of:=[Analysis.C9]" table:style-name="ce97">
            <text:p>$41.2B</text:p>
          </table:table-cell>
          <table:table-cell office:value-type="float" office:value="39845" table:formula="of:=[Analysis.D9]" table:style-name="ce97">
            <text:p>$39.8B</text:p>
          </table:table-cell>
          <table:table-cell office:value-type="float" office:value="37005" table:formula="of:=[Analysis.E9]" table:style-name="ce97">
            <text:p>$37.0B</text:p>
          </table:table-cell>
          <table:table-cell office:value-type="float" office:value="35686" table:formula="of:=[Analysis.F9]" table:style-name="ce97">
            <text:p>$35.7B</text:p>
          </table:table-cell>
          <table:table-cell office:value-type="percentage" office:value="-3.5643831914606183E-2" table:formula="of:=[Analysis.G9]" table:style-name="ce158">
            <text:p>(3.6%)</text:p>
          </table:table-cell>
          <table:table-cell office:value-type="percentage" office:value="-1.7946817760600586E-2" table:formula="of:=[Analysis.H9]" table:style-name="ce158">
            <text:p>(1.8%)</text:p>
          </table:table-cell>
          <table:table-cell office:value-type="percentage" office:value="8.5750466766467789E-2" table:formula="of:=[Analysis.I9]" table:style-name="ce43">
            <text:p>8.6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office:string-value="Services" table:formula="of:=[Analysis.A10]" table:number-columns-spanned="3" table:number-rows-spanned="1" table:style-name="ce40">
            <text:p>Services</text:p>
          </table:table-cell>
          <table:covered-table-cell table:number-columns-repeated="2"/>
          <table:table-cell office:value-type="float" office:value="68425" table:formula="of:=[Analysis.B10]" table:style-name="ce97">
            <text:p>$68.4B</text:p>
          </table:table-cell>
          <table:table-cell office:value-type="float" office:value="78129" table:formula="of:=[Analysis.C10]" table:style-name="ce97">
            <text:p>$78.1B</text:p>
          </table:table-cell>
          <table:table-cell office:value-type="float" office:value="85200" table:formula="of:=[Analysis.D10]" table:style-name="ce97">
            <text:p>$85.2B</text:p>
          </table:table-cell>
          <table:table-cell office:value-type="float" office:value="96169" table:formula="of:=[Analysis.E10]" table:style-name="ce97">
            <text:p>$96.2B</text:p>
          </table:table-cell>
          <table:table-cell office:value-type="float" office:value="109158" table:formula="of:=[Analysis.F10]" table:style-name="ce97">
            <text:p>$109.2B</text:p>
          </table:table-cell>
          <table:table-cell office:value-type="percentage" office:value="0.13506431386413498" table:formula="of:=[Analysis.G10]" table:style-name="ce158">
            <text:p>13.5%</text:p>
          </table:table-cell>
          <table:table-cell office:value-type="percentage" office:value="0.12385476417353836" table:formula="of:=[Analysis.H10]" table:style-name="ce158">
            <text:p>12.4%</text:p>
          </table:table-cell>
          <table:table-cell office:value-type="percentage" office:value="0.26229752427546071" table:formula="of:=[Analysis.I10]" table:style-name="ce43">
            <text:p>26.2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365817" table:formula="of:=[Analysis.B11]" table:style-name="ce98">
            <text:p>$365.8B</text:p>
          </table:table-cell>
          <table:table-cell office:value-type="float" office:value="394328" table:formula="of:=[Analysis.C11]" table:style-name="ce98">
            <text:p>$394.3B</text:p>
          </table:table-cell>
          <table:table-cell office:value-type="float" office:value="383285" table:formula="of:=[Analysis.D11]" table:style-name="ce98">
            <text:p>$383.3B</text:p>
          </table:table-cell>
          <table:table-cell office:value-type="float" office:value="391035" table:formula="of:=[Analysis.E11]" table:style-name="ce98">
            <text:p>$391.0B</text:p>
          </table:table-cell>
          <table:table-cell office:value-type="float" office:value="416161" table:formula="of:=[Analysis.F11]" table:style-name="ce98">
            <text:p>$416.2B</text:p>
          </table:table-cell>
          <table:table-cell office:value-type="percentage" office:value="6.425511782832749E-2" table:formula="of:=[Analysis.G11]" table:style-name="ce46">
            <text:p>6.4%</text:p>
          </table:table-cell>
          <table:table-cell office:value-type="percentage" office:value="3.275991627577457E-2" table:formula="of:=[Analysis.H11]" table:style-name="ce46">
            <text:p>3.3%</text:p>
          </table:table-cell>
          <table:table-cell office:value-type="percentage" office:value="1" table:formula="of:=[Analysis.I11]" table:style-name="ce47">
            <text:p>100.0%</text:p>
          </table:table-cell>
          <table:table-cell table:style-name="ce24"/>
          <table:table-cell table:number-columns-repeated="16372"/>
        </table:table-row>
        <table:table-row table:style-name="ro11">
          <table:table-cell table:number-columns-repeated="12" table:style-name="ce22"/>
          <table:table-cell table:number-columns-repeated="16372"/>
        </table:table-row>
        <table:table-row table:style-name="ro9">
          <table:table-cell office:value-type="string" table:number-columns-spanned="12" table:number-rows-spanned="1" table:style-name="ce14">
            <text:p>Performance by Geographic Segment <text:s/>($ in billions)</text:p>
          </table:table-cell>
          <table:covered-table-cell table:number-columns-repeated="11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35">
            <text:p>Segment</text:p>
          </table:table-cell>
          <table:covered-table-cell table:number-columns-repeated="2"/>
          <table:table-cell office:value-type="string" table:style-name="ce37">
            <text:p>FY2021</text:p>
          </table:table-cell>
          <table:table-cell office:value-type="string" table:style-name="ce37">
            <text:p>FY2022</text:p>
          </table:table-cell>
          <table:table-cell office:value-type="string" table:style-name="ce37">
            <text:p>FY2023</text:p>
          </table:table-cell>
          <table:table-cell office:value-type="string" table:style-name="ce37">
            <text:p>FY2024</text:p>
          </table:table-cell>
          <table:table-cell office:value-type="string" table:style-name="ce37">
            <text:p>FY2025</text:p>
          </table:table-cell>
          <table:table-cell office:value-type="string" table:style-name="ce37">
            <text:p>YoY '25</text:p>
          </table:table-cell>
          <table:table-cell office:value-type="string" table:style-name="ce38">
            <text:p>21-'25 CAGR</text:p>
          </table:table-cell>
          <table:table-cell office:value-type="string" table:style-name="ce39">
            <text:p>% Rev</text:p>
          </table:table-cell>
          <table:table-cell table:style-name="ce23"/>
          <table:table-cell table:number-columns-repeated="16372"/>
        </table:table-row>
        <table:table-row table:style-name="ro8">
          <table:table-cell office:value-type="string" office:string-value="Americas" table:formula="of:=[Analysis.A15]" table:number-columns-spanned="3" table:number-rows-spanned="1" table:style-name="ce40">
            <text:p>Americas</text:p>
          </table:table-cell>
          <table:covered-table-cell table:number-columns-repeated="2"/>
          <table:table-cell office:value-type="float" office:value="153306" table:formula="of:=[Analysis.B15]" table:style-name="ce97">
            <text:p>$153.3B</text:p>
          </table:table-cell>
          <table:table-cell office:value-type="float" office:value="169658" table:formula="of:=[Analysis.C15]" table:style-name="ce97">
            <text:p>$169.7B</text:p>
          </table:table-cell>
          <table:table-cell office:value-type="float" office:value="162560" table:formula="of:=[Analysis.D15]" table:style-name="ce97">
            <text:p>$162.6B</text:p>
          </table:table-cell>
          <table:table-cell office:value-type="float" office:value="167045" table:formula="of:=[Analysis.E15]" table:style-name="ce97">
            <text:p>$167.0B</text:p>
          </table:table-cell>
          <table:table-cell office:value-type="float" office:value="178353" table:formula="of:=[Analysis.F15]" table:style-name="ce97">
            <text:p>$178.4B</text:p>
          </table:table-cell>
          <table:table-cell office:value-type="percentage" office:value="6.7694333862132972E-2" table:formula="of:=[Analysis.G15]" table:style-name="ce157">
            <text:p>6.8%</text:p>
          </table:table-cell>
          <table:table-cell office:value-type="percentage" office:value="3.8556950598651607E-2" table:formula="of:=[Analysis.H15]" table:style-name="ce157">
            <text:p>3.9%</text:p>
          </table:table-cell>
          <table:table-cell office:value-type="percentage" office:value="0.42856730928655018" table:formula="of:=[Analysis.I15]" table:style-name="ce43">
            <text:p>42.9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office:string-value="Europe" table:formula="of:=[Analysis.A16]" table:number-columns-spanned="3" table:number-rows-spanned="1" table:style-name="ce40">
            <text:p>Europe</text:p>
          </table:table-cell>
          <table:covered-table-cell table:number-columns-repeated="2"/>
          <table:table-cell office:value-type="float" office:value="89307" table:formula="of:=[Analysis.B16]" table:style-name="ce97">
            <text:p>$89.3B</text:p>
          </table:table-cell>
          <table:table-cell office:value-type="float" office:value="95118" table:formula="of:=[Analysis.C16]" table:style-name="ce97">
            <text:p>$95.1B</text:p>
          </table:table-cell>
          <table:table-cell office:value-type="float" office:value="94294" table:formula="of:=[Analysis.D16]" table:style-name="ce97">
            <text:p>$94.3B</text:p>
          </table:table-cell>
          <table:table-cell office:value-type="float" office:value="101328" table:formula="of:=[Analysis.E16]" table:style-name="ce97">
            <text:p>$101.3B</text:p>
          </table:table-cell>
          <table:table-cell office:value-type="float" office:value="111032" table:formula="of:=[Analysis.F16]" table:style-name="ce97">
            <text:p>$111.0B</text:p>
          </table:table-cell>
          <table:table-cell office:value-type="percentage" office:value="9.5768198326227738E-2" table:formula="of:=[Analysis.G16]" table:style-name="ce157">
            <text:p>9.6%</text:p>
          </table:table-cell>
          <table:table-cell office:value-type="percentage" office:value="5.5943461860896493E-2" table:formula="of:=[Analysis.H16]" table:style-name="ce157">
            <text:p>5.6%</text:p>
          </table:table-cell>
          <table:table-cell office:value-type="percentage" office:value="0.26680058919504712" table:formula="of:=[Analysis.I16]" table:style-name="ce43">
            <text:p>26.7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office:string-value="Greater China" table:formula="of:=[Analysis.A17]" table:number-columns-spanned="3" table:number-rows-spanned="1" table:style-name="ce40">
            <text:p>Greater China</text:p>
          </table:table-cell>
          <table:covered-table-cell table:number-columns-repeated="2"/>
          <table:table-cell office:value-type="float" office:value="68366" table:formula="of:=[Analysis.B17]" table:style-name="ce97">
            <text:p>$68.4B</text:p>
          </table:table-cell>
          <table:table-cell office:value-type="float" office:value="74200" table:formula="of:=[Analysis.C17]" table:style-name="ce97">
            <text:p>$74.2B</text:p>
          </table:table-cell>
          <table:table-cell office:value-type="float" office:value="72559" table:formula="of:=[Analysis.D17]" table:style-name="ce97">
            <text:p>$72.6B</text:p>
          </table:table-cell>
          <table:table-cell office:value-type="float" office:value="66952" table:formula="of:=[Analysis.E17]" table:style-name="ce97">
            <text:p>$67.0B</text:p>
          </table:table-cell>
          <table:table-cell office:value-type="float" office:value="64377" table:formula="of:=[Analysis.F17]" table:style-name="ce97">
            <text:p>$64.4B</text:p>
          </table:table-cell>
          <table:table-cell office:value-type="percentage" office:value="-3.8460389532799621E-2" table:formula="of:=[Analysis.G17]" table:style-name="ce157">
            <text:p>(3.8%)</text:p>
          </table:table-cell>
          <table:table-cell office:value-type="percentage" office:value="-1.4917415940556178E-2" table:formula="of:=[Analysis.H17]" table:style-name="ce157">
            <text:p>(1.5%)</text:p>
          </table:table-cell>
          <table:table-cell office:value-type="percentage" office:value="0.15469253486030646" table:formula="of:=[Analysis.I17]" table:style-name="ce43">
            <text:p>15.5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office:string-value="Japan" table:formula="of:=[Analysis.A18]" table:number-columns-spanned="3" table:number-rows-spanned="1" table:style-name="ce40">
            <text:p>Japan</text:p>
          </table:table-cell>
          <table:covered-table-cell table:number-columns-repeated="2"/>
          <table:table-cell office:value-type="float" office:value="28482" table:formula="of:=[Analysis.B18]" table:style-name="ce97">
            <text:p>$28.5B</text:p>
          </table:table-cell>
          <table:table-cell office:value-type="float" office:value="25977" table:formula="of:=[Analysis.C18]" table:style-name="ce97">
            <text:p>$26.0B</text:p>
          </table:table-cell>
          <table:table-cell office:value-type="float" office:value="24257" table:formula="of:=[Analysis.D18]" table:style-name="ce97">
            <text:p>$24.3B</text:p>
          </table:table-cell>
          <table:table-cell office:value-type="float" office:value="25052" table:formula="of:=[Analysis.E18]" table:style-name="ce97">
            <text:p>$25.1B</text:p>
          </table:table-cell>
          <table:table-cell office:value-type="float" office:value="28703" table:formula="of:=[Analysis.F18]" table:style-name="ce97">
            <text:p>$28.7B</text:p>
          </table:table-cell>
          <table:table-cell office:value-type="percentage" office:value="0.14573686731598268" table:formula="of:=[Analysis.G18]" table:style-name="ce157">
            <text:p>14.6%</text:p>
          </table:table-cell>
          <table:table-cell office:value-type="percentage" office:value="1.9342026920357025E-3" table:formula="of:=[Analysis.H18]" table:style-name="ce157">
            <text:p>0.2%</text:p>
          </table:table-cell>
          <table:table-cell office:value-type="percentage" office:value="6.8970903087987576E-2" table:formula="of:=[Analysis.I18]" table:style-name="ce43">
            <text:p>6.9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office:string-value="Rest of Asia Pacific" table:formula="of:=[Analysis.A19]" table:number-columns-spanned="3" table:number-rows-spanned="1" table:style-name="ce40">
            <text:p>Rest of Asia Pacific</text:p>
          </table:table-cell>
          <table:covered-table-cell table:number-columns-repeated="2"/>
          <table:table-cell office:value-type="float" office:value="26356" table:formula="of:=[Analysis.B19]" table:style-name="ce97">
            <text:p>$26.4B</text:p>
          </table:table-cell>
          <table:table-cell office:value-type="float" office:value="29375" table:formula="of:=[Analysis.C19]" table:style-name="ce97">
            <text:p>$29.4B</text:p>
          </table:table-cell>
          <table:table-cell office:value-type="float" office:value="29615" table:formula="of:=[Analysis.D19]" table:style-name="ce97">
            <text:p>$29.6B</text:p>
          </table:table-cell>
          <table:table-cell office:value-type="float" office:value="30658" table:formula="of:=[Analysis.E19]" table:style-name="ce97">
            <text:p>$30.7B</text:p>
          </table:table-cell>
          <table:table-cell office:value-type="float" office:value="33696" table:formula="of:=[Analysis.F19]" table:style-name="ce97">
            <text:p>$33.7B</text:p>
          </table:table-cell>
          <table:table-cell office:value-type="percentage" office:value="9.909322199752113E-2" table:formula="of:=[Analysis.G19]" table:style-name="ce157">
            <text:p>9.9%</text:p>
          </table:table-cell>
          <table:table-cell office:value-type="percentage" office:value="6.3346271622837236E-2" table:formula="of:=[Analysis.H19]" table:style-name="ce157">
            <text:p>6.3%</text:p>
          </table:table-cell>
          <table:table-cell office:value-type="percentage" office:value="8.0968663570108679E-2" table:formula="of:=[Analysis.I19]" table:style-name="ce43">
            <text:p>8.1%</text:p>
          </table:table-cell>
          <table:table-cell table:style-name="ce24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365817" table:formula="of:=[Analysis.B20]" table:style-name="ce98">
            <text:p>$365.8B</text:p>
          </table:table-cell>
          <table:table-cell office:value-type="float" office:value="394328" table:formula="of:=[Analysis.C20]" table:style-name="ce98">
            <text:p>$394.3B</text:p>
          </table:table-cell>
          <table:table-cell office:value-type="float" office:value="383285" table:formula="of:=[Analysis.D20]" table:style-name="ce98">
            <text:p>$383.3B</text:p>
          </table:table-cell>
          <table:table-cell office:value-type="float" office:value="391035" table:formula="of:=[Analysis.E20]" table:style-name="ce98">
            <text:p>$391.0B</text:p>
          </table:table-cell>
          <table:table-cell office:value-type="float" office:value="416161" table:formula="of:=[Analysis.F20]" table:style-name="ce98">
            <text:p>$416.2B</text:p>
          </table:table-cell>
          <table:table-cell office:value-type="percentage" office:value="6.425511782832749E-2" table:formula="of:=[Analysis.G20]" table:style-name="ce46">
            <text:p>6.4%</text:p>
          </table:table-cell>
          <table:table-cell office:value-type="percentage" office:value="3.275991627577457E-2" table:formula="of:=[Analysis.H20]" table:style-name="ce46">
            <text:p>3.3%</text:p>
          </table:table-cell>
          <table:table-cell office:value-type="percentage" office:value="1" table:formula="of:=[Analysis.I20]" table:style-name="ce47">
            <text:p>100.0%</text:p>
          </table:table-cell>
          <table:table-cell table:style-name="ce24"/>
          <table:table-cell table:number-columns-repeated="16372"/>
        </table:table-row>
        <table:table-row table:style-name="ro11">
          <table:table-cell table:number-columns-repeated="12" table:style-name="ce22"/>
          <table:table-cell table:number-columns-repeated="16372" table:style-name="ce1"/>
        </table:table-row>
        <table:table-row table:style-name="ro9">
          <table:table-cell office:value-type="string" table:number-columns-spanned="12" table:number-rows-spanned="1" table:style-name="ce48">
            <text:p>Key Financial Ratios</text:p>
          </table:table-cell>
          <table:covered-table-cell table:number-columns-repeated="11"/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35">
            <text:p>Ratio</text:p>
          </table:table-cell>
          <table:covered-table-cell table:number-columns-repeated="2"/>
          <table:table-cell office:value-type="string" table:style-name="ce37">
            <text:p>FY2021</text:p>
          </table:table-cell>
          <table:table-cell office:value-type="string" table:style-name="ce37">
            <text:p>FY2022</text:p>
          </table:table-cell>
          <table:table-cell office:value-type="string" table:style-name="ce37">
            <text:p>FY2023</text:p>
          </table:table-cell>
          <table:table-cell office:value-type="string" table:style-name="ce37">
            <text:p>FY2024</text:p>
          </table:table-cell>
          <table:table-cell office:value-type="string" table:style-name="ce37">
            <text:p>FY2025</text:p>
          </table:table-cell>
          <table:table-cell table:number-columns-repeated="2" table:style-name="ce49"/>
          <table:table-cell table:style-name="ce50"/>
          <table:table-cell table:style-name="ce23"/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51">
            <text:p>Free cash flow margin</text:p>
          </table:table-cell>
          <table:covered-table-cell table:number-columns-repeated="2"/>
          <table:table-cell office:value-type="percentage" office:value="0.25409699385211731" table:formula="of:=[Analysis.B31]" table:style-name="ce53">
            <text:p>25.4%</text:p>
          </table:table-cell>
          <table:table-cell office:value-type="percentage" office:value="0.28261498042238947" table:formula="of:=[Analysis.C31]" table:style-name="ce53">
            <text:p>28.3%</text:p>
          </table:table-cell>
          <table:table-cell office:value-type="percentage" office:value="0.25981710737440805" table:formula="of:=[Analysis.D31]" table:style-name="ce53">
            <text:p>26.0%</text:p>
          </table:table-cell>
          <table:table-cell office:value-type="percentage" office:value="0.27825386474356517" table:formula="of:=[Analysis.E31]" table:style-name="ce53">
            <text:p>27.8%</text:p>
          </table:table-cell>
          <table:table-cell office:value-type="percentage" office:value="0.23732882225869315" table:formula="of:=[Analysis.F31]" table:style-name="ce53">
            <text:p>23.7%</text:p>
          </table:table-cell>
          <table:table-cell table:number-columns-repeated="2" table:style-name="ce54"/>
          <table:table-cell table:style-name="ce55"/>
          <table:table-cell table:style-name="ce24"/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51">
            <text:p>FCF / net income</text:p>
          </table:table-cell>
          <table:covered-table-cell table:number-columns-repeated="2"/>
          <table:table-cell office:value-type="percentage" office:value="0.98175961132234901" table:formula="of:=[Analysis.B32]" table:style-name="ce53">
            <text:p>98.2%</text:p>
          </table:table-cell>
          <table:table-cell office:value-type="percentage" office:value="1.1166297606284381" table:formula="of:=[Analysis.C32]" table:style-name="ce53">
            <text:p>111.7%</text:p>
          </table:table-cell>
          <table:table-cell office:value-type="percentage" office:value="1.0266920975308005" table:formula="of:=[Analysis.D32]" table:style-name="ce53">
            <text:p>102.7%</text:p>
          </table:table-cell>
          <table:table-cell office:value-type="percentage" office:value="1.1607813433472731" table:formula="of:=[Analysis.E32]" table:style-name="ce53">
            <text:p>116.1%</text:p>
          </table:table-cell>
          <table:table-cell office:value-type="percentage" office:value="0.88176948486742257" table:formula="of:=[Analysis.F32]" table:style-name="ce53">
            <text:p>88.2%</text:p>
          </table:table-cell>
          <table:table-cell table:number-columns-repeated="2" table:style-name="ce54"/>
          <table:table-cell table:style-name="ce55"/>
          <table:table-cell table:style-name="ce24"/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51">
            <text:p>Capital returned / FCF</text:p>
          </table:table-cell>
          <table:covered-table-cell table:number-columns-repeated="2"/>
          <table:table-cell office:value-type="percentage" office:value="1.0805245661786065" table:formula="of:=[Analysis.B33]" table:style-name="ce53">
            <text:p>108.1%</text:p>
          </table:table-cell>
          <table:table-cell office:value-type="percentage" office:value="0.93539298116525937" table:formula="of:=[Analysis.C33]" table:style-name="ce53">
            <text:p>93.5%</text:p>
          </table:table-cell>
          <table:table-cell office:value-type="percentage" office:value="0.9296172075835476" table:formula="of:=[Analysis.D33]" table:style-name="ce53">
            <text:p>93.0%</text:p>
          </table:table-cell>
          <table:table-cell office:value-type="percentage" office:value="1.0126462451864311" table:formula="of:=[Analysis.E33]" table:style-name="ce53">
            <text:p>101.3%</text:p>
          </table:table-cell>
          <table:table-cell office:value-type="percentage" office:value="1.0745694412101208" table:formula="of:=[Analysis.F33]" table:style-name="ce53">
            <text:p>107.5%</text:p>
          </table:table-cell>
          <table:table-cell table:number-columns-repeated="2" table:style-name="ce54"/>
          <table:table-cell table:style-name="ce55"/>
          <table:table-cell table:style-name="ce24"/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51">
            <text:p>Effective tax rate</text:p>
          </table:table-cell>
          <table:covered-table-cell table:number-columns-repeated="2"/>
          <table:table-cell office:value-type="percentage" office:value="0.13302260844085087" table:formula="of:=[Analysis.B34]" table:style-name="ce53">
            <text:p>13.3%</text:p>
          </table:table-cell>
          <table:table-cell office:value-type="percentage" office:value="0.16204461684424407" table:formula="of:=[Analysis.C34]" table:style-name="ce53">
            <text:p>16.2%</text:p>
          </table:table-cell>
          <table:table-cell office:value-type="percentage" office:value="0.14719174228036858" table:formula="of:=[Analysis.D34]" table:style-name="ce53">
            <text:p>14.7%</text:p>
          </table:table-cell>
          <table:table-cell office:value-type="percentage" office:value="0.24091185164189982" table:formula="of:=[Analysis.E34]" table:style-name="ce53">
            <text:p>24.1%</text:p>
          </table:table-cell>
          <table:table-cell office:value-type="percentage" office:value="0.15610002335586043" table:formula="of:=[Analysis.F34]" table:style-name="ce53">
            <text:p>15.6%</text:p>
          </table:table-cell>
          <table:table-cell table:number-columns-repeated="2" table:style-name="ce54"/>
          <table:table-cell table:style-name="ce55"/>
          <table:table-cell table:style-name="ce24"/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51">
            <text:p>Return on equity</text:p>
          </table:table-cell>
          <table:covered-table-cell table:number-columns-repeated="2"/>
          <table:table-cell office:value-type="string" office:string-value="—" table:formula="of:=[Analysis.B35]" table:style-name="ce53">
            <text:p>—</text:p>
          </table:table-cell>
          <table:table-cell office:value-type="string" office:string-value="—" table:formula="of:=[Analysis.C35]" table:style-name="ce53">
            <text:p>—</text:p>
          </table:table-cell>
          <table:table-cell office:value-type="string" office:string-value="—" table:formula="of:=[Analysis.D35]" table:style-name="ce53">
            <text:p>—</text:p>
          </table:table-cell>
          <table:table-cell office:value-type="percentage" office:value="1.6459350307287095" table:formula="of:=[Analysis.E35]" table:style-name="ce53">
            <text:p>164.6%</text:p>
          </table:table-cell>
          <table:table-cell office:value-type="percentage" office:value="1.5191298333175105" table:formula="of:=[Analysis.F35]" table:style-name="ce53">
            <text:p>151.9%</text:p>
          </table:table-cell>
          <table:table-cell table:number-columns-repeated="2" table:style-name="ce54"/>
          <table:table-cell table:style-name="ce55"/>
          <table:table-cell table:style-name="ce24"/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56">
            <text:p>Return on assets</text:p>
          </table:table-cell>
          <table:covered-table-cell table:number-columns-repeated="2"/>
          <table:table-cell office:value-type="string" office:string-value="—" table:formula="of:=[Analysis.B36]" table:style-name="ce58">
            <text:p>—</text:p>
          </table:table-cell>
          <table:table-cell office:value-type="string" office:string-value="—" table:formula="of:=[Analysis.C36]" table:style-name="ce58">
            <text:p>—</text:p>
          </table:table-cell>
          <table:table-cell office:value-type="string" office:string-value="—" table:formula="of:=[Analysis.D36]" table:style-name="ce58">
            <text:p>—</text:p>
          </table:table-cell>
          <table:table-cell office:value-type="percentage" office:value="0.25682503150857583" table:formula="of:=[Analysis.E36]" table:style-name="ce58">
            <text:p>25.7%</text:p>
          </table:table-cell>
          <table:table-cell office:value-type="percentage" office:value="0.31179625933565491" table:formula="of:=[Analysis.F36]" table:style-name="ce58">
            <text:p>31.2%</text:p>
          </table:table-cell>
          <table:table-cell table:number-columns-repeated="2" table:style-name="ce59"/>
          <table:table-cell table:style-name="ce60"/>
          <table:table-cell table:style-name="ce24"/>
          <table:table-cell table:number-columns-repeated="16372" table:style-name="ce1"/>
        </table:table-row>
        <table:table-row table:style-name="ro6">
          <table:table-cell table:number-columns-repeated="12" table:style-name="ce21"/>
          <table:table-cell table:number-columns-repeated="16372" table:style-name="ce1"/>
        </table:table-row>
        <table:table-row table:style-name="ro7">
          <table:table-cell office:value-type="string" table:number-columns-spanned="12" table:number-rows-spanned="1" table:style-name="ce17">
            <text:p>Visual Trends</text:p>
          </table:table-cell>
          <table:covered-table-cell table:number-columns-repeated="11"/>
          <table:table-cell table:number-columns-repeated="16372" table:style-name="ce1"/>
        </table:table-row>
        <table:table-row table:style-name="ro6">
          <table:table-cell table:style-name="ce21">
            <draw:frame draw:z-index="38" draw:id="id37" draw:style-name="a97" draw:name="Chart 75" svg:x="0.11111in" svg:y="0.08333in" svg:width="6.72917in" svg:height="3.4444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21"/>
          <table:table-cell table:style-name="ce21">
            <draw:frame draw:z-index="39" draw:id="id38" draw:style-name="a98" draw:name="Chart 76" svg:x="0.72222in" svg:y="0.08333in" svg:width="5.65278in" svg:height="3.4444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21"/>
          <table:table-cell table:style-name="ce21"/>
          <table:table-cell table:number-columns-repeated="2" table:style-name="ce21"/>
          <table:table-cell table:number-columns-repeated="16372" table:style-name="ce1"/>
        </table:table-row>
        <table:table-row table:style-name="ro6">
          <table:table-cell table:number-columns-repeated="12" table:style-name="ce21"/>
          <table:table-cell table:style-name="ce1"/>
          <table:table-cell office:value-type="string" table:style-name="ce15">
            <text:p>Product</text:p>
          </table:table-cell>
          <table:table-cell office:value-type="string" table:style-name="ce15">
            <text:p>FY2025</text:p>
          </table:table-cell>
          <table:table-cell table:style-name="ce1"/>
          <table:table-cell office:value-type="string" table:style-name="ce15">
            <text:p>Segment</text:p>
          </table:table-cell>
          <table:table-cell office:value-type="string" table:style-name="ce15">
            <text:p>FY2025</text:p>
          </table:table-cell>
          <table:table-cell table:style-name="ce1"/>
          <table:table-cell office:value-type="string" table:style-name="ce15">
            <text:p>Year</text:p>
          </table:table-cell>
          <table:table-cell office:value-type="string" table:style-name="ce15">
            <text:p>Free Cash Flow</text:p>
          </table:table-cell>
          <table:table-cell office:value-type="string" table:style-name="ce15">
            <text:p>Capital Returned</text:p>
          </table:table-cell>
          <table:table-cell table:number-columns-repeated="16362"/>
        </table:table-row>
        <table:table-row table:style-name="ro6">
          <table:table-cell table:number-columns-repeated="12" table:style-name="ce21"/>
          <table:table-cell table:style-name="ce1"/>
          <table:table-cell office:value-type="string" office:string-value="iPhone" table:formula="of:=[Raw_Data.A6]" table:style-name="ce1">
            <text:p>iPhone</text:p>
          </table:table-cell>
          <table:table-cell office:value-type="float" office:value="209586" table:formula="of:=[Raw_Data.F6]" table:style-name="ce20">
            <text:p>$2,09,586</text:p>
          </table:table-cell>
          <table:table-cell table:style-name="ce1"/>
          <table:table-cell office:value-type="string" office:string-value="Americas" table:formula="of:=[Raw_Data.A15]" table:style-name="ce1">
            <text:p>Americas</text:p>
          </table:table-cell>
          <table:table-cell office:value-type="float" office:value="178353" table:formula="of:=[Raw_Data.F15]" table:style-name="ce20">
            <text:p>$1,78,353</text:p>
          </table:table-cell>
          <table:table-cell table:style-name="ce1"/>
          <table:table-cell office:value-type="string" table:style-name="ce61">
            <text:p>FY2021</text:p>
          </table:table-cell>
          <table:table-cell office:value-type="float" office:value="92953" table:formula="of:=[Raw_Data.B36]" table:style-name="ce20">
            <text:p>$92,953</text:p>
          </table:table-cell>
          <table:table-cell office:value-type="float" office:value="100438" table:formula="of:=[Raw_Data.B39]" table:style-name="ce20">
            <text:p>$1,00,438</text:p>
          </table:table-cell>
          <table:table-cell table:number-columns-repeated="16362"/>
        </table:table-row>
        <table:table-row table:style-name="ro6">
          <table:table-cell table:number-columns-repeated="12" table:style-name="ce21"/>
          <table:table-cell table:style-name="ce1"/>
          <table:table-cell office:value-type="string" office:string-value="Mac" table:formula="of:=[Raw_Data.A7]" table:style-name="ce1">
            <text:p>Mac</text:p>
          </table:table-cell>
          <table:table-cell office:value-type="float" office:value="33708" table:formula="of:=[Raw_Data.F7]" table:style-name="ce20">
            <text:p>$33,708</text:p>
          </table:table-cell>
          <table:table-cell table:style-name="ce1"/>
          <table:table-cell office:value-type="string" office:string-value="Europe" table:formula="of:=[Raw_Data.A16]" table:style-name="ce1">
            <text:p>Europe</text:p>
          </table:table-cell>
          <table:table-cell office:value-type="float" office:value="111032" table:formula="of:=[Raw_Data.F16]" table:style-name="ce20">
            <text:p>$1,11,032</text:p>
          </table:table-cell>
          <table:table-cell table:style-name="ce1"/>
          <table:table-cell office:value-type="string" table:style-name="ce61">
            <text:p>FY2022</text:p>
          </table:table-cell>
          <table:table-cell office:value-type="float" office:value="111443" table:formula="of:=[Raw_Data.C36]" table:style-name="ce20">
            <text:p>$1,11,443</text:p>
          </table:table-cell>
          <table:table-cell office:value-type="float" office:value="104243" table:formula="of:=[Raw_Data.C39]" table:style-name="ce20">
            <text:p>$1,04,243</text:p>
          </table:table-cell>
          <table:table-cell table:number-columns-repeated="16362"/>
        </table:table-row>
        <table:table-row table:style-name="ro6">
          <table:table-cell table:number-columns-repeated="12" table:style-name="ce21"/>
          <table:table-cell table:style-name="ce1"/>
          <table:table-cell office:value-type="string" office:string-value="iPad" table:formula="of:=[Raw_Data.A8]" table:style-name="ce1">
            <text:p>iPad</text:p>
          </table:table-cell>
          <table:table-cell office:value-type="float" office:value="28023" table:formula="of:=[Raw_Data.F8]" table:style-name="ce20">
            <text:p>$28,023</text:p>
          </table:table-cell>
          <table:table-cell table:style-name="ce1"/>
          <table:table-cell office:value-type="string" office:string-value="Greater China" table:formula="of:=[Raw_Data.A17]" table:style-name="ce1">
            <text:p>Greater China</text:p>
          </table:table-cell>
          <table:table-cell office:value-type="float" office:value="64377" table:formula="of:=[Raw_Data.F17]" table:style-name="ce20">
            <text:p>$64,377</text:p>
          </table:table-cell>
          <table:table-cell table:style-name="ce1"/>
          <table:table-cell office:value-type="string" table:style-name="ce61">
            <text:p>FY2023</text:p>
          </table:table-cell>
          <table:table-cell office:value-type="float" office:value="99584" table:formula="of:=[Raw_Data.D36]" table:style-name="ce20">
            <text:p>$99,584</text:p>
          </table:table-cell>
          <table:table-cell office:value-type="float" office:value="92575" table:formula="of:=[Raw_Data.D39]" table:style-name="ce20">
            <text:p>$92,575</text:p>
          </table:table-cell>
          <table:table-cell table:number-columns-repeated="16362"/>
        </table:table-row>
        <table:table-row table:style-name="ro6">
          <table:table-cell table:number-columns-repeated="12" table:style-name="ce21"/>
          <table:table-cell table:style-name="ce1"/>
          <table:table-cell office:value-type="string" office:string-value="Wearables, Home &amp; Accessories" table:formula="of:=[Raw_Data.A9]" table:style-name="ce1">
            <text:p>Wearables, Home &amp; Accessories</text:p>
          </table:table-cell>
          <table:table-cell office:value-type="float" office:value="35686" table:formula="of:=[Raw_Data.F9]" table:style-name="ce20">
            <text:p>$35,686</text:p>
          </table:table-cell>
          <table:table-cell table:style-name="ce1"/>
          <table:table-cell office:value-type="string" office:string-value="Japan" table:formula="of:=[Raw_Data.A18]" table:style-name="ce1">
            <text:p>Japan</text:p>
          </table:table-cell>
          <table:table-cell office:value-type="float" office:value="28703" table:formula="of:=[Raw_Data.F18]" table:style-name="ce20">
            <text:p>$28,703</text:p>
          </table:table-cell>
          <table:table-cell table:style-name="ce1"/>
          <table:table-cell office:value-type="string" table:style-name="ce61">
            <text:p>FY2024</text:p>
          </table:table-cell>
          <table:table-cell office:value-type="float" office:value="108807" table:formula="of:=[Raw_Data.E36]" table:style-name="ce20">
            <text:p>$1,08,807</text:p>
          </table:table-cell>
          <table:table-cell office:value-type="float" office:value="110183" table:formula="of:=[Raw_Data.E39]" table:style-name="ce20">
            <text:p>$1,10,183</text:p>
          </table:table-cell>
          <table:table-cell table:number-columns-repeated="16362"/>
        </table:table-row>
        <table:table-row table:style-name="ro6">
          <table:table-cell table:number-columns-repeated="12" table:style-name="ce21"/>
          <table:table-cell table:style-name="ce1"/>
          <table:table-cell office:value-type="string" office:string-value="Services" table:formula="of:=[Raw_Data.A10]" table:style-name="ce1">
            <text:p>Services</text:p>
          </table:table-cell>
          <table:table-cell office:value-type="float" office:value="109158" table:formula="of:=[Raw_Data.F10]" table:style-name="ce20">
            <text:p>$1,09,158</text:p>
          </table:table-cell>
          <table:table-cell table:style-name="ce1"/>
          <table:table-cell office:value-type="string" office:string-value="Rest of Asia Pacific" table:formula="of:=[Raw_Data.A19]" table:style-name="ce1">
            <text:p>Rest of Asia Pacific</text:p>
          </table:table-cell>
          <table:table-cell office:value-type="float" office:value="33696" table:formula="of:=[Raw_Data.F19]" table:style-name="ce20">
            <text:p>$33,696</text:p>
          </table:table-cell>
          <table:table-cell table:style-name="ce1"/>
          <table:table-cell office:value-type="string" table:style-name="ce61">
            <text:p>FY2025</text:p>
          </table:table-cell>
          <table:table-cell office:value-type="float" office:value="98767" table:formula="of:=[Raw_Data.F36]" table:style-name="ce20">
            <text:p>$98,767</text:p>
          </table:table-cell>
          <table:table-cell office:value-type="float" office:value="106132" table:formula="of:=[Raw_Data.F39]" table:style-name="ce20">
            <text:p>$1,06,132</text:p>
          </table:table-cell>
          <table:table-cell table:number-columns-repeated="16362"/>
        </table:table-row>
        <table:table-row table:number-rows-repeated="10" table:style-name="ro6">
          <table:table-cell table:number-columns-repeated="12" table:style-name="ce21"/>
          <table:table-cell table:number-columns-repeated="16372" table:style-name="ce1"/>
        </table:table-row>
        <table:table-row table:style-name="ro6">
          <table:table-cell table:style-name="ce21">
            <draw:frame draw:z-index="40" draw:id="id39" draw:style-name="a99" draw:name="Chart 77" svg:x="0.11111in" svg:y="0.13194in" svg:width="6.72917in" svg:height="3.5729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21"/>
          <table:table-cell table:style-name="ce21">
            <draw:frame draw:z-index="41" draw:id="id40" draw:style-name="a100" draw:name="Chart 78" svg:x="0.72222in" svg:y="0.13194in" svg:width="5.65278in" svg:height="3.5729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4" table:style-name="ce21"/>
          <table:table-cell table:style-name="ce21"/>
          <table:table-cell table:number-columns-repeated="2" table:style-name="ce21"/>
          <table:table-cell table:number-columns-repeated="16372" table:style-name="ce1"/>
        </table:table-row>
        <table:table-row table:number-rows-repeated="3" table:style-name="ro6">
          <table:table-cell table:number-columns-repeated="12" table:style-name="ce21"/>
          <table:table-cell table:number-columns-repeated="16372" table:style-name="ce1"/>
        </table:table-row>
        <table:table-row table:number-rows-repeated="7" table:style-name="ro6">
          <table:table-cell table:number-columns-repeated="12" table:style-name="ce21"/>
          <table:table-cell table:number-columns-repeated="16372"/>
        </table:table-row>
        <table:table-row table:style-name="ro7">
          <table:table-cell table:number-columns-repeated="12" table:style-name="ce21"/>
          <table:table-cell table:number-columns-repeated="16372"/>
        </table:table-row>
        <table:table-row table:number-rows-repeated="5" table:style-name="ro6">
          <table:table-cell table:number-columns-repeated="12" table:style-name="ce21"/>
          <table:table-cell table:number-columns-repeated="16372"/>
        </table:table-row>
        <table:table-row table:style-name="ro6">
          <table:table-cell table:style-name="ce21">
            <draw:frame draw:z-index="42" draw:id="id41" draw:style-name="a101" draw:name="Chart 79" svg:x="0.11111in" svg:y="0.18056in" svg:width="6.72917in" svg:height="3.4513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21"/>
          <table:table-cell table:style-name="ce21">
            <draw:frame draw:z-index="46" draw:id="id43" draw:style-name="a105" draw:name="explorerChart" svg:x="0.74653in" svg:y="0.19097in" svg:width="5.65972in" svg:height="3.4548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7" table:style-name="ce21"/>
          <table:table-cell table:number-columns-repeated="16372"/>
        </table:table-row>
        <table:table-row table:number-rows-repeated="16" table:style-name="ro6">
          <table:table-cell table:number-columns-repeated="12" table:style-name="ce21"/>
          <table:table-cell table:number-columns-repeated="16372"/>
        </table:table-row>
        <table:table-row table:style-name="ro6">
          <table:table-cell table:style-name="ce21">
            <draw:frame draw:z-index="43" draw:id="id42" draw:style-name="a104" draw:name="FooterNote" svg:x="0.11111in" svg:y="0.02431in" svg:width="12.42361in" svg:height="0.27778in">
              <draw:text-box>
                <text:p text:style-name="a103" text:class-names="" text:cond-style-name=""><text:span text:style-name="a102" text:class-names="">Source: Apple Inc. SEC Form 10-K filings (FY2021–FY2025), EDGAR. <text:s text:c="1"/>· <text:s text:c="1"/>Figures in USD millions unless noted. <text:s text:c="1"/>· <text:s text:c="1"/>Green = source links, black = calculated.</text:span></text:p>
              </draw:text-box>
              <svg:title/>
              <svg:desc/>
            </draw:frame>
          </table:table-cell>
          <table:table-cell table:number-columns-repeated="11" table:style-name="ce21"/>
          <table:table-cell table:number-columns-repeated="16372"/>
        </table:table-row>
        <table:table-row table:number-rows-repeated="2" table:style-name="ro6">
          <table:table-cell table:number-columns-repeated="12" table:style-name="ce21"/>
          <table:table-cell table:number-columns-repeated="16372"/>
        </table:table-row>
        <table:table-row table:style-name="ro7">
          <table:table-cell table:number-columns-spanned="12" table:number-rows-spanned="1" table:style-name="ce17"/>
          <table:covered-table-cell table:number-columns-repeated="11"/>
          <table:table-cell table:number-columns-repeated="16372"/>
        </table:table-row>
        <table:table-row table:style-name="ro6">
          <table:table-cell table:number-columns-repeated="12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style-name="ce148">
            <text:p>Row Labels</text:p>
          </table:table-cell>
          <table:table-cell office:value-type="string" table:style-name="ce149">
            <text:p>Revenue ($B)</text:p>
          </table:table-cell>
          <table:table-cell table:style-name="ce1"/>
          <table:table-cell table:number-columns-repeated="8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style-name="ce150">
            <text:p>iPad</text:p>
          </table:table-cell>
          <table:table-cell office:value-type="float" office:value="144171" table:style-name="ce153">
            <text:p>$144.2B</text:p>
          </table:table-cell>
          <table:table-cell table:style-name="ce1"/>
          <table:table-cell table:number-columns-repeated="8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style-name="ce151">
            <text:p>iPhone</text:p>
          </table:table-cell>
          <table:table-cell office:value-type="float" office:value="1008814" table:style-name="ce154">
            <text:p>$1,008.8B</text:p>
          </table:table-cell>
          <table:table-cell table:style-name="ce1"/>
          <table:table-cell table:number-columns-repeated="8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style-name="ce151">
            <text:p>Mac</text:p>
          </table:table-cell>
          <table:table-cell office:value-type="float" office:value="168416" table:style-name="ce154">
            <text:p>$168.4B</text:p>
          </table:table-cell>
          <table:table-cell table:style-name="ce1"/>
          <table:table-cell table:number-columns-repeated="8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style-name="ce151">
            <text:p>Services</text:p>
          </table:table-cell>
          <table:table-cell office:value-type="float" office:value="437081" table:style-name="ce154">
            <text:p>$437.1B</text:p>
          </table:table-cell>
          <table:table-cell table:style-name="ce1"/>
          <table:table-cell table:number-columns-repeated="8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style-name="ce151">
            <text:p>Wearables, Home &amp; Accessories</text:p>
          </table:table-cell>
          <table:table-cell office:value-type="float" office:value="192144" table:style-name="ce154">
            <text:p>$192.1B</text:p>
          </table:table-cell>
          <table:table-cell table:style-name="ce1"/>
          <table:table-cell table:number-columns-repeated="8" table:style-name="ce21"/>
          <table:table-cell table:number-columns-repeated="16372"/>
        </table:table-row>
        <table:table-row table:style-name="ro6">
          <table:table-cell table:style-name="ce21"/>
          <table:table-cell office:value-type="string" table:style-name="ce152">
            <text:p>Grand Total</text:p>
          </table:table-cell>
          <table:table-cell office:value-type="float" office:value="1950626" table:style-name="ce155">
            <text:p>$1,950.6B</text:p>
          </table:table-cell>
          <table:table-cell table:style-name="ce1"/>
          <table:table-cell table:number-columns-repeated="8" table:style-name="ce21"/>
          <table:table-cell table:number-columns-repeated="16372"/>
        </table:table-row>
        <table:table-row table:number-rows-repeated="8" table:style-name="ro6">
          <table:table-cell table:style-name="ce21"/>
          <table:table-cell table:number-columns-repeated="3" table:style-name="ce1"/>
          <table:table-cell table:number-columns-repeated="8" table:style-name="ce21"/>
          <table:table-cell table:number-columns-repeated="16372"/>
        </table:table-row>
        <table:table-row table:number-rows-repeated="1048462" table:style-name="ro6">
          <table:table-cell table:number-columns-repeated="16384"/>
        </table:table-row>
      </table:table>
      <table:table table:name="Analysis" table:style-name="ta2">
        <table:table-column table:style-name="co7" table:default-cell-style-name="ce1"/>
        <table:table-column table:style-name="co8" table:number-columns-repeated="8" table:default-cell-style-name="ce1"/>
        <table:table-column table:style-name="co4" table:number-columns-repeated="16375" table:default-cell-style-name="ce1"/>
        <table:table-row table:style-name="ro5">
          <table:table-cell office:value-type="string" table:number-columns-spanned="9" table:number-rows-spanned="1" table:style-name="ce63">
            <text:p>Apple Inc. <text:s/>— <text:s/>Financial Analysis <text:s/>(FY2021–FY2025)</text:p>
          </table:table-cell>
          <table:covered-table-cell table:number-columns-repeated="8"/>
          <table:table-cell table:number-columns-repeated="16375"/>
        </table:table-row>
        <table:table-row table:style-name="ro8">
          <table:table-cell office:value-type="string" table:number-columns-spanned="9" table:number-rows-spanned="1" table:style-name="ce34">
            <text:p>$ in billions unless noted (EPS in $, ratios in %) <text:s/>· <text:s/>Source: Apple SEC 10-K filings (FY2023 &amp; FY2025) <text:s/>· <text:s/>Green = links to source, black = calculated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9">
            <text:p>Revenue by Product Line <text:s/>— <text:s/>Growth &amp; Mix <text:s/>($ in billions)</text:p>
          </table:table-cell>
          <table:table-cell table:number-columns-repeated="8" table:style-name="ce9"/>
          <table:table-cell table:number-columns-repeated="16375"/>
        </table:table-row>
        <table:table-row table:style-name="ro6">
          <table:table-cell office:value-type="string" table:style-name="ce65">
            <text:p>Category</text:p>
          </table:table-cell>
          <table:table-cell office:value-type="string" table:style-name="ce66">
            <text:p>FY2021</text:p>
          </table:table-cell>
          <table:table-cell office:value-type="string" table:style-name="ce66">
            <text:p>FY2022</text:p>
          </table:table-cell>
          <table:table-cell office:value-type="string" table:style-name="ce66">
            <text:p>FY2023</text:p>
          </table:table-cell>
          <table:table-cell office:value-type="string" table:style-name="ce66">
            <text:p>FY2024</text:p>
          </table:table-cell>
          <table:table-cell office:value-type="string" table:style-name="ce66">
            <text:p>FY2025</text:p>
          </table:table-cell>
          <table:table-cell office:value-type="string" table:style-name="ce66">
            <text:p>YoY '25</text:p>
          </table:table-cell>
          <table:table-cell office:value-type="string" table:style-name="ce67">
            <text:p>21-'25 CAGR</text:p>
          </table:table-cell>
          <table:table-cell office:value-type="string" table:style-name="ce68">
            <text:p>Mix FY25</text:p>
          </table:table-cell>
          <table:table-cell table:number-columns-repeated="16375"/>
        </table:table-row>
        <table:table-row table:style-name="ro8">
          <table:table-cell office:value-type="string" office:string-value="iPhone" table:formula="of:=[Raw_Data.A6]" table:style-name="ce69">
            <text:p>iPhone</text:p>
          </table:table-cell>
          <table:table-cell office:value-type="float" office:value="191973" table:formula="of:=[Raw_Data.B6]" table:style-name="ce92">
            <text:p>$192.0B</text:p>
          </table:table-cell>
          <table:table-cell office:value-type="float" office:value="205489" table:formula="of:=[Raw_Data.C6]" table:style-name="ce92">
            <text:p>$205.5B</text:p>
          </table:table-cell>
          <table:table-cell office:value-type="float" office:value="200583" table:formula="of:=[Raw_Data.D6]" table:style-name="ce92">
            <text:p>$200.6B</text:p>
          </table:table-cell>
          <table:table-cell office:value-type="float" office:value="201183" table:formula="of:=[Raw_Data.E6]" table:style-name="ce93">
            <text:p>$201.2B</text:p>
          </table:table-cell>
          <table:table-cell office:value-type="float" office:value="209586" table:formula="of:=[Raw_Data.F6]" table:style-name="ce93">
            <text:p>$209.6B</text:p>
          </table:table-cell>
          <table:table-cell office:value-type="float" office:value="4.1767942619406195E-2" table:formula="of:=[.F6]/[.E6]-1" table:style-name="ce159">
            <text:p>4.2%</text:p>
          </table:table-cell>
          <table:table-cell office:value-type="float" office:value="2.2187414182641252E-2" table:formula="of:=([.F6]/[.B6])^(1/4)-1" table:style-name="ce159">
            <text:p>2.2%</text:p>
          </table:table-cell>
          <table:table-cell office:value-type="float" office:value="0.50361759030759734" table:formula="of:=[.F6]/[.F$11]" table:style-name="ce71">
            <text:p>50.4%</text:p>
          </table:table-cell>
          <table:table-cell table:number-columns-repeated="16375"/>
        </table:table-row>
        <table:table-row table:style-name="ro8">
          <table:table-cell office:value-type="string" office:string-value="Mac" table:formula="of:=[Raw_Data.A7]" table:style-name="ce69">
            <text:p>Mac</text:p>
          </table:table-cell>
          <table:table-cell office:value-type="float" office:value="35190" table:formula="of:=[Raw_Data.B7]" table:style-name="ce92">
            <text:p>$35.2B</text:p>
          </table:table-cell>
          <table:table-cell office:value-type="float" office:value="40177" table:formula="of:=[Raw_Data.C7]" table:style-name="ce92">
            <text:p>$40.2B</text:p>
          </table:table-cell>
          <table:table-cell office:value-type="float" office:value="29357" table:formula="of:=[Raw_Data.D7]" table:style-name="ce92">
            <text:p>$29.4B</text:p>
          </table:table-cell>
          <table:table-cell office:value-type="float" office:value="29984" table:formula="of:=[Raw_Data.E7]" table:style-name="ce93">
            <text:p>$30.0B</text:p>
          </table:table-cell>
          <table:table-cell office:value-type="float" office:value="33708" table:formula="of:=[Raw_Data.F7]" table:style-name="ce93">
            <text:p>$33.7B</text:p>
          </table:table-cell>
          <table:table-cell office:value-type="float" office:value="0.12419957310565644" table:formula="of:=[.F7]/[.E7]-1" table:style-name="ce159">
            <text:p>12.4%</text:p>
          </table:table-cell>
          <table:table-cell office:value-type="float" office:value="-1.0699042063201936E-2" table:formula="of:=([.F7]/[.B7])^(1/4)-1" table:style-name="ce159">
            <text:p>(1.1%)</text:p>
          </table:table-cell>
          <table:table-cell office:value-type="float" office:value="8.0997498564257586E-2" table:formula="of:=[.F7]/[.F$11]" table:style-name="ce71">
            <text:p>8.1%</text:p>
          </table:table-cell>
          <table:table-cell table:number-columns-repeated="16375"/>
        </table:table-row>
        <table:table-row table:style-name="ro8">
          <table:table-cell office:value-type="string" office:string-value="iPad" table:formula="of:=[Raw_Data.A8]" table:style-name="ce69">
            <text:p>iPad</text:p>
          </table:table-cell>
          <table:table-cell office:value-type="float" office:value="31862" table:formula="of:=[Raw_Data.B8]" table:style-name="ce92">
            <text:p>$31.9B</text:p>
          </table:table-cell>
          <table:table-cell office:value-type="float" office:value="29292" table:formula="of:=[Raw_Data.C8]" table:style-name="ce92">
            <text:p>$29.3B</text:p>
          </table:table-cell>
          <table:table-cell office:value-type="float" office:value="28300" table:formula="of:=[Raw_Data.D8]" table:style-name="ce92">
            <text:p>$28.3B</text:p>
          </table:table-cell>
          <table:table-cell office:value-type="float" office:value="26694" table:formula="of:=[Raw_Data.E8]" table:style-name="ce93">
            <text:p>$26.7B</text:p>
          </table:table-cell>
          <table:table-cell office:value-type="float" office:value="28023" table:formula="of:=[Raw_Data.F8]" table:style-name="ce93">
            <text:p>$28.0B</text:p>
          </table:table-cell>
          <table:table-cell office:value-type="float" office:value="4.9786468869408962E-2" table:formula="of:=[.F8]/[.E8]-1" table:style-name="ce159">
            <text:p>5.0%</text:p>
          </table:table-cell>
          <table:table-cell office:value-type="float" office:value="-3.1587473645362962E-2" table:formula="of:=([.F8]/[.B8])^(1/4)-1" table:style-name="ce159">
            <text:p>(3.2%)</text:p>
          </table:table-cell>
          <table:table-cell office:value-type="float" office:value="6.7336920086216626E-2" table:formula="of:=[.F8]/[.F$11]" table:style-name="ce71">
            <text:p>6.7%</text:p>
          </table:table-cell>
          <table:table-cell table:number-columns-repeated="16375"/>
        </table:table-row>
        <table:table-row table:style-name="ro8">
          <table:table-cell office:value-type="string" office:string-value="Wearables, Home &amp; Accessories" table:formula="of:=[Raw_Data.A9]" table:style-name="ce69">
            <text:p>Wearables, Home &amp; Accessories</text:p>
          </table:table-cell>
          <table:table-cell office:value-type="float" office:value="38367" table:formula="of:=[Raw_Data.B9]" table:style-name="ce92">
            <text:p>$38.4B</text:p>
          </table:table-cell>
          <table:table-cell office:value-type="float" office:value="41241" table:formula="of:=[Raw_Data.C9]" table:style-name="ce92">
            <text:p>$41.2B</text:p>
          </table:table-cell>
          <table:table-cell office:value-type="float" office:value="39845" table:formula="of:=[Raw_Data.D9]" table:style-name="ce92">
            <text:p>$39.8B</text:p>
          </table:table-cell>
          <table:table-cell office:value-type="float" office:value="37005" table:formula="of:=[Raw_Data.E9]" table:style-name="ce93">
            <text:p>$37.0B</text:p>
          </table:table-cell>
          <table:table-cell office:value-type="float" office:value="35686" table:formula="of:=[Raw_Data.F9]" table:style-name="ce93">
            <text:p>$35.7B</text:p>
          </table:table-cell>
          <table:table-cell office:value-type="float" office:value="-3.5643831914606183E-2" table:formula="of:=[.F9]/[.E9]-1" table:style-name="ce159">
            <text:p>(3.6%)</text:p>
          </table:table-cell>
          <table:table-cell office:value-type="float" office:value="-1.7946817760600586E-2" table:formula="of:=([.F9]/[.B9])^(1/4)-1" table:style-name="ce159">
            <text:p>(1.8%)</text:p>
          </table:table-cell>
          <table:table-cell office:value-type="float" office:value="8.5750466766467789E-2" table:formula="of:=[.F9]/[.F$11]" table:style-name="ce71">
            <text:p>8.6%</text:p>
          </table:table-cell>
          <table:table-cell table:number-columns-repeated="16375"/>
        </table:table-row>
        <table:table-row table:style-name="ro8">
          <table:table-cell office:value-type="string" office:string-value="Services" table:formula="of:=[Raw_Data.A10]" table:style-name="ce85">
            <text:p>Services</text:p>
          </table:table-cell>
          <table:table-cell office:value-type="float" office:value="68425" table:formula="of:=[Raw_Data.B10]" table:style-name="ce94">
            <text:p>$68.4B</text:p>
          </table:table-cell>
          <table:table-cell office:value-type="float" office:value="78129" table:formula="of:=[Raw_Data.C10]" table:style-name="ce94">
            <text:p>$78.1B</text:p>
          </table:table-cell>
          <table:table-cell office:value-type="float" office:value="85200" table:formula="of:=[Raw_Data.D10]" table:style-name="ce94">
            <text:p>$85.2B</text:p>
          </table:table-cell>
          <table:table-cell office:value-type="float" office:value="96169" table:formula="of:=[Raw_Data.E10]" table:style-name="ce95">
            <text:p>$96.2B</text:p>
          </table:table-cell>
          <table:table-cell office:value-type="float" office:value="109158" table:formula="of:=[Raw_Data.F10]" table:style-name="ce95">
            <text:p>$109.2B</text:p>
          </table:table-cell>
          <table:table-cell office:value-type="float" office:value="0.13506431386413498" table:formula="of:=[.F10]/[.E10]-1" table:style-name="ce160">
            <text:p>13.5%</text:p>
          </table:table-cell>
          <table:table-cell office:value-type="float" office:value="0.12385476417353836" table:formula="of:=([.F10]/[.B10])^(1/4)-1" table:style-name="ce160">
            <text:p>12.4%</text:p>
          </table:table-cell>
          <table:table-cell office:value-type="float" office:value="0.26229752427546071" table:formula="of:=[.F10]/[.F$11]" table:style-name="ce87">
            <text:p>26.2%</text:p>
          </table:table-cell>
          <table:table-cell table:number-columns-repeated="16375"/>
        </table:table-row>
        <table:table-row table:style-name="ro8">
          <table:table-cell office:value-type="string" table:style-name="ce88">
            <text:p>Total net sales</text:p>
          </table:table-cell>
          <table:table-cell office:value-type="float" office:value="365817" table:formula="of:=[Raw_Data.B11]" table:style-name="ce96">
            <text:p>$365.8B</text:p>
          </table:table-cell>
          <table:table-cell office:value-type="float" office:value="394328" table:formula="of:=[Raw_Data.C11]" table:style-name="ce96">
            <text:p>$394.3B</text:p>
          </table:table-cell>
          <table:table-cell office:value-type="float" office:value="383285" table:formula="of:=[Raw_Data.D11]" table:style-name="ce96">
            <text:p>$383.3B</text:p>
          </table:table-cell>
          <table:table-cell office:value-type="float" office:value="391035" table:formula="of:=[Raw_Data.E11]" table:style-name="ce96">
            <text:p>$391.0B</text:p>
          </table:table-cell>
          <table:table-cell office:value-type="float" office:value="416161" table:formula="of:=[Raw_Data.F11]" table:style-name="ce96">
            <text:p>$416.2B</text:p>
          </table:table-cell>
          <table:table-cell office:value-type="float" office:value="6.425511782832749E-2" table:formula="of:=[.F11]/[.E11]-1" table:style-name="ce89">
            <text:p>6.4%</text:p>
          </table:table-cell>
          <table:table-cell office:value-type="float" office:value="3.275991627577457E-2" table:formula="of:=([.F11]/[.B11])^(1/4)-1" table:style-name="ce89">
            <text:p>3.3%</text:p>
          </table:table-cell>
          <table:table-cell office:value-type="float" office:value="1" table:formula="of:=[.F11]/[.F$11]" table:style-name="ce90">
            <text:p>100.0%</text:p>
          </table:table-cell>
          <table:table-cell table:number-columns-repeated="16375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9">
            <text:p>Revenue by Geography <text:s/>— <text:s/>Growth &amp; Mix <text:s/>($ in billions)</text:p>
          </table:table-cell>
          <table:table-cell table:number-columns-repeated="8" table:style-name="ce9"/>
          <table:table-cell table:number-columns-repeated="16375"/>
        </table:table-row>
        <table:table-row table:style-name="ro6">
          <table:table-cell office:value-type="string" table:style-name="ce65">
            <text:p>Segment</text:p>
          </table:table-cell>
          <table:table-cell office:value-type="string" table:style-name="ce66">
            <text:p>FY2021</text:p>
          </table:table-cell>
          <table:table-cell office:value-type="string" table:style-name="ce66">
            <text:p>FY2022</text:p>
          </table:table-cell>
          <table:table-cell office:value-type="string" table:style-name="ce66">
            <text:p>FY2023</text:p>
          </table:table-cell>
          <table:table-cell office:value-type="string" table:style-name="ce66">
            <text:p>FY2024</text:p>
          </table:table-cell>
          <table:table-cell office:value-type="string" table:style-name="ce66">
            <text:p>FY2025</text:p>
          </table:table-cell>
          <table:table-cell office:value-type="string" table:style-name="ce66">
            <text:p>YoY '25</text:p>
          </table:table-cell>
          <table:table-cell office:value-type="string" table:style-name="ce67">
            <text:p>21-'25 CAGR</text:p>
          </table:table-cell>
          <table:table-cell office:value-type="string" table:style-name="ce68">
            <text:p>Mix FY25</text:p>
          </table:table-cell>
          <table:table-cell table:number-columns-repeated="16375"/>
        </table:table-row>
        <table:table-row table:style-name="ro8">
          <table:table-cell office:value-type="string" office:string-value="Americas" table:formula="of:=[Raw_Data.A15]" table:style-name="ce69">
            <text:p>Americas</text:p>
          </table:table-cell>
          <table:table-cell office:value-type="float" office:value="153306" table:formula="of:=[Raw_Data.B15]" table:style-name="ce92">
            <text:p>$153.3B</text:p>
          </table:table-cell>
          <table:table-cell office:value-type="float" office:value="169658" table:formula="of:=[Raw_Data.C15]" table:style-name="ce92">
            <text:p>$169.7B</text:p>
          </table:table-cell>
          <table:table-cell office:value-type="float" office:value="162560" table:formula="of:=[Raw_Data.D15]" table:style-name="ce92">
            <text:p>$162.6B</text:p>
          </table:table-cell>
          <table:table-cell office:value-type="float" office:value="167045" table:formula="of:=[Raw_Data.E15]" table:style-name="ce92">
            <text:p>$167.0B</text:p>
          </table:table-cell>
          <table:table-cell office:value-type="float" office:value="178353" table:formula="of:=[Raw_Data.F15]" table:style-name="ce92">
            <text:p>$178.4B</text:p>
          </table:table-cell>
          <table:table-cell office:value-type="float" office:value="6.7694333862132972E-2" table:formula="of:=[.F15]/[.E15]-1" table:style-name="ce161">
            <text:p>6.8%</text:p>
          </table:table-cell>
          <table:table-cell office:value-type="float" office:value="3.8556950598651607E-2" table:formula="of:=([.F15]/[.B15])^(1/4)-1" table:style-name="ce161">
            <text:p>3.9%</text:p>
          </table:table-cell>
          <table:table-cell office:value-type="float" office:value="0.42856730928655018" table:formula="of:=[.F15]/[.F$20]" table:style-name="ce71">
            <text:p>42.9%</text:p>
          </table:table-cell>
          <table:table-cell table:number-columns-repeated="16375"/>
        </table:table-row>
        <table:table-row table:style-name="ro8">
          <table:table-cell office:value-type="string" office:string-value="Europe" table:formula="of:=[Raw_Data.A16]" table:style-name="ce69">
            <text:p>Europe</text:p>
          </table:table-cell>
          <table:table-cell office:value-type="float" office:value="89307" table:formula="of:=[Raw_Data.B16]" table:style-name="ce92">
            <text:p>$89.3B</text:p>
          </table:table-cell>
          <table:table-cell office:value-type="float" office:value="95118" table:formula="of:=[Raw_Data.C16]" table:style-name="ce92">
            <text:p>$95.1B</text:p>
          </table:table-cell>
          <table:table-cell office:value-type="float" office:value="94294" table:formula="of:=[Raw_Data.D16]" table:style-name="ce92">
            <text:p>$94.3B</text:p>
          </table:table-cell>
          <table:table-cell office:value-type="float" office:value="101328" table:formula="of:=[Raw_Data.E16]" table:style-name="ce92">
            <text:p>$101.3B</text:p>
          </table:table-cell>
          <table:table-cell office:value-type="float" office:value="111032" table:formula="of:=[Raw_Data.F16]" table:style-name="ce92">
            <text:p>$111.0B</text:p>
          </table:table-cell>
          <table:table-cell office:value-type="float" office:value="9.5768198326227738E-2" table:formula="of:=[.F16]/[.E16]-1" table:style-name="ce161">
            <text:p>9.6%</text:p>
          </table:table-cell>
          <table:table-cell office:value-type="float" office:value="5.5943461860896493E-2" table:formula="of:=([.F16]/[.B16])^(1/4)-1" table:style-name="ce161">
            <text:p>5.6%</text:p>
          </table:table-cell>
          <table:table-cell office:value-type="float" office:value="0.26680058919504712" table:formula="of:=[.F16]/[.F$20]" table:style-name="ce71">
            <text:p>26.7%</text:p>
          </table:table-cell>
          <table:table-cell table:number-columns-repeated="16375"/>
        </table:table-row>
        <table:table-row table:style-name="ro8">
          <table:table-cell office:value-type="string" office:string-value="Greater China" table:formula="of:=[Raw_Data.A17]" table:style-name="ce69">
            <text:p>Greater China</text:p>
          </table:table-cell>
          <table:table-cell office:value-type="float" office:value="68366" table:formula="of:=[Raw_Data.B17]" table:style-name="ce92">
            <text:p>$68.4B</text:p>
          </table:table-cell>
          <table:table-cell office:value-type="float" office:value="74200" table:formula="of:=[Raw_Data.C17]" table:style-name="ce92">
            <text:p>$74.2B</text:p>
          </table:table-cell>
          <table:table-cell office:value-type="float" office:value="72559" table:formula="of:=[Raw_Data.D17]" table:style-name="ce92">
            <text:p>$72.6B</text:p>
          </table:table-cell>
          <table:table-cell office:value-type="float" office:value="66952" table:formula="of:=[Raw_Data.E17]" table:style-name="ce92">
            <text:p>$67.0B</text:p>
          </table:table-cell>
          <table:table-cell office:value-type="float" office:value="64377" table:formula="of:=[Raw_Data.F17]" table:style-name="ce92">
            <text:p>$64.4B</text:p>
          </table:table-cell>
          <table:table-cell office:value-type="float" office:value="-3.8460389532799621E-2" table:formula="of:=[.F17]/[.E17]-1" table:style-name="ce161">
            <text:p>(3.8%)</text:p>
          </table:table-cell>
          <table:table-cell office:value-type="float" office:value="-1.4917415940556178E-2" table:formula="of:=([.F17]/[.B17])^(1/4)-1" table:style-name="ce161">
            <text:p>(1.5%)</text:p>
          </table:table-cell>
          <table:table-cell office:value-type="float" office:value="0.15469253486030646" table:formula="of:=[.F17]/[.F$20]" table:style-name="ce71">
            <text:p>15.5%</text:p>
          </table:table-cell>
          <table:table-cell table:number-columns-repeated="16375"/>
        </table:table-row>
        <table:table-row table:style-name="ro8">
          <table:table-cell office:value-type="string" office:string-value="Japan" table:formula="of:=[Raw_Data.A18]" table:style-name="ce69">
            <text:p>Japan</text:p>
          </table:table-cell>
          <table:table-cell office:value-type="float" office:value="28482" table:formula="of:=[Raw_Data.B18]" table:style-name="ce92">
            <text:p>$28.5B</text:p>
          </table:table-cell>
          <table:table-cell office:value-type="float" office:value="25977" table:formula="of:=[Raw_Data.C18]" table:style-name="ce92">
            <text:p>$26.0B</text:p>
          </table:table-cell>
          <table:table-cell office:value-type="float" office:value="24257" table:formula="of:=[Raw_Data.D18]" table:style-name="ce92">
            <text:p>$24.3B</text:p>
          </table:table-cell>
          <table:table-cell office:value-type="float" office:value="25052" table:formula="of:=[Raw_Data.E18]" table:style-name="ce92">
            <text:p>$25.1B</text:p>
          </table:table-cell>
          <table:table-cell office:value-type="float" office:value="28703" table:formula="of:=[Raw_Data.F18]" table:style-name="ce92">
            <text:p>$28.7B</text:p>
          </table:table-cell>
          <table:table-cell office:value-type="float" office:value="0.14573686731598268" table:formula="of:=[.F18]/[.E18]-1" table:style-name="ce161">
            <text:p>14.6%</text:p>
          </table:table-cell>
          <table:table-cell office:value-type="float" office:value="1.9342026920357025E-3" table:formula="of:=([.F18]/[.B18])^(1/4)-1" table:style-name="ce161">
            <text:p>0.2%</text:p>
          </table:table-cell>
          <table:table-cell office:value-type="float" office:value="6.8970903087987576E-2" table:formula="of:=[.F18]/[.F$20]" table:style-name="ce71">
            <text:p>6.9%</text:p>
          </table:table-cell>
          <table:table-cell table:number-columns-repeated="16375"/>
        </table:table-row>
        <table:table-row table:style-name="ro8">
          <table:table-cell office:value-type="string" office:string-value="Rest of Asia Pacific" table:formula="of:=[Raw_Data.A19]" table:style-name="ce85">
            <text:p>Rest of Asia Pacific</text:p>
          </table:table-cell>
          <table:table-cell office:value-type="float" office:value="26356" table:formula="of:=[Raw_Data.B19]" table:style-name="ce94">
            <text:p>$26.4B</text:p>
          </table:table-cell>
          <table:table-cell office:value-type="float" office:value="29375" table:formula="of:=[Raw_Data.C19]" table:style-name="ce94">
            <text:p>$29.4B</text:p>
          </table:table-cell>
          <table:table-cell office:value-type="float" office:value="29615" table:formula="of:=[Raw_Data.D19]" table:style-name="ce94">
            <text:p>$29.6B</text:p>
          </table:table-cell>
          <table:table-cell office:value-type="float" office:value="30658" table:formula="of:=[Raw_Data.E19]" table:style-name="ce94">
            <text:p>$30.7B</text:p>
          </table:table-cell>
          <table:table-cell office:value-type="float" office:value="33696" table:formula="of:=[Raw_Data.F19]" table:style-name="ce94">
            <text:p>$33.7B</text:p>
          </table:table-cell>
          <table:table-cell office:value-type="float" office:value="9.909322199752113E-2" table:formula="of:=[.F19]/[.E19]-1" table:style-name="ce162">
            <text:p>9.9%</text:p>
          </table:table-cell>
          <table:table-cell office:value-type="float" office:value="6.3346271622837236E-2" table:formula="of:=([.F19]/[.B19])^(1/4)-1" table:style-name="ce162">
            <text:p>6.3%</text:p>
          </table:table-cell>
          <table:table-cell office:value-type="float" office:value="8.0968663570108679E-2" table:formula="of:=[.F19]/[.F$20]" table:style-name="ce87">
            <text:p>8.1%</text:p>
          </table:table-cell>
          <table:table-cell table:number-columns-repeated="16375"/>
        </table:table-row>
        <table:table-row table:style-name="ro8">
          <table:table-cell office:value-type="string" table:style-name="ce88">
            <text:p>Total net sales</text:p>
          </table:table-cell>
          <table:table-cell office:value-type="float" office:value="365817" table:formula="of:=[Raw_Data.B20]" table:style-name="ce96">
            <text:p>$365.8B</text:p>
          </table:table-cell>
          <table:table-cell office:value-type="float" office:value="394328" table:formula="of:=[Raw_Data.C20]" table:style-name="ce96">
            <text:p>$394.3B</text:p>
          </table:table-cell>
          <table:table-cell office:value-type="float" office:value="383285" table:formula="of:=[Raw_Data.D20]" table:style-name="ce96">
            <text:p>$383.3B</text:p>
          </table:table-cell>
          <table:table-cell office:value-type="float" office:value="391035" table:formula="of:=[Raw_Data.E20]" table:style-name="ce96">
            <text:p>$391.0B</text:p>
          </table:table-cell>
          <table:table-cell office:value-type="float" office:value="416161" table:formula="of:=[Raw_Data.F20]" table:style-name="ce96">
            <text:p>$416.2B</text:p>
          </table:table-cell>
          <table:table-cell office:value-type="float" office:value="6.425511782832749E-2" table:formula="of:=[.F20]/[.E20]-1" table:style-name="ce89">
            <text:p>6.4%</text:p>
          </table:table-cell>
          <table:table-cell office:value-type="float" office:value="3.275991627577457E-2" table:formula="of:=([.F20]/[.B20])^(1/4)-1" table:style-name="ce89">
            <text:p>3.3%</text:p>
          </table:table-cell>
          <table:table-cell office:value-type="float" office:value="1" table:formula="of:=[.F20]/[.F$20]" table:style-name="ce90">
            <text:p>100.0%</text:p>
          </table:table-cell>
          <table:table-cell table:number-columns-repeated="16375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9">
            <text:p>Margin Analysis (% of total net sales)</text:p>
          </table:table-cell>
          <table:table-cell table:number-columns-repeated="8" table:style-name="ce9"/>
          <table:table-cell table:number-columns-repeated="16375"/>
        </table:table-row>
        <table:table-row table:style-name="ro6">
          <table:table-cell office:value-type="string" table:style-name="ce65">
            <text:p>Metric</text:p>
          </table:table-cell>
          <table:table-cell office:value-type="string" table:style-name="ce66">
            <text:p>FY2021</text:p>
          </table:table-cell>
          <table:table-cell office:value-type="string" table:style-name="ce66">
            <text:p>FY2022</text:p>
          </table:table-cell>
          <table:table-cell office:value-type="string" table:style-name="ce66">
            <text:p>FY2023</text:p>
          </table:table-cell>
          <table:table-cell office:value-type="string" table:style-name="ce66">
            <text:p>FY2024</text:p>
          </table:table-cell>
          <table:table-cell office:value-type="string" table:style-name="ce66">
            <text:p>FY2025</text:p>
          </table:table-cell>
          <table:table-cell table:number-columns-repeated="2" table:style-name="ce73"/>
          <table:table-cell table:style-name="ce74"/>
          <table:table-cell table:number-columns-repeated="16375"/>
        </table:table-row>
        <table:table-row table:style-name="ro8">
          <table:table-cell office:value-type="string" table:style-name="ce75">
            <text:p>Gross margin %</text:p>
          </table:table-cell>
          <table:table-cell office:value-type="float" office:value="0.41779359625167778" table:formula="of:=[Raw_Data.B25]/[Raw_Data.B24]" table:style-name="ce76">
            <text:p>41.8%</text:p>
          </table:table-cell>
          <table:table-cell office:value-type="float" office:value="0.43309630561360085" table:formula="of:=[Raw_Data.C25]/[Raw_Data.C24]" table:style-name="ce76">
            <text:p>43.3%</text:p>
          </table:table-cell>
          <table:table-cell office:value-type="float" office:value="0.44131129577207562" table:formula="of:=[Raw_Data.D25]/[Raw_Data.D24]" table:style-name="ce76">
            <text:p>44.1%</text:p>
          </table:table-cell>
          <table:table-cell office:value-type="float" office:value="0.46206349815233932" table:formula="of:=[Raw_Data.E25]/[Raw_Data.E24]" table:style-name="ce76">
            <text:p>46.2%</text:p>
          </table:table-cell>
          <table:table-cell office:value-type="float" office:value="0.46905164107160452" table:formula="of:=[Raw_Data.F25]/[Raw_Data.F24]" table:style-name="ce76">
            <text:p>46.9%</text:p>
          </table:table-cell>
          <table:table-cell table:number-columns-repeated="2" table:style-name="ce77"/>
          <table:table-cell table:style-name="ce78"/>
          <table:table-cell table:number-columns-repeated="16375"/>
        </table:table-row>
        <table:table-row table:style-name="ro8">
          <table:table-cell office:value-type="string" table:style-name="ce75">
            <text:p>Operating margin %</text:p>
          </table:table-cell>
          <table:table-cell office:value-type="float" office:value="0.29782377527561593" table:formula="of:=[Raw_Data.B29]/[Raw_Data.B24]" table:style-name="ce76">
            <text:p>29.8%</text:p>
          </table:table-cell>
          <table:table-cell office:value-type="float" office:value="0.30288744395528594" table:formula="of:=[Raw_Data.C29]/[Raw_Data.C24]" table:style-name="ce76">
            <text:p>30.3%</text:p>
          </table:table-cell>
          <table:table-cell office:value-type="float" office:value="0.29821412265024722" table:formula="of:=[Raw_Data.D29]/[Raw_Data.D24]" table:style-name="ce76">
            <text:p>29.8%</text:p>
          </table:table-cell>
          <table:table-cell office:value-type="float" office:value="0.31510222870075566" table:formula="of:=[Raw_Data.E29]/[Raw_Data.E24]" table:style-name="ce76">
            <text:p>31.5%</text:p>
          </table:table-cell>
          <table:table-cell office:value-type="float" office:value="0.31970799762591884" table:formula="of:=[Raw_Data.F29]/[Raw_Data.F24]" table:style-name="ce76">
            <text:p>32.0%</text:p>
          </table:table-cell>
          <table:table-cell table:number-columns-repeated="2" table:style-name="ce77"/>
          <table:table-cell table:style-name="ce78"/>
          <table:table-cell table:number-columns-repeated="16375"/>
        </table:table-row>
        <table:table-row table:style-name="ro8">
          <table:table-cell office:value-type="string" table:style-name="ce75">
            <text:p>Net margin %</text:p>
          </table:table-cell>
          <table:table-cell office:value-type="float" office:value="0.25881793355694238" table:formula="of:=[Raw_Data.B30]/[Raw_Data.B24]" table:style-name="ce76">
            <text:p>25.9%</text:p>
          </table:table-cell>
          <table:table-cell office:value-type="float" office:value="0.25309640705199732" table:formula="of:=[Raw_Data.C30]/[Raw_Data.C24]" table:style-name="ce76">
            <text:p>25.3%</text:p>
          </table:table-cell>
          <table:table-cell office:value-type="float" office:value="0.25306234264320282" table:formula="of:=[Raw_Data.D30]/[Raw_Data.D24]" table:style-name="ce76">
            <text:p>25.3%</text:p>
          </table:table-cell>
          <table:table-cell office:value-type="float" office:value="0.23971255769943867" table:formula="of:=[Raw_Data.E30]/[Raw_Data.E24]" table:style-name="ce76">
            <text:p>24.0%</text:p>
          </table:table-cell>
          <table:table-cell office:value-type="float" office:value="0.26915064121818238" table:formula="of:=[Raw_Data.F30]/[Raw_Data.F24]" table:style-name="ce76">
            <text:p>26.9%</text:p>
          </table:table-cell>
          <table:table-cell table:number-columns-repeated="2" table:style-name="ce77"/>
          <table:table-cell table:style-name="ce78"/>
          <table:table-cell table:number-columns-repeated="16375"/>
        </table:table-row>
        <table:table-row table:style-name="ro8">
          <table:table-cell office:value-type="string" table:style-name="ce79">
            <text:p>R&amp;D % of net sales</text:p>
          </table:table-cell>
          <table:table-cell office:value-type="float" office:value="5.9904269074427925E-2" table:formula="of:=[Raw_Data.B26]/[Raw_Data.B24]" table:style-name="ce80">
            <text:p>6.0%</text:p>
          </table:table-cell>
          <table:table-cell office:value-type="float" office:value="6.657148363798665E-2" table:formula="of:=[Raw_Data.C26]/[Raw_Data.C24]" table:style-name="ce80">
            <text:p>6.7%</text:p>
          </table:table-cell>
          <table:table-cell office:value-type="float" office:value="7.8048971392045086E-2" table:formula="of:=[Raw_Data.D26]/[Raw_Data.D24]" table:style-name="ce80">
            <text:p>7.8%</text:p>
          </table:table-cell>
          <table:table-cell office:value-type="float" office:value="8.0222997941360744E-2" table:formula="of:=[Raw_Data.E26]/[Raw_Data.E24]" table:style-name="ce80">
            <text:p>8.0%</text:p>
          </table:table-cell>
          <table:table-cell office:value-type="float" office:value="8.3020753987038676E-2" table:formula="of:=[Raw_Data.F26]/[Raw_Data.F24]" table:style-name="ce80">
            <text:p>8.3%</text:p>
          </table:table-cell>
          <table:table-cell table:number-columns-repeated="2" table:style-name="ce81"/>
          <table:table-cell table:style-name="ce82"/>
          <table:table-cell table:number-columns-repeated="16375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9">
            <text:p>Key Ratios</text:p>
          </table:table-cell>
          <table:table-cell table:number-columns-repeated="8" table:style-name="ce9"/>
          <table:table-cell table:number-columns-repeated="16375"/>
        </table:table-row>
        <table:table-row table:style-name="ro6">
          <table:table-cell office:value-type="string" table:style-name="ce65">
            <text:p>Ratio</text:p>
          </table:table-cell>
          <table:table-cell office:value-type="string" table:style-name="ce66">
            <text:p>FY2021</text:p>
          </table:table-cell>
          <table:table-cell office:value-type="string" table:style-name="ce66">
            <text:p>FY2022</text:p>
          </table:table-cell>
          <table:table-cell office:value-type="string" table:style-name="ce66">
            <text:p>FY2023</text:p>
          </table:table-cell>
          <table:table-cell office:value-type="string" table:style-name="ce66">
            <text:p>FY2024</text:p>
          </table:table-cell>
          <table:table-cell office:value-type="string" table:style-name="ce66">
            <text:p>FY2025</text:p>
          </table:table-cell>
          <table:table-cell table:number-columns-repeated="2" table:style-name="ce73"/>
          <table:table-cell table:style-name="ce74"/>
          <table:table-cell table:number-columns-repeated="16375"/>
        </table:table-row>
        <table:table-row table:style-name="ro8">
          <table:table-cell office:value-type="string" table:style-name="ce75">
            <text:p>Free cash flow margin</text:p>
          </table:table-cell>
          <table:table-cell office:value-type="float" office:value="0.25409699385211731" table:formula="of:=[Raw_Data.B36]/[Raw_Data.B24]" table:style-name="ce76">
            <text:p>25.4%</text:p>
          </table:table-cell>
          <table:table-cell office:value-type="float" office:value="0.28261498042238947" table:formula="of:=[Raw_Data.C36]/[Raw_Data.C24]" table:style-name="ce76">
            <text:p>28.3%</text:p>
          </table:table-cell>
          <table:table-cell office:value-type="float" office:value="0.25981710737440805" table:formula="of:=[Raw_Data.D36]/[Raw_Data.D24]" table:style-name="ce76">
            <text:p>26.0%</text:p>
          </table:table-cell>
          <table:table-cell office:value-type="float" office:value="0.27825386474356517" table:formula="of:=[Raw_Data.E36]/[Raw_Data.E24]" table:style-name="ce76">
            <text:p>27.8%</text:p>
          </table:table-cell>
          <table:table-cell office:value-type="float" office:value="0.23732882225869315" table:formula="of:=[Raw_Data.F36]/[Raw_Data.F24]" table:style-name="ce76">
            <text:p>23.7%</text:p>
          </table:table-cell>
          <table:table-cell table:number-columns-repeated="2" table:style-name="ce77"/>
          <table:table-cell table:style-name="ce78"/>
          <table:table-cell table:number-columns-repeated="16375"/>
        </table:table-row>
        <table:table-row table:style-name="ro8">
          <table:table-cell office:value-type="string" table:style-name="ce75">
            <text:p>FCF / net income</text:p>
          </table:table-cell>
          <table:table-cell office:value-type="float" office:value="0.98175961132234901" table:formula="of:=[Raw_Data.B36]/[Raw_Data.B30]" table:style-name="ce76">
            <text:p>98.2%</text:p>
          </table:table-cell>
          <table:table-cell office:value-type="float" office:value="1.1166297606284381" table:formula="of:=[Raw_Data.C36]/[Raw_Data.C30]" table:style-name="ce76">
            <text:p>111.7%</text:p>
          </table:table-cell>
          <table:table-cell office:value-type="float" office:value="1.0266920975308005" table:formula="of:=[Raw_Data.D36]/[Raw_Data.D30]" table:style-name="ce76">
            <text:p>102.7%</text:p>
          </table:table-cell>
          <table:table-cell office:value-type="float" office:value="1.1607813433472731" table:formula="of:=[Raw_Data.E36]/[Raw_Data.E30]" table:style-name="ce76">
            <text:p>116.1%</text:p>
          </table:table-cell>
          <table:table-cell office:value-type="float" office:value="0.88176948486742257" table:formula="of:=[Raw_Data.F36]/[Raw_Data.F30]" table:style-name="ce76">
            <text:p>88.2%</text:p>
          </table:table-cell>
          <table:table-cell table:number-columns-repeated="2" table:style-name="ce77"/>
          <table:table-cell table:style-name="ce78"/>
          <table:table-cell table:number-columns-repeated="16375"/>
        </table:table-row>
        <table:table-row table:style-name="ro8">
          <table:table-cell office:value-type="string" table:style-name="ce75">
            <text:p>Capital returned / FCF</text:p>
          </table:table-cell>
          <table:table-cell office:value-type="float" office:value="1.0805245661786065" table:formula="of:=[Raw_Data.B39]/[Raw_Data.B36]" table:style-name="ce76">
            <text:p>108.1%</text:p>
          </table:table-cell>
          <table:table-cell office:value-type="float" office:value="0.93539298116525937" table:formula="of:=[Raw_Data.C39]/[Raw_Data.C36]" table:style-name="ce76">
            <text:p>93.5%</text:p>
          </table:table-cell>
          <table:table-cell office:value-type="float" office:value="0.9296172075835476" table:formula="of:=[Raw_Data.D39]/[Raw_Data.D36]" table:style-name="ce76">
            <text:p>93.0%</text:p>
          </table:table-cell>
          <table:table-cell office:value-type="float" office:value="1.0126462451864311" table:formula="of:=[Raw_Data.E39]/[Raw_Data.E36]" table:style-name="ce76">
            <text:p>101.3%</text:p>
          </table:table-cell>
          <table:table-cell office:value-type="float" office:value="1.0745694412101208" table:formula="of:=[Raw_Data.F39]/[Raw_Data.F36]" table:style-name="ce76">
            <text:p>107.5%</text:p>
          </table:table-cell>
          <table:table-cell table:number-columns-repeated="2" table:style-name="ce77"/>
          <table:table-cell table:style-name="ce78"/>
          <table:table-cell table:number-columns-repeated="16375"/>
        </table:table-row>
        <table:table-row table:style-name="ro8">
          <table:table-cell office:value-type="string" table:style-name="ce75">
            <text:p>Effective tax rate</text:p>
          </table:table-cell>
          <table:table-cell office:value-type="float" office:value="0.13302260844085087" table:formula="of:=[Raw_Data.B48]/[Raw_Data.B47]" table:style-name="ce76">
            <text:p>13.3%</text:p>
          </table:table-cell>
          <table:table-cell office:value-type="float" office:value="0.16204461684424407" table:formula="of:=[Raw_Data.C48]/[Raw_Data.C47]" table:style-name="ce76">
            <text:p>16.2%</text:p>
          </table:table-cell>
          <table:table-cell office:value-type="float" office:value="0.14719174228036858" table:formula="of:=[Raw_Data.D48]/[Raw_Data.D47]" table:style-name="ce76">
            <text:p>14.7%</text:p>
          </table:table-cell>
          <table:table-cell office:value-type="float" office:value="0.24091185164189982" table:formula="of:=[Raw_Data.E48]/[Raw_Data.E47]" table:style-name="ce76">
            <text:p>24.1%</text:p>
          </table:table-cell>
          <table:table-cell office:value-type="float" office:value="0.15610002335586043" table:formula="of:=[Raw_Data.F48]/[Raw_Data.F47]" table:style-name="ce76">
            <text:p>15.6%</text:p>
          </table:table-cell>
          <table:table-cell table:number-columns-repeated="2" table:style-name="ce77"/>
          <table:table-cell table:style-name="ce78"/>
          <table:table-cell table:number-columns-repeated="16375"/>
        </table:table-row>
        <table:table-row table:style-name="ro8">
          <table:table-cell office:value-type="string" table:style-name="ce75">
            <text:p>Return on equity (ROE)</text:p>
          </table:table-cell>
          <table:table-cell office:value-type="string" table:style-name="ce83">
            <text:p>—</text:p>
          </table:table-cell>
          <table:table-cell office:value-type="string" table:style-name="ce83">
            <text:p>—</text:p>
          </table:table-cell>
          <table:table-cell office:value-type="string" table:style-name="ce83">
            <text:p>—</text:p>
          </table:table-cell>
          <table:table-cell office:value-type="float" office:value="1.6459350307287095" table:formula="of:=[Raw_Data.E30]/[Raw_Data.E45]" table:style-name="ce76">
            <text:p>164.6%</text:p>
          </table:table-cell>
          <table:table-cell office:value-type="float" office:value="1.5191298333175105" table:formula="of:=[Raw_Data.F30]/[Raw_Data.F45]" table:style-name="ce76">
            <text:p>151.9%</text:p>
          </table:table-cell>
          <table:table-cell table:number-columns-repeated="2" table:style-name="ce77"/>
          <table:table-cell table:style-name="ce78"/>
          <table:table-cell table:number-columns-repeated="16375"/>
        </table:table-row>
        <table:table-row table:style-name="ro8">
          <table:table-cell office:value-type="string" table:style-name="ce79">
            <text:p>Return on assets (ROA)</text:p>
          </table:table-cell>
          <table:table-cell office:value-type="string" table:style-name="ce84">
            <text:p>—</text:p>
          </table:table-cell>
          <table:table-cell office:value-type="string" table:style-name="ce84">
            <text:p>—</text:p>
          </table:table-cell>
          <table:table-cell office:value-type="string" table:style-name="ce84">
            <text:p>—</text:p>
          </table:table-cell>
          <table:table-cell office:value-type="float" office:value="0.25682503150857583" table:formula="of:=[Raw_Data.E30]/[Raw_Data.E43]" table:style-name="ce80">
            <text:p>25.7%</text:p>
          </table:table-cell>
          <table:table-cell office:value-type="float" office:value="0.31179625933565491" table:formula="of:=[Raw_Data.F30]/[Raw_Data.F43]" table:style-name="ce80">
            <text:p>31.2%</text:p>
          </table:table-cell>
          <table:table-cell table:number-columns-repeated="2" table:style-name="ce81"/>
          <table:table-cell table:style-name="ce82"/>
          <table:table-cell table:number-columns-repeated="16375"/>
        </table:table-row>
        <table:table-row table:number-rows-repeated="1048540" table:style-name="ro6">
          <table:table-cell table:number-columns-repeated="16384"/>
        </table:table-row>
      </table:table>
      <table:table table:name="Raw_Data" table:style-name="ta3"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4" table:number-columns-repeated="16378" table:default-cell-style-name="ce1"/>
        <table:table-row table:style-name="ro15">
          <table:table-cell office:value-type="string" table:style-name="ce2">
            <text:p>Apple Inc. — Financial Data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3">
            <text:p>$ in billions unless noted (EPS in $). Fiscal years end late September. Source: Apple SEC Form 10-K filings (EDGAR)</text:p>
          </table:table-cell>
          <table:table-cell table:number-columns-repeated="16383" table:style-name="ce1"/>
        </table:table-row>
        <table:table-row table:style-name="ro6">
          <table:table-cell table:number-columns-repeated="16384"/>
        </table:table-row>
        <table:table-row table:style-name="ro16">
          <table:table-cell office:value-type="string" table:style-name="ce4">
            <text:p>Net Sales by Product Category</text:p>
          </table:table-cell>
          <table:table-cell table:style-name="ce4"/>
          <table:table-cell table:number-columns-repeated="4" table:style-name="ce5"/>
          <table:table-cell table:number-columns-repeated="16378"/>
        </table:table-row>
        <table:table-row table:style-name="ro6">
          <table:table-cell office:value-type="string" table:style-name="ce7">
            <text:p>Category</text:p>
          </table:table-cell>
          <table:table-cell office:value-type="string" table:style-name="ce8">
            <text:p>FY2021</text:p>
          </table:table-cell>
          <table:table-cell office:value-type="string" table:style-name="ce8">
            <text:p>FY2022</text:p>
          </table:table-cell>
          <table:table-cell office:value-type="string" table:style-name="ce8">
            <text:p>FY2023</text:p>
          </table:table-cell>
          <table:table-cell office:value-type="string" table:style-name="ce8">
            <text:p>FY2024</text:p>
          </table:table-cell>
          <table:table-cell office:value-type="string" table:style-name="ce8">
            <text:p>FY2025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iPhone</text:p>
          </table:table-cell>
          <table:table-cell office:value-type="float" office:value="191973" table:style-name="ce143">
            <office:annotation draw:style-name="a106" svg:x="5.65277777777778in" svg:y="1.03472222222222in" svg:width="1.44444444444444in" svg:height="0.854166666666667in">
              <dc:creator>Krunal Soni</dc:creator>
              <text:p><text:span text:style-name="T2">Krunal Soni:</text:span><text:span text:style-name="T1"/></text:p>
              <text:p><text:span text:style-name="T1">Source: Apple FY2023 10-K, SEC EDGAR, https://www.sec.gov/Archives/edgar/data/320193/000032019323000106/aapl-20230930.htm</text:span></text:p>
            </office:annotation>
            <text:p>$192.0B</text:p>
          </table:table-cell>
          <table:table-cell office:value-type="float" office:value="205489" table:style-name="ce143">
            <office:annotation draw:style-name="a107" svg:x="4.02083333333333in" svg:y="1.03472222222222in" svg:width="1.44444444444444in" svg:height="0.854166666666667in">
              <dc:creator>Krunal Soni</dc:creator>
              <text:p><text:span text:style-name="T2">Krunal Soni:</text:span><text:span text:style-name="T1"/></text:p>
              <text:p><text:span text:style-name="T1">Source: Apple FY2024 10-K, SEC EDGAR, https://www.sec.gov/Archives/edgar/data/0000320193/000032019324000123/aapl-20240928.htm</text:span></text:p>
            </office:annotation>
            <text:p>$205.5B</text:p>
          </table:table-cell>
          <table:table-cell office:value-type="float" office:value="200583" table:style-name="ce143">
            <text:p>$200.6B</text:p>
          </table:table-cell>
          <table:table-cell office:value-type="float" office:value="201183" table:style-name="ce143">
            <text:p>$201.2B</text:p>
          </table:table-cell>
          <table:table-cell office:value-type="float" office:value="209586" table:style-name="ce143">
            <office:annotation draw:style-name="a108" svg:x="7.97222222222222in" svg:y="1.03472222222222in" svg:width="1.44444444444444in" svg:height="0.854166666666667in">
              <dc:creator>Krunal Soni</dc:creator>
              <text:p><text:span text:style-name="T2">Krunal Soni:</text:span><text:span text:style-name="T1"/></text:p>
              <text:p><text:span text:style-name="T1">Source: Apple FY2025 10-K, SEC EDGAR, https://www.sec.gov/Archives/edgar/data/0000320193/000032019325000079/aapl-20250927.htm</text:span></text:p>
            </office:annotation>
            <text:p>$209.6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Mac</text:p>
          </table:table-cell>
          <table:table-cell office:value-type="float" office:value="35190" table:style-name="ce143">
            <text:p>$35.2B</text:p>
          </table:table-cell>
          <table:table-cell office:value-type="float" office:value="40177" table:style-name="ce143">
            <text:p>$40.2B</text:p>
          </table:table-cell>
          <table:table-cell office:value-type="float" office:value="29357" table:style-name="ce143">
            <text:p>$29.4B</text:p>
          </table:table-cell>
          <table:table-cell office:value-type="float" office:value="29984" table:style-name="ce143">
            <text:p>$30.0B</text:p>
          </table:table-cell>
          <table:table-cell office:value-type="float" office:value="33708" table:style-name="ce143">
            <text:p>$33.7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iPad</text:p>
          </table:table-cell>
          <table:table-cell office:value-type="float" office:value="31862" table:style-name="ce143">
            <text:p>$31.9B</text:p>
          </table:table-cell>
          <table:table-cell office:value-type="float" office:value="29292" table:style-name="ce143">
            <text:p>$29.3B</text:p>
          </table:table-cell>
          <table:table-cell office:value-type="float" office:value="28300" table:style-name="ce143">
            <text:p>$28.3B</text:p>
          </table:table-cell>
          <table:table-cell office:value-type="float" office:value="26694" table:style-name="ce143">
            <text:p>$26.7B</text:p>
          </table:table-cell>
          <table:table-cell office:value-type="float" office:value="28023" table:style-name="ce143">
            <text:p>$28.0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Wearables, Home &amp; Accessories</text:p>
          </table:table-cell>
          <table:table-cell office:value-type="float" office:value="38367" table:style-name="ce143">
            <text:p>$38.4B</text:p>
          </table:table-cell>
          <table:table-cell office:value-type="float" office:value="41241" table:style-name="ce143">
            <text:p>$41.2B</text:p>
          </table:table-cell>
          <table:table-cell office:value-type="float" office:value="39845" table:style-name="ce143">
            <text:p>$39.8B</text:p>
          </table:table-cell>
          <table:table-cell office:value-type="float" office:value="37005" table:style-name="ce143">
            <text:p>$37.0B</text:p>
          </table:table-cell>
          <table:table-cell office:value-type="float" office:value="35686" table:style-name="ce143">
            <text:p>$35.7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Services</text:p>
          </table:table-cell>
          <table:table-cell office:value-type="float" office:value="68425" table:style-name="ce143">
            <text:p>$68.4B</text:p>
          </table:table-cell>
          <table:table-cell office:value-type="float" office:value="78129" table:style-name="ce143">
            <text:p>$78.1B</text:p>
          </table:table-cell>
          <table:table-cell office:value-type="float" office:value="85200" table:style-name="ce143">
            <text:p>$85.2B</text:p>
          </table:table-cell>
          <table:table-cell office:value-type="float" office:value="96169" table:style-name="ce143">
            <text:p>$96.2B</text:p>
          </table:table-cell>
          <table:table-cell office:value-type="float" office:value="109158" table:style-name="ce143">
            <text:p>$109.2B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otal net sales</text:p>
          </table:table-cell>
          <table:table-cell office:value-type="float" office:value="365817" table:formula="of:=SUM([.B6:.B10])" table:style-name="ce144">
            <text:p>$365.8B</text:p>
          </table:table-cell>
          <table:table-cell office:value-type="float" office:value="394328" table:formula="of:=SUM([.C6:.C10])" table:style-name="ce144">
            <text:p>$394.3B</text:p>
          </table:table-cell>
          <table:table-cell office:value-type="float" office:value="383285" table:formula="of:=SUM([.D6:.D10])" table:style-name="ce144">
            <text:p>$383.3B</text:p>
          </table:table-cell>
          <table:table-cell office:value-type="float" office:value="391035" table:formula="of:=SUM([.E6:.E10])" table:style-name="ce144">
            <text:p>$391.0B</text:p>
          </table:table-cell>
          <table:table-cell office:value-type="float" office:value="416161" table:formula="of:=SUM([.F6:.F10])" table:style-name="ce144">
            <text:p>$416.2B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6">
          <table:table-cell office:value-type="string" table:style-name="ce4">
            <text:p>Net Sales by Geographic Segment</text:p>
          </table:table-cell>
          <table:table-cell table:style-name="ce4"/>
          <table:table-cell table:number-columns-repeated="4" table:style-name="ce5"/>
          <table:table-cell table:number-columns-repeated="16378"/>
        </table:table-row>
        <table:table-row table:style-name="ro6">
          <table:table-cell office:value-type="string" table:style-name="ce7">
            <text:p>Segment</text:p>
          </table:table-cell>
          <table:table-cell office:value-type="string" table:style-name="ce8">
            <text:p>FY2021</text:p>
          </table:table-cell>
          <table:table-cell office:value-type="string" table:style-name="ce8">
            <text:p>FY2022</text:p>
          </table:table-cell>
          <table:table-cell office:value-type="string" table:style-name="ce8">
            <text:p>FY2023</text:p>
          </table:table-cell>
          <table:table-cell office:value-type="string" table:style-name="ce8">
            <text:p>FY2024</text:p>
          </table:table-cell>
          <table:table-cell office:value-type="string" table:style-name="ce8">
            <text:p>FY2025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Americas</text:p>
          </table:table-cell>
          <table:table-cell office:value-type="float" office:value="153306" table:style-name="ce143">
            <text:p>$153.3B</text:p>
          </table:table-cell>
          <table:table-cell office:value-type="float" office:value="169658" table:style-name="ce143">
            <office:annotation draw:style-name="a109" svg:x="4.02083333333333in" svg:y="2.86111111111111in" svg:width="1.44444444444444in" svg:height="0.854166666666667in">
              <dc:creator>Krunal Soni</dc:creator>
              <text:p><text:span text:style-name="T2">Krunal Soni:</text:span><text:span text:style-name="T1"/></text:p>
              <text:p><text:span text:style-name="T1">Source: Apple FY2024 10-K, SEC EDGAR, https://www.sec.gov/Archives/edgar/data/0000320193/000032019324000123/aapl-20240928.htm</text:span></text:p>
            </office:annotation>
            <text:p>$169.7B</text:p>
          </table:table-cell>
          <table:table-cell office:value-type="float" office:value="162560" table:style-name="ce143">
            <text:p>$162.6B</text:p>
          </table:table-cell>
          <table:table-cell office:value-type="float" office:value="167045" table:style-name="ce143">
            <text:p>$167.0B</text:p>
          </table:table-cell>
          <table:table-cell office:value-type="float" office:value="178353" table:style-name="ce143">
            <office:annotation draw:style-name="a110" svg:x="7.97222222222222in" svg:y="2.86111111111111in" svg:width="1.44444444444444in" svg:height="0.854166666666667in">
              <dc:creator>Krunal Soni</dc:creator>
              <text:p><text:span text:style-name="T2">Krunal Soni:</text:span><text:span text:style-name="T1"/></text:p>
              <text:p><text:span text:style-name="T1">Source: Apple FY2025 10-K, SEC EDGAR, https://www.sec.gov/Archives/edgar/data/0000320193/000032019325000079/aapl-20250927.htm</text:span></text:p>
            </office:annotation>
            <text:p>$178.4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Europe</text:p>
          </table:table-cell>
          <table:table-cell office:value-type="float" office:value="89307" table:style-name="ce143">
            <text:p>$89.3B</text:p>
          </table:table-cell>
          <table:table-cell office:value-type="float" office:value="95118" table:style-name="ce143">
            <text:p>$95.1B</text:p>
          </table:table-cell>
          <table:table-cell office:value-type="float" office:value="94294" table:style-name="ce143">
            <text:p>$94.3B</text:p>
          </table:table-cell>
          <table:table-cell office:value-type="float" office:value="101328" table:style-name="ce143">
            <text:p>$101.3B</text:p>
          </table:table-cell>
          <table:table-cell office:value-type="float" office:value="111032" table:style-name="ce143">
            <text:p>$111.0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Greater China</text:p>
          </table:table-cell>
          <table:table-cell office:value-type="float" office:value="68366" table:style-name="ce143">
            <text:p>$68.4B</text:p>
          </table:table-cell>
          <table:table-cell office:value-type="float" office:value="74200" table:style-name="ce143">
            <text:p>$74.2B</text:p>
          </table:table-cell>
          <table:table-cell office:value-type="float" office:value="72559" table:style-name="ce143">
            <text:p>$72.6B</text:p>
          </table:table-cell>
          <table:table-cell office:value-type="float" office:value="66952" table:style-name="ce143">
            <text:p>$67.0B</text:p>
          </table:table-cell>
          <table:table-cell office:value-type="float" office:value="64377" table:style-name="ce143">
            <text:p>$64.4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Japan</text:p>
          </table:table-cell>
          <table:table-cell office:value-type="float" office:value="28482" table:style-name="ce143">
            <text:p>$28.5B</text:p>
          </table:table-cell>
          <table:table-cell office:value-type="float" office:value="25977" table:style-name="ce143">
            <text:p>$26.0B</text:p>
          </table:table-cell>
          <table:table-cell office:value-type="float" office:value="24257" table:style-name="ce143">
            <text:p>$24.3B</text:p>
          </table:table-cell>
          <table:table-cell office:value-type="float" office:value="25052" table:style-name="ce143">
            <text:p>$25.1B</text:p>
          </table:table-cell>
          <table:table-cell office:value-type="float" office:value="28703" table:style-name="ce143">
            <text:p>$28.7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Rest of Asia Pacific</text:p>
          </table:table-cell>
          <table:table-cell office:value-type="float" office:value="26356" table:style-name="ce143">
            <text:p>$26.4B</text:p>
          </table:table-cell>
          <table:table-cell office:value-type="float" office:value="29375" table:style-name="ce143">
            <text:p>$29.4B</text:p>
          </table:table-cell>
          <table:table-cell office:value-type="float" office:value="29615" table:style-name="ce143">
            <text:p>$29.6B</text:p>
          </table:table-cell>
          <table:table-cell office:value-type="float" office:value="30658" table:style-name="ce143">
            <text:p>$30.7B</text:p>
          </table:table-cell>
          <table:table-cell office:value-type="float" office:value="33696" table:style-name="ce143">
            <text:p>$33.7B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otal net sales</text:p>
          </table:table-cell>
          <table:table-cell office:value-type="float" office:value="365817" table:formula="of:=SUM([.B15:.B19])" table:style-name="ce144">
            <text:p>$365.8B</text:p>
          </table:table-cell>
          <table:table-cell office:value-type="float" office:value="394328" table:formula="of:=SUM([.C15:.C19])" table:style-name="ce144">
            <text:p>$394.3B</text:p>
          </table:table-cell>
          <table:table-cell office:value-type="float" office:value="383285" table:formula="of:=SUM([.D15:.D19])" table:style-name="ce144">
            <text:p>$383.3B</text:p>
          </table:table-cell>
          <table:table-cell office:value-type="float" office:value="391035" table:formula="of:=SUM([.E15:.E19])" table:style-name="ce144">
            <text:p>$391.0B</text:p>
          </table:table-cell>
          <table:table-cell office:value-type="float" office:value="416161" table:formula="of:=SUM([.F15:.F19])" table:style-name="ce144">
            <text:p>$416.2B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6">
          <table:table-cell office:value-type="string" table:style-name="ce4">
            <text:p>Profitability Summary</text:p>
          </table:table-cell>
          <table:table-cell table:style-name="ce4"/>
          <table:table-cell table:number-columns-repeated="4" table:style-name="ce5"/>
          <table:table-cell table:number-columns-repeated="16378"/>
        </table:table-row>
        <table:table-row table:style-name="ro16">
          <table:table-cell office:value-type="string" table:style-name="ce4">
            <text:p>Income Statement Summary</text:p>
          </table:table-cell>
          <table:table-cell office:value-type="string" table:style-name="ce19">
            <text:p>FY2021</text:p>
          </table:table-cell>
          <table:table-cell office:value-type="string" table:style-name="ce19">
            <text:p>FY2022</text:p>
          </table:table-cell>
          <table:table-cell office:value-type="string" table:style-name="ce19">
            <text:p>FY2023</text:p>
          </table:table-cell>
          <table:table-cell office:value-type="string" table:style-name="ce19">
            <text:p>FY2024</text:p>
          </table:table-cell>
          <table:table-cell office:value-type="string" table:style-name="ce19">
            <text:p>FY2025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otal net sales</text:p>
          </table:table-cell>
          <table:table-cell office:value-type="float" office:value="365817" table:formula="of:=[.B11]" table:style-name="ce145">
            <text:p>$365.8B</text:p>
          </table:table-cell>
          <table:table-cell office:value-type="float" office:value="394328" table:formula="of:=[.C11]" table:style-name="ce145">
            <text:p>$394.3B</text:p>
          </table:table-cell>
          <table:table-cell office:value-type="float" office:value="383285" table:formula="of:=[.D11]" table:style-name="ce145">
            <text:p>$383.3B</text:p>
          </table:table-cell>
          <table:table-cell office:value-type="float" office:value="391035" table:formula="of:=[.E11]" table:style-name="ce145">
            <text:p>$391.0B</text:p>
          </table:table-cell>
          <table:table-cell office:value-type="float" office:value="416161" table:formula="of:=[.F11]" table:style-name="ce145">
            <text:p>$416.2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Total gross margin</text:p>
          </table:table-cell>
          <table:table-cell office:value-type="float" office:value="152836" table:style-name="ce143">
            <text:p>$152.8B</text:p>
          </table:table-cell>
          <table:table-cell office:value-type="float" office:value="170782" table:style-name="ce143">
            <office:annotation draw:style-name="a111" svg:x="4.02083333333333in" svg:y="4.88888888888889in" svg:width="1.44444444444444in" svg:height="0.854166666666667in">
              <dc:creator>Krunal Soni</dc:creator>
              <text:p><text:span text:style-name="T2">Source: Apple FY2024 &amp; FY2025 10-K, SEC EDGAR. FY2025: https://www.sec.gov/Archives/edgar/data/0000320193/000032019325000079/aapl-20250927.htm</text:span></text:p>
            </office:annotation>
            <text:p>$170.8B</text:p>
          </table:table-cell>
          <table:table-cell office:value-type="float" office:value="169148" table:style-name="ce143">
            <text:p>$169.1B</text:p>
          </table:table-cell>
          <table:table-cell office:value-type="float" office:value="180683" table:style-name="ce143">
            <text:p>$180.7B</text:p>
          </table:table-cell>
          <table:table-cell office:value-type="float" office:value="195201" table:style-name="ce143">
            <text:p>$195.2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Research &amp; development</text:p>
          </table:table-cell>
          <table:table-cell office:value-type="float" office:value="21914" table:style-name="ce143">
            <text:p>$21.9B</text:p>
          </table:table-cell>
          <table:table-cell office:value-type="float" office:value="26251" table:style-name="ce143">
            <text:p>$26.3B</text:p>
          </table:table-cell>
          <table:table-cell office:value-type="float" office:value="29915" table:style-name="ce143">
            <text:p>$29.9B</text:p>
          </table:table-cell>
          <table:table-cell office:value-type="float" office:value="31370" table:style-name="ce143">
            <text:p>$31.4B</text:p>
          </table:table-cell>
          <table:table-cell office:value-type="float" office:value="34550" table:style-name="ce143">
            <text:p>$34.6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Selling, general &amp; administrative</text:p>
          </table:table-cell>
          <table:table-cell office:value-type="float" office:value="21973" table:style-name="ce143">
            <text:p>$22.0B</text:p>
          </table:table-cell>
          <table:table-cell office:value-type="float" office:value="25094" table:style-name="ce143">
            <text:p>$25.1B</text:p>
          </table:table-cell>
          <table:table-cell office:value-type="float" office:value="24932" table:style-name="ce143">
            <text:p>$24.9B</text:p>
          </table:table-cell>
          <table:table-cell office:value-type="float" office:value="26097" table:style-name="ce143">
            <text:p>$26.1B</text:p>
          </table:table-cell>
          <table:table-cell office:value-type="float" office:value="27601" table:style-name="ce143">
            <text:p>$27.6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Total operating expenses</text:p>
          </table:table-cell>
          <table:table-cell office:value-type="float" office:value="43887" table:formula="of:=[.B26]+[.B27]" table:style-name="ce146">
            <text:p>$43.9B</text:p>
          </table:table-cell>
          <table:table-cell office:value-type="float" office:value="51345" table:formula="of:=[.C26]+[.C27]" table:style-name="ce143">
            <text:p>$51.3B</text:p>
          </table:table-cell>
          <table:table-cell office:value-type="float" office:value="54847" table:formula="of:=[.D26]+[.D27]" table:style-name="ce143">
            <text:p>$54.8B</text:p>
          </table:table-cell>
          <table:table-cell office:value-type="float" office:value="57467" table:formula="of:=[.E26]+[.E27]" table:style-name="ce143">
            <text:p>$57.5B</text:p>
          </table:table-cell>
          <table:table-cell office:value-type="float" office:value="62151" table:formula="of:=[.F26]+[.F27]" table:style-name="ce146">
            <text:p>$62.2B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Operating income</text:p>
          </table:table-cell>
          <table:table-cell office:value-type="float" office:value="108949" table:formula="of:=[.B25]-[.B28]" table:style-name="ce144">
            <text:p>$108.9B</text:p>
          </table:table-cell>
          <table:table-cell office:value-type="float" office:value="119437" table:formula="of:=[.C25]-[.C28]" table:style-name="ce144">
            <text:p>$119.4B</text:p>
          </table:table-cell>
          <table:table-cell office:value-type="float" office:value="114301" table:formula="of:=[.D25]-[.D28]" table:style-name="ce144">
            <text:p>$114.3B</text:p>
          </table:table-cell>
          <table:table-cell office:value-type="float" office:value="123216" table:formula="of:=[.E25]-[.E28]" table:style-name="ce144">
            <text:p>$123.2B</text:p>
          </table:table-cell>
          <table:table-cell office:value-type="float" office:value="133050" table:formula="of:=[.F25]-[.F28]" table:style-name="ce144">
            <text:p>$133.1B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Net income</text:p>
          </table:table-cell>
          <table:table-cell office:value-type="float" office:value="94680" table:style-name="ce147">
            <text:p>$94.7B</text:p>
          </table:table-cell>
          <table:table-cell office:value-type="float" office:value="99803" table:style-name="ce147">
            <text:p>$99.8B</text:p>
          </table:table-cell>
          <table:table-cell office:value-type="float" office:value="96995" table:style-name="ce147">
            <text:p>$97.0B</text:p>
          </table:table-cell>
          <table:table-cell office:value-type="float" office:value="93736" table:style-name="ce147">
            <text:p>$93.7B</text:p>
          </table:table-cell>
          <table:table-cell office:value-type="float" office:value="112010" table:style-name="ce147">
            <text:p>$112.0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Diluted EPS</text:p>
          </table:table-cell>
          <table:table-cell office:value-type="float" office:value="5.61" table:style-name="ce18">
            <text:p>$5.61</text:p>
          </table:table-cell>
          <table:table-cell office:value-type="float" office:value="6.11" table:style-name="ce18">
            <text:p>$6.11</text:p>
          </table:table-cell>
          <table:table-cell office:value-type="float" office:value="6.13" table:style-name="ce18">
            <text:p>$6.13</text:p>
          </table:table-cell>
          <table:table-cell office:value-type="float" office:value="6.08" table:style-name="ce18">
            <text:p>$6.08</text:p>
          </table:table-cell>
          <table:table-cell office:value-type="float" office:value="7.46" table:style-name="ce18">
            <text:p>$7.46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6">
          <table:table-cell office:value-type="string" table:style-name="ce25">
            <text:p>Cash Flow &amp; Capital Returns</text:p>
          </table:table-cell>
          <table:table-cell office:value-type="string" table:style-name="ce26">
            <text:p>FY2021</text:p>
          </table:table-cell>
          <table:table-cell office:value-type="string" table:style-name="ce26">
            <text:p>FY2022</text:p>
          </table:table-cell>
          <table:table-cell office:value-type="string" table:style-name="ce26">
            <text:p>FY2023</text:p>
          </table:table-cell>
          <table:table-cell office:value-type="string" table:style-name="ce26">
            <text:p>FY2024</text:p>
          </table:table-cell>
          <table:table-cell office:value-type="string" table:style-name="ce26">
            <text:p>FY2025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Operating cash flow</text:p>
          </table:table-cell>
          <table:table-cell office:value-type="float" office:value="104038" table:style-name="ce143">
            <office:annotation draw:style-name="a112" svg:x="5.65277777777778in" svg:y="6.72916666666667in" svg:width="1.44444444444444in" svg:height="0.854166666666667in">
              <dc:creator>Krunal Soni</dc:creator>
              <text:p><text:span text:style-name="T2">Krunal Soni:</text:span><text:span text:style-name="T1"/></text:p>
              <text:p><text:span text:style-name="T1">Source: Apple FY2023 10-K (FY2021-23) &amp; FY2025 10-K (FY2024-25), SEC EDGAR</text:span></text:p>
            </office:annotation>
            <text:p>$104.0B</text:p>
          </table:table-cell>
          <table:table-cell office:value-type="float" office:value="122151" table:style-name="ce143">
            <text:p>$122.2B</text:p>
          </table:table-cell>
          <table:table-cell office:value-type="float" office:value="110543" table:style-name="ce143">
            <text:p>$110.5B</text:p>
          </table:table-cell>
          <table:table-cell office:value-type="float" office:value="118254" table:style-name="ce143">
            <text:p>$118.3B</text:p>
          </table:table-cell>
          <table:table-cell office:value-type="float" office:value="111482" table:style-name="ce143">
            <text:p>$111.5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Capital expenditures</text:p>
          </table:table-cell>
          <table:table-cell office:value-type="float" office:value="11085" table:style-name="ce143">
            <text:p>$11.1B</text:p>
          </table:table-cell>
          <table:table-cell office:value-type="float" office:value="10708" table:style-name="ce143">
            <text:p>$10.7B</text:p>
          </table:table-cell>
          <table:table-cell office:value-type="float" office:value="10959" table:style-name="ce143">
            <text:p>$11.0B</text:p>
          </table:table-cell>
          <table:table-cell office:value-type="float" office:value="9447" table:style-name="ce143">
            <text:p>$9.4B</text:p>
          </table:table-cell>
          <table:table-cell office:value-type="float" office:value="12715" table:style-name="ce143">
            <text:p>$12.7B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Free cash flow</text:p>
          </table:table-cell>
          <table:table-cell office:value-type="float" office:value="92953" table:formula="of:=[.B34]-[.B35]" table:style-name="ce144">
            <text:p>$93.0B</text:p>
          </table:table-cell>
          <table:table-cell office:value-type="float" office:value="111443" table:formula="of:=[.C34]-[.C35]" table:style-name="ce144">
            <text:p>$111.4B</text:p>
          </table:table-cell>
          <table:table-cell office:value-type="float" office:value="99584" table:formula="of:=[.D34]-[.D35]" table:style-name="ce144">
            <text:p>$99.6B</text:p>
          </table:table-cell>
          <table:table-cell office:value-type="float" office:value="108807" table:formula="of:=[.E34]-[.E35]" table:style-name="ce144">
            <text:p>$108.8B</text:p>
          </table:table-cell>
          <table:table-cell office:value-type="float" office:value="98767" table:formula="of:=[.F34]-[.F35]" table:style-name="ce144">
            <text:p>$98.8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Dividends paid</text:p>
          </table:table-cell>
          <table:table-cell office:value-type="float" office:value="14467" table:style-name="ce143">
            <text:p>$14.5B</text:p>
          </table:table-cell>
          <table:table-cell office:value-type="float" office:value="14841" table:style-name="ce143">
            <text:p>$14.8B</text:p>
          </table:table-cell>
          <table:table-cell office:value-type="float" office:value="15025" table:style-name="ce143">
            <text:p>$15.0B</text:p>
          </table:table-cell>
          <table:table-cell office:value-type="float" office:value="15234" table:style-name="ce143">
            <text:p>$15.2B</text:p>
          </table:table-cell>
          <table:table-cell office:value-type="float" office:value="15421" table:style-name="ce143">
            <text:p>$15.4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Share repurchases</text:p>
          </table:table-cell>
          <table:table-cell office:value-type="float" office:value="85971" table:style-name="ce143">
            <text:p>$86.0B</text:p>
          </table:table-cell>
          <table:table-cell office:value-type="float" office:value="89402" table:style-name="ce143">
            <text:p>$89.4B</text:p>
          </table:table-cell>
          <table:table-cell office:value-type="float" office:value="77550" table:style-name="ce143">
            <text:p>$77.6B</text:p>
          </table:table-cell>
          <table:table-cell office:value-type="float" office:value="94949" table:style-name="ce143">
            <text:p>$94.9B</text:p>
          </table:table-cell>
          <table:table-cell office:value-type="float" office:value="90711" table:style-name="ce143">
            <text:p>$90.7B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otal capital returned</text:p>
          </table:table-cell>
          <table:table-cell office:value-type="float" office:value="100438" table:formula="of:=[.B37]+[.B38]" table:style-name="ce144">
            <text:p>$100.4B</text:p>
          </table:table-cell>
          <table:table-cell office:value-type="float" office:value="104243" table:formula="of:=[.C37]+[.C38]" table:style-name="ce144">
            <text:p>$104.2B</text:p>
          </table:table-cell>
          <table:table-cell office:value-type="float" office:value="92575" table:formula="of:=[.D37]+[.D38]" table:style-name="ce144">
            <text:p>$92.6B</text:p>
          </table:table-cell>
          <table:table-cell office:value-type="float" office:value="110183" table:formula="of:=[.E37]+[.E38]" table:style-name="ce144">
            <text:p>$110.2B</text:p>
          </table:table-cell>
          <table:table-cell office:value-type="float" office:value="106132" table:formula="of:=[.F37]+[.F38]" table:style-name="ce144">
            <text:p>$106.1B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6">
          <table:table-cell office:value-type="string" table:style-name="ce12">
            <text:p>Balance Sheet (fiscal year-end)</text:p>
          </table:table-cell>
          <table:table-cell table:number-columns-repeated="3" table:style-name="ce27"/>
          <table:table-cell office:value-type="string" table:style-name="ce28">
            <text:p>FY2024</text:p>
          </table:table-cell>
          <table:table-cell office:value-type="string" table:style-name="ce28">
            <text:p>FY2025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Cash &amp; cash equivalents</text:p>
          </table:table-cell>
          <table:table-cell table:number-columns-repeated="3" table:style-name="ce1"/>
          <table:table-cell office:value-type="float" office:value="29943" table:style-name="ce143">
            <office:annotation draw:style-name="a113" svg:x="9.40277777777778in" svg:y="8.35416666666667in" svg:width="1.44444444444444in" svg:height="0.854166666666667in">
              <dc:creator>Krunal Soni</dc:creator>
              <text:p><text:span text:style-name="T2">Krunal Soni:</text:span><text:span text:style-name="T1"/></text:p>
              <text:p><text:span text:style-name="T1">Source: Apple FY2025 10-K, SEC EDGAR, https://www.sec.gov/Archives/edgar/data/0000320193/000032019325000079/aapl-20250927.htm</text:span></text:p>
            </office:annotation>
            <text:p>$29.9B</text:p>
          </table:table-cell>
          <table:table-cell office:value-type="float" office:value="35934" table:style-name="ce143">
            <text:p>$35.9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Total assets</text:p>
          </table:table-cell>
          <table:table-cell table:number-columns-repeated="3" table:style-name="ce1"/>
          <table:table-cell office:value-type="float" office:value="364980" table:style-name="ce143">
            <text:p>$365.0B</text:p>
          </table:table-cell>
          <table:table-cell office:value-type="float" office:value="359241" table:style-name="ce143">
            <text:p>$359.2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Total term debt</text:p>
          </table:table-cell>
          <table:table-cell table:number-columns-repeated="3" table:style-name="ce1"/>
          <table:table-cell office:value-type="float" office:value="96662" table:style-name="ce143">
            <text:p>$96.7B</text:p>
          </table:table-cell>
          <table:table-cell office:value-type="float" office:value="90678" table:style-name="ce143">
            <text:p>$90.7B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Shareholders' equity</text:p>
          </table:table-cell>
          <table:table-cell table:number-columns-repeated="3" table:style-name="ce1"/>
          <table:table-cell office:value-type="float" office:value="56950" table:style-name="ce147">
            <text:p>$57.0B</text:p>
          </table:table-cell>
          <table:table-cell office:value-type="float" office:value="73733" table:style-name="ce147">
            <text:p>$73.7B</text:p>
          </table:table-cell>
          <table:table-cell table:number-columns-repeated="16378"/>
        </table:table-row>
        <table:table-row table:style-name="ro6">
          <table:table-cell office:value-type="string" table:style-name="ce29">
            <text:p>Supplemental — Income Taxes</text:p>
          </table:table-cell>
          <table:table-cell table:number-columns-repeated="5" table:style-name="ce30"/>
          <table:table-cell table:number-columns-repeated="16378"/>
        </table:table-row>
        <table:table-row table:style-name="ro6">
          <table:table-cell office:value-type="string" table:style-name="ce1">
            <text:p>Pre-tax income</text:p>
          </table:table-cell>
          <table:table-cell office:value-type="float" office:value="109207" table:style-name="ce143">
            <office:annotation draw:style-name="a114" svg:x="5.65277777777778in" svg:y="9.36111111111111in" svg:width="1.44444444444444in" svg:height="0.854166666666667in">
              <dc:creator>Krunal Soni</dc:creator>
              <text:p><text:span text:style-name="T2">Krunal Soni:</text:span><text:span text:style-name="T1"/></text:p>
              <text:p><text:span text:style-name="T1">Source: Apple FY2023 &amp; FY2025 10-K, SEC EDGAR. FY2021 from FY2023 10-K; FY2025 https://www.sec.gov/Archives/edgar/data/0000320193/000032019325000079/aapl-20250927.htm</text:span></text:p>
            </office:annotation>
            <text:p>$109.2B</text:p>
          </table:table-cell>
          <table:table-cell office:value-type="float" office:value="119103" table:style-name="ce143">
            <text:p>$119.1B</text:p>
          </table:table-cell>
          <table:table-cell office:value-type="float" office:value="113736" table:style-name="ce143">
            <text:p>$113.7B</text:p>
          </table:table-cell>
          <table:table-cell office:value-type="float" office:value="123485" table:style-name="ce143">
            <text:p>$123.5B</text:p>
          </table:table-cell>
          <table:table-cell office:value-type="float" office:value="132729" table:style-name="ce143">
            <text:p>$132.7B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Income tax provision</text:p>
          </table:table-cell>
          <table:table-cell office:value-type="float" office:value="14527" table:style-name="ce143">
            <text:p>$14.5B</text:p>
          </table:table-cell>
          <table:table-cell office:value-type="float" office:value="19300" table:style-name="ce143">
            <text:p>$19.3B</text:p>
          </table:table-cell>
          <table:table-cell office:value-type="float" office:value="16741" table:style-name="ce143">
            <text:p>$16.7B</text:p>
          </table:table-cell>
          <table:table-cell office:value-type="float" office:value="29749" table:style-name="ce143">
            <text:p>$29.7B</text:p>
          </table:table-cell>
          <table:table-cell office:value-type="float" office:value="20719" table:style-name="ce143">
            <text:p>$20.7B</text:p>
          </table:table-cell>
          <table:table-cell table:number-columns-repeated="16378"/>
        </table:table-row>
        <table:table-row table:number-rows-repeated="1048528" table:style-name="ro6">
          <table:table-cell table:number-columns-repeated="16384"/>
        </table:table-row>
      </table:table>
      <table:table table:name="Data_Model" table:style-name="ta3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16374" table:default-cell-style-name="ce1"/>
        <table:table-row table:style-name="ro6">
          <table:table-cell office:value-type="string" table:style-name="ce1">
            <text:p>Category</text:p>
          </table:table-cell>
          <table:table-cell office:value-type="string" table:style-name="ce1">
            <text:p>Fiscal Year</text:p>
          </table:table-cell>
          <table:table-cell office:value-type="string" table:style-name="ce1">
            <text:p>Revenue</text:p>
          </table:table-cell>
          <table:table-cell table:style-name="ce1"/>
          <table:table-cell office:value-type="string" table:style-name="ce1">
            <text:p>Segment</text:p>
          </table:table-cell>
          <table:table-cell office:value-type="string" table:style-name="ce1">
            <text:p>Fiscal Year</text:p>
          </table:table-cell>
          <table:table-cell office:value-type="string" table:style-name="ce1">
            <text:p>Revenue</text:p>
          </table:table-cell>
          <table:table-cell table:number-columns-repeated="16377"/>
        </table:table-row>
        <table:table-row table:style-name="ro6">
          <table:table-cell office:value-type="string" office:string-value="iPhone" table:formula="of:=[Raw_Data.A6]" table:style-name="ce1">
            <text:p>iPhone</text:p>
          </table:table-cell>
          <table:table-cell office:value-type="string" table:style-name="ce1">
            <text:p>FY2021</text:p>
          </table:table-cell>
          <table:table-cell office:value-type="float" office:value="191973" table:formula="of:=[Raw_Data.B6]" table:style-name="ce1">
            <text:p>191973</text:p>
          </table:table-cell>
          <table:table-cell table:style-name="ce1"/>
          <table:table-cell office:value-type="string" office:string-value="Americas" table:formula="of:=[Raw_Data.A15]" table:style-name="ce1">
            <text:p>Americas</text:p>
          </table:table-cell>
          <table:table-cell office:value-type="string" table:style-name="ce1">
            <text:p>FY2021</text:p>
          </table:table-cell>
          <table:table-cell office:value-type="float" office:value="153306" table:formula="of:=[Raw_Data.B15]" table:style-name="ce1">
            <text:p>153306</text:p>
          </table:table-cell>
          <table:table-cell table:number-columns-repeated="16377"/>
        </table:table-row>
        <table:table-row table:style-name="ro6">
          <table:table-cell office:value-type="string" office:string-value="iPhone" table:formula="of:=[Raw_Data.A6]" table:style-name="ce1">
            <text:p>iPhone</text:p>
          </table:table-cell>
          <table:table-cell office:value-type="string" table:style-name="ce1">
            <text:p>FY2022</text:p>
          </table:table-cell>
          <table:table-cell office:value-type="float" office:value="205489" table:formula="of:=[Raw_Data.C6]" table:style-name="ce1">
            <text:p>205489</text:p>
          </table:table-cell>
          <table:table-cell table:style-name="ce1"/>
          <table:table-cell office:value-type="string" office:string-value="Americas" table:formula="of:=[Raw_Data.A15]" table:style-name="ce1">
            <text:p>Americas</text:p>
          </table:table-cell>
          <table:table-cell office:value-type="string" table:style-name="ce1">
            <text:p>FY2022</text:p>
          </table:table-cell>
          <table:table-cell office:value-type="float" office:value="169658" table:formula="of:=[Raw_Data.C15]" table:style-name="ce1">
            <text:p>169658</text:p>
          </table:table-cell>
          <table:table-cell table:number-columns-repeated="16377"/>
        </table:table-row>
        <table:table-row table:style-name="ro6">
          <table:table-cell office:value-type="string" office:string-value="iPhone" table:formula="of:=[Raw_Data.A6]" table:style-name="ce1">
            <text:p>iPhone</text:p>
          </table:table-cell>
          <table:table-cell office:value-type="string" table:style-name="ce1">
            <text:p>FY2023</text:p>
          </table:table-cell>
          <table:table-cell office:value-type="float" office:value="200583" table:formula="of:=[Raw_Data.D6]" table:style-name="ce1">
            <text:p>200583</text:p>
          </table:table-cell>
          <table:table-cell table:style-name="ce1"/>
          <table:table-cell office:value-type="string" office:string-value="Americas" table:formula="of:=[Raw_Data.A15]" table:style-name="ce1">
            <text:p>Americas</text:p>
          </table:table-cell>
          <table:table-cell office:value-type="string" table:style-name="ce1">
            <text:p>FY2023</text:p>
          </table:table-cell>
          <table:table-cell office:value-type="float" office:value="162560" table:formula="of:=[Raw_Data.D15]" table:style-name="ce1">
            <text:p>162560</text:p>
          </table:table-cell>
          <table:table-cell table:number-columns-repeated="16377"/>
        </table:table-row>
        <table:table-row table:style-name="ro6">
          <table:table-cell office:value-type="string" office:string-value="iPhone" table:formula="of:=[Raw_Data.A6]" table:style-name="ce1">
            <text:p>iPhone</text:p>
          </table:table-cell>
          <table:table-cell office:value-type="string" table:style-name="ce1">
            <text:p>FY2024</text:p>
          </table:table-cell>
          <table:table-cell office:value-type="float" office:value="201183" table:formula="of:=[Raw_Data.E6]" table:style-name="ce1">
            <text:p>201183</text:p>
          </table:table-cell>
          <table:table-cell table:style-name="ce1"/>
          <table:table-cell office:value-type="string" office:string-value="Americas" table:formula="of:=[Raw_Data.A15]" table:style-name="ce1">
            <text:p>Americas</text:p>
          </table:table-cell>
          <table:table-cell office:value-type="string" table:style-name="ce1">
            <text:p>FY2024</text:p>
          </table:table-cell>
          <table:table-cell office:value-type="float" office:value="167045" table:formula="of:=[Raw_Data.E15]" table:style-name="ce1">
            <text:p>167045</text:p>
          </table:table-cell>
          <table:table-cell table:number-columns-repeated="16377"/>
        </table:table-row>
        <table:table-row table:style-name="ro6">
          <table:table-cell office:value-type="string" office:string-value="iPhone" table:formula="of:=[Raw_Data.A6]" table:style-name="ce1">
            <text:p>iPhone</text:p>
          </table:table-cell>
          <table:table-cell office:value-type="string" table:style-name="ce1">
            <text:p>FY2025</text:p>
          </table:table-cell>
          <table:table-cell office:value-type="float" office:value="209586" table:formula="of:=[Raw_Data.F6]" table:style-name="ce1">
            <text:p>209586</text:p>
          </table:table-cell>
          <table:table-cell table:style-name="ce1"/>
          <table:table-cell office:value-type="string" office:string-value="Americas" table:formula="of:=[Raw_Data.A15]" table:style-name="ce1">
            <text:p>Americas</text:p>
          </table:table-cell>
          <table:table-cell office:value-type="string" table:style-name="ce1">
            <text:p>FY2025</text:p>
          </table:table-cell>
          <table:table-cell office:value-type="float" office:value="178353" table:formula="of:=[Raw_Data.F15]" table:style-name="ce1">
            <text:p>178353</text:p>
          </table:table-cell>
          <table:table-cell table:number-columns-repeated="16377"/>
        </table:table-row>
        <table:table-row table:style-name="ro6">
          <table:table-cell office:value-type="string" office:string-value="Mac" table:formula="of:=[Raw_Data.A7]" table:style-name="ce1">
            <text:p>Mac</text:p>
          </table:table-cell>
          <table:table-cell office:value-type="string" table:style-name="ce1">
            <text:p>FY2021</text:p>
          </table:table-cell>
          <table:table-cell office:value-type="float" office:value="35190" table:formula="of:=[Raw_Data.B7]" table:style-name="ce1">
            <text:p>35190</text:p>
          </table:table-cell>
          <table:table-cell table:style-name="ce1"/>
          <table:table-cell office:value-type="string" office:string-value="Europe" table:formula="of:=[Raw_Data.A16]" table:style-name="ce1">
            <text:p>Europe</text:p>
          </table:table-cell>
          <table:table-cell office:value-type="string" table:style-name="ce1">
            <text:p>FY2021</text:p>
          </table:table-cell>
          <table:table-cell office:value-type="float" office:value="89307" table:formula="of:=[Raw_Data.B16]" table:style-name="ce1">
            <text:p>89307</text:p>
          </table:table-cell>
          <table:table-cell table:number-columns-repeated="16377"/>
        </table:table-row>
        <table:table-row table:style-name="ro6">
          <table:table-cell office:value-type="string" office:string-value="Mac" table:formula="of:=[Raw_Data.A7]" table:style-name="ce1">
            <text:p>Mac</text:p>
          </table:table-cell>
          <table:table-cell office:value-type="string" table:style-name="ce1">
            <text:p>FY2022</text:p>
          </table:table-cell>
          <table:table-cell office:value-type="float" office:value="40177" table:formula="of:=[Raw_Data.C7]" table:style-name="ce1">
            <text:p>40177</text:p>
          </table:table-cell>
          <table:table-cell table:style-name="ce1"/>
          <table:table-cell office:value-type="string" office:string-value="Europe" table:formula="of:=[Raw_Data.A16]" table:style-name="ce1">
            <text:p>Europe</text:p>
          </table:table-cell>
          <table:table-cell office:value-type="string" table:style-name="ce1">
            <text:p>FY2022</text:p>
          </table:table-cell>
          <table:table-cell office:value-type="float" office:value="95118" table:formula="of:=[Raw_Data.C16]" table:style-name="ce1">
            <text:p>95118</text:p>
          </table:table-cell>
          <table:table-cell table:number-columns-repeated="16377"/>
        </table:table-row>
        <table:table-row table:style-name="ro6">
          <table:table-cell office:value-type="string" office:string-value="Mac" table:formula="of:=[Raw_Data.A7]" table:style-name="ce1">
            <text:p>Mac</text:p>
          </table:table-cell>
          <table:table-cell office:value-type="string" table:style-name="ce1">
            <text:p>FY2023</text:p>
          </table:table-cell>
          <table:table-cell office:value-type="float" office:value="29357" table:formula="of:=[Raw_Data.D7]" table:style-name="ce1">
            <text:p>29357</text:p>
          </table:table-cell>
          <table:table-cell table:style-name="ce1"/>
          <table:table-cell office:value-type="string" office:string-value="Europe" table:formula="of:=[Raw_Data.A16]" table:style-name="ce1">
            <text:p>Europe</text:p>
          </table:table-cell>
          <table:table-cell office:value-type="string" table:style-name="ce1">
            <text:p>FY2023</text:p>
          </table:table-cell>
          <table:table-cell office:value-type="float" office:value="94294" table:formula="of:=[Raw_Data.D16]" table:style-name="ce1">
            <text:p>94294</text:p>
          </table:table-cell>
          <table:table-cell table:number-columns-repeated="16377"/>
        </table:table-row>
        <table:table-row table:style-name="ro6">
          <table:table-cell office:value-type="string" office:string-value="Mac" table:formula="of:=[Raw_Data.A7]" table:style-name="ce1">
            <text:p>Mac</text:p>
          </table:table-cell>
          <table:table-cell office:value-type="string" table:style-name="ce1">
            <text:p>FY2024</text:p>
          </table:table-cell>
          <table:table-cell office:value-type="float" office:value="29984" table:formula="of:=[Raw_Data.E7]" table:style-name="ce1">
            <text:p>29984</text:p>
          </table:table-cell>
          <table:table-cell table:style-name="ce1"/>
          <table:table-cell office:value-type="string" office:string-value="Europe" table:formula="of:=[Raw_Data.A16]" table:style-name="ce1">
            <text:p>Europe</text:p>
          </table:table-cell>
          <table:table-cell office:value-type="string" table:style-name="ce1">
            <text:p>FY2024</text:p>
          </table:table-cell>
          <table:table-cell office:value-type="float" office:value="101328" table:formula="of:=[Raw_Data.E16]" table:style-name="ce1">
            <text:p>101328</text:p>
          </table:table-cell>
          <table:table-cell table:number-columns-repeated="16377"/>
        </table:table-row>
        <table:table-row table:style-name="ro6">
          <table:table-cell office:value-type="string" office:string-value="Mac" table:formula="of:=[Raw_Data.A7]" table:style-name="ce1">
            <text:p>Mac</text:p>
          </table:table-cell>
          <table:table-cell office:value-type="string" table:style-name="ce1">
            <text:p>FY2025</text:p>
          </table:table-cell>
          <table:table-cell office:value-type="float" office:value="33708" table:formula="of:=[Raw_Data.F7]" table:style-name="ce1">
            <text:p>33708</text:p>
          </table:table-cell>
          <table:table-cell table:style-name="ce1"/>
          <table:table-cell office:value-type="string" office:string-value="Europe" table:formula="of:=[Raw_Data.A16]" table:style-name="ce1">
            <text:p>Europe</text:p>
          </table:table-cell>
          <table:table-cell office:value-type="string" table:style-name="ce1">
            <text:p>FY2025</text:p>
          </table:table-cell>
          <table:table-cell office:value-type="float" office:value="111032" table:formula="of:=[Raw_Data.F16]" table:style-name="ce1">
            <text:p>111032</text:p>
          </table:table-cell>
          <table:table-cell table:number-columns-repeated="16377"/>
        </table:table-row>
        <table:table-row table:style-name="ro6">
          <table:table-cell office:value-type="string" office:string-value="iPad" table:formula="of:=[Raw_Data.A8]" table:style-name="ce1">
            <text:p>iPad</text:p>
          </table:table-cell>
          <table:table-cell office:value-type="string" table:style-name="ce1">
            <text:p>FY2021</text:p>
          </table:table-cell>
          <table:table-cell office:value-type="float" office:value="31862" table:formula="of:=[Raw_Data.B8]" table:style-name="ce1">
            <text:p>31862</text:p>
          </table:table-cell>
          <table:table-cell table:style-name="ce1"/>
          <table:table-cell office:value-type="string" office:string-value="Greater China" table:formula="of:=[Raw_Data.A17]" table:style-name="ce1">
            <text:p>Greater China</text:p>
          </table:table-cell>
          <table:table-cell office:value-type="string" table:style-name="ce1">
            <text:p>FY2021</text:p>
          </table:table-cell>
          <table:table-cell office:value-type="float" office:value="68366" table:formula="of:=[Raw_Data.B17]" table:style-name="ce1">
            <text:p>68366</text:p>
          </table:table-cell>
          <table:table-cell table:number-columns-repeated="16377"/>
        </table:table-row>
        <table:table-row table:style-name="ro6">
          <table:table-cell office:value-type="string" office:string-value="iPad" table:formula="of:=[Raw_Data.A8]" table:style-name="ce1">
            <text:p>iPad</text:p>
          </table:table-cell>
          <table:table-cell office:value-type="string" table:style-name="ce1">
            <text:p>FY2022</text:p>
          </table:table-cell>
          <table:table-cell office:value-type="float" office:value="29292" table:formula="of:=[Raw_Data.C8]" table:style-name="ce1">
            <text:p>29292</text:p>
          </table:table-cell>
          <table:table-cell table:style-name="ce1"/>
          <table:table-cell office:value-type="string" office:string-value="Greater China" table:formula="of:=[Raw_Data.A17]" table:style-name="ce1">
            <text:p>Greater China</text:p>
          </table:table-cell>
          <table:table-cell office:value-type="string" table:style-name="ce1">
            <text:p>FY2022</text:p>
          </table:table-cell>
          <table:table-cell office:value-type="float" office:value="74200" table:formula="of:=[Raw_Data.C17]" table:style-name="ce1">
            <text:p>74200</text:p>
          </table:table-cell>
          <table:table-cell table:number-columns-repeated="16377"/>
        </table:table-row>
        <table:table-row table:style-name="ro6">
          <table:table-cell office:value-type="string" office:string-value="iPad" table:formula="of:=[Raw_Data.A8]" table:style-name="ce1">
            <text:p>iPad</text:p>
          </table:table-cell>
          <table:table-cell office:value-type="string" table:style-name="ce1">
            <text:p>FY2023</text:p>
          </table:table-cell>
          <table:table-cell office:value-type="float" office:value="28300" table:formula="of:=[Raw_Data.D8]" table:style-name="ce1">
            <text:p>28300</text:p>
          </table:table-cell>
          <table:table-cell table:style-name="ce1"/>
          <table:table-cell office:value-type="string" office:string-value="Greater China" table:formula="of:=[Raw_Data.A17]" table:style-name="ce1">
            <text:p>Greater China</text:p>
          </table:table-cell>
          <table:table-cell office:value-type="string" table:style-name="ce1">
            <text:p>FY2023</text:p>
          </table:table-cell>
          <table:table-cell office:value-type="float" office:value="72559" table:formula="of:=[Raw_Data.D17]" table:style-name="ce1">
            <text:p>72559</text:p>
          </table:table-cell>
          <table:table-cell table:number-columns-repeated="16377"/>
        </table:table-row>
        <table:table-row table:style-name="ro6">
          <table:table-cell office:value-type="string" office:string-value="iPad" table:formula="of:=[Raw_Data.A8]" table:style-name="ce1">
            <text:p>iPad</text:p>
          </table:table-cell>
          <table:table-cell office:value-type="string" table:style-name="ce1">
            <text:p>FY2024</text:p>
          </table:table-cell>
          <table:table-cell office:value-type="float" office:value="26694" table:formula="of:=[Raw_Data.E8]" table:style-name="ce1">
            <text:p>26694</text:p>
          </table:table-cell>
          <table:table-cell table:style-name="ce1"/>
          <table:table-cell office:value-type="string" office:string-value="Greater China" table:formula="of:=[Raw_Data.A17]" table:style-name="ce1">
            <text:p>Greater China</text:p>
          </table:table-cell>
          <table:table-cell office:value-type="string" table:style-name="ce1">
            <text:p>FY2024</text:p>
          </table:table-cell>
          <table:table-cell office:value-type="float" office:value="66952" table:formula="of:=[Raw_Data.E17]" table:style-name="ce1">
            <text:p>66952</text:p>
          </table:table-cell>
          <table:table-cell table:number-columns-repeated="16377"/>
        </table:table-row>
        <table:table-row table:style-name="ro6">
          <table:table-cell office:value-type="string" office:string-value="iPad" table:formula="of:=[Raw_Data.A8]" table:style-name="ce1">
            <text:p>iPad</text:p>
          </table:table-cell>
          <table:table-cell office:value-type="string" table:style-name="ce1">
            <text:p>FY2025</text:p>
          </table:table-cell>
          <table:table-cell office:value-type="float" office:value="28023" table:formula="of:=[Raw_Data.F8]" table:style-name="ce1">
            <text:p>28023</text:p>
          </table:table-cell>
          <table:table-cell table:style-name="ce1"/>
          <table:table-cell office:value-type="string" office:string-value="Greater China" table:formula="of:=[Raw_Data.A17]" table:style-name="ce1">
            <text:p>Greater China</text:p>
          </table:table-cell>
          <table:table-cell office:value-type="string" table:style-name="ce1">
            <text:p>FY2025</text:p>
          </table:table-cell>
          <table:table-cell office:value-type="float" office:value="64377" table:formula="of:=[Raw_Data.F17]" table:style-name="ce1">
            <text:p>64377</text:p>
          </table:table-cell>
          <table:table-cell table:number-columns-repeated="16377"/>
        </table:table-row>
        <table:table-row table:style-name="ro6">
          <table:table-cell office:value-type="string" office:string-value="Wearables, Home &amp; Accessories" table:formula="of:=[Raw_Data.A9]" table:style-name="ce1">
            <text:p>Wearables, Home &amp; Accessories</text:p>
          </table:table-cell>
          <table:table-cell office:value-type="string" table:style-name="ce1">
            <text:p>FY2021</text:p>
          </table:table-cell>
          <table:table-cell office:value-type="float" office:value="38367" table:formula="of:=[Raw_Data.B9]" table:style-name="ce1">
            <text:p>38367</text:p>
          </table:table-cell>
          <table:table-cell table:style-name="ce1"/>
          <table:table-cell office:value-type="string" office:string-value="Japan" table:formula="of:=[Raw_Data.A18]" table:style-name="ce1">
            <text:p>Japan</text:p>
          </table:table-cell>
          <table:table-cell office:value-type="string" table:style-name="ce1">
            <text:p>FY2021</text:p>
          </table:table-cell>
          <table:table-cell office:value-type="float" office:value="28482" table:formula="of:=[Raw_Data.B18]" table:style-name="ce1">
            <text:p>28482</text:p>
          </table:table-cell>
          <table:table-cell table:number-columns-repeated="16377"/>
        </table:table-row>
        <table:table-row table:style-name="ro6">
          <table:table-cell office:value-type="string" office:string-value="Wearables, Home &amp; Accessories" table:formula="of:=[Raw_Data.A9]" table:style-name="ce1">
            <text:p>Wearables, Home &amp; Accessories</text:p>
          </table:table-cell>
          <table:table-cell office:value-type="string" table:style-name="ce1">
            <text:p>FY2022</text:p>
          </table:table-cell>
          <table:table-cell office:value-type="float" office:value="41241" table:formula="of:=[Raw_Data.C9]" table:style-name="ce1">
            <text:p>41241</text:p>
          </table:table-cell>
          <table:table-cell table:style-name="ce1"/>
          <table:table-cell office:value-type="string" office:string-value="Japan" table:formula="of:=[Raw_Data.A18]" table:style-name="ce1">
            <text:p>Japan</text:p>
          </table:table-cell>
          <table:table-cell office:value-type="string" table:style-name="ce1">
            <text:p>FY2022</text:p>
          </table:table-cell>
          <table:table-cell office:value-type="float" office:value="25977" table:formula="of:=[Raw_Data.C18]" table:style-name="ce1">
            <text:p>25977</text:p>
          </table:table-cell>
          <table:table-cell table:number-columns-repeated="16377"/>
        </table:table-row>
        <table:table-row table:style-name="ro6">
          <table:table-cell office:value-type="string" office:string-value="Wearables, Home &amp; Accessories" table:formula="of:=[Raw_Data.A9]" table:style-name="ce1">
            <text:p>Wearables, Home &amp; Accessories</text:p>
          </table:table-cell>
          <table:table-cell office:value-type="string" table:style-name="ce1">
            <text:p>FY2023</text:p>
          </table:table-cell>
          <table:table-cell office:value-type="float" office:value="39845" table:formula="of:=[Raw_Data.D9]" table:style-name="ce1">
            <text:p>39845</text:p>
          </table:table-cell>
          <table:table-cell table:style-name="ce1"/>
          <table:table-cell office:value-type="string" office:string-value="Japan" table:formula="of:=[Raw_Data.A18]" table:style-name="ce1">
            <text:p>Japan</text:p>
          </table:table-cell>
          <table:table-cell office:value-type="string" table:style-name="ce1">
            <text:p>FY2023</text:p>
          </table:table-cell>
          <table:table-cell office:value-type="float" office:value="24257" table:formula="of:=[Raw_Data.D18]" table:style-name="ce1">
            <text:p>24257</text:p>
          </table:table-cell>
          <table:table-cell table:number-columns-repeated="16377"/>
        </table:table-row>
        <table:table-row table:style-name="ro6">
          <table:table-cell office:value-type="string" office:string-value="Wearables, Home &amp; Accessories" table:formula="of:=[Raw_Data.A9]" table:style-name="ce1">
            <text:p>Wearables, Home &amp; Accessories</text:p>
          </table:table-cell>
          <table:table-cell office:value-type="string" table:style-name="ce1">
            <text:p>FY2024</text:p>
          </table:table-cell>
          <table:table-cell office:value-type="float" office:value="37005" table:formula="of:=[Raw_Data.E9]" table:style-name="ce1">
            <text:p>37005</text:p>
          </table:table-cell>
          <table:table-cell table:style-name="ce1"/>
          <table:table-cell office:value-type="string" office:string-value="Japan" table:formula="of:=[Raw_Data.A18]" table:style-name="ce1">
            <text:p>Japan</text:p>
          </table:table-cell>
          <table:table-cell office:value-type="string" table:style-name="ce1">
            <text:p>FY2024</text:p>
          </table:table-cell>
          <table:table-cell office:value-type="float" office:value="25052" table:formula="of:=[Raw_Data.E18]" table:style-name="ce1">
            <text:p>25052</text:p>
          </table:table-cell>
          <table:table-cell table:number-columns-repeated="16377"/>
        </table:table-row>
        <table:table-row table:style-name="ro6">
          <table:table-cell office:value-type="string" office:string-value="Wearables, Home &amp; Accessories" table:formula="of:=[Raw_Data.A9]" table:style-name="ce1">
            <text:p>Wearables, Home &amp; Accessories</text:p>
          </table:table-cell>
          <table:table-cell office:value-type="string" table:style-name="ce1">
            <text:p>FY2025</text:p>
          </table:table-cell>
          <table:table-cell office:value-type="float" office:value="35686" table:formula="of:=[Raw_Data.F9]" table:style-name="ce1">
            <text:p>35686</text:p>
          </table:table-cell>
          <table:table-cell table:style-name="ce1"/>
          <table:table-cell office:value-type="string" office:string-value="Japan" table:formula="of:=[Raw_Data.A18]" table:style-name="ce1">
            <text:p>Japan</text:p>
          </table:table-cell>
          <table:table-cell office:value-type="string" table:style-name="ce1">
            <text:p>FY2025</text:p>
          </table:table-cell>
          <table:table-cell office:value-type="float" office:value="28703" table:formula="of:=[Raw_Data.F18]" table:style-name="ce1">
            <text:p>28703</text:p>
          </table:table-cell>
          <table:table-cell table:number-columns-repeated="16377"/>
        </table:table-row>
        <table:table-row table:style-name="ro6">
          <table:table-cell office:value-type="string" office:string-value="Services" table:formula="of:=[Raw_Data.A10]" table:style-name="ce1">
            <text:p>Services</text:p>
          </table:table-cell>
          <table:table-cell office:value-type="string" table:style-name="ce1">
            <text:p>FY2021</text:p>
          </table:table-cell>
          <table:table-cell office:value-type="float" office:value="68425" table:formula="of:=[Raw_Data.B10]" table:style-name="ce1">
            <text:p>68425</text:p>
          </table:table-cell>
          <table:table-cell table:style-name="ce1"/>
          <table:table-cell office:value-type="string" office:string-value="Rest of Asia Pacific" table:formula="of:=[Raw_Data.A19]" table:style-name="ce1">
            <text:p>Rest of Asia Pacific</text:p>
          </table:table-cell>
          <table:table-cell office:value-type="string" table:style-name="ce1">
            <text:p>FY2021</text:p>
          </table:table-cell>
          <table:table-cell office:value-type="float" office:value="26356" table:formula="of:=[Raw_Data.B19]" table:style-name="ce1">
            <text:p>26356</text:p>
          </table:table-cell>
          <table:table-cell table:number-columns-repeated="16377"/>
        </table:table-row>
        <table:table-row table:style-name="ro6">
          <table:table-cell office:value-type="string" office:string-value="Services" table:formula="of:=[Raw_Data.A10]" table:style-name="ce1">
            <text:p>Services</text:p>
          </table:table-cell>
          <table:table-cell office:value-type="string" table:style-name="ce1">
            <text:p>FY2022</text:p>
          </table:table-cell>
          <table:table-cell office:value-type="float" office:value="78129" table:formula="of:=[Raw_Data.C10]" table:style-name="ce1">
            <text:p>78129</text:p>
          </table:table-cell>
          <table:table-cell table:style-name="ce1"/>
          <table:table-cell office:value-type="string" office:string-value="Rest of Asia Pacific" table:formula="of:=[Raw_Data.A19]" table:style-name="ce1">
            <text:p>Rest of Asia Pacific</text:p>
          </table:table-cell>
          <table:table-cell office:value-type="string" table:style-name="ce1">
            <text:p>FY2022</text:p>
          </table:table-cell>
          <table:table-cell office:value-type="float" office:value="29375" table:formula="of:=[Raw_Data.C19]" table:style-name="ce1">
            <text:p>29375</text:p>
          </table:table-cell>
          <table:table-cell table:number-columns-repeated="16377"/>
        </table:table-row>
        <table:table-row table:style-name="ro6">
          <table:table-cell office:value-type="string" office:string-value="Services" table:formula="of:=[Raw_Data.A10]" table:style-name="ce1">
            <text:p>Services</text:p>
          </table:table-cell>
          <table:table-cell office:value-type="string" table:style-name="ce1">
            <text:p>FY2023</text:p>
          </table:table-cell>
          <table:table-cell office:value-type="float" office:value="85200" table:formula="of:=[Raw_Data.D10]" table:style-name="ce1">
            <text:p>85200</text:p>
          </table:table-cell>
          <table:table-cell table:style-name="ce1"/>
          <table:table-cell office:value-type="string" office:string-value="Rest of Asia Pacific" table:formula="of:=[Raw_Data.A19]" table:style-name="ce1">
            <text:p>Rest of Asia Pacific</text:p>
          </table:table-cell>
          <table:table-cell office:value-type="string" table:style-name="ce1">
            <text:p>FY2023</text:p>
          </table:table-cell>
          <table:table-cell office:value-type="float" office:value="29615" table:formula="of:=[Raw_Data.D19]" table:style-name="ce1">
            <text:p>29615</text:p>
          </table:table-cell>
          <table:table-cell table:number-columns-repeated="16377"/>
        </table:table-row>
        <table:table-row table:style-name="ro6">
          <table:table-cell office:value-type="string" office:string-value="Services" table:formula="of:=[Raw_Data.A10]" table:style-name="ce1">
            <text:p>Services</text:p>
          </table:table-cell>
          <table:table-cell office:value-type="string" table:style-name="ce1">
            <text:p>FY2024</text:p>
          </table:table-cell>
          <table:table-cell office:value-type="float" office:value="96169" table:formula="of:=[Raw_Data.E10]" table:style-name="ce1">
            <text:p>96169</text:p>
          </table:table-cell>
          <table:table-cell table:style-name="ce1"/>
          <table:table-cell office:value-type="string" office:string-value="Rest of Asia Pacific" table:formula="of:=[Raw_Data.A19]" table:style-name="ce1">
            <text:p>Rest of Asia Pacific</text:p>
          </table:table-cell>
          <table:table-cell office:value-type="string" table:style-name="ce1">
            <text:p>FY2024</text:p>
          </table:table-cell>
          <table:table-cell office:value-type="float" office:value="30658" table:formula="of:=[Raw_Data.E19]" table:style-name="ce1">
            <text:p>30658</text:p>
          </table:table-cell>
          <table:table-cell table:number-columns-repeated="16377"/>
        </table:table-row>
        <table:table-row table:style-name="ro6">
          <table:table-cell office:value-type="string" office:string-value="Services" table:formula="of:=[Raw_Data.A10]" table:style-name="ce1">
            <text:p>Services</text:p>
          </table:table-cell>
          <table:table-cell office:value-type="string" table:style-name="ce1">
            <text:p>FY2025</text:p>
          </table:table-cell>
          <table:table-cell office:value-type="float" office:value="109158" table:formula="of:=[Raw_Data.F10]" table:style-name="ce1">
            <text:p>109158</text:p>
          </table:table-cell>
          <table:table-cell table:style-name="ce1"/>
          <table:table-cell office:value-type="string" office:string-value="Rest of Asia Pacific" table:formula="of:=[Raw_Data.A19]" table:style-name="ce1">
            <text:p>Rest of Asia Pacific</text:p>
          </table:table-cell>
          <table:table-cell office:value-type="string" table:style-name="ce1">
            <text:p>FY2025</text:p>
          </table:table-cell>
          <table:table-cell office:value-type="float" office:value="33696" table:formula="of:=[Raw_Data.F19]" table:style-name="ce1">
            <text:p>33696</text:p>
          </table:table-cell>
          <table:table-cell table:number-columns-repeated="16377"/>
        </table:table-row>
        <table:table-row table:number-rows-repeated="1048550" table:style-name="ro6">
          <table:table-cell table:number-columns-repeated="16384"/>
        </table:table-row>
      </table:table>
      <table:named-expressions>
        <table:named-expression table:name="Slicer_Category" table:expression="of:=&quot;&quot;" table:base-cell-address="Executive_Summary.$A$1"/>
        <table:named-expression table:name="Slicer_Fiscal_Year" table:expression="of:=&quot;&quot;" table:base-cell-address="Executive_Summary.$A$1"/>
      </table:named-expressions>
      <table:database-ranges>
        <table:database-range table:target-range-address="Data_Model.A1:Data_Model.C26" table:name="ProductData" table:display-filter-buttons="true"/>
        <table:database-range table:target-range-address="Data_Model.E1:Data_Model.G26" table:name="GeoData" table:display-filter-buttons="true"/>
      </table:database-ranges>
      <table:data-pilot-tables>
        <table:data-pilot-table table:name="pvProduct" table:target-range-address="Dashboard.B100:Dashboard.C106" table:show-filter-button="false" table:buttons="Dashboard.B100">
          <table:source-cell-range table:cell-range-address="Data_Model.A1:Data_Model.C26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enu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iscal 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percentage-style style:name="N38P0">
      <number:number number:decimal-places="1" number:min-decimal-places="1" number:min-integer-digits="1"/>
      <number:text>%</number:text>
    </number:percentage-style>
    <number:percentage-style style:name="N38P1">
      <number:text>(</number:text>
      <number:number number:decimal-places="1" number:min-decimal-places="1" number:min-integer-digits="1"/>
      <number:text>%)</number:text>
    </number:percentage-style>
    <number:text-style style:name="N38">
      <number:text>-</number:text>
      <style:map style:condition="value()&gt;0" style:apply-style-name="N38P0"/>
      <style:map style:condition="value()&lt;0" style:apply-style-name="N38P1"/>
    </number:text-style>
    <number:percentage-style style:name="N40">
      <number:number number:decimal-places="1" number:min-decimal-places="1" number:min-integer-digits="1"/>
      <number:text>%</number:text>
    </number:percentage-style>
    <number:percentage-style style:name="N44P0">
      <number:number number:decimal-places="1" number:min-decimal-places="1" number:min-integer-digits="1"/>
      <number:text>%</number:text>
    </number:percentage-style>
    <number:percentage-style style:name="N44">
      <number:text>(</number:text>
      <number:number number:decimal-places="1" number:min-decimal-places="1" number:min-integer-digits="1"/>
      <number:text>%)</number:text>
      <style:map style:condition="value()&gt;=0" style:apply-style-name="N44P0"/>
    </number:percentage-style>
    <number:number-style style:name="N46">
      <number:text>$</number:text>
      <number:number number:decimal-places="2" number:min-decimal-places="2" number:min-integer-digits="1"/>
    </number:number-style>
    <number:number-style style:name="N47">
      <number:text>$</number:text>
      <number:number number:decimal-places="0" number:min-decimal-places="0" number:min-integer-digits="1" number:grouping="true"/>
    </number:number-style>
    <number:number-style style:name="N48P0">
      <number:text>$</number:text>
      <number:number number:decimal-places="1" number:min-decimal-places="1" number:min-integer-digits="1" number:grouping="true" number:display-factor="1000"/>
      <number:text>B</number:text>
    </number:number-style>
    <number:number-style style:name="N48P1">
      <number:text>($</number:text>
      <number:number number:decimal-places="1" number:min-decimal-places="1" number:min-integer-digits="1" number:grouping="true" number:display-factor="1000"/>
      <number:text>B)</number:text>
    </number:number-style>
    <number:text-style style:name="N48">
      <number:text>–</number:text>
      <style:map style:condition="value()&gt;0" style:apply-style-name="N48P0"/>
      <style:map style:condition="value()&lt;0" style:apply-style-name="N48P1"/>
    </number:text-style>
    <number:number-style style:name="N49">
      <number:text>$</number:text>
      <number:number number:decimal-places="1" number:min-decimal-places="1" number:min-integer-digits="1" number:grouping="true" number:display-factor="1000"/>
      <number:text>B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ext-properties fo:color="#1D8A3F"/>
    </style:style>
    <style:style style:name="cf2" style:family="table-cell">
      <style:text-properties fo:color="#D70015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30026</meta:generator>
    <meta:initial-creator>krunal soni</meta:initial-creator>
    <dc:creator>krunal soni</dc:creator>
    <meta:creation-date>2026-06-20T05:17:48Z</meta:creation-date>
    <dc:date>2026-06-20T17:48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text>$</number:text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e3e3e8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48.0pt" svg:width="484.5pt" chart:style-name="Crt0">
        <chart:title chart:style-name="CT00">
          <text:p text:style-name="a0" text:class-names="" text:cond-style-name="">Revenue by Product Line ($M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Raw_Data.$B$5:.$F$5"/>
          </chart:axis>
          <chart:axis chart:dimension="y" chart:name="primary-y" chart:style-name="Axs1">
            <chart:grid chart:class="major" chart:style-name="GMa1"/>
          </chart:axis>
          <chart:series chart:label-cell-address="Raw_Data.$A$6" chart:values-cell-range-address="Raw_Data.$B$6:.$F$6" chart:class="chart:bar" chart:attached-axis="primary-y" chart:style-name="G0S0">
            <chart:data-point chart:repeated="5"/>
          </chart:series>
          <chart:series chart:label-cell-address="Raw_Data.$A$7" chart:values-cell-range-address="Raw_Data.$B$7:.$F$7" chart:class="chart:bar" chart:attached-axis="primary-y" chart:style-name="G0S1">
            <chart:data-point chart:repeated="5"/>
          </chart:series>
          <chart:series chart:label-cell-address="Raw_Data.$A$8" chart:values-cell-range-address="Raw_Data.$B$8:.$F$8" chart:class="chart:bar" chart:attached-axis="primary-y" chart:style-name="G0S2">
            <chart:data-point chart:repeated="5"/>
          </chart:series>
          <chart:series chart:label-cell-address="Raw_Data.$A$9" chart:values-cell-range-address="Raw_Data.$B$9:.$F$9" chart:class="chart:bar" chart:attached-axis="primary-y" chart:style-name="G0S3">
            <chart:data-point chart:repeated="5"/>
          </chart:series>
          <chart:series chart:label-cell-address="Raw_Data.$A$10" chart:values-cell-range-address="Raw_Data.$B$10:.$F$10" chart:class="chart:bar" chart:attached-axis="primary-y" chart:style-name="G0S4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8P0">
      <number:number number:decimal-places="1" number:min-decimal-places="1" number:min-integer-digits="1"/>
      <number:text>%</number:text>
    </number:percentage-style>
    <number:percentage-style style:name="N38P1">
      <number:text>(</number:text>
      <number:number number:decimal-places="1" number:min-decimal-places="1" number:min-integer-digits="1"/>
      <number:text>%)</number:text>
    </number:percentage-style>
    <number:text-style style:name="N38">
      <number:text>-</number:text>
      <style:map style:condition="value()&gt;0" style:apply-style-name="N38P0"/>
      <style:map style:condition="value()&lt;0" style:apply-style-name="N38P1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3e3e8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48.0pt" svg:width="407.0pt" chart:style-name="Crt0">
        <chart:title chart:style-name="CT00">
          <text:p text:style-name="a0" text:class-names="" text:cond-style-name="">Margin Trend (% of revenue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is.$B$23:.$F$23"/>
          </chart:axis>
          <chart:axis chart:dimension="y" chart:name="primary-y" chart:style-name="Axs1">
            <chart:grid chart:class="major" chart:style-name="GMa1"/>
          </chart:axis>
          <chart:series chart:label-cell-address="Analysis.$A$24" chart:values-cell-range-address="Analysis.$B$24:.$F$24" chart:class="chart:line" chart:attached-axis="primary-y" chart:style-name="G0S0">
            <chart:data-point chart:repeated="5"/>
          </chart:series>
          <chart:series chart:label-cell-address="Analysis.$A$25" chart:values-cell-range-address="Analysis.$B$25:.$F$25" chart:class="chart:line" chart:attached-axis="primary-y" chart:style-name="G0S1">
            <chart:data-point chart:repeated="5"/>
          </chart:series>
          <chart:series chart:label-cell-address="Analysis.$A$26" chart:values-cell-range-address="Analysis.$B$26:.$F$26" chart:class="chart:line" chart:attached-axis="primary-y" chart:style-name="G0S2">
            <chart:data-point chart:repeated="5"/>
          </chart:series>
          <chart:series chart:label-cell-address="Analysis.$A$27" chart:values-cell-range-address="Analysis.$B$27:.$F$27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text>$</number:text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3e3e8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7.25pt" svg:width="484.5pt" chart:style-name="Crt0">
        <chart:title chart:style-name="CT00">
          <text:p text:style-name="a0" text:class-names="" text:cond-style-name="">Free Cash Flow vs Capital Returned ($M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Dashboard.$T$46:.$T$50"/>
          </chart:axis>
          <chart:axis chart:dimension="y" chart:name="primary-y" chart:style-name="Axs1">
            <chart:grid chart:class="major" chart:style-name="GMa1"/>
          </chart:axis>
          <chart:series chart:label-cell-address="Dashboard.$U$45" chart:values-cell-range-address="Dashboard.$U$46:.$U$50" chart:class="chart:bar" chart:attached-axis="primary-y" chart:style-name="G0S0">
            <chart:data-point chart:repeated="5"/>
          </chart:series>
          <chart:series chart:label-cell-address="Dashboard.$V$45" chart:values-cell-range-address="Dashboard.$V$46:.$V$50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e3e3e8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ring" svg:height="257.25pt" svg:width="407.0pt" chart:style-name="Crt0">
        <chart:title chart:style-name="CT00">
          <text:p text:style-name="a0" text:class-names="" text:cond-style-name="">FY2025 Revenue Mix by Product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Dashboard.$N$46:.$N$50"/>
          </chart:axis>
          <chart:axis chart:dimension="y"/>
          <chart:series chart:label-cell-address="Dashboard.$O$45" chart:values-cell-range-address="Dashboard.$O$46:.$O$50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text>$</number:text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3e3e8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48.5pt" svg:width="484.5pt" chart:style-name="Crt0">
        <chart:title chart:style-name="CT00">
          <text:p text:style-name="a0" text:class-names="" text:cond-style-name="">FY2025 Revenue by Geography ($M)</text:p>
        </chart:title>
        <chart:plot-area chart:style-name="Plt0">
          <chart:axis chart:dimension="x" chart:name="primary-x" chart:style-name="Axs0">
            <chart:categories table:cell-range-address="Dashboard.$Q$46:.$Q$50"/>
          </chart:axis>
          <chart:axis chart:dimension="y" chart:name="primary-y" chart:style-name="Axs1">
            <chart:grid chart:class="major" chart:style-name="GMa1"/>
          </chart:axis>
          <chart:series chart:label-cell-address="Dashboard.$R$45" chart:values-cell-range-address="Dashboard.$R$46:.$R$5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4">
      <number:text>$</number:text>
      <number:number number:decimal-places="0" number:min-decimal-places="0" number:min-integer-digits="1" number:grouping="true" number:display-factor="1000">
        <number:embedded-text number:position="0">B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4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8.75pt" svg:width="407.5pt" chart:style-name="Crt0">
        <chart:title chart:style-name="CT00">
          <text:p text:style-name="a0" text:class-names="" text:cond-style-name="">Revenue by Product ($B) — filtered by slicer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iPad</text:p>
            </table:table-cell>
            <table:table-cell office:value-type="float" office:value="144171"/>
          </table:table-row>
          <table:table-row>
            <table:table-cell office:value-type="string">
              <text:p>iPhone</text:p>
            </table:table-cell>
            <table:table-cell office:value-type="float" office:value="1008814"/>
          </table:table-row>
          <table:table-row>
            <table:table-cell office:value-type="string">
              <text:p>Mac</text:p>
            </table:table-cell>
            <table:table-cell office:value-type="float" office:value="168416"/>
          </table:table-row>
          <table:table-row>
            <table:table-cell office:value-type="string">
              <text:p>Services</text:p>
            </table:table-cell>
            <table:table-cell office:value-type="float" office:value="437081"/>
          </table:table-row>
          <table:table-row>
            <table:table-cell office:value-type="string">
              <text:p>Wearables, Home &amp; Accessories</text:p>
            </table:table-cell>
            <table:table-cell office:value-type="float" office:value="19214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