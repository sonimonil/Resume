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2E75B6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style:repeat-content="false"/>
      <style:paragraph-properties fo:text-align="center"/>
    </style:style>
    <style:style style:name="ce4" style:family="table-cell" style:parent-style-name="Default" style:data-style-name="N37">
      <style:table-cell-properties fo:border-top="thin solid #000000" fo:border-bottom="thin solid #D9D9D9" fo:border-left="thin solid #D9D9D9" fo:border-right="thin solid #D9D9D9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D9D9D9"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fo:border="thin solid #D9D9D9" style:vertical-align="automatic" style:repeat-content="false"/>
      <style:paragraph-properties fo:text-align="center"/>
    </style:style>
    <style:style style:name="ce7" style:family="table-cell" style:parent-style-name="Default" style:data-style-name="N13">
      <style:table-cell-properties fo:border-top="thin solid #000000" fo:border-bottom="thin solid #D9D9D9" fo:border-left="thin solid #D9D9D9" fo:border-right="thin solid #D9D9D9"/>
    </style:style>
    <style:style style:name="ce8" style:family="table-cell" style:parent-style-name="Default" style:data-style-name="N13">
      <style:table-cell-properties fo:border="thin solid #D9D9D9"/>
    </style:style>
    <style:style style:name="ce9" style:family="table-cell" style:parent-style-name="Default" style:data-style-name="N36">
      <style:table-cell-properties fo:border-top="thin solid #000000" fo:border-bottom="thin solid #D9D9D9" fo:border-left="thin solid #D9D9D9" fo:border-right="thin solid #D9D9D9"/>
    </style:style>
    <style:style style:name="ce10" style:family="table-cell" style:parent-style-name="Default" style:data-style-name="N36">
      <style:table-cell-properties fo:border="thin solid #D9D9D9"/>
    </style:style>
    <style:style style:name="ce11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4F6FB"/>
    </style:style>
    <style:style style:name="ce13" style:family="table-cell" style:parent-style-name="Default" style:data-style-name="N0">
      <style:table-cell-properties fo:background-color="#F4F6FB"/>
      <style:text-properties fo:color="#5A5A5A" fo:font-style="italic" style:font-style-asian="italic" style:font-style-complex="italic"/>
    </style:style>
    <style:style style:name="ce14" style:family="table-cell" style:parent-style-name="Default" style:data-style-name="N13">
      <style:table-cell-properties fo:border="thin solid #D9D9D9" fo:background-color="#F4F6FB"/>
    </style:style>
    <style:style style:name="ce15" style:family="table-cell" style:parent-style-name="Default" style:data-style-name="N13">
      <style:table-cell-properties fo:border="thin solid #D9D9D9" fo:background-color="#F4F6FB"/>
      <style:text-properties fo:font-weight="bold" style:font-weight-asian="bold" style:font-weight-complex="bold"/>
    </style:style>
    <style:style style:name="ce16" style:family="table-cell" style:parent-style-name="Default" style:data-style-name="N39">
      <style:table-cell-properties fo:border="thin solid #D9D9D9" fo:background-color="#F4F6FB"/>
      <style:text-properties fo:color="#1F4E79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4F6FB"/>
      <style:text-properties fo:color="#808080" fo:font-size="9pt" style:font-size-asian="9pt" style:font-size-complex="9pt" fo:font-style="italic" style:font-style-asian="italic" style:font-style-complex="italic"/>
    </style:style>
    <style:style style:name="ce18" style:family="table-cell" style:parent-style-name="Default" style:data-style-name="N0">
      <style:table-cell-properties fo:background-color="#264653"/>
      <style:text-properties fo:color="#FFFFFF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264653"/>
    </style:style>
    <style:style style:name="ce20" style:family="table-cell" style:parent-style-name="Default" style:data-style-name="N0">
      <style:table-cell-properties style:vertical-align="automatic" fo:background-color="#264653" style:repeat-content="fals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264653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A9D8F" style:repeat-content="false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2A9D8F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E76F51" style:repeat-content="false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38">
      <style:table-cell-properties style:vertical-align="middle" fo:background-color="#E76F51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F4A261" style:repeat-content="fals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F4A261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6D597A" style:repeat-content="fals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6D597A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457B9D" style:repeat-content="fals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457B9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D9D9D9" style:vertical-align="automatic" fo:background-color="#26465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4F6FB"/>
      <style:text-properties fo:color="#2A9D8F" fo:font-size="13pt" style:font-size-asian="13pt" style:font-size-complex="13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D9D9D9" fo:background-color="#FFFFFF"/>
    </style:style>
    <style:style style:name="ce35" style:family="table-cell" style:parent-style-name="Default" style:data-style-name="N38">
      <style:table-cell-properties fo:border="thin solid #D9D9D9" fo:background-color="#FFFFFF"/>
    </style:style>
    <style:style style:name="ce36" style:family="table-cell" style:parent-style-name="Default" style:data-style-name="N0">
      <style:table-cell-properties fo:border="thin solid #D9D9D9" fo:background-color="#EAF4F2"/>
    </style:style>
    <style:style style:name="ce37" style:family="table-cell" style:parent-style-name="Default" style:data-style-name="N38">
      <style:table-cell-properties fo:border="thin solid #D9D9D9" fo:background-color="#EAF4F2"/>
    </style:style>
    <style:style style:name="ce38" style:family="table-cell" style:parent-style-name="Default" style:data-style-name="N0">
      <style:table-cell-properties fo:border="thin solid #D9D9D9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D9D9D9" style:vertical-align="automatic" fo:background-color="#EAF4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9">
      <style:table-cell-properties fo:border="thin solid #D9D9D9" fo:background-color="#F4F6FB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264653"/>
      <style:text-properties fo:color="#FFFFFF"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4F6FB"/>
      <style:text-properties fo:color="#5A5A5A" fo:font-size="10pt" style:font-size-asian="10pt" style:font-size-complex="10pt"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middle" fo:background-color="#264653" style:repeat-content="false"/>
      <style:paragraph-properties fo:text-align="center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E76F51" style:repeat-content="false"/>
      <style:paragraph-properties fo:text-align="center"/>
      <style:text-properties fo:color="#FFFFFF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2A9D8F" style:repeat-content="false"/>
      <style:paragraph-properties fo:text-align="center"/>
      <style:text-properties fo:color="#FFFFFF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6D597A" style:repeat-content="false"/>
      <style:paragraph-properties fo:text-align="center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background-color="#457B9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E9A93B" style:repeat-content="false"/>
      <style:paragraph-properties fo:text-align="center"/>
      <style:text-properties fo:color="#FFFFFF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background-color="#81B29A" style:repeat-content="false"/>
      <style:paragraph-properties fo:text-align="center"/>
      <style:text-properties fo:color="#FFFFFF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4F6FB"/>
      <style:text-properties fo:color="#F4F6FB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4F6FB"/>
      <style:text-properties fo:color="#F4F6FB" fo:font-size="9pt" style:font-size-asian="9pt" style:font-size-complex="9pt"/>
    </style:style>
    <style:style style:name="ce52" style:family="table-cell" style:parent-style-name="Default" style:data-style-name="N22">
      <style:table-cell-properties style:vertical-align="middle" fo:background-color="#264653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#2A9D8F" style:repeat-content="false"/>
      <style:paragraph-properties fo:text-align="center"/>
      <style:text-properties fo:color="#FFFFFF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2A9D8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#E76F51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EAF4F2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6D597A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457B9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E9A93B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#81B29A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ackground-color="#264653"/>
    </style:style>
    <style:style style:name="ce63" style:family="table-cell" style:parent-style-name="Default" style:data-style-name="N0">
      <style:table-cell-properties style:vertical-align="middle" fo:background-color="#264653" style:repeat-content="false"/>
      <style:paragraph-properties fo:text-align="start" fo:margin-left="0cm"/>
      <style:text-properties fo:color="#FFFFFF" fo:font-size="18pt" style:font-size-asian="18pt" style:font-size-complex="18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4F6FB"/>
    </style:style>
    <style:style style:name="ce65" style:family="table-cell" style:parent-style-name="Default" style:data-style-name="N0">
      <style:table-cell-properties fo:background-color="#F4F6FB"/>
      <style:text-properties fo:color="#5A5A5A" fo:font-style="italic" style:font-style-asian="italic" style:font-style-complex="italic"/>
    </style:style>
    <style:style style:name="ce66" style:family="table-cell" style:parent-style-name="Default" style:data-style-name="N0">
      <style:table-cell-properties style:vertical-align="middle" fo:background-color="#E3E6EA" style:repeat-content="false"/>
      <style:paragraph-properties fo:text-align="center"/>
      <style:text-properties fo:color="#FFFFFF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D9E2E1" style:vertical-align="middle" fo:background-color="#E3E6EA" style:repeat-content="false"/>
      <style:paragraph-properties fo:text-align="center"/>
    </style:style>
    <style:style style:name="ce68" style:family="table-cell" style:parent-style-name="Default" style:data-style-name="N0">
      <style:table-cell-properties fo:background-color="#F4F6FB"/>
      <style:text-properties fo:color="#264653" fo:font-weight="bold" style:font-weight-asian="bold" style:font-weight-complex="bold"/>
    </style:style>
    <style:style style:name="ce69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30">
      <style:table-cell-properties style:vertical-align="middle" fo:background-color="#264653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ext-properties fo:color="#F4F6FB"/>
    </style:style>
    <style:style style:name="ce72" style:family="table-cell" style:parent-style-name="Default" style:data-style-name="N38">
      <style:text-properties fo:color="#F4F6FB"/>
    </style:style>
    <style:style style:name="co1" style:family="table-column">
      <style:table-column-properties fo:break-before="auto" style:column-width="3.35138888888889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62277777777778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564444444444444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4.58611111111111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1.76388888888889cm"/>
    </style:style>
    <style:style style:name="ro1" style:family="table-row">
      <style:table-row-properties style:row-height="2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34pt" style:use-optimal-row-height="false" fo:break-before="auto"/>
    </style:style>
    <style:style style:name="ro8" style:family="table-row">
      <style:table-row-properties style:row-height="22pt" style:use-optimal-row-height="false" fo:break-before="auto"/>
    </style:style>
    <style:style style:name="ro9" style:family="table-row">
      <style:table-row-properties style:row-height="20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2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73" style:family="table-cell" style:parent-style-name="Default" style:data-style-name="N13">
      <style:table-cell-properties fo:border="thin solid #D9D9D9" fo:background-color="#F4F6FB"/>
      <style:map style:condition="of:is-true-formula(ISNA([.B18]))" style:apply-style-name="cf2" style:base-cell-address="Dashboard.B18"/>
      <style:map style:condition="of:is-true-formula(ISNA([.B18]))" style:apply-style-name="cf1" style:base-cell-address="Dashboard.B18"/>
    </style:style>
    <style:style style:name="ce74" style:family="table-cell" style:parent-style-name="Default" style:data-style-name="N13">
      <style:table-cell-properties fo:border="thin solid #D9D9D9" fo:background-color="#F4F6FB"/>
      <style:text-properties fo:font-weight="bold" style:font-weight-asian="bold" style:font-weight-complex="bold"/>
      <style:map style:condition="of:is-true-formula(ISNA([.B18]))" style:apply-style-name="cf2" style:base-cell-address="Dashboard.B18"/>
      <style:map style:condition="of:is-true-formula(ISNA([.B18]))" style:apply-style-name="cf1" style:base-cell-address="Dashboard.B18"/>
    </style:style>
    <style:style style:name="ce75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6]&lt;&gt;&quot;&quot;)" style:apply-style-name="cf3" style:base-cell-address="Tracker.C6"/>
    </style:style>
    <style:style style:name="ce76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15]&lt;&gt;&quot;&quot;)" style:apply-style-name="cf3" style:base-cell-address="Tracker.C15"/>
    </style:style>
    <style:style style:name="ce77" style:family="table-cell" style:parent-style-name="Default" style:data-style-name="N0">
      <style:table-cell-properties fo:border="thin solid #D9E2E1" style:vertical-align="middle" fo:background-color="#E3E6EA" style:repeat-content="false"/>
      <style:paragraph-properties fo:text-align="center"/>
      <style:map style:condition="of:is-true-formula([.C15]&lt;&gt;&quot;&quot;)" style:apply-style-name="cf3" style:base-cell-address="Tracker.C15"/>
    </style:style>
    <style:style style:name="ce78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24]&lt;&gt;&quot;&quot;)" style:apply-style-name="cf3" style:base-cell-address="Tracker.C24"/>
    </style:style>
    <style:style style:name="ce79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33]&lt;&gt;&quot;&quot;)" style:apply-style-name="cf3" style:base-cell-address="Tracker.C33"/>
    </style:style>
    <style:style style:name="ce80" style:family="table-cell" style:parent-style-name="Default" style:data-style-name="N0">
      <style:table-cell-properties fo:border="thin solid #D9E2E1" style:vertical-align="middle" fo:background-color="#E3E6EA" style:repeat-content="false"/>
      <style:paragraph-properties fo:text-align="center"/>
      <style:map style:condition="of:is-true-formula([.C33]&lt;&gt;&quot;&quot;)" style:apply-style-name="cf3" style:base-cell-address="Tracker.C33"/>
    </style:style>
    <style:style style:name="ce81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42]&lt;&gt;&quot;&quot;)" style:apply-style-name="cf3" style:base-cell-address="Tracker.C42"/>
    </style:style>
    <style:style style:name="ce82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51]&lt;&gt;&quot;&quot;)" style:apply-style-name="cf3" style:base-cell-address="Tracker.C51"/>
    </style:style>
    <style:style style:name="ce83" style:family="table-cell" style:parent-style-name="Default" style:data-style-name="N0">
      <style:table-cell-properties fo:border="thin solid #D9E2E1" style:vertical-align="middle" fo:background-color="#E3E6EA" style:repeat-content="false"/>
      <style:paragraph-properties fo:text-align="center"/>
      <style:map style:condition="of:is-true-formula([.C51]&lt;&gt;&quot;&quot;)" style:apply-style-name="cf3" style:base-cell-address="Tracker.C51"/>
    </style:style>
    <style:style style:name="ce84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60]&lt;&gt;&quot;&quot;)" style:apply-style-name="cf3" style:base-cell-address="Tracker.C60"/>
    </style:style>
    <style:style style:name="ce85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69]&lt;&gt;&quot;&quot;)" style:apply-style-name="cf3" style:base-cell-address="Tracker.C69"/>
    </style:style>
    <style:style style:name="ce86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78]&lt;&gt;&quot;&quot;)" style:apply-style-name="cf3" style:base-cell-address="Tracker.C78"/>
    </style:style>
    <style:style style:name="ce87" style:family="table-cell" style:parent-style-name="Default" style:data-style-name="N0">
      <style:table-cell-properties fo:border="thin solid #D9E2E1" style:vertical-align="middle" fo:background-color="#E3E6EA" style:repeat-content="false"/>
      <style:paragraph-properties fo:text-align="center"/>
      <style:map style:condition="of:is-true-formula([.C78]&lt;&gt;&quot;&quot;)" style:apply-style-name="cf3" style:base-cell-address="Tracker.C78"/>
    </style:style>
    <style:style style:name="ce88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87]&lt;&gt;&quot;&quot;)" style:apply-style-name="cf3" style:base-cell-address="Tracker.C87"/>
    </style:style>
    <style:style style:name="ce89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96]&lt;&gt;&quot;&quot;)" style:apply-style-name="cf3" style:base-cell-address="Tracker.C96"/>
    </style:style>
    <style:style style:name="ce90" style:family="table-cell" style:parent-style-name="Default" style:data-style-name="N0">
      <style:table-cell-properties fo:border="thin solid #D9E2E1" style:vertical-align="middle" fo:background-color="#E3E6EA" style:repeat-content="false"/>
      <style:paragraph-properties fo:text-align="center"/>
      <style:map style:condition="of:is-true-formula([.C96]&lt;&gt;&quot;&quot;)" style:apply-style-name="cf3" style:base-cell-address="Tracker.C96"/>
    </style:style>
    <style:style style:name="ce91" style:family="table-cell" style:parent-style-name="Default" style:data-style-name="N0">
      <style:table-cell-properties fo:border="thin solid #D9E2E1" style:vertical-align="middle" style:repeat-content="false"/>
      <style:paragraph-properties fo:text-align="center"/>
      <style:map style:condition="of:is-true-formula([.C105]&lt;&gt;&quot;&quot;)" style:apply-style-name="cf3" style:base-cell-address="Tracker.C105"/>
    </style:style>
    <style:style style:name="ce92" style:family="table-cell" style:parent-style-name="Default" style:data-style-name="N37">
      <style:table-cell-properties fo:border-top="thin solid #000000" fo:border-bottom="thin solid #D9D9D9" fo:border-left="thin solid #D9D9D9" fo:border-right="thin solid #D9D9D9" style:vertical-align="automatic" style:repeat-content="false"/>
      <style:paragraph-properties fo:text-align="center"/>
      <style:map style:condition="of:cell-content()=1" style:apply-style-name="cf4"/>
      <style:map style:condition="of:cell-content()=1" style:apply-style-name="cf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✓&quot;)">
          <table:help-message table:display="true"/>
          <table:error-message table:display="true"/>
        </table:content-validation>
      </table:content-validations>
      <table:table table:name="Dashboard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8">
            <text:p>PROGRESS DASHBOARD</text:p>
          </table:table-cell>
          <table:table-cell table:number-columns-repeated="7" table:style-name="ce19"/>
          <table:table-cell table:number-columns-repeated="9" table:style-name="ce12"/>
          <table:table-cell table:number-columns-repeated="16367"/>
        </table:table-row>
        <table:table-row table:style-name="ro2">
          <table:table-cell office:value-type="string" table:style-name="ce13">
            <text:p>Live view of your 2026 habit progress — updates as you fill in the Tracker.</text:p>
          </table:table-cell>
          <table:table-cell table:number-columns-repeated="16" table:style-name="ce12"/>
          <table:table-cell table:number-columns-repeated="16367"/>
        </table:table-row>
        <table:table-row table:style-name="ro2">
          <table:table-cell table:number-columns-repeated="9" table:style-name="ce12"/>
          <table:table-cell table:style-name="ce12">
            <draw:frame draw:z-index="1" draw:id="id0" draw:style-name="a0" draw:name="Chart 1" svg:x="0in" svg:y="0in" svg:width="5.30556in" svg:height="3.486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2"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20">
            <text:p>📅 <text:s/>Days into 2026</text:p>
          </table:table-cell>
          <table:covered-table-cell/>
          <table:table-cell office:value-type="string" table:number-columns-spanned="2" table:number-rows-spanned="1" table:style-name="ce22">
            <text:p>✅ <text:s/>Habits Completed</text:p>
          </table:table-cell>
          <table:covered-table-cell/>
          <table:table-cell office:value-type="string" table:number-columns-spanned="2" table:number-rows-spanned="1" table:style-name="ce24">
            <text:p>🎯 <text:s/>Overall Completion</text:p>
          </table:table-cell>
          <table:covered-table-cell/>
          <table:table-cell office:value-type="string" table:number-columns-spanned="2" table:number-rows-spanned="1" table:style-name="ce26">
            <text:p>🔥 <text:s/>Best Streak (days)</text:p>
          </table:table-cell>
          <table:covered-table-cell/>
          <table:table-cell table:number-columns-repeated="9" table:style-name="ce12"/>
          <table:table-cell table:number-columns-repeated="16367"/>
        </table:table-row>
        <table:table-row table:style-name="ro3">
          <table:table-cell office:value-type="float" office:value="165" table:formula="of:=MIN(TODAY();DATE(2026;12;31))-DATE(2026;1;1)+1" table:number-columns-spanned="2" table:number-rows-spanned="1" table:style-name="ce21">
            <text:p>165</text:p>
          </table:table-cell>
          <table:covered-table-cell/>
          <table:table-cell office:value-type="float" office:value="0" table:formula="of:=SUM([Engine.J4:.J368])" table:number-columns-spanned="2" table:number-rows-spanned="1" table:style-name="ce23">
            <text:p>0</text:p>
          </table:table-cell>
          <table:covered-table-cell/>
          <table:table-cell office:value-type="percentage" office:value="0" table:formula="of:=IFERROR([.C5]/([.A5]*6);0)" table:number-columns-spanned="2" table:number-rows-spanned="1" table:style-name="ce25">
            <text:p>0.0%</text:p>
          </table:table-cell>
          <table:covered-table-cell/>
          <table:table-cell office:value-type="float" office:value="0" table:formula="of:=MAX([Engine.M4:.R368])" table:number-columns-spanned="2" table:number-rows-spanned="1" table:style-name="ce27">
            <text:p>0</text:p>
          </table:table-cell>
          <table:covered-table-cell/>
          <table:table-cell table:number-columns-repeated="9" table:style-name="ce12"/>
          <table:table-cell table:number-columns-repeated="16367"/>
        </table:table-row>
        <table:table-row table:style-name="ro2">
          <table:table-cell table:number-columns-repeated="17" table:style-name="ce12"/>
          <table:table-cell table:number-columns-repeated="16367"/>
        </table:table-row>
        <table:table-row table:style-name="ro4">
          <table:table-cell office:value-type="string" table:style-name="ce33">
            <text:p>HABIT SUMMARY</text:p>
          </table:table-cell>
          <table:table-cell table:number-columns-repeated="16" table:style-name="ce12"/>
          <table:table-cell table:number-columns-repeated="16367"/>
        </table:table-row>
        <table:table-row table:style-name="ro2">
          <table:table-cell office:value-type="string" table:style-name="ce32">
            <text:p>Habit</text:p>
          </table:table-cell>
          <table:table-cell office:value-type="string" table:style-name="ce32">
            <text:p>Days Done</text:p>
          </table:table-cell>
          <table:table-cell office:value-type="string" table:style-name="ce32">
            <text:p>Completion Rate</text:p>
          </table:table-cell>
          <table:table-cell office:value-type="string" table:style-name="ce32">
            <text:p>Best Streak</text:p>
          </table:table-cell>
          <table:table-cell office:value-type="string" table:style-name="ce32">
            <text:p>Current Streak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office:value-type="string" table:style-name="ce38">
            <text:p>🏃 Exercise</text:p>
          </table:table-cell>
          <table:table-cell office:value-type="float" office:value="0" table:formula="of:=SUM([Engine.D:.D])" table:style-name="ce34">
            <text:p>0</text:p>
          </table:table-cell>
          <table:table-cell office:value-type="percentage" office:value="0" table:formula="of:=IFERROR([.B9]/[.$A$5];0)" table:style-name="ce35">
            <text:p>0.0%</text:p>
          </table:table-cell>
          <table:table-cell office:value-type="float" office:value="0" table:formula="of:=MAX([Engine.M:.M])" table:style-name="ce34">
            <text:p>0</text:p>
          </table:table-cell>
          <table:table-cell office:value-type="float" office:value="0" table:formula="of:=IFERROR(INDEX([Engine.M:.M];MATCH(TODAY();[Engine.A:.A];0));0)" table:style-name="ce34">
            <text:p>0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office:value-type="string" table:style-name="ce39">
            <text:p>📖 Reading</text:p>
          </table:table-cell>
          <table:table-cell office:value-type="float" office:value="0" table:formula="of:=SUM([Engine.E:.E])" table:style-name="ce36">
            <text:p>0</text:p>
          </table:table-cell>
          <table:table-cell office:value-type="percentage" office:value="0" table:formula="of:=IFERROR([.B10]/[.$A$5];0)" table:style-name="ce37">
            <text:p>0.0%</text:p>
          </table:table-cell>
          <table:table-cell office:value-type="float" office:value="0" table:formula="of:=MAX([Engine.N:.N])" table:style-name="ce36">
            <text:p>0</text:p>
          </table:table-cell>
          <table:table-cell office:value-type="float" office:value="0" table:formula="of:=IFERROR(INDEX([Engine.N:.N];MATCH(TODAY();[Engine.A:.A];0));0)" table:style-name="ce36">
            <text:p>0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office:value-type="string" table:style-name="ce38">
            <text:p>🧘 Meditation</text:p>
          </table:table-cell>
          <table:table-cell office:value-type="float" office:value="0" table:formula="of:=SUM([Engine.F:.F])" table:style-name="ce34">
            <text:p>0</text:p>
          </table:table-cell>
          <table:table-cell office:value-type="percentage" office:value="0" table:formula="of:=IFERROR([.B11]/[.$A$5];0)" table:style-name="ce35">
            <text:p>0.0%</text:p>
          </table:table-cell>
          <table:table-cell office:value-type="float" office:value="0" table:formula="of:=MAX([Engine.O:.O])" table:style-name="ce34">
            <text:p>0</text:p>
          </table:table-cell>
          <table:table-cell office:value-type="float" office:value="0" table:formula="of:=IFERROR(INDEX([Engine.O:.O];MATCH(TODAY();[Engine.A:.A];0));0)" table:style-name="ce34">
            <text:p>0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office:value-type="string" table:style-name="ce39">
            <text:p>💧 Water</text:p>
          </table:table-cell>
          <table:table-cell office:value-type="float" office:value="0" table:formula="of:=SUM([Engine.G:.G])" table:style-name="ce36">
            <text:p>0</text:p>
          </table:table-cell>
          <table:table-cell office:value-type="percentage" office:value="0" table:formula="of:=IFERROR([.B12]/[.$A$5];0)" table:style-name="ce37">
            <text:p>0.0%</text:p>
          </table:table-cell>
          <table:table-cell office:value-type="float" office:value="0" table:formula="of:=MAX([Engine.P:.P])" table:style-name="ce36">
            <text:p>0</text:p>
          </table:table-cell>
          <table:table-cell office:value-type="float" office:value="0" table:formula="of:=IFERROR(INDEX([Engine.P:.P];MATCH(TODAY();[Engine.A:.A];0));0)" table:style-name="ce36">
            <text:p>0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office:value-type="string" table:style-name="ce38">
            <text:p>😴 Sleep</text:p>
          </table:table-cell>
          <table:table-cell office:value-type="float" office:value="0" table:formula="of:=SUM([Engine.H:.H])" table:style-name="ce34">
            <text:p>0</text:p>
          </table:table-cell>
          <table:table-cell office:value-type="percentage" office:value="0" table:formula="of:=IFERROR([.B13]/[.$A$5];0)" table:style-name="ce35">
            <text:p>0.0%</text:p>
          </table:table-cell>
          <table:table-cell office:value-type="float" office:value="0" table:formula="of:=MAX([Engine.Q:.Q])" table:style-name="ce34">
            <text:p>0</text:p>
          </table:table-cell>
          <table:table-cell office:value-type="float" office:value="0" table:formula="of:=IFERROR(INDEX([Engine.Q:.Q];MATCH(TODAY();[Engine.A:.A];0));0)" table:style-name="ce34">
            <text:p>0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office:value-type="string" table:style-name="ce39">
            <text:p>🥗 Diet</text:p>
          </table:table-cell>
          <table:table-cell office:value-type="float" office:value="0" table:formula="of:=SUM([Engine.I:.I])" table:style-name="ce36">
            <text:p>0</text:p>
          </table:table-cell>
          <table:table-cell office:value-type="percentage" office:value="0" table:formula="of:=IFERROR([.B14]/[.$A$5];0)" table:style-name="ce37">
            <text:p>0.0%</text:p>
          </table:table-cell>
          <table:table-cell office:value-type="float" office:value="0" table:formula="of:=MAX([Engine.R:.R])" table:style-name="ce36">
            <text:p>0</text:p>
          </table:table-cell>
          <table:table-cell office:value-type="float" office:value="0" table:formula="of:=IFERROR(INDEX([Engine.R:.R];MATCH(TODAY();[Engine.A:.A];0));0)" table:style-name="ce36">
            <text:p>0</text:p>
          </table:table-cell>
          <table:table-cell table:number-columns-repeated="12" table:style-name="ce12"/>
          <table:table-cell table:number-columns-repeated="16367"/>
        </table:table-row>
        <table:table-row table:style-name="ro2">
          <table:table-cell table:number-columns-repeated="17" table:style-name="ce12"/>
          <table:table-cell table:number-columns-repeated="16367"/>
        </table:table-row>
        <table:table-row table:style-name="ro4">
          <table:table-cell office:value-type="string" table:style-name="ce33">
            <text:p>MONTHLY COMPLETION %</text:p>
          </table:table-cell>
          <table:table-cell table:number-columns-repeated="16" table:style-name="ce12"/>
          <table:table-cell table:number-columns-repeated="16367"/>
        </table:table-row>
        <table:table-row table:style-name="ro2">
          <table:table-cell office:value-type="string" table:style-name="ce32">
            <text:p>Month</text:p>
          </table:table-cell>
          <table:table-cell office:value-type="string" table:style-name="ce32">
            <text:p>🏃 Exer</text:p>
          </table:table-cell>
          <table:table-cell office:value-type="string" table:style-name="ce32">
            <text:p>📖 Read</text:p>
          </table:table-cell>
          <table:table-cell office:value-type="string" table:style-name="ce32">
            <text:p>🧘 Med</text:p>
          </table:table-cell>
          <table:table-cell office:value-type="string" table:style-name="ce32">
            <text:p>💧 Water</text:p>
          </table:table-cell>
          <table:table-cell office:value-type="string" table:style-name="ce32">
            <text:p>😴 Sleep</text:p>
          </table:table-cell>
          <table:table-cell office:value-type="string" table:style-name="ce32">
            <text:p>🥗 Diet</text:p>
          </table:table-cell>
          <table:table-cell office:value-type="string" table:style-name="ce32">
            <text:p>Overall</text:p>
          </table:table-cell>
          <table:table-cell table:style-name="ce12"/>
          <table:table-cell office:value-type="string" table:style-name="ce50">
            <text:p>Days*</text:p>
          </table:table-cell>
          <table:table-cell table:number-columns-repeated="7" table:style-name="ce12"/>
          <table:table-cell table:number-columns-repeated="16367"/>
        </table:table-row>
        <table:table-row table:style-name="ro2">
          <table:table-cell office:value-type="date" office:date-value="2026-01-01T00:00:00" table:formula="of:=DATE(2026;1;1)" table:style-name="ce40">
            <text:p>Jan</text:p>
          </table:table-cell>
          <table:table-cell office:value-type="percentage" office:value="0" table:formula="of:=IF([.$J18]=0;NA();SUMIFS([Engine.D:.D];[Engine.$A:.$A];&quot;&gt;=&quot;&amp;[.$A18];[Engine.$A:.$A];&quot;&lt;=&quot;&amp;EOMONTH([.$A18];0))/[.$J18])" table:style-name="ce73">
            <text:p>0%</text:p>
          </table:table-cell>
          <table:table-cell office:value-type="percentage" office:value="0" table:formula="of:=IF([.$J18]=0;NA();SUMIFS([Engine.E:.E];[Engine.$A:.$A];&quot;&gt;=&quot;&amp;[.$A18];[Engine.$A:.$A];&quot;&lt;=&quot;&amp;EOMONTH([.$A18];0))/[.$J18])" table:style-name="ce73">
            <text:p>0%</text:p>
          </table:table-cell>
          <table:table-cell office:value-type="percentage" office:value="0" table:formula="of:=IF([.$J18]=0;NA();SUMIFS([Engine.F:.F];[Engine.$A:.$A];&quot;&gt;=&quot;&amp;[.$A18];[Engine.$A:.$A];&quot;&lt;=&quot;&amp;EOMONTH([.$A18];0))/[.$J18])" table:style-name="ce73">
            <text:p>0%</text:p>
          </table:table-cell>
          <table:table-cell office:value-type="percentage" office:value="0" table:formula="of:=IF([.$J18]=0;NA();SUMIFS([Engine.G:.G];[Engine.$A:.$A];&quot;&gt;=&quot;&amp;[.$A18];[Engine.$A:.$A];&quot;&lt;=&quot;&amp;EOMONTH([.$A18];0))/[.$J18])" table:style-name="ce73">
            <text:p>0%</text:p>
          </table:table-cell>
          <table:table-cell office:value-type="percentage" office:value="0" table:formula="of:=IF([.$J18]=0;NA();SUMIFS([Engine.H:.H];[Engine.$A:.$A];&quot;&gt;=&quot;&amp;[.$A18];[Engine.$A:.$A];&quot;&lt;=&quot;&amp;EOMONTH([.$A18];0))/[.$J18])" table:style-name="ce73">
            <text:p>0%</text:p>
          </table:table-cell>
          <table:table-cell office:value-type="percentage" office:value="0" table:formula="of:=IF([.$J18]=0;NA();SUMIFS([Engine.I:.I];[Engine.$A:.$A];&quot;&gt;=&quot;&amp;[.$A18];[Engine.$A:.$A];&quot;&lt;=&quot;&amp;EOMONTH([.$A18];0))/[.$J18])" table:style-name="ce73">
            <text:p>0%</text:p>
          </table:table-cell>
          <table:table-cell office:value-type="percentage" office:value="0" table:formula="of:=IF([.$J18]=0;NA();AVERAGE([.B18:.G18]))" table:style-name="ce74">
            <text:p>0%</text:p>
          </table:table-cell>
          <table:table-cell table:style-name="ce12"/>
          <table:table-cell office:value-type="float" office:value="31" table:formula="of:=MAX(0;MIN(EOMONTH([.$A18];0);TODAY())-[.$A18]+1)" table:style-name="ce51">
            <text:p>31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2-01T00:00:00" table:formula="of:=EDATE([.A18];1)" table:style-name="ce16">
            <text:p>Feb</text:p>
          </table:table-cell>
          <table:table-cell office:value-type="percentage" office:value="0" table:formula="of:=IF([.$J19]=0;NA();SUMIFS([Engine.D:.D];[Engine.$A:.$A];&quot;&gt;=&quot;&amp;[.$A19];[Engine.$A:.$A];&quot;&lt;=&quot;&amp;EOMONTH([.$A19];0))/[.$J19])" table:style-name="ce73">
            <text:p>0%</text:p>
          </table:table-cell>
          <table:table-cell office:value-type="percentage" office:value="0" table:formula="of:=IF([.$J19]=0;NA();SUMIFS([Engine.E:.E];[Engine.$A:.$A];&quot;&gt;=&quot;&amp;[.$A19];[Engine.$A:.$A];&quot;&lt;=&quot;&amp;EOMONTH([.$A19];0))/[.$J19])" table:style-name="ce73">
            <text:p>0%</text:p>
          </table:table-cell>
          <table:table-cell office:value-type="percentage" office:value="0" table:formula="of:=IF([.$J19]=0;NA();SUMIFS([Engine.F:.F];[Engine.$A:.$A];&quot;&gt;=&quot;&amp;[.$A19];[Engine.$A:.$A];&quot;&lt;=&quot;&amp;EOMONTH([.$A19];0))/[.$J19])" table:style-name="ce73">
            <text:p>0%</text:p>
          </table:table-cell>
          <table:table-cell office:value-type="percentage" office:value="0" table:formula="of:=IF([.$J19]=0;NA();SUMIFS([Engine.G:.G];[Engine.$A:.$A];&quot;&gt;=&quot;&amp;[.$A19];[Engine.$A:.$A];&quot;&lt;=&quot;&amp;EOMONTH([.$A19];0))/[.$J19])" table:style-name="ce73">
            <text:p>0%</text:p>
          </table:table-cell>
          <table:table-cell office:value-type="percentage" office:value="0" table:formula="of:=IF([.$J19]=0;NA();SUMIFS([Engine.H:.H];[Engine.$A:.$A];&quot;&gt;=&quot;&amp;[.$A19];[Engine.$A:.$A];&quot;&lt;=&quot;&amp;EOMONTH([.$A19];0))/[.$J19])" table:style-name="ce73">
            <text:p>0%</text:p>
          </table:table-cell>
          <table:table-cell office:value-type="percentage" office:value="0" table:formula="of:=IF([.$J19]=0;NA();SUMIFS([Engine.I:.I];[Engine.$A:.$A];&quot;&gt;=&quot;&amp;[.$A19];[Engine.$A:.$A];&quot;&lt;=&quot;&amp;EOMONTH([.$A19];0))/[.$J19])" table:style-name="ce73">
            <text:p>0%</text:p>
          </table:table-cell>
          <table:table-cell office:value-type="percentage" office:value="0" table:formula="of:=IF([.$J19]=0;NA();AVERAGE([.B19:.G19]))" table:style-name="ce74">
            <text:p>0%</text:p>
          </table:table-cell>
          <table:table-cell table:style-name="ce12"/>
          <table:table-cell office:value-type="float" office:value="28" table:formula="of:=MAX(0;MIN(EOMONTH([.$A19];0);TODAY())-[.$A19]+1)" table:style-name="ce51">
            <text:p>28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3-01T00:00:00" table:formula="of:=EDATE([.A19];1)" table:style-name="ce16">
            <text:p>Mar</text:p>
          </table:table-cell>
          <table:table-cell office:value-type="percentage" office:value="0" table:formula="of:=IF([.$J20]=0;NA();SUMIFS([Engine.D:.D];[Engine.$A:.$A];&quot;&gt;=&quot;&amp;[.$A20];[Engine.$A:.$A];&quot;&lt;=&quot;&amp;EOMONTH([.$A20];0))/[.$J20])" table:style-name="ce73">
            <text:p>0%</text:p>
          </table:table-cell>
          <table:table-cell office:value-type="percentage" office:value="0" table:formula="of:=IF([.$J20]=0;NA();SUMIFS([Engine.E:.E];[Engine.$A:.$A];&quot;&gt;=&quot;&amp;[.$A20];[Engine.$A:.$A];&quot;&lt;=&quot;&amp;EOMONTH([.$A20];0))/[.$J20])" table:style-name="ce73">
            <text:p>0%</text:p>
          </table:table-cell>
          <table:table-cell office:value-type="percentage" office:value="0" table:formula="of:=IF([.$J20]=0;NA();SUMIFS([Engine.F:.F];[Engine.$A:.$A];&quot;&gt;=&quot;&amp;[.$A20];[Engine.$A:.$A];&quot;&lt;=&quot;&amp;EOMONTH([.$A20];0))/[.$J20])" table:style-name="ce73">
            <text:p>0%</text:p>
          </table:table-cell>
          <table:table-cell office:value-type="percentage" office:value="0" table:formula="of:=IF([.$J20]=0;NA();SUMIFS([Engine.G:.G];[Engine.$A:.$A];&quot;&gt;=&quot;&amp;[.$A20];[Engine.$A:.$A];&quot;&lt;=&quot;&amp;EOMONTH([.$A20];0))/[.$J20])" table:style-name="ce73">
            <text:p>0%</text:p>
          </table:table-cell>
          <table:table-cell office:value-type="percentage" office:value="0" table:formula="of:=IF([.$J20]=0;NA();SUMIFS([Engine.H:.H];[Engine.$A:.$A];&quot;&gt;=&quot;&amp;[.$A20];[Engine.$A:.$A];&quot;&lt;=&quot;&amp;EOMONTH([.$A20];0))/[.$J20])" table:style-name="ce73">
            <text:p>0%</text:p>
          </table:table-cell>
          <table:table-cell office:value-type="percentage" office:value="0" table:formula="of:=IF([.$J20]=0;NA();SUMIFS([Engine.I:.I];[Engine.$A:.$A];&quot;&gt;=&quot;&amp;[.$A20];[Engine.$A:.$A];&quot;&lt;=&quot;&amp;EOMONTH([.$A20];0))/[.$J20])" table:style-name="ce73">
            <text:p>0%</text:p>
          </table:table-cell>
          <table:table-cell office:value-type="percentage" office:value="0" table:formula="of:=IF([.$J20]=0;NA();AVERAGE([.B20:.G20]))" table:style-name="ce74">
            <text:p>0%</text:p>
          </table:table-cell>
          <table:table-cell table:style-name="ce12"/>
          <table:table-cell office:value-type="float" office:value="31" table:formula="of:=MAX(0;MIN(EOMONTH([.$A20];0);TODAY())-[.$A20]+1)" table:style-name="ce51">
            <text:p>31</text:p>
            <draw:frame draw:z-index="2" draw:id="id1" draw:style-name="a1" draw:name="Chart 2" svg:x="0in" svg:y="0in" svg:width="5.30556in" svg:height="3.416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4-01T00:00:00" table:formula="of:=EDATE([.A20];1)" table:style-name="ce16">
            <text:p>Apr</text:p>
          </table:table-cell>
          <table:table-cell office:value-type="percentage" office:value="0" table:formula="of:=IF([.$J21]=0;NA();SUMIFS([Engine.D:.D];[Engine.$A:.$A];&quot;&gt;=&quot;&amp;[.$A21];[Engine.$A:.$A];&quot;&lt;=&quot;&amp;EOMONTH([.$A21];0))/[.$J21])" table:style-name="ce73">
            <text:p>0%</text:p>
          </table:table-cell>
          <table:table-cell office:value-type="percentage" office:value="0" table:formula="of:=IF([.$J21]=0;NA();SUMIFS([Engine.E:.E];[Engine.$A:.$A];&quot;&gt;=&quot;&amp;[.$A21];[Engine.$A:.$A];&quot;&lt;=&quot;&amp;EOMONTH([.$A21];0))/[.$J21])" table:style-name="ce73">
            <text:p>0%</text:p>
          </table:table-cell>
          <table:table-cell office:value-type="percentage" office:value="0" table:formula="of:=IF([.$J21]=0;NA();SUMIFS([Engine.F:.F];[Engine.$A:.$A];&quot;&gt;=&quot;&amp;[.$A21];[Engine.$A:.$A];&quot;&lt;=&quot;&amp;EOMONTH([.$A21];0))/[.$J21])" table:style-name="ce73">
            <text:p>0%</text:p>
          </table:table-cell>
          <table:table-cell office:value-type="percentage" office:value="0" table:formula="of:=IF([.$J21]=0;NA();SUMIFS([Engine.G:.G];[Engine.$A:.$A];&quot;&gt;=&quot;&amp;[.$A21];[Engine.$A:.$A];&quot;&lt;=&quot;&amp;EOMONTH([.$A21];0))/[.$J21])" table:style-name="ce73">
            <text:p>0%</text:p>
          </table:table-cell>
          <table:table-cell office:value-type="percentage" office:value="0" table:formula="of:=IF([.$J21]=0;NA();SUMIFS([Engine.H:.H];[Engine.$A:.$A];&quot;&gt;=&quot;&amp;[.$A21];[Engine.$A:.$A];&quot;&lt;=&quot;&amp;EOMONTH([.$A21];0))/[.$J21])" table:style-name="ce73">
            <text:p>0%</text:p>
          </table:table-cell>
          <table:table-cell office:value-type="percentage" office:value="0" table:formula="of:=IF([.$J21]=0;NA();SUMIFS([Engine.I:.I];[Engine.$A:.$A];&quot;&gt;=&quot;&amp;[.$A21];[Engine.$A:.$A];&quot;&lt;=&quot;&amp;EOMONTH([.$A21];0))/[.$J21])" table:style-name="ce73">
            <text:p>0%</text:p>
          </table:table-cell>
          <table:table-cell office:value-type="percentage" office:value="0" table:formula="of:=IF([.$J21]=0;NA();AVERAGE([.B21:.G21]))" table:style-name="ce74">
            <text:p>0%</text:p>
          </table:table-cell>
          <table:table-cell table:style-name="ce12"/>
          <table:table-cell office:value-type="float" office:value="30" table:formula="of:=MAX(0;MIN(EOMONTH([.$A21];0);TODAY())-[.$A21]+1)" table:style-name="ce51">
            <text:p>30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5-01T00:00:00" table:formula="of:=EDATE([.A21];1)" table:style-name="ce16">
            <text:p>May</text:p>
          </table:table-cell>
          <table:table-cell office:value-type="percentage" office:value="0" table:formula="of:=IF([.$J22]=0;NA();SUMIFS([Engine.D:.D];[Engine.$A:.$A];&quot;&gt;=&quot;&amp;[.$A22];[Engine.$A:.$A];&quot;&lt;=&quot;&amp;EOMONTH([.$A22];0))/[.$J22])" table:style-name="ce73">
            <text:p>0%</text:p>
          </table:table-cell>
          <table:table-cell office:value-type="percentage" office:value="0" table:formula="of:=IF([.$J22]=0;NA();SUMIFS([Engine.E:.E];[Engine.$A:.$A];&quot;&gt;=&quot;&amp;[.$A22];[Engine.$A:.$A];&quot;&lt;=&quot;&amp;EOMONTH([.$A22];0))/[.$J22])" table:style-name="ce73">
            <text:p>0%</text:p>
          </table:table-cell>
          <table:table-cell office:value-type="percentage" office:value="0" table:formula="of:=IF([.$J22]=0;NA();SUMIFS([Engine.F:.F];[Engine.$A:.$A];&quot;&gt;=&quot;&amp;[.$A22];[Engine.$A:.$A];&quot;&lt;=&quot;&amp;EOMONTH([.$A22];0))/[.$J22])" table:style-name="ce73">
            <text:p>0%</text:p>
          </table:table-cell>
          <table:table-cell office:value-type="percentage" office:value="0" table:formula="of:=IF([.$J22]=0;NA();SUMIFS([Engine.G:.G];[Engine.$A:.$A];&quot;&gt;=&quot;&amp;[.$A22];[Engine.$A:.$A];&quot;&lt;=&quot;&amp;EOMONTH([.$A22];0))/[.$J22])" table:style-name="ce73">
            <text:p>0%</text:p>
          </table:table-cell>
          <table:table-cell office:value-type="percentage" office:value="0" table:formula="of:=IF([.$J22]=0;NA();SUMIFS([Engine.H:.H];[Engine.$A:.$A];&quot;&gt;=&quot;&amp;[.$A22];[Engine.$A:.$A];&quot;&lt;=&quot;&amp;EOMONTH([.$A22];0))/[.$J22])" table:style-name="ce73">
            <text:p>0%</text:p>
          </table:table-cell>
          <table:table-cell office:value-type="percentage" office:value="0" table:formula="of:=IF([.$J22]=0;NA();SUMIFS([Engine.I:.I];[Engine.$A:.$A];&quot;&gt;=&quot;&amp;[.$A22];[Engine.$A:.$A];&quot;&lt;=&quot;&amp;EOMONTH([.$A22];0))/[.$J22])" table:style-name="ce73">
            <text:p>0%</text:p>
          </table:table-cell>
          <table:table-cell office:value-type="percentage" office:value="0" table:formula="of:=IF([.$J22]=0;NA();AVERAGE([.B22:.G22]))" table:style-name="ce74">
            <text:p>0%</text:p>
          </table:table-cell>
          <table:table-cell table:style-name="ce12"/>
          <table:table-cell office:value-type="float" office:value="31" table:formula="of:=MAX(0;MIN(EOMONTH([.$A22];0);TODAY())-[.$A22]+1)" table:style-name="ce51">
            <text:p>31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6-01T00:00:00" table:formula="of:=EDATE([.A22];1)" table:style-name="ce16">
            <text:p>Jun</text:p>
          </table:table-cell>
          <table:table-cell office:value-type="percentage" office:value="0" table:formula="of:=IF([.$J23]=0;NA();SUMIFS([Engine.D:.D];[Engine.$A:.$A];&quot;&gt;=&quot;&amp;[.$A23];[Engine.$A:.$A];&quot;&lt;=&quot;&amp;EOMONTH([.$A23];0))/[.$J23])" table:style-name="ce73">
            <text:p>0%</text:p>
          </table:table-cell>
          <table:table-cell office:value-type="percentage" office:value="0" table:formula="of:=IF([.$J23]=0;NA();SUMIFS([Engine.E:.E];[Engine.$A:.$A];&quot;&gt;=&quot;&amp;[.$A23];[Engine.$A:.$A];&quot;&lt;=&quot;&amp;EOMONTH([.$A23];0))/[.$J23])" table:style-name="ce73">
            <text:p>0%</text:p>
          </table:table-cell>
          <table:table-cell office:value-type="percentage" office:value="0" table:formula="of:=IF([.$J23]=0;NA();SUMIFS([Engine.F:.F];[Engine.$A:.$A];&quot;&gt;=&quot;&amp;[.$A23];[Engine.$A:.$A];&quot;&lt;=&quot;&amp;EOMONTH([.$A23];0))/[.$J23])" table:style-name="ce73">
            <text:p>0%</text:p>
          </table:table-cell>
          <table:table-cell office:value-type="percentage" office:value="0" table:formula="of:=IF([.$J23]=0;NA();SUMIFS([Engine.G:.G];[Engine.$A:.$A];&quot;&gt;=&quot;&amp;[.$A23];[Engine.$A:.$A];&quot;&lt;=&quot;&amp;EOMONTH([.$A23];0))/[.$J23])" table:style-name="ce73">
            <text:p>0%</text:p>
          </table:table-cell>
          <table:table-cell office:value-type="percentage" office:value="0" table:formula="of:=IF([.$J23]=0;NA();SUMIFS([Engine.H:.H];[Engine.$A:.$A];&quot;&gt;=&quot;&amp;[.$A23];[Engine.$A:.$A];&quot;&lt;=&quot;&amp;EOMONTH([.$A23];0))/[.$J23])" table:style-name="ce73">
            <text:p>0%</text:p>
          </table:table-cell>
          <table:table-cell office:value-type="percentage" office:value="0" table:formula="of:=IF([.$J23]=0;NA();SUMIFS([Engine.I:.I];[Engine.$A:.$A];&quot;&gt;=&quot;&amp;[.$A23];[Engine.$A:.$A];&quot;&lt;=&quot;&amp;EOMONTH([.$A23];0))/[.$J23])" table:style-name="ce73">
            <text:p>0%</text:p>
          </table:table-cell>
          <table:table-cell office:value-type="percentage" office:value="0" table:formula="of:=IF([.$J23]=0;NA();AVERAGE([.B23:.G23]))" table:style-name="ce74">
            <text:p>0%</text:p>
          </table:table-cell>
          <table:table-cell table:style-name="ce12"/>
          <table:table-cell office:value-type="float" office:value="14" table:formula="of:=MAX(0;MIN(EOMONTH([.$A23];0);TODAY())-[.$A23]+1)" table:style-name="ce51">
            <text:p>14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7-01T00:00:00" table:formula="of:=EDATE([.A23];1)" table:style-name="ce16">
            <text:p>Jul</text:p>
          </table:table-cell>
          <table:table-cell office:value-type="percentage" office:value="0" table:formula="of:=IF([.$J24]=0;NA();SUMIFS([Engine.D:.D];[Engine.$A:.$A];&quot;&gt;=&quot;&amp;[.$A24];[Engine.$A:.$A];&quot;&lt;=&quot;&amp;EOMONTH([.$A24];0))/[.$J24])" table:style-name="ce73">
            <text:p>#N/A</text:p>
          </table:table-cell>
          <table:table-cell office:value-type="percentage" office:value="0" table:formula="of:=IF([.$J24]=0;NA();SUMIFS([Engine.E:.E];[Engine.$A:.$A];&quot;&gt;=&quot;&amp;[.$A24];[Engine.$A:.$A];&quot;&lt;=&quot;&amp;EOMONTH([.$A24];0))/[.$J24])" table:style-name="ce73">
            <text:p>#N/A</text:p>
          </table:table-cell>
          <table:table-cell office:value-type="percentage" office:value="0" table:formula="of:=IF([.$J24]=0;NA();SUMIFS([Engine.F:.F];[Engine.$A:.$A];&quot;&gt;=&quot;&amp;[.$A24];[Engine.$A:.$A];&quot;&lt;=&quot;&amp;EOMONTH([.$A24];0))/[.$J24])" table:style-name="ce73">
            <text:p>#N/A</text:p>
          </table:table-cell>
          <table:table-cell office:value-type="percentage" office:value="0" table:formula="of:=IF([.$J24]=0;NA();SUMIFS([Engine.G:.G];[Engine.$A:.$A];&quot;&gt;=&quot;&amp;[.$A24];[Engine.$A:.$A];&quot;&lt;=&quot;&amp;EOMONTH([.$A24];0))/[.$J24])" table:style-name="ce73">
            <text:p>#N/A</text:p>
          </table:table-cell>
          <table:table-cell office:value-type="percentage" office:value="0" table:formula="of:=IF([.$J24]=0;NA();SUMIFS([Engine.H:.H];[Engine.$A:.$A];&quot;&gt;=&quot;&amp;[.$A24];[Engine.$A:.$A];&quot;&lt;=&quot;&amp;EOMONTH([.$A24];0))/[.$J24])" table:style-name="ce73">
            <text:p>#N/A</text:p>
          </table:table-cell>
          <table:table-cell office:value-type="percentage" office:value="0" table:formula="of:=IF([.$J24]=0;NA();SUMIFS([Engine.I:.I];[Engine.$A:.$A];&quot;&gt;=&quot;&amp;[.$A24];[Engine.$A:.$A];&quot;&lt;=&quot;&amp;EOMONTH([.$A24];0))/[.$J24])" table:style-name="ce73">
            <text:p>#N/A</text:p>
          </table:table-cell>
          <table:table-cell office:value-type="percentage" office:value="0" table:formula="of:=IF([.$J24]=0;NA();AVERAGE([.B24:.G24]))" table:style-name="ce74">
            <text:p>#N/A</text:p>
          </table:table-cell>
          <table:table-cell table:style-name="ce12"/>
          <table:table-cell office:value-type="float" office:value="0" table:formula="of:=MAX(0;MIN(EOMONTH([.$A24];0);TODAY())-[.$A24]+1)" table:style-name="ce51">
            <text:p>0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8-01T00:00:00" table:formula="of:=EDATE([.A24];1)" table:style-name="ce16">
            <text:p>Aug</text:p>
          </table:table-cell>
          <table:table-cell office:value-type="percentage" office:value="0" table:formula="of:=IF([.$J25]=0;NA();SUMIFS([Engine.D:.D];[Engine.$A:.$A];&quot;&gt;=&quot;&amp;[.$A25];[Engine.$A:.$A];&quot;&lt;=&quot;&amp;EOMONTH([.$A25];0))/[.$J25])" table:style-name="ce73">
            <text:p>#N/A</text:p>
          </table:table-cell>
          <table:table-cell office:value-type="percentage" office:value="0" table:formula="of:=IF([.$J25]=0;NA();SUMIFS([Engine.E:.E];[Engine.$A:.$A];&quot;&gt;=&quot;&amp;[.$A25];[Engine.$A:.$A];&quot;&lt;=&quot;&amp;EOMONTH([.$A25];0))/[.$J25])" table:style-name="ce73">
            <text:p>#N/A</text:p>
          </table:table-cell>
          <table:table-cell office:value-type="percentage" office:value="0" table:formula="of:=IF([.$J25]=0;NA();SUMIFS([Engine.F:.F];[Engine.$A:.$A];&quot;&gt;=&quot;&amp;[.$A25];[Engine.$A:.$A];&quot;&lt;=&quot;&amp;EOMONTH([.$A25];0))/[.$J25])" table:style-name="ce73">
            <text:p>#N/A</text:p>
          </table:table-cell>
          <table:table-cell office:value-type="percentage" office:value="0" table:formula="of:=IF([.$J25]=0;NA();SUMIFS([Engine.G:.G];[Engine.$A:.$A];&quot;&gt;=&quot;&amp;[.$A25];[Engine.$A:.$A];&quot;&lt;=&quot;&amp;EOMONTH([.$A25];0))/[.$J25])" table:style-name="ce73">
            <text:p>#N/A</text:p>
          </table:table-cell>
          <table:table-cell office:value-type="percentage" office:value="0" table:formula="of:=IF([.$J25]=0;NA();SUMIFS([Engine.H:.H];[Engine.$A:.$A];&quot;&gt;=&quot;&amp;[.$A25];[Engine.$A:.$A];&quot;&lt;=&quot;&amp;EOMONTH([.$A25];0))/[.$J25])" table:style-name="ce73">
            <text:p>#N/A</text:p>
          </table:table-cell>
          <table:table-cell office:value-type="percentage" office:value="0" table:formula="of:=IF([.$J25]=0;NA();SUMIFS([Engine.I:.I];[Engine.$A:.$A];&quot;&gt;=&quot;&amp;[.$A25];[Engine.$A:.$A];&quot;&lt;=&quot;&amp;EOMONTH([.$A25];0))/[.$J25])" table:style-name="ce73">
            <text:p>#N/A</text:p>
          </table:table-cell>
          <table:table-cell office:value-type="percentage" office:value="0" table:formula="of:=IF([.$J25]=0;NA();AVERAGE([.B25:.G25]))" table:style-name="ce74">
            <text:p>#N/A</text:p>
          </table:table-cell>
          <table:table-cell table:style-name="ce12"/>
          <table:table-cell office:value-type="float" office:value="0" table:formula="of:=MAX(0;MIN(EOMONTH([.$A25];0);TODAY())-[.$A25]+1)" table:style-name="ce51">
            <text:p>0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09-01T00:00:00" table:formula="of:=EDATE([.A25];1)" table:style-name="ce16">
            <text:p>Sep</text:p>
          </table:table-cell>
          <table:table-cell office:value-type="percentage" office:value="0" table:formula="of:=IF([.$J26]=0;NA();SUMIFS([Engine.D:.D];[Engine.$A:.$A];&quot;&gt;=&quot;&amp;[.$A26];[Engine.$A:.$A];&quot;&lt;=&quot;&amp;EOMONTH([.$A26];0))/[.$J26])" table:style-name="ce73">
            <text:p>#N/A</text:p>
          </table:table-cell>
          <table:table-cell office:value-type="percentage" office:value="0" table:formula="of:=IF([.$J26]=0;NA();SUMIFS([Engine.E:.E];[Engine.$A:.$A];&quot;&gt;=&quot;&amp;[.$A26];[Engine.$A:.$A];&quot;&lt;=&quot;&amp;EOMONTH([.$A26];0))/[.$J26])" table:style-name="ce73">
            <text:p>#N/A</text:p>
          </table:table-cell>
          <table:table-cell office:value-type="percentage" office:value="0" table:formula="of:=IF([.$J26]=0;NA();SUMIFS([Engine.F:.F];[Engine.$A:.$A];&quot;&gt;=&quot;&amp;[.$A26];[Engine.$A:.$A];&quot;&lt;=&quot;&amp;EOMONTH([.$A26];0))/[.$J26])" table:style-name="ce73">
            <text:p>#N/A</text:p>
          </table:table-cell>
          <table:table-cell office:value-type="percentage" office:value="0" table:formula="of:=IF([.$J26]=0;NA();SUMIFS([Engine.G:.G];[Engine.$A:.$A];&quot;&gt;=&quot;&amp;[.$A26];[Engine.$A:.$A];&quot;&lt;=&quot;&amp;EOMONTH([.$A26];0))/[.$J26])" table:style-name="ce73">
            <text:p>#N/A</text:p>
          </table:table-cell>
          <table:table-cell office:value-type="percentage" office:value="0" table:formula="of:=IF([.$J26]=0;NA();SUMIFS([Engine.H:.H];[Engine.$A:.$A];&quot;&gt;=&quot;&amp;[.$A26];[Engine.$A:.$A];&quot;&lt;=&quot;&amp;EOMONTH([.$A26];0))/[.$J26])" table:style-name="ce73">
            <text:p>#N/A</text:p>
          </table:table-cell>
          <table:table-cell office:value-type="percentage" office:value="0" table:formula="of:=IF([.$J26]=0;NA();SUMIFS([Engine.I:.I];[Engine.$A:.$A];&quot;&gt;=&quot;&amp;[.$A26];[Engine.$A:.$A];&quot;&lt;=&quot;&amp;EOMONTH([.$A26];0))/[.$J26])" table:style-name="ce73">
            <text:p>#N/A</text:p>
          </table:table-cell>
          <table:table-cell office:value-type="percentage" office:value="0" table:formula="of:=IF([.$J26]=0;NA();AVERAGE([.B26:.G26]))" table:style-name="ce74">
            <text:p>#N/A</text:p>
          </table:table-cell>
          <table:table-cell table:style-name="ce12"/>
          <table:table-cell office:value-type="float" office:value="0" table:formula="of:=MAX(0;MIN(EOMONTH([.$A26];0);TODAY())-[.$A26]+1)" table:style-name="ce51">
            <text:p>0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10-01T00:00:00" table:formula="of:=EDATE([.A26];1)" table:style-name="ce16">
            <text:p>Oct</text:p>
          </table:table-cell>
          <table:table-cell office:value-type="percentage" office:value="0" table:formula="of:=IF([.$J27]=0;NA();SUMIFS([Engine.D:.D];[Engine.$A:.$A];&quot;&gt;=&quot;&amp;[.$A27];[Engine.$A:.$A];&quot;&lt;=&quot;&amp;EOMONTH([.$A27];0))/[.$J27])" table:style-name="ce73">
            <text:p>#N/A</text:p>
          </table:table-cell>
          <table:table-cell office:value-type="percentage" office:value="0" table:formula="of:=IF([.$J27]=0;NA();SUMIFS([Engine.E:.E];[Engine.$A:.$A];&quot;&gt;=&quot;&amp;[.$A27];[Engine.$A:.$A];&quot;&lt;=&quot;&amp;EOMONTH([.$A27];0))/[.$J27])" table:style-name="ce73">
            <text:p>#N/A</text:p>
          </table:table-cell>
          <table:table-cell office:value-type="percentage" office:value="0" table:formula="of:=IF([.$J27]=0;NA();SUMIFS([Engine.F:.F];[Engine.$A:.$A];&quot;&gt;=&quot;&amp;[.$A27];[Engine.$A:.$A];&quot;&lt;=&quot;&amp;EOMONTH([.$A27];0))/[.$J27])" table:style-name="ce73">
            <text:p>#N/A</text:p>
          </table:table-cell>
          <table:table-cell office:value-type="percentage" office:value="0" table:formula="of:=IF([.$J27]=0;NA();SUMIFS([Engine.G:.G];[Engine.$A:.$A];&quot;&gt;=&quot;&amp;[.$A27];[Engine.$A:.$A];&quot;&lt;=&quot;&amp;EOMONTH([.$A27];0))/[.$J27])" table:style-name="ce73">
            <text:p>#N/A</text:p>
          </table:table-cell>
          <table:table-cell office:value-type="percentage" office:value="0" table:formula="of:=IF([.$J27]=0;NA();SUMIFS([Engine.H:.H];[Engine.$A:.$A];&quot;&gt;=&quot;&amp;[.$A27];[Engine.$A:.$A];&quot;&lt;=&quot;&amp;EOMONTH([.$A27];0))/[.$J27])" table:style-name="ce73">
            <text:p>#N/A</text:p>
          </table:table-cell>
          <table:table-cell office:value-type="percentage" office:value="0" table:formula="of:=IF([.$J27]=0;NA();SUMIFS([Engine.I:.I];[Engine.$A:.$A];&quot;&gt;=&quot;&amp;[.$A27];[Engine.$A:.$A];&quot;&lt;=&quot;&amp;EOMONTH([.$A27];0))/[.$J27])" table:style-name="ce73">
            <text:p>#N/A</text:p>
          </table:table-cell>
          <table:table-cell office:value-type="percentage" office:value="0" table:formula="of:=IF([.$J27]=0;NA();AVERAGE([.B27:.G27]))" table:style-name="ce74">
            <text:p>#N/A</text:p>
          </table:table-cell>
          <table:table-cell table:style-name="ce12"/>
          <table:table-cell office:value-type="float" office:value="0" table:formula="of:=MAX(0;MIN(EOMONTH([.$A27];0);TODAY())-[.$A27]+1)" table:style-name="ce51">
            <text:p>0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11-01T00:00:00" table:formula="of:=EDATE([.A27];1)" table:style-name="ce16">
            <text:p>Nov</text:p>
          </table:table-cell>
          <table:table-cell office:value-type="percentage" office:value="0" table:formula="of:=IF([.$J28]=0;NA();SUMIFS([Engine.D:.D];[Engine.$A:.$A];&quot;&gt;=&quot;&amp;[.$A28];[Engine.$A:.$A];&quot;&lt;=&quot;&amp;EOMONTH([.$A28];0))/[.$J28])" table:style-name="ce73">
            <text:p>#N/A</text:p>
          </table:table-cell>
          <table:table-cell office:value-type="percentage" office:value="0" table:formula="of:=IF([.$J28]=0;NA();SUMIFS([Engine.E:.E];[Engine.$A:.$A];&quot;&gt;=&quot;&amp;[.$A28];[Engine.$A:.$A];&quot;&lt;=&quot;&amp;EOMONTH([.$A28];0))/[.$J28])" table:style-name="ce73">
            <text:p>#N/A</text:p>
          </table:table-cell>
          <table:table-cell office:value-type="percentage" office:value="0" table:formula="of:=IF([.$J28]=0;NA();SUMIFS([Engine.F:.F];[Engine.$A:.$A];&quot;&gt;=&quot;&amp;[.$A28];[Engine.$A:.$A];&quot;&lt;=&quot;&amp;EOMONTH([.$A28];0))/[.$J28])" table:style-name="ce73">
            <text:p>#N/A</text:p>
          </table:table-cell>
          <table:table-cell office:value-type="percentage" office:value="0" table:formula="of:=IF([.$J28]=0;NA();SUMIFS([Engine.G:.G];[Engine.$A:.$A];&quot;&gt;=&quot;&amp;[.$A28];[Engine.$A:.$A];&quot;&lt;=&quot;&amp;EOMONTH([.$A28];0))/[.$J28])" table:style-name="ce73">
            <text:p>#N/A</text:p>
          </table:table-cell>
          <table:table-cell office:value-type="percentage" office:value="0" table:formula="of:=IF([.$J28]=0;NA();SUMIFS([Engine.H:.H];[Engine.$A:.$A];&quot;&gt;=&quot;&amp;[.$A28];[Engine.$A:.$A];&quot;&lt;=&quot;&amp;EOMONTH([.$A28];0))/[.$J28])" table:style-name="ce73">
            <text:p>#N/A</text:p>
          </table:table-cell>
          <table:table-cell office:value-type="percentage" office:value="0" table:formula="of:=IF([.$J28]=0;NA();SUMIFS([Engine.I:.I];[Engine.$A:.$A];&quot;&gt;=&quot;&amp;[.$A28];[Engine.$A:.$A];&quot;&lt;=&quot;&amp;EOMONTH([.$A28];0))/[.$J28])" table:style-name="ce73">
            <text:p>#N/A</text:p>
          </table:table-cell>
          <table:table-cell office:value-type="percentage" office:value="0" table:formula="of:=IF([.$J28]=0;NA();AVERAGE([.B28:.G28]))" table:style-name="ce74">
            <text:p>#N/A</text:p>
          </table:table-cell>
          <table:table-cell table:style-name="ce12"/>
          <table:table-cell office:value-type="float" office:value="0" table:formula="of:=MAX(0;MIN(EOMONTH([.$A28];0);TODAY())-[.$A28]+1)" table:style-name="ce51">
            <text:p>0</text:p>
          </table:table-cell>
          <table:table-cell table:number-columns-repeated="7" table:style-name="ce12"/>
          <table:table-cell table:number-columns-repeated="16367"/>
        </table:table-row>
        <table:table-row table:style-name="ro5">
          <table:table-cell office:value-type="date" office:date-value="2026-12-01T00:00:00" table:formula="of:=EDATE([.A28];1)" table:style-name="ce16">
            <text:p>Dec</text:p>
          </table:table-cell>
          <table:table-cell office:value-type="percentage" office:value="0" table:formula="of:=IF([.$J29]=0;NA();SUMIFS([Engine.D:.D];[Engine.$A:.$A];&quot;&gt;=&quot;&amp;[.$A29];[Engine.$A:.$A];&quot;&lt;=&quot;&amp;EOMONTH([.$A29];0))/[.$J29])" table:style-name="ce73">
            <text:p>#N/A</text:p>
          </table:table-cell>
          <table:table-cell office:value-type="percentage" office:value="0" table:formula="of:=IF([.$J29]=0;NA();SUMIFS([Engine.E:.E];[Engine.$A:.$A];&quot;&gt;=&quot;&amp;[.$A29];[Engine.$A:.$A];&quot;&lt;=&quot;&amp;EOMONTH([.$A29];0))/[.$J29])" table:style-name="ce73">
            <text:p>#N/A</text:p>
          </table:table-cell>
          <table:table-cell office:value-type="percentage" office:value="0" table:formula="of:=IF([.$J29]=0;NA();SUMIFS([Engine.F:.F];[Engine.$A:.$A];&quot;&gt;=&quot;&amp;[.$A29];[Engine.$A:.$A];&quot;&lt;=&quot;&amp;EOMONTH([.$A29];0))/[.$J29])" table:style-name="ce73">
            <text:p>#N/A</text:p>
          </table:table-cell>
          <table:table-cell office:value-type="percentage" office:value="0" table:formula="of:=IF([.$J29]=0;NA();SUMIFS([Engine.G:.G];[Engine.$A:.$A];&quot;&gt;=&quot;&amp;[.$A29];[Engine.$A:.$A];&quot;&lt;=&quot;&amp;EOMONTH([.$A29];0))/[.$J29])" table:style-name="ce73">
            <text:p>#N/A</text:p>
          </table:table-cell>
          <table:table-cell office:value-type="percentage" office:value="0" table:formula="of:=IF([.$J29]=0;NA();SUMIFS([Engine.H:.H];[Engine.$A:.$A];&quot;&gt;=&quot;&amp;[.$A29];[Engine.$A:.$A];&quot;&lt;=&quot;&amp;EOMONTH([.$A29];0))/[.$J29])" table:style-name="ce73">
            <text:p>#N/A</text:p>
          </table:table-cell>
          <table:table-cell office:value-type="percentage" office:value="0" table:formula="of:=IF([.$J29]=0;NA();SUMIFS([Engine.I:.I];[Engine.$A:.$A];&quot;&gt;=&quot;&amp;[.$A29];[Engine.$A:.$A];&quot;&lt;=&quot;&amp;EOMONTH([.$A29];0))/[.$J29])" table:style-name="ce73">
            <text:p>#N/A</text:p>
          </table:table-cell>
          <table:table-cell office:value-type="percentage" office:value="0" table:formula="of:=IF([.$J29]=0;NA();AVERAGE([.B29:.G29]))" table:style-name="ce74">
            <text:p>#N/A</text:p>
          </table:table-cell>
          <table:table-cell table:style-name="ce12"/>
          <table:table-cell office:value-type="float" office:value="0" table:formula="of:=MAX(0;MIN(EOMONTH([.$A29];0);TODAY())-[.$A29]+1)" table:style-name="ce51">
            <text:p>0</text:p>
          </table:table-cell>
          <table:table-cell table:number-columns-repeated="7" table:style-name="ce12"/>
          <table:table-cell table:number-columns-repeated="16367"/>
        </table:table-row>
        <table:table-row table:style-name="ro2">
          <table:table-cell table:number-columns-repeated="17" table:style-name="ce12"/>
          <table:table-cell table:number-columns-repeated="16367"/>
        </table:table-row>
        <table:table-row table:style-name="ro2">
          <table:table-cell office:value-type="string" table:style-name="ce17">
            <text:p>*Days = days elapsed so far in each month, so % stays fair while the year is in progress.</text:p>
          </table:table-cell>
          <table:table-cell table:number-columns-repeated="16" table:style-name="ce12"/>
          <table:table-cell table:number-columns-repeated="16367"/>
        </table:table-row>
        <table:table-row table:style-name="ro2">
          <table:table-cell table:number-columns-repeated="17" table:style-name="ce12"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28">
            <text:p>🏆 Top Habit</text:p>
          </table:table-cell>
          <table:covered-table-cell/>
          <table:table-cell office:value-type="string" table:number-columns-spanned="2" table:number-rows-spanned="1" table:style-name="ce30">
            <text:p>💡 Needs Attention</text:p>
          </table:table-cell>
          <table:covered-table-cell/>
          <table:table-cell table:number-columns-repeated="13" table:style-name="ce12"/>
          <table:table-cell table:number-columns-repeated="16367"/>
        </table:table-row>
        <table:table-row table:style-name="ro6">
          <table:table-cell office:value-type="string" office:string-value="—" table:formula="of:=IF(SUM([.C9:.C14])=0;&quot;—&quot;;INDEX([.A9:.A14];MATCH(MAX([.C9:.C14]);[.C9:.C14];0)))" table:number-columns-spanned="2" table:number-rows-spanned="1" table:style-name="ce29">
            <text:p>—</text:p>
          </table:table-cell>
          <table:covered-table-cell/>
          <table:table-cell office:value-type="string" office:string-value="—" table:formula="of:=IF(SUM([.C9:.C14])=0;&quot;—&quot;;INDEX([.A9:.A14];MATCH(MIN([.C9:.C14]);[.C9:.C14];0)))" table:number-columns-spanned="2" table:number-rows-spanned="1" table:style-name="ce31">
            <text:p>—</text:p>
          </table:table-cell>
          <table:covered-table-cell/>
          <table:table-cell table:number-columns-repeated="13" table:style-name="ce12"/>
          <table:table-cell table:number-columns-repeated="16367"/>
        </table:table-row>
        <table:table-row table:style-name="ro2">
          <table:table-cell table:number-columns-repeated="17" table:style-name="ce12"/>
          <table:table-cell table:number-columns-repeated="16367"/>
        </table:table-row>
        <table:table-row table:style-name="ro4">
          <table:table-cell office:value-type="string" table:style-name="ce33">
            <text:p>MORE INSIGHTS</text:p>
          </table:table-cell>
          <table:table-cell table:number-columns-repeated="16" table:style-name="ce12"/>
          <table:table-cell table:number-columns-repeated="16367"/>
        </table:table-row>
        <table:table-row table:style-name="ro2">
          <table:table-cell table:style-name="ce12">
            <draw:frame draw:z-index="4" draw:id="id3" draw:style-name="a3" draw:name="Habit Balance" svg:x="0in" svg:y="0in" svg:width="6.73611in" svg:height="4.0277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 table:style-name="ce12"/>
          <table:table-cell table:style-name="ce12">
            <draw:frame draw:z-index="3" draw:id="id2" draw:style-name="a2" draw:name="Overall Progress" svg:x="0in" svg:y="0in" svg:width="1.97222in" svg:height="3.2222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12"/>
          <table:table-cell table:number-columns-repeated="16367"/>
        </table:table-row>
        <table:table-row table:number-rows-repeated="20" table:style-name="ro2">
          <table:table-cell table:number-columns-repeated="17" table:style-name="ce12"/>
          <table:table-cell table:number-columns-repeated="16367"/>
        </table:table-row>
        <table:table-row table:style-name="ro2">
          <table:table-cell table:style-name="ce12">
            <draw:frame draw:z-index="5" draw:id="id4" draw:style-name="a4" draw:name="Habit Trends" svg:x="0in" svg:y="0in" svg:width="14.45833in" svg:height="4.0277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" table:style-name="ce12"/>
          <table:table-cell table:number-columns-repeated="16367"/>
        </table:table-row>
        <table:table-row table:number-rows-repeated="19" table:style-name="ro2">
          <table:table-cell table:number-columns-repeated="17" table:style-name="ce12"/>
          <table:table-cell table:number-columns-repeated="16367"/>
        </table:table-row>
        <table:table-row table:style-name="ro2">
          <table:table-cell office:value-type="string" table:style-name="ce71">
            <text:p>Done</text:p>
          </table:table-cell>
          <table:table-cell office:value-type="float" office:value="0" table:formula="of:=[.E5]" table:style-name="ce7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1">
            <text:p>Remaining</text:p>
          </table:table-cell>
          <table:table-cell office:value-type="percentage" office:value="1" table:formula="of:=1-[.E5]" table:style-name="ce72">
            <text:p>100.0%</text:p>
          </table:table-cell>
          <table:table-cell table:number-columns-repeated="16382" table:style-name="ce1"/>
        </table:table-row>
        <table:table-row table:number-rows-repeated="1048497" table:style-name="ro2">
          <table:table-cell table:number-columns-repeated="16384"/>
        </table:table-row>
      </table:table>
      <table:table table:name="Tracker" table:style-name="ta1">
        <table:table-column table:style-name="co6" table:default-cell-style-name="ce1"/>
        <table:table-column table:style-name="co7" table:default-cell-style-name="ce1"/>
        <table:table-column table:style-name="co8" table:number-columns-repeated="31" table:default-cell-style-name="ce1"/>
        <table:table-column table:style-name="co5" table:number-columns-repeated="16351" table:default-cell-style-name="ce1"/>
        <table:table-row table:style-name="ro7">
          <table:table-cell office:value-type="string" table:number-columns-spanned="34" table:number-rows-spanned="1" table:style-name="ce63">
            <text:p>🎯 <text:s/>HABIT TRACKER 2026</text:p>
          </table:table-cell>
          <table:covered-table-cell table:number-columns-repeated="33"/>
          <table:table-cell table:number-columns-repeated="16350"/>
        </table:table-row>
        <table:table-row table:style-name="ro8">
          <table:table-cell office:value-type="string" table:number-columns-spanned="34" table:number-rows-spanned="1" table:style-name="ce65">
            <text:p>Tip: go to the current month, find today's day-number column, and mark each habit you did (type any mark — a ✓ dropdown is provided). Totals update automatically.</text:p>
          </table:table-cell>
          <table:covered-table-cell table:number-columns-repeated="33"/>
          <table:table-cell table:number-columns-repeated="16350"/>
        </table:table-row>
        <table:table-row table:style-name="ro9">
          <table:table-cell table:style-name="ce68"/>
          <table:table-cell office:value-type="string" table:number-columns-spanned="2" table:number-rows-spanned="1" table:style-name="ce69">
            <text:p><text:a xlink:href="#Tracker.A4">Jan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13">Feb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22">Mar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31">Apr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40">May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49">Jun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58">Jul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67">Aug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76">Sep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85">Oct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94">Nov</text:a></text:p>
          </table:table-cell>
          <table:covered-table-cell/>
          <table:table-cell office:value-type="string" table:number-columns-spanned="2" table:number-rows-spanned="1" table:style-name="ce69">
            <text:p><text:a xlink:href="#Tracker.A103">Dec</text:a></text:p>
          </table:table-cell>
          <table:covered-table-cell/>
          <table:table-cell table:number-columns-repeated="9" table:style-name="ce12"/>
          <table:table-cell table:number-columns-repeated="16350"/>
        </table:table-row>
        <table:table-row table:style-name="ro5">
          <table:table-cell table:style-name="ce1"/>
          <table:table-cell office:value-type="string" table:number-columns-spanned="33" table:number-rows-spanned="1" table:style-name="ce70">
            <text:p><text:s text:c="2"/>January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 table:style-name="ce1"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5">
            <text:p>🏃 Exercise</text:p>
          </table:table-cell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office:value-type="float" office:value="0" table:formula="of:=COUNTA([.C6:.AG6])" table:style-name="ce56">
            <text:p>0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4">
            <text:p>📖 Reading</text:p>
          </table:table-cell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office:value-type="float" office:value="0" table:formula="of:=COUNTA([.C7:.AG7])" table:style-name="ce56">
            <text:p>0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7">
            <text:p>🧘 Meditation</text:p>
          </table:table-cell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office:value-type="float" office:value="0" table:formula="of:=COUNTA([.C8:.AG8])" table:style-name="ce56">
            <text:p>0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8">
            <text:p>💧 Water</text:p>
          </table:table-cell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office:value-type="float" office:value="0" table:formula="of:=COUNTA([.C9:.AG9])" table:style-name="ce56">
            <text:p>0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9">
            <text:p>😴 Sleep</text:p>
          </table:table-cell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office:value-type="float" office:value="0" table:formula="of:=COUNTA([.C10:.AG10])" table:style-name="ce56">
            <text:p>0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60">
            <text:p>🥗 Diet</text:p>
          </table:table-cell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table:content-validation-name="val1" table:style-name="ce75"/>
          <table:table-cell office:value-type="float" office:value="0" table:formula="of:=COUNTA([.C11:.AG11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 table:style-name="ce1"/>
          <table:table-cell office:value-type="string" table:number-columns-spanned="33" table:number-rows-spanned="1" table:style-name="ce70">
            <text:p><text:s text:c="2"/>February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 table:style-name="ce1"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table:number-columns-repeated="3" table:style-name="ce66"/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5">
            <text:p>🏃 Exercise</text:p>
          </table:table-cell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7"/>
          <table:table-cell table:content-validation-name="val1" table:style-name="ce77"/>
          <table:table-cell table:content-validation-name="val1" table:style-name="ce77"/>
          <table:table-cell office:value-type="float" office:value="0" table:formula="of:=COUNTA([.C15:.AG15])" table:style-name="ce56">
            <text:p>0</text:p>
          </table:table-cell>
          <table:table-cell table:number-columns-repeated="16350"/>
        </table:table-row>
        <table:table-row table:style-name="ro9">
          <table:table-cell table:style-name="ce1"/>
          <table:table-cell office:value-type="string" table:style-name="ce54">
            <text:p>📖 Reading</text:p>
          </table:table-cell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7"/>
          <table:table-cell table:content-validation-name="val1" table:style-name="ce77"/>
          <table:table-cell table:content-validation-name="val1" table:style-name="ce77"/>
          <table:table-cell office:value-type="float" office:value="0" table:formula="of:=COUNTA([.C16:.AG16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7"/>
          <table:table-cell table:content-validation-name="val1" table:style-name="ce77"/>
          <table:table-cell table:content-validation-name="val1" table:style-name="ce77"/>
          <table:table-cell office:value-type="float" office:value="0" table:formula="of:=COUNTA([.C17:.AG17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7"/>
          <table:table-cell table:content-validation-name="val1" table:style-name="ce77"/>
          <table:table-cell table:content-validation-name="val1" table:style-name="ce77"/>
          <table:table-cell office:value-type="float" office:value="0" table:formula="of:=COUNTA([.C18:.AG18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7"/>
          <table:table-cell table:content-validation-name="val1" table:style-name="ce77"/>
          <table:table-cell table:content-validation-name="val1" table:style-name="ce77"/>
          <table:table-cell office:value-type="float" office:value="0" table:formula="of:=COUNTA([.C19:.AG19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6"/>
          <table:table-cell table:content-validation-name="val1" table:style-name="ce77"/>
          <table:table-cell table:content-validation-name="val1" table:style-name="ce77"/>
          <table:table-cell table:content-validation-name="val1" table:style-name="ce77"/>
          <table:table-cell office:value-type="float" office:value="0" table:formula="of:=COUNTA([.C20:.AG20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March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office:value-type="float" office:value="0" table:formula="of:=COUNTA([.C24:.AG24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office:value-type="float" office:value="0" table:formula="of:=COUNTA([.C25:.AG25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office:value-type="float" office:value="0" table:formula="of:=COUNTA([.C26:.AG26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office:value-type="float" office:value="0" table:formula="of:=COUNTA([.C27:.AG27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office:value-type="float" office:value="0" table:formula="of:=COUNTA([.C28:.AG28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table:content-validation-name="val1" table:style-name="ce78"/>
          <table:table-cell office:value-type="float" office:value="0" table:formula="of:=COUNTA([.C29:.AG29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April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table:style-name="ce66"/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80"/>
          <table:table-cell office:value-type="float" office:value="0" table:formula="of:=COUNTA([.C33:.AG33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80"/>
          <table:table-cell office:value-type="float" office:value="0" table:formula="of:=COUNTA([.C34:.AG34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80"/>
          <table:table-cell office:value-type="float" office:value="0" table:formula="of:=COUNTA([.C35:.AG35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80"/>
          <table:table-cell office:value-type="float" office:value="0" table:formula="of:=COUNTA([.C36:.AG36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80"/>
          <table:table-cell office:value-type="float" office:value="0" table:formula="of:=COUNTA([.C37:.AG37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79"/>
          <table:table-cell table:content-validation-name="val1" table:style-name="ce80"/>
          <table:table-cell office:value-type="float" office:value="0" table:formula="of:=COUNTA([.C38:.AG38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May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office:value-type="float" office:value="0" table:formula="of:=COUNTA([.C42:.AG42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office:value-type="float" office:value="0" table:formula="of:=COUNTA([.C43:.AG43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office:value-type="float" office:value="0" table:formula="of:=COUNTA([.C44:.AG44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office:value-type="float" office:value="0" table:formula="of:=COUNTA([.C45:.AG45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office:value-type="float" office:value="0" table:formula="of:=COUNTA([.C46:.AG46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table:content-validation-name="val1" table:style-name="ce81"/>
          <table:table-cell office:value-type="float" office:value="0" table:formula="of:=COUNTA([.C47:.AG47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June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table:style-name="ce66"/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3"/>
          <table:table-cell office:value-type="float" office:value="0" table:formula="of:=COUNTA([.C51:.AG51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3"/>
          <table:table-cell office:value-type="float" office:value="0" table:formula="of:=COUNTA([.C52:.AG52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3"/>
          <table:table-cell office:value-type="float" office:value="0" table:formula="of:=COUNTA([.C53:.AG53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3"/>
          <table:table-cell office:value-type="float" office:value="0" table:formula="of:=COUNTA([.C54:.AG54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3"/>
          <table:table-cell office:value-type="float" office:value="0" table:formula="of:=COUNTA([.C55:.AG55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2"/>
          <table:table-cell table:content-validation-name="val1" table:style-name="ce83"/>
          <table:table-cell office:value-type="float" office:value="0" table:formula="of:=COUNTA([.C56:.AG56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July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office:value-type="float" office:value="0" table:formula="of:=COUNTA([.C60:.AG60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office:value-type="float" office:value="0" table:formula="of:=COUNTA([.C61:.AG61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office:value-type="float" office:value="0" table:formula="of:=COUNTA([.C62:.AG62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office:value-type="float" office:value="0" table:formula="of:=COUNTA([.C63:.AG63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office:value-type="float" office:value="0" table:formula="of:=COUNTA([.C64:.AG64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table:content-validation-name="val1" table:style-name="ce84"/>
          <table:table-cell office:value-type="float" office:value="0" table:formula="of:=COUNTA([.C65:.AG65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August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office:value-type="float" office:value="0" table:formula="of:=COUNTA([.C69:.AG69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office:value-type="float" office:value="0" table:formula="of:=COUNTA([.C70:.AG70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office:value-type="float" office:value="0" table:formula="of:=COUNTA([.C71:.AG71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office:value-type="float" office:value="0" table:formula="of:=COUNTA([.C72:.AG72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office:value-type="float" office:value="0" table:formula="of:=COUNTA([.C73:.AG73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table:content-validation-name="val1" table:style-name="ce85"/>
          <table:table-cell office:value-type="float" office:value="0" table:formula="of:=COUNTA([.C74:.AG74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September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table:style-name="ce66"/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7"/>
          <table:table-cell office:value-type="float" office:value="0" table:formula="of:=COUNTA([.C78:.AG78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7"/>
          <table:table-cell office:value-type="float" office:value="0" table:formula="of:=COUNTA([.C79:.AG79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7"/>
          <table:table-cell office:value-type="float" office:value="0" table:formula="of:=COUNTA([.C80:.AG80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7"/>
          <table:table-cell office:value-type="float" office:value="0" table:formula="of:=COUNTA([.C81:.AG81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7"/>
          <table:table-cell office:value-type="float" office:value="0" table:formula="of:=COUNTA([.C82:.AG82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6"/>
          <table:table-cell table:content-validation-name="val1" table:style-name="ce87"/>
          <table:table-cell office:value-type="float" office:value="0" table:formula="of:=COUNTA([.C83:.AG83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October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office:value-type="float" office:value="0" table:formula="of:=COUNTA([.C87:.AG87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office:value-type="float" office:value="0" table:formula="of:=COUNTA([.C88:.AG88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office:value-type="float" office:value="0" table:formula="of:=COUNTA([.C89:.AG89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office:value-type="float" office:value="0" table:formula="of:=COUNTA([.C90:.AG90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office:value-type="float" office:value="0" table:formula="of:=COUNTA([.C91:.AG91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table:content-validation-name="val1" table:style-name="ce88"/>
          <table:table-cell office:value-type="float" office:value="0" table:formula="of:=COUNTA([.C92:.AG92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November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table:style-name="ce66"/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90"/>
          <table:table-cell office:value-type="float" office:value="0" table:formula="of:=COUNTA([.C96:.AG96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90"/>
          <table:table-cell office:value-type="float" office:value="0" table:formula="of:=COUNTA([.C97:.AG97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90"/>
          <table:table-cell office:value-type="float" office:value="0" table:formula="of:=COUNTA([.C98:.AG98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90"/>
          <table:table-cell office:value-type="float" office:value="0" table:formula="of:=COUNTA([.C99:.AG99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90"/>
          <table:table-cell office:value-type="float" office:value="0" table:formula="of:=COUNTA([.C100:.AG100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89"/>
          <table:table-cell table:content-validation-name="val1" table:style-name="ce90"/>
          <table:table-cell office:value-type="float" office:value="0" table:formula="of:=COUNTA([.C101:.AG101])" table:style-name="ce56">
            <text:p>0</text:p>
          </table:table-cell>
          <table:table-cell table:number-columns-repeated="16350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office:value-type="string" table:number-columns-spanned="33" table:number-rows-spanned="1" table:style-name="ce70">
            <text:p><text:s text:c="2"/>December 2026</text:p>
          </table:table-cell>
          <table:covered-table-cell table:number-columns-repeated="32"/>
          <table:table-cell table:number-columns-repeated="16350"/>
        </table:table-row>
        <table:table-row table:style-name="ro9">
          <table:table-cell/>
          <table:table-cell office:value-type="string" table:style-name="ce54">
            <text:p>Habit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string" table:style-name="ce53">
            <text:p>Total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5">
            <text:p>🏃 Exercise</text:p>
          </table:table-cell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office:value-type="float" office:value="0" table:formula="of:=COUNTA([.C105:.AG105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4">
            <text:p>📖 Reading</text:p>
          </table:table-cell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office:value-type="float" office:value="0" table:formula="of:=COUNTA([.C106:.AG106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7">
            <text:p>🧘 Meditation</text:p>
          </table:table-cell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office:value-type="float" office:value="0" table:formula="of:=COUNTA([.C107:.AG107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8">
            <text:p>💧 Water</text:p>
          </table:table-cell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office:value-type="float" office:value="0" table:formula="of:=COUNTA([.C108:.AG108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59">
            <text:p>😴 Sleep</text:p>
          </table:table-cell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office:value-type="float" office:value="0" table:formula="of:=COUNTA([.C109:.AG109])" table:style-name="ce56">
            <text:p>0</text:p>
          </table:table-cell>
          <table:table-cell table:number-columns-repeated="16350"/>
        </table:table-row>
        <table:table-row table:style-name="ro9">
          <table:table-cell/>
          <table:table-cell office:value-type="string" table:style-name="ce60">
            <text:p>🥗 Diet</text:p>
          </table:table-cell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table:content-validation-name="val1" table:style-name="ce91"/>
          <table:table-cell office:value-type="float" office:value="0" table:formula="of:=COUNTA([.C110:.AG110])" table:style-name="ce56">
            <text:p>0</text:p>
          </table:table-cell>
          <table:table-cell table:number-columns-repeated="16350"/>
        </table:table-row>
        <table:table-row table:number-rows-repeated="1048466" table:style-name="ro2">
          <table:table-cell table:number-columns-repeated="16384"/>
        </table:table-row>
      </table:table>
      <table:table table:name="Engine" table:style-name="ta2">
        <table:table-column table:style-name="co9" table:default-cell-style-name="ce1"/>
        <table:table-column table:style-name="co5" table:number-columns-repeated="2" table:default-cell-style-name="ce1"/>
        <table:table-column table:style-name="co10" table:number-columns-repeated="6" table:default-cell-style-name="ce1"/>
        <table:table-column table:style-name="co5" table:number-columns-repeated="3" table:default-cell-style-name="ce1"/>
        <table:table-column-group>
          <table:table-column table:style-name="co11" table:number-columns-repeated="6" table:default-cell-style-name="ce1"/>
        </table:table-column-group>
        <table:table-column table:style-name="co5" table:number-columns-repeated="16366" table:default-cell-style-name="ce1"/>
        <table:table-row table:style-name="ro10">
          <table:table-cell office:value-type="string" table:style-name="ce41">
            <text:p>HABIT TRACKER 2026</text:p>
          </table:table-cell>
          <table:table-cell table:number-columns-repeated="10" table:style-name="ce19"/>
          <table:table-cell table:number-columns-repeated="16373" table:style-name="ce1"/>
        </table:table-row>
        <table:table-row table:style-name="ro2">
          <table:table-cell office:value-type="string" table:style-name="ce42">
            <text:p>Enter 1 on any day you complete a habit. Leave blank if not. Totals and the Dashboard update automatically.</text:p>
          </table:table-cell>
          <table:table-cell table:number-columns-repeated="10" table:style-name="ce12"/>
          <table:table-cell table:number-columns-repeated="16373" table:style-name="ce1"/>
        </table:table-row>
        <table:table-row table:style-name="ro11">
          <table:table-cell office:value-type="string" table:style-name="ce43">
            <text:p>Date</text:p>
          </table:table-cell>
          <table:table-cell office:value-type="string" table:style-name="ce43">
            <text:p>Day</text:p>
          </table:table-cell>
          <table:table-cell office:value-type="string" table:style-name="ce43">
            <text:p>Month</text:p>
          </table:table-cell>
          <table:table-cell office:value-type="string" table:style-name="ce44">
            <text:p>🏃 Exercise</text:p>
          </table:table-cell>
          <table:table-cell office:value-type="string" table:style-name="ce45">
            <text:p>📖 Reading</text:p>
          </table:table-cell>
          <table:table-cell office:value-type="string" table:style-name="ce46">
            <text:p>🧘 Meditation</text:p>
          </table:table-cell>
          <table:table-cell office:value-type="string" table:style-name="ce47">
            <text:p>💧 Water</text:p>
          </table:table-cell>
          <table:table-cell office:value-type="string" table:style-name="ce48">
            <text:p>😴 Sleep</text:p>
          </table:table-cell>
          <table:table-cell office:value-type="string" table:style-name="ce49">
            <text:p>🥗 Diet</text:p>
          </table:table-cell>
          <table:table-cell office:value-type="string" table:style-name="ce43">
            <text:p>Done</text:p>
          </table:table-cell>
          <table:table-cell office:value-type="string" table:style-name="ce43">
            <text:p>%</text:p>
          </table:table-cell>
          <table:table-cell table:style-name="ce1"/>
          <table:table-cell office:value-type="string" table:style-name="ce11">
            <text:p>ExcStrk</text:p>
          </table:table-cell>
          <table:table-cell office:value-type="string" table:style-name="ce11">
            <text:p>RdStrk</text:p>
          </table:table-cell>
          <table:table-cell office:value-type="string" table:style-name="ce11">
            <text:p>MedStrk</text:p>
          </table:table-cell>
          <table:table-cell office:value-type="string" table:style-name="ce11">
            <text:p>WtrStrk</text:p>
          </table:table-cell>
          <table:table-cell office:value-type="string" table:style-name="ce11">
            <text:p>SlpStrk</text:p>
          </table:table-cell>
          <table:table-cell office:value-type="string" table:style-name="ce11">
            <text:p>DietStrk</text:p>
          </table:table-cell>
          <table:table-cell table:number-columns-repeated="16366"/>
        </table:table-row>
        <table:table-row table:style-name="ro2">
          <table:table-cell office:value-type="date" office:date-value="2026-01-01T00:00:00" table:formula="of:=DATE(2026;1;1)" table:style-name="ce9">
            <text:p>Thu, 01 Jan 2026</text:p>
          </table:table-cell>
          <table:table-cell office:value-type="string" office:string-value="Thu" table:formula="of:=TEXT([.A4];&quot;ddd&quot;)" table:style-name="ce3">
            <text:p>Thu</text:p>
          </table:table-cell>
          <table:table-cell office:value-type="string" office:string-value="Jan" table:formula="of:=TEXT([.A4];&quot;mmm&quot;)" table:style-name="ce3">
            <text:p>Jan</text:p>
          </table:table-cell>
          <table:table-cell office:value-type="float" office:value="0" table:formula="of:=IF(INDEX([Tracker.$A$1:.$AG$120];6+9*(MONTH([.$A4])-1)+(COLUMN()-4);DAY([.$A4])+2)&lt;&gt;&quot;&quot;;1;0)" table:style-name="ce92"/>
          <table:table-cell office:value-type="float" office:value="0" table:formula="of:=IF(INDEX([Tracker.$A$1:.$AG$120];6+9*(MONTH([.$A4])-1)+(COLUMN()-4);DAY([.$A4])+2)&lt;&gt;&quot;&quot;;1;0)" table:style-name="ce92"/>
          <table:table-cell office:value-type="float" office:value="0" table:formula="of:=IF(INDEX([Tracker.$A$1:.$AG$120];6+9*(MONTH([.$A4])-1)+(COLUMN()-4);DAY([.$A4])+2)&lt;&gt;&quot;&quot;;1;0)" table:style-name="ce92"/>
          <table:table-cell office:value-type="float" office:value="0" table:formula="of:=IF(INDEX([Tracker.$A$1:.$AG$120];6+9*(MONTH([.$A4])-1)+(COLUMN()-4);DAY([.$A4])+2)&lt;&gt;&quot;&quot;;1;0)" table:style-name="ce92"/>
          <table:table-cell office:value-type="float" office:value="0" table:formula="of:=IF(INDEX([Tracker.$A$1:.$AG$120];6+9*(MONTH([.$A4])-1)+(COLUMN()-4);DAY([.$A4])+2)&lt;&gt;&quot;&quot;;1;0)" table:style-name="ce92"/>
          <table:table-cell office:value-type="float" office:value="0" table:formula="of:=IF(INDEX([Tracker.$A$1:.$AG$120];6+9*(MONTH([.$A4])-1)+(COLUMN()-4);DAY([.$A4])+2)&lt;&gt;&quot;&quot;;1;0)" table:style-name="ce92"/>
          <table:table-cell office:value-type="float" office:value="0" table:formula="of:=SUM([.D4:.I4])" table:style-name="ce4"/>
          <table:table-cell office:value-type="percentage" office:value="0" table:formula="of:=[.J4]/6" table:style-name="ce7">
            <text:p>0%</text:p>
          </table:table-cell>
          <table:table-cell table:style-name="ce1"/>
          <table:table-cell office:value-type="float" office:value="0" table:formula="of:=IF([.D4]=1;1;0)" table:style-name="ce2">
            <text:p>0</text:p>
          </table:table-cell>
          <table:table-cell office:value-type="float" office:value="0" table:formula="of:=IF([.E4]=1;1;0)" table:style-name="ce2">
            <text:p>0</text:p>
          </table:table-cell>
          <table:table-cell office:value-type="float" office:value="0" table:formula="of:=IF([.F4]=1;1;0)" table:style-name="ce2">
            <text:p>0</text:p>
          </table:table-cell>
          <table:table-cell office:value-type="float" office:value="0" table:formula="of:=IF([.G4]=1;1;0)" table:style-name="ce2">
            <text:p>0</text:p>
          </table:table-cell>
          <table:table-cell office:value-type="float" office:value="0" table:formula="of:=IF([.H4]=1;1;0)" table:style-name="ce2">
            <text:p>0</text:p>
          </table:table-cell>
          <table:table-cell office:value-type="float" office:value="0" table:formula="of:=IF([.I4]=1;1;0)" table:style-name="ce2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2T00:00:00" table:formula="of:=[.A4]+1" table:style-name="ce10">
            <text:p>Fri, 02 Jan 2026</text:p>
          </table:table-cell>
          <table:table-cell office:value-type="string" office:string-value="Fri" table:formula="of:=TEXT([.A5];&quot;ddd&quot;)" table:style-name="ce5">
            <text:p>Fri</text:p>
          </table:table-cell>
          <table:table-cell office:value-type="string" office:string-value="Jan" table:formula="of:=TEXT([.A5];&quot;mmm&quot;)" table:style-name="ce5">
            <text:p>Jan</text:p>
          </table:table-cell>
          <table:table-cell office:value-type="float" office:value="0" table:formula="of:=IF(INDEX([Tracker.$A$1:.$AG$120];6+9*(MONTH([.$A5])-1)+(COLUMN()-4);DAY([.$A5])+2)&lt;&gt;&quot;&quot;;1;0)" table:style-name="ce92"/>
          <table:table-cell office:value-type="float" office:value="0" table:formula="of:=IF(INDEX([Tracker.$A$1:.$AG$120];6+9*(MONTH([.$A5])-1)+(COLUMN()-4);DAY([.$A5])+2)&lt;&gt;&quot;&quot;;1;0)" table:style-name="ce92"/>
          <table:table-cell office:value-type="float" office:value="0" table:formula="of:=IF(INDEX([Tracker.$A$1:.$AG$120];6+9*(MONTH([.$A5])-1)+(COLUMN()-4);DAY([.$A5])+2)&lt;&gt;&quot;&quot;;1;0)" table:style-name="ce92"/>
          <table:table-cell office:value-type="float" office:value="0" table:formula="of:=IF(INDEX([Tracker.$A$1:.$AG$120];6+9*(MONTH([.$A5])-1)+(COLUMN()-4);DAY([.$A5])+2)&lt;&gt;&quot;&quot;;1;0)" table:style-name="ce92"/>
          <table:table-cell office:value-type="float" office:value="0" table:formula="of:=IF(INDEX([Tracker.$A$1:.$AG$120];6+9*(MONTH([.$A5])-1)+(COLUMN()-4);DAY([.$A5])+2)&lt;&gt;&quot;&quot;;1;0)" table:style-name="ce92"/>
          <table:table-cell office:value-type="float" office:value="0" table:formula="of:=IF(INDEX([Tracker.$A$1:.$AG$120];6+9*(MONTH([.$A5])-1)+(COLUMN()-4);DAY([.$A5])+2)&lt;&gt;&quot;&quot;;1;0)" table:style-name="ce92"/>
          <table:table-cell office:value-type="float" office:value="0" table:formula="of:=SUM([.D5:.I5])" table:style-name="ce6"/>
          <table:table-cell office:value-type="percentage" office:value="0" table:formula="of:=[.J5]/6" table:style-name="ce8">
            <text:p>0%</text:p>
          </table:table-cell>
          <table:table-cell table:style-name="ce1"/>
          <table:table-cell office:value-type="float" office:value="0" table:formula="of:=IF([.D5]=1;[.M4]+1;0)" table:style-name="ce1">
            <text:p>0</text:p>
          </table:table-cell>
          <table:table-cell office:value-type="float" office:value="0" table:formula="of:=IF([.E5]=1;[.N4]+1;0)" table:style-name="ce1">
            <text:p>0</text:p>
          </table:table-cell>
          <table:table-cell office:value-type="float" office:value="0" table:formula="of:=IF([.F5]=1;[.O4]+1;0)" table:style-name="ce1">
            <text:p>0</text:p>
          </table:table-cell>
          <table:table-cell office:value-type="float" office:value="0" table:formula="of:=IF([.G5]=1;[.P4]+1;0)" table:style-name="ce1">
            <text:p>0</text:p>
          </table:table-cell>
          <table:table-cell office:value-type="float" office:value="0" table:formula="of:=IF([.H5]=1;[.Q4]+1;0)" table:style-name="ce1">
            <text:p>0</text:p>
          </table:table-cell>
          <table:table-cell office:value-type="float" office:value="0" table:formula="of:=IF([.I5]=1;[.R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3T00:00:00" table:formula="of:=[.A5]+1" table:style-name="ce10">
            <text:p>Sat, 03 Jan 2026</text:p>
          </table:table-cell>
          <table:table-cell office:value-type="string" office:string-value="Sat" table:formula="of:=TEXT([.A6];&quot;ddd&quot;)" table:style-name="ce5">
            <text:p>Sat</text:p>
          </table:table-cell>
          <table:table-cell office:value-type="string" office:string-value="Jan" table:formula="of:=TEXT([.A6];&quot;mmm&quot;)" table:style-name="ce5">
            <text:p>Jan</text:p>
          </table:table-cell>
          <table:table-cell office:value-type="float" office:value="0" table:formula="of:=IF(INDEX([Tracker.$A$1:.$AG$120];6+9*(MONTH([.$A6])-1)+(COLUMN()-4);DAY([.$A6])+2)&lt;&gt;&quot;&quot;;1;0)" table:style-name="ce92"/>
          <table:table-cell office:value-type="float" office:value="0" table:formula="of:=IF(INDEX([Tracker.$A$1:.$AG$120];6+9*(MONTH([.$A6])-1)+(COLUMN()-4);DAY([.$A6])+2)&lt;&gt;&quot;&quot;;1;0)" table:style-name="ce92"/>
          <table:table-cell office:value-type="float" office:value="0" table:formula="of:=IF(INDEX([Tracker.$A$1:.$AG$120];6+9*(MONTH([.$A6])-1)+(COLUMN()-4);DAY([.$A6])+2)&lt;&gt;&quot;&quot;;1;0)" table:style-name="ce92"/>
          <table:table-cell office:value-type="float" office:value="0" table:formula="of:=IF(INDEX([Tracker.$A$1:.$AG$120];6+9*(MONTH([.$A6])-1)+(COLUMN()-4);DAY([.$A6])+2)&lt;&gt;&quot;&quot;;1;0)" table:style-name="ce92"/>
          <table:table-cell office:value-type="float" office:value="0" table:formula="of:=IF(INDEX([Tracker.$A$1:.$AG$120];6+9*(MONTH([.$A6])-1)+(COLUMN()-4);DAY([.$A6])+2)&lt;&gt;&quot;&quot;;1;0)" table:style-name="ce92"/>
          <table:table-cell office:value-type="float" office:value="0" table:formula="of:=IF(INDEX([Tracker.$A$1:.$AG$120];6+9*(MONTH([.$A6])-1)+(COLUMN()-4);DAY([.$A6])+2)&lt;&gt;&quot;&quot;;1;0)" table:style-name="ce92"/>
          <table:table-cell office:value-type="float" office:value="0" table:formula="of:=SUM([.D6:.I6])" table:style-name="ce6"/>
          <table:table-cell office:value-type="percentage" office:value="0" table:formula="of:=[.J6]/6" table:style-name="ce8">
            <text:p>0%</text:p>
          </table:table-cell>
          <table:table-cell table:style-name="ce1"/>
          <table:table-cell office:value-type="float" office:value="0" table:formula="of:=IF([.D6]=1;[.M5]+1;0)" table:style-name="ce1">
            <text:p>0</text:p>
          </table:table-cell>
          <table:table-cell office:value-type="float" office:value="0" table:formula="of:=IF([.E6]=1;[.N5]+1;0)" table:style-name="ce1">
            <text:p>0</text:p>
          </table:table-cell>
          <table:table-cell office:value-type="float" office:value="0" table:formula="of:=IF([.F6]=1;[.O5]+1;0)" table:style-name="ce1">
            <text:p>0</text:p>
          </table:table-cell>
          <table:table-cell office:value-type="float" office:value="0" table:formula="of:=IF([.G6]=1;[.P5]+1;0)" table:style-name="ce1">
            <text:p>0</text:p>
          </table:table-cell>
          <table:table-cell office:value-type="float" office:value="0" table:formula="of:=IF([.H6]=1;[.Q5]+1;0)" table:style-name="ce1">
            <text:p>0</text:p>
          </table:table-cell>
          <table:table-cell office:value-type="float" office:value="0" table:formula="of:=IF([.I6]=1;[.R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4T00:00:00" table:formula="of:=[.A6]+1" table:style-name="ce10">
            <text:p>Sun, 04 Jan 2026</text:p>
          </table:table-cell>
          <table:table-cell office:value-type="string" office:string-value="Sun" table:formula="of:=TEXT([.A7];&quot;ddd&quot;)" table:style-name="ce5">
            <text:p>Sun</text:p>
          </table:table-cell>
          <table:table-cell office:value-type="string" office:string-value="Jan" table:formula="of:=TEXT([.A7];&quot;mmm&quot;)" table:style-name="ce5">
            <text:p>Jan</text:p>
          </table:table-cell>
          <table:table-cell office:value-type="float" office:value="0" table:formula="of:=IF(INDEX([Tracker.$A$1:.$AG$120];6+9*(MONTH([.$A7])-1)+(COLUMN()-4);DAY([.$A7])+2)&lt;&gt;&quot;&quot;;1;0)" table:style-name="ce92"/>
          <table:table-cell office:value-type="float" office:value="0" table:formula="of:=IF(INDEX([Tracker.$A$1:.$AG$120];6+9*(MONTH([.$A7])-1)+(COLUMN()-4);DAY([.$A7])+2)&lt;&gt;&quot;&quot;;1;0)" table:style-name="ce92"/>
          <table:table-cell office:value-type="float" office:value="0" table:formula="of:=IF(INDEX([Tracker.$A$1:.$AG$120];6+9*(MONTH([.$A7])-1)+(COLUMN()-4);DAY([.$A7])+2)&lt;&gt;&quot;&quot;;1;0)" table:style-name="ce92"/>
          <table:table-cell office:value-type="float" office:value="0" table:formula="of:=IF(INDEX([Tracker.$A$1:.$AG$120];6+9*(MONTH([.$A7])-1)+(COLUMN()-4);DAY([.$A7])+2)&lt;&gt;&quot;&quot;;1;0)" table:style-name="ce92"/>
          <table:table-cell office:value-type="float" office:value="0" table:formula="of:=IF(INDEX([Tracker.$A$1:.$AG$120];6+9*(MONTH([.$A7])-1)+(COLUMN()-4);DAY([.$A7])+2)&lt;&gt;&quot;&quot;;1;0)" table:style-name="ce92"/>
          <table:table-cell office:value-type="float" office:value="0" table:formula="of:=IF(INDEX([Tracker.$A$1:.$AG$120];6+9*(MONTH([.$A7])-1)+(COLUMN()-4);DAY([.$A7])+2)&lt;&gt;&quot;&quot;;1;0)" table:style-name="ce92"/>
          <table:table-cell office:value-type="float" office:value="0" table:formula="of:=SUM([.D7:.I7])" table:style-name="ce6"/>
          <table:table-cell office:value-type="percentage" office:value="0" table:formula="of:=[.J7]/6" table:style-name="ce8">
            <text:p>0%</text:p>
          </table:table-cell>
          <table:table-cell table:style-name="ce1"/>
          <table:table-cell office:value-type="float" office:value="0" table:formula="of:=IF([.D7]=1;[.M6]+1;0)" table:style-name="ce1">
            <text:p>0</text:p>
          </table:table-cell>
          <table:table-cell office:value-type="float" office:value="0" table:formula="of:=IF([.E7]=1;[.N6]+1;0)" table:style-name="ce1">
            <text:p>0</text:p>
          </table:table-cell>
          <table:table-cell office:value-type="float" office:value="0" table:formula="of:=IF([.F7]=1;[.O6]+1;0)" table:style-name="ce1">
            <text:p>0</text:p>
          </table:table-cell>
          <table:table-cell office:value-type="float" office:value="0" table:formula="of:=IF([.G7]=1;[.P6]+1;0)" table:style-name="ce1">
            <text:p>0</text:p>
          </table:table-cell>
          <table:table-cell office:value-type="float" office:value="0" table:formula="of:=IF([.H7]=1;[.Q6]+1;0)" table:style-name="ce1">
            <text:p>0</text:p>
          </table:table-cell>
          <table:table-cell office:value-type="float" office:value="0" table:formula="of:=IF([.I7]=1;[.R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5T00:00:00" table:formula="of:=[.A7]+1" table:style-name="ce10">
            <text:p>Mon, 05 Jan 2026</text:p>
          </table:table-cell>
          <table:table-cell office:value-type="string" office:string-value="Mon" table:formula="of:=TEXT([.A8];&quot;ddd&quot;)" table:style-name="ce5">
            <text:p>Mon</text:p>
          </table:table-cell>
          <table:table-cell office:value-type="string" office:string-value="Jan" table:formula="of:=TEXT([.A8];&quot;mmm&quot;)" table:style-name="ce5">
            <text:p>Jan</text:p>
          </table:table-cell>
          <table:table-cell office:value-type="float" office:value="0" table:formula="of:=IF(INDEX([Tracker.$A$1:.$AG$120];6+9*(MONTH([.$A8])-1)+(COLUMN()-4);DAY([.$A8])+2)&lt;&gt;&quot;&quot;;1;0)" table:style-name="ce92"/>
          <table:table-cell office:value-type="float" office:value="0" table:formula="of:=IF(INDEX([Tracker.$A$1:.$AG$120];6+9*(MONTH([.$A8])-1)+(COLUMN()-4);DAY([.$A8])+2)&lt;&gt;&quot;&quot;;1;0)" table:style-name="ce92"/>
          <table:table-cell office:value-type="float" office:value="0" table:formula="of:=IF(INDEX([Tracker.$A$1:.$AG$120];6+9*(MONTH([.$A8])-1)+(COLUMN()-4);DAY([.$A8])+2)&lt;&gt;&quot;&quot;;1;0)" table:style-name="ce92"/>
          <table:table-cell office:value-type="float" office:value="0" table:formula="of:=IF(INDEX([Tracker.$A$1:.$AG$120];6+9*(MONTH([.$A8])-1)+(COLUMN()-4);DAY([.$A8])+2)&lt;&gt;&quot;&quot;;1;0)" table:style-name="ce92"/>
          <table:table-cell office:value-type="float" office:value="0" table:formula="of:=IF(INDEX([Tracker.$A$1:.$AG$120];6+9*(MONTH([.$A8])-1)+(COLUMN()-4);DAY([.$A8])+2)&lt;&gt;&quot;&quot;;1;0)" table:style-name="ce92"/>
          <table:table-cell office:value-type="float" office:value="0" table:formula="of:=IF(INDEX([Tracker.$A$1:.$AG$120];6+9*(MONTH([.$A8])-1)+(COLUMN()-4);DAY([.$A8])+2)&lt;&gt;&quot;&quot;;1;0)" table:style-name="ce92"/>
          <table:table-cell office:value-type="float" office:value="0" table:formula="of:=SUM([.D8:.I8])" table:style-name="ce6"/>
          <table:table-cell office:value-type="percentage" office:value="0" table:formula="of:=[.J8]/6" table:style-name="ce8">
            <text:p>0%</text:p>
          </table:table-cell>
          <table:table-cell table:style-name="ce1"/>
          <table:table-cell office:value-type="float" office:value="0" table:formula="of:=IF([.D8]=1;[.M7]+1;0)" table:style-name="ce1">
            <text:p>0</text:p>
          </table:table-cell>
          <table:table-cell office:value-type="float" office:value="0" table:formula="of:=IF([.E8]=1;[.N7]+1;0)" table:style-name="ce1">
            <text:p>0</text:p>
          </table:table-cell>
          <table:table-cell office:value-type="float" office:value="0" table:formula="of:=IF([.F8]=1;[.O7]+1;0)" table:style-name="ce1">
            <text:p>0</text:p>
          </table:table-cell>
          <table:table-cell office:value-type="float" office:value="0" table:formula="of:=IF([.G8]=1;[.P7]+1;0)" table:style-name="ce1">
            <text:p>0</text:p>
          </table:table-cell>
          <table:table-cell office:value-type="float" office:value="0" table:formula="of:=IF([.H8]=1;[.Q7]+1;0)" table:style-name="ce1">
            <text:p>0</text:p>
          </table:table-cell>
          <table:table-cell office:value-type="float" office:value="0" table:formula="of:=IF([.I8]=1;[.R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6T00:00:00" table:formula="of:=[.A8]+1" table:style-name="ce10">
            <text:p>Tue, 06 Jan 2026</text:p>
          </table:table-cell>
          <table:table-cell office:value-type="string" office:string-value="Tue" table:formula="of:=TEXT([.A9];&quot;ddd&quot;)" table:style-name="ce5">
            <text:p>Tue</text:p>
          </table:table-cell>
          <table:table-cell office:value-type="string" office:string-value="Jan" table:formula="of:=TEXT([.A9];&quot;mmm&quot;)" table:style-name="ce5">
            <text:p>Jan</text:p>
          </table:table-cell>
          <table:table-cell office:value-type="float" office:value="0" table:formula="of:=IF(INDEX([Tracker.$A$1:.$AG$120];6+9*(MONTH([.$A9])-1)+(COLUMN()-4);DAY([.$A9])+2)&lt;&gt;&quot;&quot;;1;0)" table:style-name="ce92"/>
          <table:table-cell office:value-type="float" office:value="0" table:formula="of:=IF(INDEX([Tracker.$A$1:.$AG$120];6+9*(MONTH([.$A9])-1)+(COLUMN()-4);DAY([.$A9])+2)&lt;&gt;&quot;&quot;;1;0)" table:style-name="ce92"/>
          <table:table-cell office:value-type="float" office:value="0" table:formula="of:=IF(INDEX([Tracker.$A$1:.$AG$120];6+9*(MONTH([.$A9])-1)+(COLUMN()-4);DAY([.$A9])+2)&lt;&gt;&quot;&quot;;1;0)" table:style-name="ce92"/>
          <table:table-cell office:value-type="float" office:value="0" table:formula="of:=IF(INDEX([Tracker.$A$1:.$AG$120];6+9*(MONTH([.$A9])-1)+(COLUMN()-4);DAY([.$A9])+2)&lt;&gt;&quot;&quot;;1;0)" table:style-name="ce92"/>
          <table:table-cell office:value-type="float" office:value="0" table:formula="of:=IF(INDEX([Tracker.$A$1:.$AG$120];6+9*(MONTH([.$A9])-1)+(COLUMN()-4);DAY([.$A9])+2)&lt;&gt;&quot;&quot;;1;0)" table:style-name="ce92"/>
          <table:table-cell office:value-type="float" office:value="0" table:formula="of:=IF(INDEX([Tracker.$A$1:.$AG$120];6+9*(MONTH([.$A9])-1)+(COLUMN()-4);DAY([.$A9])+2)&lt;&gt;&quot;&quot;;1;0)" table:style-name="ce92"/>
          <table:table-cell office:value-type="float" office:value="0" table:formula="of:=SUM([.D9:.I9])" table:style-name="ce6"/>
          <table:table-cell office:value-type="percentage" office:value="0" table:formula="of:=[.J9]/6" table:style-name="ce8">
            <text:p>0%</text:p>
          </table:table-cell>
          <table:table-cell table:style-name="ce1"/>
          <table:table-cell office:value-type="float" office:value="0" table:formula="of:=IF([.D9]=1;[.M8]+1;0)" table:style-name="ce1">
            <text:p>0</text:p>
          </table:table-cell>
          <table:table-cell office:value-type="float" office:value="0" table:formula="of:=IF([.E9]=1;[.N8]+1;0)" table:style-name="ce1">
            <text:p>0</text:p>
          </table:table-cell>
          <table:table-cell office:value-type="float" office:value="0" table:formula="of:=IF([.F9]=1;[.O8]+1;0)" table:style-name="ce1">
            <text:p>0</text:p>
          </table:table-cell>
          <table:table-cell office:value-type="float" office:value="0" table:formula="of:=IF([.G9]=1;[.P8]+1;0)" table:style-name="ce1">
            <text:p>0</text:p>
          </table:table-cell>
          <table:table-cell office:value-type="float" office:value="0" table:formula="of:=IF([.H9]=1;[.Q8]+1;0)" table:style-name="ce1">
            <text:p>0</text:p>
          </table:table-cell>
          <table:table-cell office:value-type="float" office:value="0" table:formula="of:=IF([.I9]=1;[.R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7T00:00:00" table:formula="of:=[.A9]+1" table:style-name="ce10">
            <text:p>Wed, 07 Jan 2026</text:p>
          </table:table-cell>
          <table:table-cell office:value-type="string" office:string-value="Wed" table:formula="of:=TEXT([.A10];&quot;ddd&quot;)" table:style-name="ce5">
            <text:p>Wed</text:p>
          </table:table-cell>
          <table:table-cell office:value-type="string" office:string-value="Jan" table:formula="of:=TEXT([.A10];&quot;mmm&quot;)" table:style-name="ce5">
            <text:p>Jan</text:p>
          </table:table-cell>
          <table:table-cell office:value-type="float" office:value="0" table:formula="of:=IF(INDEX([Tracker.$A$1:.$AG$120];6+9*(MONTH([.$A10])-1)+(COLUMN()-4);DAY([.$A10])+2)&lt;&gt;&quot;&quot;;1;0)" table:style-name="ce92"/>
          <table:table-cell office:value-type="float" office:value="0" table:formula="of:=IF(INDEX([Tracker.$A$1:.$AG$120];6+9*(MONTH([.$A10])-1)+(COLUMN()-4);DAY([.$A10])+2)&lt;&gt;&quot;&quot;;1;0)" table:style-name="ce92"/>
          <table:table-cell office:value-type="float" office:value="0" table:formula="of:=IF(INDEX([Tracker.$A$1:.$AG$120];6+9*(MONTH([.$A10])-1)+(COLUMN()-4);DAY([.$A10])+2)&lt;&gt;&quot;&quot;;1;0)" table:style-name="ce92"/>
          <table:table-cell office:value-type="float" office:value="0" table:formula="of:=IF(INDEX([Tracker.$A$1:.$AG$120];6+9*(MONTH([.$A10])-1)+(COLUMN()-4);DAY([.$A10])+2)&lt;&gt;&quot;&quot;;1;0)" table:style-name="ce92"/>
          <table:table-cell office:value-type="float" office:value="0" table:formula="of:=IF(INDEX([Tracker.$A$1:.$AG$120];6+9*(MONTH([.$A10])-1)+(COLUMN()-4);DAY([.$A10])+2)&lt;&gt;&quot;&quot;;1;0)" table:style-name="ce92"/>
          <table:table-cell office:value-type="float" office:value="0" table:formula="of:=IF(INDEX([Tracker.$A$1:.$AG$120];6+9*(MONTH([.$A10])-1)+(COLUMN()-4);DAY([.$A10])+2)&lt;&gt;&quot;&quot;;1;0)" table:style-name="ce92"/>
          <table:table-cell office:value-type="float" office:value="0" table:formula="of:=SUM([.D10:.I10])" table:style-name="ce6"/>
          <table:table-cell office:value-type="percentage" office:value="0" table:formula="of:=[.J10]/6" table:style-name="ce8">
            <text:p>0%</text:p>
          </table:table-cell>
          <table:table-cell table:style-name="ce1"/>
          <table:table-cell office:value-type="float" office:value="0" table:formula="of:=IF([.D10]=1;[.M9]+1;0)" table:style-name="ce1">
            <text:p>0</text:p>
          </table:table-cell>
          <table:table-cell office:value-type="float" office:value="0" table:formula="of:=IF([.E10]=1;[.N9]+1;0)" table:style-name="ce1">
            <text:p>0</text:p>
          </table:table-cell>
          <table:table-cell office:value-type="float" office:value="0" table:formula="of:=IF([.F10]=1;[.O9]+1;0)" table:style-name="ce1">
            <text:p>0</text:p>
          </table:table-cell>
          <table:table-cell office:value-type="float" office:value="0" table:formula="of:=IF([.G10]=1;[.P9]+1;0)" table:style-name="ce1">
            <text:p>0</text:p>
          </table:table-cell>
          <table:table-cell office:value-type="float" office:value="0" table:formula="of:=IF([.H10]=1;[.Q9]+1;0)" table:style-name="ce1">
            <text:p>0</text:p>
          </table:table-cell>
          <table:table-cell office:value-type="float" office:value="0" table:formula="of:=IF([.I10]=1;[.R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8T00:00:00" table:formula="of:=[.A10]+1" table:style-name="ce10">
            <text:p>Thu, 08 Jan 2026</text:p>
          </table:table-cell>
          <table:table-cell office:value-type="string" office:string-value="Thu" table:formula="of:=TEXT([.A11];&quot;ddd&quot;)" table:style-name="ce5">
            <text:p>Thu</text:p>
          </table:table-cell>
          <table:table-cell office:value-type="string" office:string-value="Jan" table:formula="of:=TEXT([.A11];&quot;mmm&quot;)" table:style-name="ce5">
            <text:p>Jan</text:p>
          </table:table-cell>
          <table:table-cell office:value-type="float" office:value="0" table:formula="of:=IF(INDEX([Tracker.$A$1:.$AG$120];6+9*(MONTH([.$A11])-1)+(COLUMN()-4);DAY([.$A11])+2)&lt;&gt;&quot;&quot;;1;0)" table:style-name="ce92"/>
          <table:table-cell office:value-type="float" office:value="0" table:formula="of:=IF(INDEX([Tracker.$A$1:.$AG$120];6+9*(MONTH([.$A11])-1)+(COLUMN()-4);DAY([.$A11])+2)&lt;&gt;&quot;&quot;;1;0)" table:style-name="ce92"/>
          <table:table-cell office:value-type="float" office:value="0" table:formula="of:=IF(INDEX([Tracker.$A$1:.$AG$120];6+9*(MONTH([.$A11])-1)+(COLUMN()-4);DAY([.$A11])+2)&lt;&gt;&quot;&quot;;1;0)" table:style-name="ce92"/>
          <table:table-cell office:value-type="float" office:value="0" table:formula="of:=IF(INDEX([Tracker.$A$1:.$AG$120];6+9*(MONTH([.$A11])-1)+(COLUMN()-4);DAY([.$A11])+2)&lt;&gt;&quot;&quot;;1;0)" table:style-name="ce92"/>
          <table:table-cell office:value-type="float" office:value="0" table:formula="of:=IF(INDEX([Tracker.$A$1:.$AG$120];6+9*(MONTH([.$A11])-1)+(COLUMN()-4);DAY([.$A11])+2)&lt;&gt;&quot;&quot;;1;0)" table:style-name="ce92"/>
          <table:table-cell office:value-type="float" office:value="0" table:formula="of:=IF(INDEX([Tracker.$A$1:.$AG$120];6+9*(MONTH([.$A11])-1)+(COLUMN()-4);DAY([.$A11])+2)&lt;&gt;&quot;&quot;;1;0)" table:style-name="ce92"/>
          <table:table-cell office:value-type="float" office:value="0" table:formula="of:=SUM([.D11:.I11])" table:style-name="ce6"/>
          <table:table-cell office:value-type="percentage" office:value="0" table:formula="of:=[.J11]/6" table:style-name="ce8">
            <text:p>0%</text:p>
          </table:table-cell>
          <table:table-cell table:style-name="ce1"/>
          <table:table-cell office:value-type="float" office:value="0" table:formula="of:=IF([.D11]=1;[.M10]+1;0)" table:style-name="ce1">
            <text:p>0</text:p>
          </table:table-cell>
          <table:table-cell office:value-type="float" office:value="0" table:formula="of:=IF([.E11]=1;[.N10]+1;0)" table:style-name="ce1">
            <text:p>0</text:p>
          </table:table-cell>
          <table:table-cell office:value-type="float" office:value="0" table:formula="of:=IF([.F11]=1;[.O10]+1;0)" table:style-name="ce1">
            <text:p>0</text:p>
          </table:table-cell>
          <table:table-cell office:value-type="float" office:value="0" table:formula="of:=IF([.G11]=1;[.P10]+1;0)" table:style-name="ce1">
            <text:p>0</text:p>
          </table:table-cell>
          <table:table-cell office:value-type="float" office:value="0" table:formula="of:=IF([.H11]=1;[.Q10]+1;0)" table:style-name="ce1">
            <text:p>0</text:p>
          </table:table-cell>
          <table:table-cell office:value-type="float" office:value="0" table:formula="of:=IF([.I11]=1;[.R1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09T00:00:00" table:formula="of:=[.A11]+1" table:style-name="ce10">
            <text:p>Fri, 09 Jan 2026</text:p>
          </table:table-cell>
          <table:table-cell office:value-type="string" office:string-value="Fri" table:formula="of:=TEXT([.A12];&quot;ddd&quot;)" table:style-name="ce5">
            <text:p>Fri</text:p>
          </table:table-cell>
          <table:table-cell office:value-type="string" office:string-value="Jan" table:formula="of:=TEXT([.A12];&quot;mmm&quot;)" table:style-name="ce5">
            <text:p>Jan</text:p>
          </table:table-cell>
          <table:table-cell office:value-type="float" office:value="0" table:formula="of:=IF(INDEX([Tracker.$A$1:.$AG$120];6+9*(MONTH([.$A12])-1)+(COLUMN()-4);DAY([.$A12])+2)&lt;&gt;&quot;&quot;;1;0)" table:style-name="ce92"/>
          <table:table-cell office:value-type="float" office:value="0" table:formula="of:=IF(INDEX([Tracker.$A$1:.$AG$120];6+9*(MONTH([.$A12])-1)+(COLUMN()-4);DAY([.$A12])+2)&lt;&gt;&quot;&quot;;1;0)" table:style-name="ce92"/>
          <table:table-cell office:value-type="float" office:value="0" table:formula="of:=IF(INDEX([Tracker.$A$1:.$AG$120];6+9*(MONTH([.$A12])-1)+(COLUMN()-4);DAY([.$A12])+2)&lt;&gt;&quot;&quot;;1;0)" table:style-name="ce92"/>
          <table:table-cell office:value-type="float" office:value="0" table:formula="of:=IF(INDEX([Tracker.$A$1:.$AG$120];6+9*(MONTH([.$A12])-1)+(COLUMN()-4);DAY([.$A12])+2)&lt;&gt;&quot;&quot;;1;0)" table:style-name="ce92"/>
          <table:table-cell office:value-type="float" office:value="0" table:formula="of:=IF(INDEX([Tracker.$A$1:.$AG$120];6+9*(MONTH([.$A12])-1)+(COLUMN()-4);DAY([.$A12])+2)&lt;&gt;&quot;&quot;;1;0)" table:style-name="ce92"/>
          <table:table-cell office:value-type="float" office:value="0" table:formula="of:=IF(INDEX([Tracker.$A$1:.$AG$120];6+9*(MONTH([.$A12])-1)+(COLUMN()-4);DAY([.$A12])+2)&lt;&gt;&quot;&quot;;1;0)" table:style-name="ce92"/>
          <table:table-cell office:value-type="float" office:value="0" table:formula="of:=SUM([.D12:.I12])" table:style-name="ce6"/>
          <table:table-cell office:value-type="percentage" office:value="0" table:formula="of:=[.J12]/6" table:style-name="ce8">
            <text:p>0%</text:p>
          </table:table-cell>
          <table:table-cell table:style-name="ce1"/>
          <table:table-cell office:value-type="float" office:value="0" table:formula="of:=IF([.D12]=1;[.M11]+1;0)" table:style-name="ce1">
            <text:p>0</text:p>
          </table:table-cell>
          <table:table-cell office:value-type="float" office:value="0" table:formula="of:=IF([.E12]=1;[.N11]+1;0)" table:style-name="ce1">
            <text:p>0</text:p>
          </table:table-cell>
          <table:table-cell office:value-type="float" office:value="0" table:formula="of:=IF([.F12]=1;[.O11]+1;0)" table:style-name="ce1">
            <text:p>0</text:p>
          </table:table-cell>
          <table:table-cell office:value-type="float" office:value="0" table:formula="of:=IF([.G12]=1;[.P11]+1;0)" table:style-name="ce1">
            <text:p>0</text:p>
          </table:table-cell>
          <table:table-cell office:value-type="float" office:value="0" table:formula="of:=IF([.H12]=1;[.Q11]+1;0)" table:style-name="ce1">
            <text:p>0</text:p>
          </table:table-cell>
          <table:table-cell office:value-type="float" office:value="0" table:formula="of:=IF([.I12]=1;[.R1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0T00:00:00" table:formula="of:=[.A12]+1" table:style-name="ce10">
            <text:p>Sat, 10 Jan 2026</text:p>
          </table:table-cell>
          <table:table-cell office:value-type="string" office:string-value="Sat" table:formula="of:=TEXT([.A13];&quot;ddd&quot;)" table:style-name="ce5">
            <text:p>Sat</text:p>
          </table:table-cell>
          <table:table-cell office:value-type="string" office:string-value="Jan" table:formula="of:=TEXT([.A13];&quot;mmm&quot;)" table:style-name="ce5">
            <text:p>Jan</text:p>
          </table:table-cell>
          <table:table-cell office:value-type="float" office:value="0" table:formula="of:=IF(INDEX([Tracker.$A$1:.$AG$120];6+9*(MONTH([.$A13])-1)+(COLUMN()-4);DAY([.$A13])+2)&lt;&gt;&quot;&quot;;1;0)" table:style-name="ce92"/>
          <table:table-cell office:value-type="float" office:value="0" table:formula="of:=IF(INDEX([Tracker.$A$1:.$AG$120];6+9*(MONTH([.$A13])-1)+(COLUMN()-4);DAY([.$A13])+2)&lt;&gt;&quot;&quot;;1;0)" table:style-name="ce92"/>
          <table:table-cell office:value-type="float" office:value="0" table:formula="of:=IF(INDEX([Tracker.$A$1:.$AG$120];6+9*(MONTH([.$A13])-1)+(COLUMN()-4);DAY([.$A13])+2)&lt;&gt;&quot;&quot;;1;0)" table:style-name="ce92"/>
          <table:table-cell office:value-type="float" office:value="0" table:formula="of:=IF(INDEX([Tracker.$A$1:.$AG$120];6+9*(MONTH([.$A13])-1)+(COLUMN()-4);DAY([.$A13])+2)&lt;&gt;&quot;&quot;;1;0)" table:style-name="ce92"/>
          <table:table-cell office:value-type="float" office:value="0" table:formula="of:=IF(INDEX([Tracker.$A$1:.$AG$120];6+9*(MONTH([.$A13])-1)+(COLUMN()-4);DAY([.$A13])+2)&lt;&gt;&quot;&quot;;1;0)" table:style-name="ce92"/>
          <table:table-cell office:value-type="float" office:value="0" table:formula="of:=IF(INDEX([Tracker.$A$1:.$AG$120];6+9*(MONTH([.$A13])-1)+(COLUMN()-4);DAY([.$A13])+2)&lt;&gt;&quot;&quot;;1;0)" table:style-name="ce92"/>
          <table:table-cell office:value-type="float" office:value="0" table:formula="of:=SUM([.D13:.I13])" table:style-name="ce6"/>
          <table:table-cell office:value-type="percentage" office:value="0" table:formula="of:=[.J13]/6" table:style-name="ce8">
            <text:p>0%</text:p>
          </table:table-cell>
          <table:table-cell table:style-name="ce1"/>
          <table:table-cell office:value-type="float" office:value="0" table:formula="of:=IF([.D13]=1;[.M12]+1;0)" table:style-name="ce1">
            <text:p>0</text:p>
          </table:table-cell>
          <table:table-cell office:value-type="float" office:value="0" table:formula="of:=IF([.E13]=1;[.N12]+1;0)" table:style-name="ce1">
            <text:p>0</text:p>
          </table:table-cell>
          <table:table-cell office:value-type="float" office:value="0" table:formula="of:=IF([.F13]=1;[.O12]+1;0)" table:style-name="ce1">
            <text:p>0</text:p>
          </table:table-cell>
          <table:table-cell office:value-type="float" office:value="0" table:formula="of:=IF([.G13]=1;[.P12]+1;0)" table:style-name="ce1">
            <text:p>0</text:p>
          </table:table-cell>
          <table:table-cell office:value-type="float" office:value="0" table:formula="of:=IF([.H13]=1;[.Q12]+1;0)" table:style-name="ce1">
            <text:p>0</text:p>
          </table:table-cell>
          <table:table-cell office:value-type="float" office:value="0" table:formula="of:=IF([.I13]=1;[.R1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1T00:00:00" table:formula="of:=[.A13]+1" table:style-name="ce10">
            <text:p>Sun, 11 Jan 2026</text:p>
          </table:table-cell>
          <table:table-cell office:value-type="string" office:string-value="Sun" table:formula="of:=TEXT([.A14];&quot;ddd&quot;)" table:style-name="ce5">
            <text:p>Sun</text:p>
          </table:table-cell>
          <table:table-cell office:value-type="string" office:string-value="Jan" table:formula="of:=TEXT([.A14];&quot;mmm&quot;)" table:style-name="ce5">
            <text:p>Jan</text:p>
          </table:table-cell>
          <table:table-cell office:value-type="float" office:value="0" table:formula="of:=IF(INDEX([Tracker.$A$1:.$AG$120];6+9*(MONTH([.$A14])-1)+(COLUMN()-4);DAY([.$A14])+2)&lt;&gt;&quot;&quot;;1;0)" table:style-name="ce92"/>
          <table:table-cell office:value-type="float" office:value="0" table:formula="of:=IF(INDEX([Tracker.$A$1:.$AG$120];6+9*(MONTH([.$A14])-1)+(COLUMN()-4);DAY([.$A14])+2)&lt;&gt;&quot;&quot;;1;0)" table:style-name="ce92"/>
          <table:table-cell office:value-type="float" office:value="0" table:formula="of:=IF(INDEX([Tracker.$A$1:.$AG$120];6+9*(MONTH([.$A14])-1)+(COLUMN()-4);DAY([.$A14])+2)&lt;&gt;&quot;&quot;;1;0)" table:style-name="ce92"/>
          <table:table-cell office:value-type="float" office:value="0" table:formula="of:=IF(INDEX([Tracker.$A$1:.$AG$120];6+9*(MONTH([.$A14])-1)+(COLUMN()-4);DAY([.$A14])+2)&lt;&gt;&quot;&quot;;1;0)" table:style-name="ce92"/>
          <table:table-cell office:value-type="float" office:value="0" table:formula="of:=IF(INDEX([Tracker.$A$1:.$AG$120];6+9*(MONTH([.$A14])-1)+(COLUMN()-4);DAY([.$A14])+2)&lt;&gt;&quot;&quot;;1;0)" table:style-name="ce92"/>
          <table:table-cell office:value-type="float" office:value="0" table:formula="of:=IF(INDEX([Tracker.$A$1:.$AG$120];6+9*(MONTH([.$A14])-1)+(COLUMN()-4);DAY([.$A14])+2)&lt;&gt;&quot;&quot;;1;0)" table:style-name="ce92"/>
          <table:table-cell office:value-type="float" office:value="0" table:formula="of:=SUM([.D14:.I14])" table:style-name="ce6"/>
          <table:table-cell office:value-type="percentage" office:value="0" table:formula="of:=[.J14]/6" table:style-name="ce8">
            <text:p>0%</text:p>
          </table:table-cell>
          <table:table-cell table:style-name="ce1"/>
          <table:table-cell office:value-type="float" office:value="0" table:formula="of:=IF([.D14]=1;[.M13]+1;0)" table:style-name="ce1">
            <text:p>0</text:p>
          </table:table-cell>
          <table:table-cell office:value-type="float" office:value="0" table:formula="of:=IF([.E14]=1;[.N13]+1;0)" table:style-name="ce1">
            <text:p>0</text:p>
          </table:table-cell>
          <table:table-cell office:value-type="float" office:value="0" table:formula="of:=IF([.F14]=1;[.O13]+1;0)" table:style-name="ce1">
            <text:p>0</text:p>
          </table:table-cell>
          <table:table-cell office:value-type="float" office:value="0" table:formula="of:=IF([.G14]=1;[.P13]+1;0)" table:style-name="ce1">
            <text:p>0</text:p>
          </table:table-cell>
          <table:table-cell office:value-type="float" office:value="0" table:formula="of:=IF([.H14]=1;[.Q13]+1;0)" table:style-name="ce1">
            <text:p>0</text:p>
          </table:table-cell>
          <table:table-cell office:value-type="float" office:value="0" table:formula="of:=IF([.I14]=1;[.R1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2T00:00:00" table:formula="of:=[.A14]+1" table:style-name="ce10">
            <text:p>Mon, 12 Jan 2026</text:p>
          </table:table-cell>
          <table:table-cell office:value-type="string" office:string-value="Mon" table:formula="of:=TEXT([.A15];&quot;ddd&quot;)" table:style-name="ce5">
            <text:p>Mon</text:p>
          </table:table-cell>
          <table:table-cell office:value-type="string" office:string-value="Jan" table:formula="of:=TEXT([.A15];&quot;mmm&quot;)" table:style-name="ce5">
            <text:p>Jan</text:p>
          </table:table-cell>
          <table:table-cell office:value-type="float" office:value="0" table:formula="of:=IF(INDEX([Tracker.$A$1:.$AG$120];6+9*(MONTH([.$A15])-1)+(COLUMN()-4);DAY([.$A15])+2)&lt;&gt;&quot;&quot;;1;0)" table:style-name="ce92"/>
          <table:table-cell office:value-type="float" office:value="0" table:formula="of:=IF(INDEX([Tracker.$A$1:.$AG$120];6+9*(MONTH([.$A15])-1)+(COLUMN()-4);DAY([.$A15])+2)&lt;&gt;&quot;&quot;;1;0)" table:style-name="ce92"/>
          <table:table-cell office:value-type="float" office:value="0" table:formula="of:=IF(INDEX([Tracker.$A$1:.$AG$120];6+9*(MONTH([.$A15])-1)+(COLUMN()-4);DAY([.$A15])+2)&lt;&gt;&quot;&quot;;1;0)" table:style-name="ce92"/>
          <table:table-cell office:value-type="float" office:value="0" table:formula="of:=IF(INDEX([Tracker.$A$1:.$AG$120];6+9*(MONTH([.$A15])-1)+(COLUMN()-4);DAY([.$A15])+2)&lt;&gt;&quot;&quot;;1;0)" table:style-name="ce92"/>
          <table:table-cell office:value-type="float" office:value="0" table:formula="of:=IF(INDEX([Tracker.$A$1:.$AG$120];6+9*(MONTH([.$A15])-1)+(COLUMN()-4);DAY([.$A15])+2)&lt;&gt;&quot;&quot;;1;0)" table:style-name="ce92"/>
          <table:table-cell office:value-type="float" office:value="0" table:formula="of:=IF(INDEX([Tracker.$A$1:.$AG$120];6+9*(MONTH([.$A15])-1)+(COLUMN()-4);DAY([.$A15])+2)&lt;&gt;&quot;&quot;;1;0)" table:style-name="ce92"/>
          <table:table-cell office:value-type="float" office:value="0" table:formula="of:=SUM([.D15:.I15])" table:style-name="ce6"/>
          <table:table-cell office:value-type="percentage" office:value="0" table:formula="of:=[.J15]/6" table:style-name="ce8">
            <text:p>0%</text:p>
          </table:table-cell>
          <table:table-cell table:style-name="ce1"/>
          <table:table-cell office:value-type="float" office:value="0" table:formula="of:=IF([.D15]=1;[.M14]+1;0)" table:style-name="ce1">
            <text:p>0</text:p>
          </table:table-cell>
          <table:table-cell office:value-type="float" office:value="0" table:formula="of:=IF([.E15]=1;[.N14]+1;0)" table:style-name="ce1">
            <text:p>0</text:p>
          </table:table-cell>
          <table:table-cell office:value-type="float" office:value="0" table:formula="of:=IF([.F15]=1;[.O14]+1;0)" table:style-name="ce1">
            <text:p>0</text:p>
          </table:table-cell>
          <table:table-cell office:value-type="float" office:value="0" table:formula="of:=IF([.G15]=1;[.P14]+1;0)" table:style-name="ce1">
            <text:p>0</text:p>
          </table:table-cell>
          <table:table-cell office:value-type="float" office:value="0" table:formula="of:=IF([.H15]=1;[.Q14]+1;0)" table:style-name="ce1">
            <text:p>0</text:p>
          </table:table-cell>
          <table:table-cell office:value-type="float" office:value="0" table:formula="of:=IF([.I15]=1;[.R1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3T00:00:00" table:formula="of:=[.A15]+1" table:style-name="ce10">
            <text:p>Tue, 13 Jan 2026</text:p>
          </table:table-cell>
          <table:table-cell office:value-type="string" office:string-value="Tue" table:formula="of:=TEXT([.A16];&quot;ddd&quot;)" table:style-name="ce5">
            <text:p>Tue</text:p>
          </table:table-cell>
          <table:table-cell office:value-type="string" office:string-value="Jan" table:formula="of:=TEXT([.A16];&quot;mmm&quot;)" table:style-name="ce5">
            <text:p>Jan</text:p>
          </table:table-cell>
          <table:table-cell office:value-type="float" office:value="0" table:formula="of:=IF(INDEX([Tracker.$A$1:.$AG$120];6+9*(MONTH([.$A16])-1)+(COLUMN()-4);DAY([.$A16])+2)&lt;&gt;&quot;&quot;;1;0)" table:style-name="ce92"/>
          <table:table-cell office:value-type="float" office:value="0" table:formula="of:=IF(INDEX([Tracker.$A$1:.$AG$120];6+9*(MONTH([.$A16])-1)+(COLUMN()-4);DAY([.$A16])+2)&lt;&gt;&quot;&quot;;1;0)" table:style-name="ce92"/>
          <table:table-cell office:value-type="float" office:value="0" table:formula="of:=IF(INDEX([Tracker.$A$1:.$AG$120];6+9*(MONTH([.$A16])-1)+(COLUMN()-4);DAY([.$A16])+2)&lt;&gt;&quot;&quot;;1;0)" table:style-name="ce92"/>
          <table:table-cell office:value-type="float" office:value="0" table:formula="of:=IF(INDEX([Tracker.$A$1:.$AG$120];6+9*(MONTH([.$A16])-1)+(COLUMN()-4);DAY([.$A16])+2)&lt;&gt;&quot;&quot;;1;0)" table:style-name="ce92"/>
          <table:table-cell office:value-type="float" office:value="0" table:formula="of:=IF(INDEX([Tracker.$A$1:.$AG$120];6+9*(MONTH([.$A16])-1)+(COLUMN()-4);DAY([.$A16])+2)&lt;&gt;&quot;&quot;;1;0)" table:style-name="ce92"/>
          <table:table-cell office:value-type="float" office:value="0" table:formula="of:=IF(INDEX([Tracker.$A$1:.$AG$120];6+9*(MONTH([.$A16])-1)+(COLUMN()-4);DAY([.$A16])+2)&lt;&gt;&quot;&quot;;1;0)" table:style-name="ce92"/>
          <table:table-cell office:value-type="float" office:value="0" table:formula="of:=SUM([.D16:.I16])" table:style-name="ce6"/>
          <table:table-cell office:value-type="percentage" office:value="0" table:formula="of:=[.J16]/6" table:style-name="ce8">
            <text:p>0%</text:p>
          </table:table-cell>
          <table:table-cell table:style-name="ce1"/>
          <table:table-cell office:value-type="float" office:value="0" table:formula="of:=IF([.D16]=1;[.M15]+1;0)" table:style-name="ce1">
            <text:p>0</text:p>
          </table:table-cell>
          <table:table-cell office:value-type="float" office:value="0" table:formula="of:=IF([.E16]=1;[.N15]+1;0)" table:style-name="ce1">
            <text:p>0</text:p>
          </table:table-cell>
          <table:table-cell office:value-type="float" office:value="0" table:formula="of:=IF([.F16]=1;[.O15]+1;0)" table:style-name="ce1">
            <text:p>0</text:p>
          </table:table-cell>
          <table:table-cell office:value-type="float" office:value="0" table:formula="of:=IF([.G16]=1;[.P15]+1;0)" table:style-name="ce1">
            <text:p>0</text:p>
          </table:table-cell>
          <table:table-cell office:value-type="float" office:value="0" table:formula="of:=IF([.H16]=1;[.Q15]+1;0)" table:style-name="ce1">
            <text:p>0</text:p>
          </table:table-cell>
          <table:table-cell office:value-type="float" office:value="0" table:formula="of:=IF([.I16]=1;[.R1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4T00:00:00" table:formula="of:=[.A16]+1" table:style-name="ce10">
            <text:p>Wed, 14 Jan 2026</text:p>
          </table:table-cell>
          <table:table-cell office:value-type="string" office:string-value="Wed" table:formula="of:=TEXT([.A17];&quot;ddd&quot;)" table:style-name="ce5">
            <text:p>Wed</text:p>
          </table:table-cell>
          <table:table-cell office:value-type="string" office:string-value="Jan" table:formula="of:=TEXT([.A17];&quot;mmm&quot;)" table:style-name="ce5">
            <text:p>Jan</text:p>
          </table:table-cell>
          <table:table-cell office:value-type="float" office:value="0" table:formula="of:=IF(INDEX([Tracker.$A$1:.$AG$120];6+9*(MONTH([.$A17])-1)+(COLUMN()-4);DAY([.$A17])+2)&lt;&gt;&quot;&quot;;1;0)" table:style-name="ce92"/>
          <table:table-cell office:value-type="float" office:value="0" table:formula="of:=IF(INDEX([Tracker.$A$1:.$AG$120];6+9*(MONTH([.$A17])-1)+(COLUMN()-4);DAY([.$A17])+2)&lt;&gt;&quot;&quot;;1;0)" table:style-name="ce92"/>
          <table:table-cell office:value-type="float" office:value="0" table:formula="of:=IF(INDEX([Tracker.$A$1:.$AG$120];6+9*(MONTH([.$A17])-1)+(COLUMN()-4);DAY([.$A17])+2)&lt;&gt;&quot;&quot;;1;0)" table:style-name="ce92"/>
          <table:table-cell office:value-type="float" office:value="0" table:formula="of:=IF(INDEX([Tracker.$A$1:.$AG$120];6+9*(MONTH([.$A17])-1)+(COLUMN()-4);DAY([.$A17])+2)&lt;&gt;&quot;&quot;;1;0)" table:style-name="ce92"/>
          <table:table-cell office:value-type="float" office:value="0" table:formula="of:=IF(INDEX([Tracker.$A$1:.$AG$120];6+9*(MONTH([.$A17])-1)+(COLUMN()-4);DAY([.$A17])+2)&lt;&gt;&quot;&quot;;1;0)" table:style-name="ce92"/>
          <table:table-cell office:value-type="float" office:value="0" table:formula="of:=IF(INDEX([Tracker.$A$1:.$AG$120];6+9*(MONTH([.$A17])-1)+(COLUMN()-4);DAY([.$A17])+2)&lt;&gt;&quot;&quot;;1;0)" table:style-name="ce92"/>
          <table:table-cell office:value-type="float" office:value="0" table:formula="of:=SUM([.D17:.I17])" table:style-name="ce6"/>
          <table:table-cell office:value-type="percentage" office:value="0" table:formula="of:=[.J17]/6" table:style-name="ce8">
            <text:p>0%</text:p>
          </table:table-cell>
          <table:table-cell table:style-name="ce1"/>
          <table:table-cell office:value-type="float" office:value="0" table:formula="of:=IF([.D17]=1;[.M16]+1;0)" table:style-name="ce1">
            <text:p>0</text:p>
          </table:table-cell>
          <table:table-cell office:value-type="float" office:value="0" table:formula="of:=IF([.E17]=1;[.N16]+1;0)" table:style-name="ce1">
            <text:p>0</text:p>
          </table:table-cell>
          <table:table-cell office:value-type="float" office:value="0" table:formula="of:=IF([.F17]=1;[.O16]+1;0)" table:style-name="ce1">
            <text:p>0</text:p>
          </table:table-cell>
          <table:table-cell office:value-type="float" office:value="0" table:formula="of:=IF([.G17]=1;[.P16]+1;0)" table:style-name="ce1">
            <text:p>0</text:p>
          </table:table-cell>
          <table:table-cell office:value-type="float" office:value="0" table:formula="of:=IF([.H17]=1;[.Q16]+1;0)" table:style-name="ce1">
            <text:p>0</text:p>
          </table:table-cell>
          <table:table-cell office:value-type="float" office:value="0" table:formula="of:=IF([.I17]=1;[.R1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5T00:00:00" table:formula="of:=[.A17]+1" table:style-name="ce10">
            <text:p>Thu, 15 Jan 2026</text:p>
          </table:table-cell>
          <table:table-cell office:value-type="string" office:string-value="Thu" table:formula="of:=TEXT([.A18];&quot;ddd&quot;)" table:style-name="ce5">
            <text:p>Thu</text:p>
          </table:table-cell>
          <table:table-cell office:value-type="string" office:string-value="Jan" table:formula="of:=TEXT([.A18];&quot;mmm&quot;)" table:style-name="ce5">
            <text:p>Jan</text:p>
          </table:table-cell>
          <table:table-cell office:value-type="float" office:value="0" table:formula="of:=IF(INDEX([Tracker.$A$1:.$AG$120];6+9*(MONTH([.$A18])-1)+(COLUMN()-4);DAY([.$A18])+2)&lt;&gt;&quot;&quot;;1;0)" table:style-name="ce92"/>
          <table:table-cell office:value-type="float" office:value="0" table:formula="of:=IF(INDEX([Tracker.$A$1:.$AG$120];6+9*(MONTH([.$A18])-1)+(COLUMN()-4);DAY([.$A18])+2)&lt;&gt;&quot;&quot;;1;0)" table:style-name="ce92"/>
          <table:table-cell office:value-type="float" office:value="0" table:formula="of:=IF(INDEX([Tracker.$A$1:.$AG$120];6+9*(MONTH([.$A18])-1)+(COLUMN()-4);DAY([.$A18])+2)&lt;&gt;&quot;&quot;;1;0)" table:style-name="ce92"/>
          <table:table-cell office:value-type="float" office:value="0" table:formula="of:=IF(INDEX([Tracker.$A$1:.$AG$120];6+9*(MONTH([.$A18])-1)+(COLUMN()-4);DAY([.$A18])+2)&lt;&gt;&quot;&quot;;1;0)" table:style-name="ce92"/>
          <table:table-cell office:value-type="float" office:value="0" table:formula="of:=IF(INDEX([Tracker.$A$1:.$AG$120];6+9*(MONTH([.$A18])-1)+(COLUMN()-4);DAY([.$A18])+2)&lt;&gt;&quot;&quot;;1;0)" table:style-name="ce92"/>
          <table:table-cell office:value-type="float" office:value="0" table:formula="of:=IF(INDEX([Tracker.$A$1:.$AG$120];6+9*(MONTH([.$A18])-1)+(COLUMN()-4);DAY([.$A18])+2)&lt;&gt;&quot;&quot;;1;0)" table:style-name="ce92"/>
          <table:table-cell office:value-type="float" office:value="0" table:formula="of:=SUM([.D18:.I18])" table:style-name="ce6"/>
          <table:table-cell office:value-type="percentage" office:value="0" table:formula="of:=[.J18]/6" table:style-name="ce8">
            <text:p>0%</text:p>
          </table:table-cell>
          <table:table-cell table:style-name="ce1"/>
          <table:table-cell office:value-type="float" office:value="0" table:formula="of:=IF([.D18]=1;[.M17]+1;0)" table:style-name="ce1">
            <text:p>0</text:p>
          </table:table-cell>
          <table:table-cell office:value-type="float" office:value="0" table:formula="of:=IF([.E18]=1;[.N17]+1;0)" table:style-name="ce1">
            <text:p>0</text:p>
          </table:table-cell>
          <table:table-cell office:value-type="float" office:value="0" table:formula="of:=IF([.F18]=1;[.O17]+1;0)" table:style-name="ce1">
            <text:p>0</text:p>
          </table:table-cell>
          <table:table-cell office:value-type="float" office:value="0" table:formula="of:=IF([.G18]=1;[.P17]+1;0)" table:style-name="ce1">
            <text:p>0</text:p>
          </table:table-cell>
          <table:table-cell office:value-type="float" office:value="0" table:formula="of:=IF([.H18]=1;[.Q17]+1;0)" table:style-name="ce1">
            <text:p>0</text:p>
          </table:table-cell>
          <table:table-cell office:value-type="float" office:value="0" table:formula="of:=IF([.I18]=1;[.R1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6T00:00:00" table:formula="of:=[.A18]+1" table:style-name="ce10">
            <text:p>Fri, 16 Jan 2026</text:p>
          </table:table-cell>
          <table:table-cell office:value-type="string" office:string-value="Fri" table:formula="of:=TEXT([.A19];&quot;ddd&quot;)" table:style-name="ce5">
            <text:p>Fri</text:p>
          </table:table-cell>
          <table:table-cell office:value-type="string" office:string-value="Jan" table:formula="of:=TEXT([.A19];&quot;mmm&quot;)" table:style-name="ce5">
            <text:p>Jan</text:p>
          </table:table-cell>
          <table:table-cell office:value-type="float" office:value="0" table:formula="of:=IF(INDEX([Tracker.$A$1:.$AG$120];6+9*(MONTH([.$A19])-1)+(COLUMN()-4);DAY([.$A19])+2)&lt;&gt;&quot;&quot;;1;0)" table:style-name="ce92"/>
          <table:table-cell office:value-type="float" office:value="0" table:formula="of:=IF(INDEX([Tracker.$A$1:.$AG$120];6+9*(MONTH([.$A19])-1)+(COLUMN()-4);DAY([.$A19])+2)&lt;&gt;&quot;&quot;;1;0)" table:style-name="ce92"/>
          <table:table-cell office:value-type="float" office:value="0" table:formula="of:=IF(INDEX([Tracker.$A$1:.$AG$120];6+9*(MONTH([.$A19])-1)+(COLUMN()-4);DAY([.$A19])+2)&lt;&gt;&quot;&quot;;1;0)" table:style-name="ce92"/>
          <table:table-cell office:value-type="float" office:value="0" table:formula="of:=IF(INDEX([Tracker.$A$1:.$AG$120];6+9*(MONTH([.$A19])-1)+(COLUMN()-4);DAY([.$A19])+2)&lt;&gt;&quot;&quot;;1;0)" table:style-name="ce92"/>
          <table:table-cell office:value-type="float" office:value="0" table:formula="of:=IF(INDEX([Tracker.$A$1:.$AG$120];6+9*(MONTH([.$A19])-1)+(COLUMN()-4);DAY([.$A19])+2)&lt;&gt;&quot;&quot;;1;0)" table:style-name="ce92"/>
          <table:table-cell office:value-type="float" office:value="0" table:formula="of:=IF(INDEX([Tracker.$A$1:.$AG$120];6+9*(MONTH([.$A19])-1)+(COLUMN()-4);DAY([.$A19])+2)&lt;&gt;&quot;&quot;;1;0)" table:style-name="ce92"/>
          <table:table-cell office:value-type="float" office:value="0" table:formula="of:=SUM([.D19:.I19])" table:style-name="ce6"/>
          <table:table-cell office:value-type="percentage" office:value="0" table:formula="of:=[.J19]/6" table:style-name="ce8">
            <text:p>0%</text:p>
          </table:table-cell>
          <table:table-cell table:style-name="ce1"/>
          <table:table-cell office:value-type="float" office:value="0" table:formula="of:=IF([.D19]=1;[.M18]+1;0)" table:style-name="ce1">
            <text:p>0</text:p>
          </table:table-cell>
          <table:table-cell office:value-type="float" office:value="0" table:formula="of:=IF([.E19]=1;[.N18]+1;0)" table:style-name="ce1">
            <text:p>0</text:p>
          </table:table-cell>
          <table:table-cell office:value-type="float" office:value="0" table:formula="of:=IF([.F19]=1;[.O18]+1;0)" table:style-name="ce1">
            <text:p>0</text:p>
          </table:table-cell>
          <table:table-cell office:value-type="float" office:value="0" table:formula="of:=IF([.G19]=1;[.P18]+1;0)" table:style-name="ce1">
            <text:p>0</text:p>
          </table:table-cell>
          <table:table-cell office:value-type="float" office:value="0" table:formula="of:=IF([.H19]=1;[.Q18]+1;0)" table:style-name="ce1">
            <text:p>0</text:p>
          </table:table-cell>
          <table:table-cell office:value-type="float" office:value="0" table:formula="of:=IF([.I19]=1;[.R1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7T00:00:00" table:formula="of:=[.A19]+1" table:style-name="ce10">
            <text:p>Sat, 17 Jan 2026</text:p>
          </table:table-cell>
          <table:table-cell office:value-type="string" office:string-value="Sat" table:formula="of:=TEXT([.A20];&quot;ddd&quot;)" table:style-name="ce5">
            <text:p>Sat</text:p>
          </table:table-cell>
          <table:table-cell office:value-type="string" office:string-value="Jan" table:formula="of:=TEXT([.A20];&quot;mmm&quot;)" table:style-name="ce5">
            <text:p>Jan</text:p>
          </table:table-cell>
          <table:table-cell office:value-type="float" office:value="0" table:formula="of:=IF(INDEX([Tracker.$A$1:.$AG$120];6+9*(MONTH([.$A20])-1)+(COLUMN()-4);DAY([.$A20])+2)&lt;&gt;&quot;&quot;;1;0)" table:style-name="ce92"/>
          <table:table-cell office:value-type="float" office:value="0" table:formula="of:=IF(INDEX([Tracker.$A$1:.$AG$120];6+9*(MONTH([.$A20])-1)+(COLUMN()-4);DAY([.$A20])+2)&lt;&gt;&quot;&quot;;1;0)" table:style-name="ce92"/>
          <table:table-cell office:value-type="float" office:value="0" table:formula="of:=IF(INDEX([Tracker.$A$1:.$AG$120];6+9*(MONTH([.$A20])-1)+(COLUMN()-4);DAY([.$A20])+2)&lt;&gt;&quot;&quot;;1;0)" table:style-name="ce92"/>
          <table:table-cell office:value-type="float" office:value="0" table:formula="of:=IF(INDEX([Tracker.$A$1:.$AG$120];6+9*(MONTH([.$A20])-1)+(COLUMN()-4);DAY([.$A20])+2)&lt;&gt;&quot;&quot;;1;0)" table:style-name="ce92"/>
          <table:table-cell office:value-type="float" office:value="0" table:formula="of:=IF(INDEX([Tracker.$A$1:.$AG$120];6+9*(MONTH([.$A20])-1)+(COLUMN()-4);DAY([.$A20])+2)&lt;&gt;&quot;&quot;;1;0)" table:style-name="ce92"/>
          <table:table-cell office:value-type="float" office:value="0" table:formula="of:=IF(INDEX([Tracker.$A$1:.$AG$120];6+9*(MONTH([.$A20])-1)+(COLUMN()-4);DAY([.$A20])+2)&lt;&gt;&quot;&quot;;1;0)" table:style-name="ce92"/>
          <table:table-cell office:value-type="float" office:value="0" table:formula="of:=SUM([.D20:.I20])" table:style-name="ce6"/>
          <table:table-cell office:value-type="percentage" office:value="0" table:formula="of:=[.J20]/6" table:style-name="ce8">
            <text:p>0%</text:p>
          </table:table-cell>
          <table:table-cell table:style-name="ce1"/>
          <table:table-cell office:value-type="float" office:value="0" table:formula="of:=IF([.D20]=1;[.M19]+1;0)" table:style-name="ce1">
            <text:p>0</text:p>
          </table:table-cell>
          <table:table-cell office:value-type="float" office:value="0" table:formula="of:=IF([.E20]=1;[.N19]+1;0)" table:style-name="ce1">
            <text:p>0</text:p>
          </table:table-cell>
          <table:table-cell office:value-type="float" office:value="0" table:formula="of:=IF([.F20]=1;[.O19]+1;0)" table:style-name="ce1">
            <text:p>0</text:p>
          </table:table-cell>
          <table:table-cell office:value-type="float" office:value="0" table:formula="of:=IF([.G20]=1;[.P19]+1;0)" table:style-name="ce1">
            <text:p>0</text:p>
          </table:table-cell>
          <table:table-cell office:value-type="float" office:value="0" table:formula="of:=IF([.H20]=1;[.Q19]+1;0)" table:style-name="ce1">
            <text:p>0</text:p>
          </table:table-cell>
          <table:table-cell office:value-type="float" office:value="0" table:formula="of:=IF([.I20]=1;[.R1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8T00:00:00" table:formula="of:=[.A20]+1" table:style-name="ce10">
            <text:p>Sun, 18 Jan 2026</text:p>
          </table:table-cell>
          <table:table-cell office:value-type="string" office:string-value="Sun" table:formula="of:=TEXT([.A21];&quot;ddd&quot;)" table:style-name="ce5">
            <text:p>Sun</text:p>
          </table:table-cell>
          <table:table-cell office:value-type="string" office:string-value="Jan" table:formula="of:=TEXT([.A21];&quot;mmm&quot;)" table:style-name="ce5">
            <text:p>Jan</text:p>
          </table:table-cell>
          <table:table-cell office:value-type="float" office:value="0" table:formula="of:=IF(INDEX([Tracker.$A$1:.$AG$120];6+9*(MONTH([.$A21])-1)+(COLUMN()-4);DAY([.$A21])+2)&lt;&gt;&quot;&quot;;1;0)" table:style-name="ce92"/>
          <table:table-cell office:value-type="float" office:value="0" table:formula="of:=IF(INDEX([Tracker.$A$1:.$AG$120];6+9*(MONTH([.$A21])-1)+(COLUMN()-4);DAY([.$A21])+2)&lt;&gt;&quot;&quot;;1;0)" table:style-name="ce92"/>
          <table:table-cell office:value-type="float" office:value="0" table:formula="of:=IF(INDEX([Tracker.$A$1:.$AG$120];6+9*(MONTH([.$A21])-1)+(COLUMN()-4);DAY([.$A21])+2)&lt;&gt;&quot;&quot;;1;0)" table:style-name="ce92"/>
          <table:table-cell office:value-type="float" office:value="0" table:formula="of:=IF(INDEX([Tracker.$A$1:.$AG$120];6+9*(MONTH([.$A21])-1)+(COLUMN()-4);DAY([.$A21])+2)&lt;&gt;&quot;&quot;;1;0)" table:style-name="ce92"/>
          <table:table-cell office:value-type="float" office:value="0" table:formula="of:=IF(INDEX([Tracker.$A$1:.$AG$120];6+9*(MONTH([.$A21])-1)+(COLUMN()-4);DAY([.$A21])+2)&lt;&gt;&quot;&quot;;1;0)" table:style-name="ce92"/>
          <table:table-cell office:value-type="float" office:value="0" table:formula="of:=IF(INDEX([Tracker.$A$1:.$AG$120];6+9*(MONTH([.$A21])-1)+(COLUMN()-4);DAY([.$A21])+2)&lt;&gt;&quot;&quot;;1;0)" table:style-name="ce92"/>
          <table:table-cell office:value-type="float" office:value="0" table:formula="of:=SUM([.D21:.I21])" table:style-name="ce6"/>
          <table:table-cell office:value-type="percentage" office:value="0" table:formula="of:=[.J21]/6" table:style-name="ce8">
            <text:p>0%</text:p>
          </table:table-cell>
          <table:table-cell table:style-name="ce1"/>
          <table:table-cell office:value-type="float" office:value="0" table:formula="of:=IF([.D21]=1;[.M20]+1;0)" table:style-name="ce1">
            <text:p>0</text:p>
          </table:table-cell>
          <table:table-cell office:value-type="float" office:value="0" table:formula="of:=IF([.E21]=1;[.N20]+1;0)" table:style-name="ce1">
            <text:p>0</text:p>
          </table:table-cell>
          <table:table-cell office:value-type="float" office:value="0" table:formula="of:=IF([.F21]=1;[.O20]+1;0)" table:style-name="ce1">
            <text:p>0</text:p>
          </table:table-cell>
          <table:table-cell office:value-type="float" office:value="0" table:formula="of:=IF([.G21]=1;[.P20]+1;0)" table:style-name="ce1">
            <text:p>0</text:p>
          </table:table-cell>
          <table:table-cell office:value-type="float" office:value="0" table:formula="of:=IF([.H21]=1;[.Q20]+1;0)" table:style-name="ce1">
            <text:p>0</text:p>
          </table:table-cell>
          <table:table-cell office:value-type="float" office:value="0" table:formula="of:=IF([.I21]=1;[.R2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19T00:00:00" table:formula="of:=[.A21]+1" table:style-name="ce10">
            <text:p>Mon, 19 Jan 2026</text:p>
          </table:table-cell>
          <table:table-cell office:value-type="string" office:string-value="Mon" table:formula="of:=TEXT([.A22];&quot;ddd&quot;)" table:style-name="ce5">
            <text:p>Mon</text:p>
          </table:table-cell>
          <table:table-cell office:value-type="string" office:string-value="Jan" table:formula="of:=TEXT([.A22];&quot;mmm&quot;)" table:style-name="ce5">
            <text:p>Jan</text:p>
          </table:table-cell>
          <table:table-cell office:value-type="float" office:value="0" table:formula="of:=IF(INDEX([Tracker.$A$1:.$AG$120];6+9*(MONTH([.$A22])-1)+(COLUMN()-4);DAY([.$A22])+2)&lt;&gt;&quot;&quot;;1;0)" table:style-name="ce92"/>
          <table:table-cell office:value-type="float" office:value="0" table:formula="of:=IF(INDEX([Tracker.$A$1:.$AG$120];6+9*(MONTH([.$A22])-1)+(COLUMN()-4);DAY([.$A22])+2)&lt;&gt;&quot;&quot;;1;0)" table:style-name="ce92"/>
          <table:table-cell office:value-type="float" office:value="0" table:formula="of:=IF(INDEX([Tracker.$A$1:.$AG$120];6+9*(MONTH([.$A22])-1)+(COLUMN()-4);DAY([.$A22])+2)&lt;&gt;&quot;&quot;;1;0)" table:style-name="ce92"/>
          <table:table-cell office:value-type="float" office:value="0" table:formula="of:=IF(INDEX([Tracker.$A$1:.$AG$120];6+9*(MONTH([.$A22])-1)+(COLUMN()-4);DAY([.$A22])+2)&lt;&gt;&quot;&quot;;1;0)" table:style-name="ce92"/>
          <table:table-cell office:value-type="float" office:value="0" table:formula="of:=IF(INDEX([Tracker.$A$1:.$AG$120];6+9*(MONTH([.$A22])-1)+(COLUMN()-4);DAY([.$A22])+2)&lt;&gt;&quot;&quot;;1;0)" table:style-name="ce92"/>
          <table:table-cell office:value-type="float" office:value="0" table:formula="of:=IF(INDEX([Tracker.$A$1:.$AG$120];6+9*(MONTH([.$A22])-1)+(COLUMN()-4);DAY([.$A22])+2)&lt;&gt;&quot;&quot;;1;0)" table:style-name="ce92"/>
          <table:table-cell office:value-type="float" office:value="0" table:formula="of:=SUM([.D22:.I22])" table:style-name="ce6"/>
          <table:table-cell office:value-type="percentage" office:value="0" table:formula="of:=[.J22]/6" table:style-name="ce8">
            <text:p>0%</text:p>
          </table:table-cell>
          <table:table-cell table:style-name="ce1"/>
          <table:table-cell office:value-type="float" office:value="0" table:formula="of:=IF([.D22]=1;[.M21]+1;0)" table:style-name="ce1">
            <text:p>0</text:p>
          </table:table-cell>
          <table:table-cell office:value-type="float" office:value="0" table:formula="of:=IF([.E22]=1;[.N21]+1;0)" table:style-name="ce1">
            <text:p>0</text:p>
          </table:table-cell>
          <table:table-cell office:value-type="float" office:value="0" table:formula="of:=IF([.F22]=1;[.O21]+1;0)" table:style-name="ce1">
            <text:p>0</text:p>
          </table:table-cell>
          <table:table-cell office:value-type="float" office:value="0" table:formula="of:=IF([.G22]=1;[.P21]+1;0)" table:style-name="ce1">
            <text:p>0</text:p>
          </table:table-cell>
          <table:table-cell office:value-type="float" office:value="0" table:formula="of:=IF([.H22]=1;[.Q21]+1;0)" table:style-name="ce1">
            <text:p>0</text:p>
          </table:table-cell>
          <table:table-cell office:value-type="float" office:value="0" table:formula="of:=IF([.I22]=1;[.R2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0T00:00:00" table:formula="of:=[.A22]+1" table:style-name="ce10">
            <text:p>Tue, 20 Jan 2026</text:p>
          </table:table-cell>
          <table:table-cell office:value-type="string" office:string-value="Tue" table:formula="of:=TEXT([.A23];&quot;ddd&quot;)" table:style-name="ce5">
            <text:p>Tue</text:p>
          </table:table-cell>
          <table:table-cell office:value-type="string" office:string-value="Jan" table:formula="of:=TEXT([.A23];&quot;mmm&quot;)" table:style-name="ce5">
            <text:p>Jan</text:p>
          </table:table-cell>
          <table:table-cell office:value-type="float" office:value="0" table:formula="of:=IF(INDEX([Tracker.$A$1:.$AG$120];6+9*(MONTH([.$A23])-1)+(COLUMN()-4);DAY([.$A23])+2)&lt;&gt;&quot;&quot;;1;0)" table:style-name="ce92"/>
          <table:table-cell office:value-type="float" office:value="0" table:formula="of:=IF(INDEX([Tracker.$A$1:.$AG$120];6+9*(MONTH([.$A23])-1)+(COLUMN()-4);DAY([.$A23])+2)&lt;&gt;&quot;&quot;;1;0)" table:style-name="ce92"/>
          <table:table-cell office:value-type="float" office:value="0" table:formula="of:=IF(INDEX([Tracker.$A$1:.$AG$120];6+9*(MONTH([.$A23])-1)+(COLUMN()-4);DAY([.$A23])+2)&lt;&gt;&quot;&quot;;1;0)" table:style-name="ce92"/>
          <table:table-cell office:value-type="float" office:value="0" table:formula="of:=IF(INDEX([Tracker.$A$1:.$AG$120];6+9*(MONTH([.$A23])-1)+(COLUMN()-4);DAY([.$A23])+2)&lt;&gt;&quot;&quot;;1;0)" table:style-name="ce92"/>
          <table:table-cell office:value-type="float" office:value="0" table:formula="of:=IF(INDEX([Tracker.$A$1:.$AG$120];6+9*(MONTH([.$A23])-1)+(COLUMN()-4);DAY([.$A23])+2)&lt;&gt;&quot;&quot;;1;0)" table:style-name="ce92"/>
          <table:table-cell office:value-type="float" office:value="0" table:formula="of:=IF(INDEX([Tracker.$A$1:.$AG$120];6+9*(MONTH([.$A23])-1)+(COLUMN()-4);DAY([.$A23])+2)&lt;&gt;&quot;&quot;;1;0)" table:style-name="ce92"/>
          <table:table-cell office:value-type="float" office:value="0" table:formula="of:=SUM([.D23:.I23])" table:style-name="ce6"/>
          <table:table-cell office:value-type="percentage" office:value="0" table:formula="of:=[.J23]/6" table:style-name="ce8">
            <text:p>0%</text:p>
          </table:table-cell>
          <table:table-cell table:style-name="ce1"/>
          <table:table-cell office:value-type="float" office:value="0" table:formula="of:=IF([.D23]=1;[.M22]+1;0)" table:style-name="ce1">
            <text:p>0</text:p>
          </table:table-cell>
          <table:table-cell office:value-type="float" office:value="0" table:formula="of:=IF([.E23]=1;[.N22]+1;0)" table:style-name="ce1">
            <text:p>0</text:p>
          </table:table-cell>
          <table:table-cell office:value-type="float" office:value="0" table:formula="of:=IF([.F23]=1;[.O22]+1;0)" table:style-name="ce1">
            <text:p>0</text:p>
          </table:table-cell>
          <table:table-cell office:value-type="float" office:value="0" table:formula="of:=IF([.G23]=1;[.P22]+1;0)" table:style-name="ce1">
            <text:p>0</text:p>
          </table:table-cell>
          <table:table-cell office:value-type="float" office:value="0" table:formula="of:=IF([.H23]=1;[.Q22]+1;0)" table:style-name="ce1">
            <text:p>0</text:p>
          </table:table-cell>
          <table:table-cell office:value-type="float" office:value="0" table:formula="of:=IF([.I23]=1;[.R2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1T00:00:00" table:formula="of:=[.A23]+1" table:style-name="ce10">
            <text:p>Wed, 21 Jan 2026</text:p>
          </table:table-cell>
          <table:table-cell office:value-type="string" office:string-value="Wed" table:formula="of:=TEXT([.A24];&quot;ddd&quot;)" table:style-name="ce5">
            <text:p>Wed</text:p>
          </table:table-cell>
          <table:table-cell office:value-type="string" office:string-value="Jan" table:formula="of:=TEXT([.A24];&quot;mmm&quot;)" table:style-name="ce5">
            <text:p>Jan</text:p>
          </table:table-cell>
          <table:table-cell office:value-type="float" office:value="0" table:formula="of:=IF(INDEX([Tracker.$A$1:.$AG$120];6+9*(MONTH([.$A24])-1)+(COLUMN()-4);DAY([.$A24])+2)&lt;&gt;&quot;&quot;;1;0)" table:style-name="ce92"/>
          <table:table-cell office:value-type="float" office:value="0" table:formula="of:=IF(INDEX([Tracker.$A$1:.$AG$120];6+9*(MONTH([.$A24])-1)+(COLUMN()-4);DAY([.$A24])+2)&lt;&gt;&quot;&quot;;1;0)" table:style-name="ce92"/>
          <table:table-cell office:value-type="float" office:value="0" table:formula="of:=IF(INDEX([Tracker.$A$1:.$AG$120];6+9*(MONTH([.$A24])-1)+(COLUMN()-4);DAY([.$A24])+2)&lt;&gt;&quot;&quot;;1;0)" table:style-name="ce92"/>
          <table:table-cell office:value-type="float" office:value="0" table:formula="of:=IF(INDEX([Tracker.$A$1:.$AG$120];6+9*(MONTH([.$A24])-1)+(COLUMN()-4);DAY([.$A24])+2)&lt;&gt;&quot;&quot;;1;0)" table:style-name="ce92"/>
          <table:table-cell office:value-type="float" office:value="0" table:formula="of:=IF(INDEX([Tracker.$A$1:.$AG$120];6+9*(MONTH([.$A24])-1)+(COLUMN()-4);DAY([.$A24])+2)&lt;&gt;&quot;&quot;;1;0)" table:style-name="ce92"/>
          <table:table-cell office:value-type="float" office:value="0" table:formula="of:=IF(INDEX([Tracker.$A$1:.$AG$120];6+9*(MONTH([.$A24])-1)+(COLUMN()-4);DAY([.$A24])+2)&lt;&gt;&quot;&quot;;1;0)" table:style-name="ce92"/>
          <table:table-cell office:value-type="float" office:value="0" table:formula="of:=SUM([.D24:.I24])" table:style-name="ce6"/>
          <table:table-cell office:value-type="percentage" office:value="0" table:formula="of:=[.J24]/6" table:style-name="ce8">
            <text:p>0%</text:p>
          </table:table-cell>
          <table:table-cell table:style-name="ce1"/>
          <table:table-cell office:value-type="float" office:value="0" table:formula="of:=IF([.D24]=1;[.M23]+1;0)" table:style-name="ce1">
            <text:p>0</text:p>
          </table:table-cell>
          <table:table-cell office:value-type="float" office:value="0" table:formula="of:=IF([.E24]=1;[.N23]+1;0)" table:style-name="ce1">
            <text:p>0</text:p>
          </table:table-cell>
          <table:table-cell office:value-type="float" office:value="0" table:formula="of:=IF([.F24]=1;[.O23]+1;0)" table:style-name="ce1">
            <text:p>0</text:p>
          </table:table-cell>
          <table:table-cell office:value-type="float" office:value="0" table:formula="of:=IF([.G24]=1;[.P23]+1;0)" table:style-name="ce1">
            <text:p>0</text:p>
          </table:table-cell>
          <table:table-cell office:value-type="float" office:value="0" table:formula="of:=IF([.H24]=1;[.Q23]+1;0)" table:style-name="ce1">
            <text:p>0</text:p>
          </table:table-cell>
          <table:table-cell office:value-type="float" office:value="0" table:formula="of:=IF([.I24]=1;[.R2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2T00:00:00" table:formula="of:=[.A24]+1" table:style-name="ce10">
            <text:p>Thu, 22 Jan 2026</text:p>
          </table:table-cell>
          <table:table-cell office:value-type="string" office:string-value="Thu" table:formula="of:=TEXT([.A25];&quot;ddd&quot;)" table:style-name="ce5">
            <text:p>Thu</text:p>
          </table:table-cell>
          <table:table-cell office:value-type="string" office:string-value="Jan" table:formula="of:=TEXT([.A25];&quot;mmm&quot;)" table:style-name="ce5">
            <text:p>Jan</text:p>
          </table:table-cell>
          <table:table-cell office:value-type="float" office:value="0" table:formula="of:=IF(INDEX([Tracker.$A$1:.$AG$120];6+9*(MONTH([.$A25])-1)+(COLUMN()-4);DAY([.$A25])+2)&lt;&gt;&quot;&quot;;1;0)" table:style-name="ce92"/>
          <table:table-cell office:value-type="float" office:value="0" table:formula="of:=IF(INDEX([Tracker.$A$1:.$AG$120];6+9*(MONTH([.$A25])-1)+(COLUMN()-4);DAY([.$A25])+2)&lt;&gt;&quot;&quot;;1;0)" table:style-name="ce92"/>
          <table:table-cell office:value-type="float" office:value="0" table:formula="of:=IF(INDEX([Tracker.$A$1:.$AG$120];6+9*(MONTH([.$A25])-1)+(COLUMN()-4);DAY([.$A25])+2)&lt;&gt;&quot;&quot;;1;0)" table:style-name="ce92"/>
          <table:table-cell office:value-type="float" office:value="0" table:formula="of:=IF(INDEX([Tracker.$A$1:.$AG$120];6+9*(MONTH([.$A25])-1)+(COLUMN()-4);DAY([.$A25])+2)&lt;&gt;&quot;&quot;;1;0)" table:style-name="ce92"/>
          <table:table-cell office:value-type="float" office:value="0" table:formula="of:=IF(INDEX([Tracker.$A$1:.$AG$120];6+9*(MONTH([.$A25])-1)+(COLUMN()-4);DAY([.$A25])+2)&lt;&gt;&quot;&quot;;1;0)" table:style-name="ce92"/>
          <table:table-cell office:value-type="float" office:value="0" table:formula="of:=IF(INDEX([Tracker.$A$1:.$AG$120];6+9*(MONTH([.$A25])-1)+(COLUMN()-4);DAY([.$A25])+2)&lt;&gt;&quot;&quot;;1;0)" table:style-name="ce92"/>
          <table:table-cell office:value-type="float" office:value="0" table:formula="of:=SUM([.D25:.I25])" table:style-name="ce6"/>
          <table:table-cell office:value-type="percentage" office:value="0" table:formula="of:=[.J25]/6" table:style-name="ce8">
            <text:p>0%</text:p>
          </table:table-cell>
          <table:table-cell table:style-name="ce1"/>
          <table:table-cell office:value-type="float" office:value="0" table:formula="of:=IF([.D25]=1;[.M24]+1;0)" table:style-name="ce1">
            <text:p>0</text:p>
          </table:table-cell>
          <table:table-cell office:value-type="float" office:value="0" table:formula="of:=IF([.E25]=1;[.N24]+1;0)" table:style-name="ce1">
            <text:p>0</text:p>
          </table:table-cell>
          <table:table-cell office:value-type="float" office:value="0" table:formula="of:=IF([.F25]=1;[.O24]+1;0)" table:style-name="ce1">
            <text:p>0</text:p>
          </table:table-cell>
          <table:table-cell office:value-type="float" office:value="0" table:formula="of:=IF([.G25]=1;[.P24]+1;0)" table:style-name="ce1">
            <text:p>0</text:p>
          </table:table-cell>
          <table:table-cell office:value-type="float" office:value="0" table:formula="of:=IF([.H25]=1;[.Q24]+1;0)" table:style-name="ce1">
            <text:p>0</text:p>
          </table:table-cell>
          <table:table-cell office:value-type="float" office:value="0" table:formula="of:=IF([.I25]=1;[.R2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3T00:00:00" table:formula="of:=[.A25]+1" table:style-name="ce10">
            <text:p>Fri, 23 Jan 2026</text:p>
          </table:table-cell>
          <table:table-cell office:value-type="string" office:string-value="Fri" table:formula="of:=TEXT([.A26];&quot;ddd&quot;)" table:style-name="ce5">
            <text:p>Fri</text:p>
          </table:table-cell>
          <table:table-cell office:value-type="string" office:string-value="Jan" table:formula="of:=TEXT([.A26];&quot;mmm&quot;)" table:style-name="ce5">
            <text:p>Jan</text:p>
          </table:table-cell>
          <table:table-cell office:value-type="float" office:value="0" table:formula="of:=IF(INDEX([Tracker.$A$1:.$AG$120];6+9*(MONTH([.$A26])-1)+(COLUMN()-4);DAY([.$A26])+2)&lt;&gt;&quot;&quot;;1;0)" table:style-name="ce92"/>
          <table:table-cell office:value-type="float" office:value="0" table:formula="of:=IF(INDEX([Tracker.$A$1:.$AG$120];6+9*(MONTH([.$A26])-1)+(COLUMN()-4);DAY([.$A26])+2)&lt;&gt;&quot;&quot;;1;0)" table:style-name="ce92"/>
          <table:table-cell office:value-type="float" office:value="0" table:formula="of:=IF(INDEX([Tracker.$A$1:.$AG$120];6+9*(MONTH([.$A26])-1)+(COLUMN()-4);DAY([.$A26])+2)&lt;&gt;&quot;&quot;;1;0)" table:style-name="ce92"/>
          <table:table-cell office:value-type="float" office:value="0" table:formula="of:=IF(INDEX([Tracker.$A$1:.$AG$120];6+9*(MONTH([.$A26])-1)+(COLUMN()-4);DAY([.$A26])+2)&lt;&gt;&quot;&quot;;1;0)" table:style-name="ce92"/>
          <table:table-cell office:value-type="float" office:value="0" table:formula="of:=IF(INDEX([Tracker.$A$1:.$AG$120];6+9*(MONTH([.$A26])-1)+(COLUMN()-4);DAY([.$A26])+2)&lt;&gt;&quot;&quot;;1;0)" table:style-name="ce92"/>
          <table:table-cell office:value-type="float" office:value="0" table:formula="of:=IF(INDEX([Tracker.$A$1:.$AG$120];6+9*(MONTH([.$A26])-1)+(COLUMN()-4);DAY([.$A26])+2)&lt;&gt;&quot;&quot;;1;0)" table:style-name="ce92"/>
          <table:table-cell office:value-type="float" office:value="0" table:formula="of:=SUM([.D26:.I26])" table:style-name="ce6"/>
          <table:table-cell office:value-type="percentage" office:value="0" table:formula="of:=[.J26]/6" table:style-name="ce8">
            <text:p>0%</text:p>
          </table:table-cell>
          <table:table-cell table:style-name="ce1"/>
          <table:table-cell office:value-type="float" office:value="0" table:formula="of:=IF([.D26]=1;[.M25]+1;0)" table:style-name="ce1">
            <text:p>0</text:p>
          </table:table-cell>
          <table:table-cell office:value-type="float" office:value="0" table:formula="of:=IF([.E26]=1;[.N25]+1;0)" table:style-name="ce1">
            <text:p>0</text:p>
          </table:table-cell>
          <table:table-cell office:value-type="float" office:value="0" table:formula="of:=IF([.F26]=1;[.O25]+1;0)" table:style-name="ce1">
            <text:p>0</text:p>
          </table:table-cell>
          <table:table-cell office:value-type="float" office:value="0" table:formula="of:=IF([.G26]=1;[.P25]+1;0)" table:style-name="ce1">
            <text:p>0</text:p>
          </table:table-cell>
          <table:table-cell office:value-type="float" office:value="0" table:formula="of:=IF([.H26]=1;[.Q25]+1;0)" table:style-name="ce1">
            <text:p>0</text:p>
          </table:table-cell>
          <table:table-cell office:value-type="float" office:value="0" table:formula="of:=IF([.I26]=1;[.R2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4T00:00:00" table:formula="of:=[.A26]+1" table:style-name="ce10">
            <text:p>Sat, 24 Jan 2026</text:p>
          </table:table-cell>
          <table:table-cell office:value-type="string" office:string-value="Sat" table:formula="of:=TEXT([.A27];&quot;ddd&quot;)" table:style-name="ce5">
            <text:p>Sat</text:p>
          </table:table-cell>
          <table:table-cell office:value-type="string" office:string-value="Jan" table:formula="of:=TEXT([.A27];&quot;mmm&quot;)" table:style-name="ce5">
            <text:p>Jan</text:p>
          </table:table-cell>
          <table:table-cell office:value-type="float" office:value="0" table:formula="of:=IF(INDEX([Tracker.$A$1:.$AG$120];6+9*(MONTH([.$A27])-1)+(COLUMN()-4);DAY([.$A27])+2)&lt;&gt;&quot;&quot;;1;0)" table:style-name="ce92"/>
          <table:table-cell office:value-type="float" office:value="0" table:formula="of:=IF(INDEX([Tracker.$A$1:.$AG$120];6+9*(MONTH([.$A27])-1)+(COLUMN()-4);DAY([.$A27])+2)&lt;&gt;&quot;&quot;;1;0)" table:style-name="ce92"/>
          <table:table-cell office:value-type="float" office:value="0" table:formula="of:=IF(INDEX([Tracker.$A$1:.$AG$120];6+9*(MONTH([.$A27])-1)+(COLUMN()-4);DAY([.$A27])+2)&lt;&gt;&quot;&quot;;1;0)" table:style-name="ce92"/>
          <table:table-cell office:value-type="float" office:value="0" table:formula="of:=IF(INDEX([Tracker.$A$1:.$AG$120];6+9*(MONTH([.$A27])-1)+(COLUMN()-4);DAY([.$A27])+2)&lt;&gt;&quot;&quot;;1;0)" table:style-name="ce92"/>
          <table:table-cell office:value-type="float" office:value="0" table:formula="of:=IF(INDEX([Tracker.$A$1:.$AG$120];6+9*(MONTH([.$A27])-1)+(COLUMN()-4);DAY([.$A27])+2)&lt;&gt;&quot;&quot;;1;0)" table:style-name="ce92"/>
          <table:table-cell office:value-type="float" office:value="0" table:formula="of:=IF(INDEX([Tracker.$A$1:.$AG$120];6+9*(MONTH([.$A27])-1)+(COLUMN()-4);DAY([.$A27])+2)&lt;&gt;&quot;&quot;;1;0)" table:style-name="ce92"/>
          <table:table-cell office:value-type="float" office:value="0" table:formula="of:=SUM([.D27:.I27])" table:style-name="ce6"/>
          <table:table-cell office:value-type="percentage" office:value="0" table:formula="of:=[.J27]/6" table:style-name="ce8">
            <text:p>0%</text:p>
          </table:table-cell>
          <table:table-cell table:style-name="ce1"/>
          <table:table-cell office:value-type="float" office:value="0" table:formula="of:=IF([.D27]=1;[.M26]+1;0)" table:style-name="ce1">
            <text:p>0</text:p>
          </table:table-cell>
          <table:table-cell office:value-type="float" office:value="0" table:formula="of:=IF([.E27]=1;[.N26]+1;0)" table:style-name="ce1">
            <text:p>0</text:p>
          </table:table-cell>
          <table:table-cell office:value-type="float" office:value="0" table:formula="of:=IF([.F27]=1;[.O26]+1;0)" table:style-name="ce1">
            <text:p>0</text:p>
          </table:table-cell>
          <table:table-cell office:value-type="float" office:value="0" table:formula="of:=IF([.G27]=1;[.P26]+1;0)" table:style-name="ce1">
            <text:p>0</text:p>
          </table:table-cell>
          <table:table-cell office:value-type="float" office:value="0" table:formula="of:=IF([.H27]=1;[.Q26]+1;0)" table:style-name="ce1">
            <text:p>0</text:p>
          </table:table-cell>
          <table:table-cell office:value-type="float" office:value="0" table:formula="of:=IF([.I27]=1;[.R2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5T00:00:00" table:formula="of:=[.A27]+1" table:style-name="ce10">
            <text:p>Sun, 25 Jan 2026</text:p>
          </table:table-cell>
          <table:table-cell office:value-type="string" office:string-value="Sun" table:formula="of:=TEXT([.A28];&quot;ddd&quot;)" table:style-name="ce5">
            <text:p>Sun</text:p>
          </table:table-cell>
          <table:table-cell office:value-type="string" office:string-value="Jan" table:formula="of:=TEXT([.A28];&quot;mmm&quot;)" table:style-name="ce5">
            <text:p>Jan</text:p>
          </table:table-cell>
          <table:table-cell office:value-type="float" office:value="0" table:formula="of:=IF(INDEX([Tracker.$A$1:.$AG$120];6+9*(MONTH([.$A28])-1)+(COLUMN()-4);DAY([.$A28])+2)&lt;&gt;&quot;&quot;;1;0)" table:style-name="ce92"/>
          <table:table-cell office:value-type="float" office:value="0" table:formula="of:=IF(INDEX([Tracker.$A$1:.$AG$120];6+9*(MONTH([.$A28])-1)+(COLUMN()-4);DAY([.$A28])+2)&lt;&gt;&quot;&quot;;1;0)" table:style-name="ce92"/>
          <table:table-cell office:value-type="float" office:value="0" table:formula="of:=IF(INDEX([Tracker.$A$1:.$AG$120];6+9*(MONTH([.$A28])-1)+(COLUMN()-4);DAY([.$A28])+2)&lt;&gt;&quot;&quot;;1;0)" table:style-name="ce92"/>
          <table:table-cell office:value-type="float" office:value="0" table:formula="of:=IF(INDEX([Tracker.$A$1:.$AG$120];6+9*(MONTH([.$A28])-1)+(COLUMN()-4);DAY([.$A28])+2)&lt;&gt;&quot;&quot;;1;0)" table:style-name="ce92"/>
          <table:table-cell office:value-type="float" office:value="0" table:formula="of:=IF(INDEX([Tracker.$A$1:.$AG$120];6+9*(MONTH([.$A28])-1)+(COLUMN()-4);DAY([.$A28])+2)&lt;&gt;&quot;&quot;;1;0)" table:style-name="ce92"/>
          <table:table-cell office:value-type="float" office:value="0" table:formula="of:=IF(INDEX([Tracker.$A$1:.$AG$120];6+9*(MONTH([.$A28])-1)+(COLUMN()-4);DAY([.$A28])+2)&lt;&gt;&quot;&quot;;1;0)" table:style-name="ce92"/>
          <table:table-cell office:value-type="float" office:value="0" table:formula="of:=SUM([.D28:.I28])" table:style-name="ce6"/>
          <table:table-cell office:value-type="percentage" office:value="0" table:formula="of:=[.J28]/6" table:style-name="ce8">
            <text:p>0%</text:p>
          </table:table-cell>
          <table:table-cell table:style-name="ce1"/>
          <table:table-cell office:value-type="float" office:value="0" table:formula="of:=IF([.D28]=1;[.M27]+1;0)" table:style-name="ce1">
            <text:p>0</text:p>
          </table:table-cell>
          <table:table-cell office:value-type="float" office:value="0" table:formula="of:=IF([.E28]=1;[.N27]+1;0)" table:style-name="ce1">
            <text:p>0</text:p>
          </table:table-cell>
          <table:table-cell office:value-type="float" office:value="0" table:formula="of:=IF([.F28]=1;[.O27]+1;0)" table:style-name="ce1">
            <text:p>0</text:p>
          </table:table-cell>
          <table:table-cell office:value-type="float" office:value="0" table:formula="of:=IF([.G28]=1;[.P27]+1;0)" table:style-name="ce1">
            <text:p>0</text:p>
          </table:table-cell>
          <table:table-cell office:value-type="float" office:value="0" table:formula="of:=IF([.H28]=1;[.Q27]+1;0)" table:style-name="ce1">
            <text:p>0</text:p>
          </table:table-cell>
          <table:table-cell office:value-type="float" office:value="0" table:formula="of:=IF([.I28]=1;[.R2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6T00:00:00" table:formula="of:=[.A28]+1" table:style-name="ce10">
            <text:p>Mon, 26 Jan 2026</text:p>
          </table:table-cell>
          <table:table-cell office:value-type="string" office:string-value="Mon" table:formula="of:=TEXT([.A29];&quot;ddd&quot;)" table:style-name="ce5">
            <text:p>Mon</text:p>
          </table:table-cell>
          <table:table-cell office:value-type="string" office:string-value="Jan" table:formula="of:=TEXT([.A29];&quot;mmm&quot;)" table:style-name="ce5">
            <text:p>Jan</text:p>
          </table:table-cell>
          <table:table-cell office:value-type="float" office:value="0" table:formula="of:=IF(INDEX([Tracker.$A$1:.$AG$120];6+9*(MONTH([.$A29])-1)+(COLUMN()-4);DAY([.$A29])+2)&lt;&gt;&quot;&quot;;1;0)" table:style-name="ce92"/>
          <table:table-cell office:value-type="float" office:value="0" table:formula="of:=IF(INDEX([Tracker.$A$1:.$AG$120];6+9*(MONTH([.$A29])-1)+(COLUMN()-4);DAY([.$A29])+2)&lt;&gt;&quot;&quot;;1;0)" table:style-name="ce92"/>
          <table:table-cell office:value-type="float" office:value="0" table:formula="of:=IF(INDEX([Tracker.$A$1:.$AG$120];6+9*(MONTH([.$A29])-1)+(COLUMN()-4);DAY([.$A29])+2)&lt;&gt;&quot;&quot;;1;0)" table:style-name="ce92"/>
          <table:table-cell office:value-type="float" office:value="0" table:formula="of:=IF(INDEX([Tracker.$A$1:.$AG$120];6+9*(MONTH([.$A29])-1)+(COLUMN()-4);DAY([.$A29])+2)&lt;&gt;&quot;&quot;;1;0)" table:style-name="ce92"/>
          <table:table-cell office:value-type="float" office:value="0" table:formula="of:=IF(INDEX([Tracker.$A$1:.$AG$120];6+9*(MONTH([.$A29])-1)+(COLUMN()-4);DAY([.$A29])+2)&lt;&gt;&quot;&quot;;1;0)" table:style-name="ce92"/>
          <table:table-cell office:value-type="float" office:value="0" table:formula="of:=IF(INDEX([Tracker.$A$1:.$AG$120];6+9*(MONTH([.$A29])-1)+(COLUMN()-4);DAY([.$A29])+2)&lt;&gt;&quot;&quot;;1;0)" table:style-name="ce92"/>
          <table:table-cell office:value-type="float" office:value="0" table:formula="of:=SUM([.D29:.I29])" table:style-name="ce6"/>
          <table:table-cell office:value-type="percentage" office:value="0" table:formula="of:=[.J29]/6" table:style-name="ce8">
            <text:p>0%</text:p>
          </table:table-cell>
          <table:table-cell table:style-name="ce1"/>
          <table:table-cell office:value-type="float" office:value="0" table:formula="of:=IF([.D29]=1;[.M28]+1;0)" table:style-name="ce1">
            <text:p>0</text:p>
          </table:table-cell>
          <table:table-cell office:value-type="float" office:value="0" table:formula="of:=IF([.E29]=1;[.N28]+1;0)" table:style-name="ce1">
            <text:p>0</text:p>
          </table:table-cell>
          <table:table-cell office:value-type="float" office:value="0" table:formula="of:=IF([.F29]=1;[.O28]+1;0)" table:style-name="ce1">
            <text:p>0</text:p>
          </table:table-cell>
          <table:table-cell office:value-type="float" office:value="0" table:formula="of:=IF([.G29]=1;[.P28]+1;0)" table:style-name="ce1">
            <text:p>0</text:p>
          </table:table-cell>
          <table:table-cell office:value-type="float" office:value="0" table:formula="of:=IF([.H29]=1;[.Q28]+1;0)" table:style-name="ce1">
            <text:p>0</text:p>
          </table:table-cell>
          <table:table-cell office:value-type="float" office:value="0" table:formula="of:=IF([.I29]=1;[.R2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7T00:00:00" table:formula="of:=[.A29]+1" table:style-name="ce10">
            <text:p>Tue, 27 Jan 2026</text:p>
          </table:table-cell>
          <table:table-cell office:value-type="string" office:string-value="Tue" table:formula="of:=TEXT([.A30];&quot;ddd&quot;)" table:style-name="ce5">
            <text:p>Tue</text:p>
          </table:table-cell>
          <table:table-cell office:value-type="string" office:string-value="Jan" table:formula="of:=TEXT([.A30];&quot;mmm&quot;)" table:style-name="ce5">
            <text:p>Jan</text:p>
          </table:table-cell>
          <table:table-cell office:value-type="float" office:value="0" table:formula="of:=IF(INDEX([Tracker.$A$1:.$AG$120];6+9*(MONTH([.$A30])-1)+(COLUMN()-4);DAY([.$A30])+2)&lt;&gt;&quot;&quot;;1;0)" table:style-name="ce92"/>
          <table:table-cell office:value-type="float" office:value="0" table:formula="of:=IF(INDEX([Tracker.$A$1:.$AG$120];6+9*(MONTH([.$A30])-1)+(COLUMN()-4);DAY([.$A30])+2)&lt;&gt;&quot;&quot;;1;0)" table:style-name="ce92"/>
          <table:table-cell office:value-type="float" office:value="0" table:formula="of:=IF(INDEX([Tracker.$A$1:.$AG$120];6+9*(MONTH([.$A30])-1)+(COLUMN()-4);DAY([.$A30])+2)&lt;&gt;&quot;&quot;;1;0)" table:style-name="ce92"/>
          <table:table-cell office:value-type="float" office:value="0" table:formula="of:=IF(INDEX([Tracker.$A$1:.$AG$120];6+9*(MONTH([.$A30])-1)+(COLUMN()-4);DAY([.$A30])+2)&lt;&gt;&quot;&quot;;1;0)" table:style-name="ce92"/>
          <table:table-cell office:value-type="float" office:value="0" table:formula="of:=IF(INDEX([Tracker.$A$1:.$AG$120];6+9*(MONTH([.$A30])-1)+(COLUMN()-4);DAY([.$A30])+2)&lt;&gt;&quot;&quot;;1;0)" table:style-name="ce92"/>
          <table:table-cell office:value-type="float" office:value="0" table:formula="of:=IF(INDEX([Tracker.$A$1:.$AG$120];6+9*(MONTH([.$A30])-1)+(COLUMN()-4);DAY([.$A30])+2)&lt;&gt;&quot;&quot;;1;0)" table:style-name="ce92"/>
          <table:table-cell office:value-type="float" office:value="0" table:formula="of:=SUM([.D30:.I30])" table:style-name="ce6"/>
          <table:table-cell office:value-type="percentage" office:value="0" table:formula="of:=[.J30]/6" table:style-name="ce8">
            <text:p>0%</text:p>
          </table:table-cell>
          <table:table-cell table:style-name="ce1"/>
          <table:table-cell office:value-type="float" office:value="0" table:formula="of:=IF([.D30]=1;[.M29]+1;0)" table:style-name="ce1">
            <text:p>0</text:p>
          </table:table-cell>
          <table:table-cell office:value-type="float" office:value="0" table:formula="of:=IF([.E30]=1;[.N29]+1;0)" table:style-name="ce1">
            <text:p>0</text:p>
          </table:table-cell>
          <table:table-cell office:value-type="float" office:value="0" table:formula="of:=IF([.F30]=1;[.O29]+1;0)" table:style-name="ce1">
            <text:p>0</text:p>
          </table:table-cell>
          <table:table-cell office:value-type="float" office:value="0" table:formula="of:=IF([.G30]=1;[.P29]+1;0)" table:style-name="ce1">
            <text:p>0</text:p>
          </table:table-cell>
          <table:table-cell office:value-type="float" office:value="0" table:formula="of:=IF([.H30]=1;[.Q29]+1;0)" table:style-name="ce1">
            <text:p>0</text:p>
          </table:table-cell>
          <table:table-cell office:value-type="float" office:value="0" table:formula="of:=IF([.I30]=1;[.R2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8T00:00:00" table:formula="of:=[.A30]+1" table:style-name="ce10">
            <text:p>Wed, 28 Jan 2026</text:p>
          </table:table-cell>
          <table:table-cell office:value-type="string" office:string-value="Wed" table:formula="of:=TEXT([.A31];&quot;ddd&quot;)" table:style-name="ce5">
            <text:p>Wed</text:p>
          </table:table-cell>
          <table:table-cell office:value-type="string" office:string-value="Jan" table:formula="of:=TEXT([.A31];&quot;mmm&quot;)" table:style-name="ce5">
            <text:p>Jan</text:p>
          </table:table-cell>
          <table:table-cell office:value-type="float" office:value="0" table:formula="of:=IF(INDEX([Tracker.$A$1:.$AG$120];6+9*(MONTH([.$A31])-1)+(COLUMN()-4);DAY([.$A31])+2)&lt;&gt;&quot;&quot;;1;0)" table:style-name="ce92"/>
          <table:table-cell office:value-type="float" office:value="0" table:formula="of:=IF(INDEX([Tracker.$A$1:.$AG$120];6+9*(MONTH([.$A31])-1)+(COLUMN()-4);DAY([.$A31])+2)&lt;&gt;&quot;&quot;;1;0)" table:style-name="ce92"/>
          <table:table-cell office:value-type="float" office:value="0" table:formula="of:=IF(INDEX([Tracker.$A$1:.$AG$120];6+9*(MONTH([.$A31])-1)+(COLUMN()-4);DAY([.$A31])+2)&lt;&gt;&quot;&quot;;1;0)" table:style-name="ce92"/>
          <table:table-cell office:value-type="float" office:value="0" table:formula="of:=IF(INDEX([Tracker.$A$1:.$AG$120];6+9*(MONTH([.$A31])-1)+(COLUMN()-4);DAY([.$A31])+2)&lt;&gt;&quot;&quot;;1;0)" table:style-name="ce92"/>
          <table:table-cell office:value-type="float" office:value="0" table:formula="of:=IF(INDEX([Tracker.$A$1:.$AG$120];6+9*(MONTH([.$A31])-1)+(COLUMN()-4);DAY([.$A31])+2)&lt;&gt;&quot;&quot;;1;0)" table:style-name="ce92"/>
          <table:table-cell office:value-type="float" office:value="0" table:formula="of:=IF(INDEX([Tracker.$A$1:.$AG$120];6+9*(MONTH([.$A31])-1)+(COLUMN()-4);DAY([.$A31])+2)&lt;&gt;&quot;&quot;;1;0)" table:style-name="ce92"/>
          <table:table-cell office:value-type="float" office:value="0" table:formula="of:=SUM([.D31:.I31])" table:style-name="ce6"/>
          <table:table-cell office:value-type="percentage" office:value="0" table:formula="of:=[.J31]/6" table:style-name="ce8">
            <text:p>0%</text:p>
          </table:table-cell>
          <table:table-cell table:style-name="ce1"/>
          <table:table-cell office:value-type="float" office:value="0" table:formula="of:=IF([.D31]=1;[.M30]+1;0)" table:style-name="ce1">
            <text:p>0</text:p>
          </table:table-cell>
          <table:table-cell office:value-type="float" office:value="0" table:formula="of:=IF([.E31]=1;[.N30]+1;0)" table:style-name="ce1">
            <text:p>0</text:p>
          </table:table-cell>
          <table:table-cell office:value-type="float" office:value="0" table:formula="of:=IF([.F31]=1;[.O30]+1;0)" table:style-name="ce1">
            <text:p>0</text:p>
          </table:table-cell>
          <table:table-cell office:value-type="float" office:value="0" table:formula="of:=IF([.G31]=1;[.P30]+1;0)" table:style-name="ce1">
            <text:p>0</text:p>
          </table:table-cell>
          <table:table-cell office:value-type="float" office:value="0" table:formula="of:=IF([.H31]=1;[.Q30]+1;0)" table:style-name="ce1">
            <text:p>0</text:p>
          </table:table-cell>
          <table:table-cell office:value-type="float" office:value="0" table:formula="of:=IF([.I31]=1;[.R3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29T00:00:00" table:formula="of:=[.A31]+1" table:style-name="ce10">
            <text:p>Thu, 29 Jan 2026</text:p>
          </table:table-cell>
          <table:table-cell office:value-type="string" office:string-value="Thu" table:formula="of:=TEXT([.A32];&quot;ddd&quot;)" table:style-name="ce5">
            <text:p>Thu</text:p>
          </table:table-cell>
          <table:table-cell office:value-type="string" office:string-value="Jan" table:formula="of:=TEXT([.A32];&quot;mmm&quot;)" table:style-name="ce5">
            <text:p>Jan</text:p>
          </table:table-cell>
          <table:table-cell office:value-type="float" office:value="0" table:formula="of:=IF(INDEX([Tracker.$A$1:.$AG$120];6+9*(MONTH([.$A32])-1)+(COLUMN()-4);DAY([.$A32])+2)&lt;&gt;&quot;&quot;;1;0)" table:style-name="ce92"/>
          <table:table-cell office:value-type="float" office:value="0" table:formula="of:=IF(INDEX([Tracker.$A$1:.$AG$120];6+9*(MONTH([.$A32])-1)+(COLUMN()-4);DAY([.$A32])+2)&lt;&gt;&quot;&quot;;1;0)" table:style-name="ce92"/>
          <table:table-cell office:value-type="float" office:value="0" table:formula="of:=IF(INDEX([Tracker.$A$1:.$AG$120];6+9*(MONTH([.$A32])-1)+(COLUMN()-4);DAY([.$A32])+2)&lt;&gt;&quot;&quot;;1;0)" table:style-name="ce92"/>
          <table:table-cell office:value-type="float" office:value="0" table:formula="of:=IF(INDEX([Tracker.$A$1:.$AG$120];6+9*(MONTH([.$A32])-1)+(COLUMN()-4);DAY([.$A32])+2)&lt;&gt;&quot;&quot;;1;0)" table:style-name="ce92"/>
          <table:table-cell office:value-type="float" office:value="0" table:formula="of:=IF(INDEX([Tracker.$A$1:.$AG$120];6+9*(MONTH([.$A32])-1)+(COLUMN()-4);DAY([.$A32])+2)&lt;&gt;&quot;&quot;;1;0)" table:style-name="ce92"/>
          <table:table-cell office:value-type="float" office:value="0" table:formula="of:=IF(INDEX([Tracker.$A$1:.$AG$120];6+9*(MONTH([.$A32])-1)+(COLUMN()-4);DAY([.$A32])+2)&lt;&gt;&quot;&quot;;1;0)" table:style-name="ce92"/>
          <table:table-cell office:value-type="float" office:value="0" table:formula="of:=SUM([.D32:.I32])" table:style-name="ce6"/>
          <table:table-cell office:value-type="percentage" office:value="0" table:formula="of:=[.J32]/6" table:style-name="ce8">
            <text:p>0%</text:p>
          </table:table-cell>
          <table:table-cell table:style-name="ce1"/>
          <table:table-cell office:value-type="float" office:value="0" table:formula="of:=IF([.D32]=1;[.M31]+1;0)" table:style-name="ce1">
            <text:p>0</text:p>
          </table:table-cell>
          <table:table-cell office:value-type="float" office:value="0" table:formula="of:=IF([.E32]=1;[.N31]+1;0)" table:style-name="ce1">
            <text:p>0</text:p>
          </table:table-cell>
          <table:table-cell office:value-type="float" office:value="0" table:formula="of:=IF([.F32]=1;[.O31]+1;0)" table:style-name="ce1">
            <text:p>0</text:p>
          </table:table-cell>
          <table:table-cell office:value-type="float" office:value="0" table:formula="of:=IF([.G32]=1;[.P31]+1;0)" table:style-name="ce1">
            <text:p>0</text:p>
          </table:table-cell>
          <table:table-cell office:value-type="float" office:value="0" table:formula="of:=IF([.H32]=1;[.Q31]+1;0)" table:style-name="ce1">
            <text:p>0</text:p>
          </table:table-cell>
          <table:table-cell office:value-type="float" office:value="0" table:formula="of:=IF([.I32]=1;[.R3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30T00:00:00" table:formula="of:=[.A32]+1" table:style-name="ce10">
            <text:p>Fri, 30 Jan 2026</text:p>
          </table:table-cell>
          <table:table-cell office:value-type="string" office:string-value="Fri" table:formula="of:=TEXT([.A33];&quot;ddd&quot;)" table:style-name="ce5">
            <text:p>Fri</text:p>
          </table:table-cell>
          <table:table-cell office:value-type="string" office:string-value="Jan" table:formula="of:=TEXT([.A33];&quot;mmm&quot;)" table:style-name="ce5">
            <text:p>Jan</text:p>
          </table:table-cell>
          <table:table-cell office:value-type="float" office:value="0" table:formula="of:=IF(INDEX([Tracker.$A$1:.$AG$120];6+9*(MONTH([.$A33])-1)+(COLUMN()-4);DAY([.$A33])+2)&lt;&gt;&quot;&quot;;1;0)" table:style-name="ce92"/>
          <table:table-cell office:value-type="float" office:value="0" table:formula="of:=IF(INDEX([Tracker.$A$1:.$AG$120];6+9*(MONTH([.$A33])-1)+(COLUMN()-4);DAY([.$A33])+2)&lt;&gt;&quot;&quot;;1;0)" table:style-name="ce92"/>
          <table:table-cell office:value-type="float" office:value="0" table:formula="of:=IF(INDEX([Tracker.$A$1:.$AG$120];6+9*(MONTH([.$A33])-1)+(COLUMN()-4);DAY([.$A33])+2)&lt;&gt;&quot;&quot;;1;0)" table:style-name="ce92"/>
          <table:table-cell office:value-type="float" office:value="0" table:formula="of:=IF(INDEX([Tracker.$A$1:.$AG$120];6+9*(MONTH([.$A33])-1)+(COLUMN()-4);DAY([.$A33])+2)&lt;&gt;&quot;&quot;;1;0)" table:style-name="ce92"/>
          <table:table-cell office:value-type="float" office:value="0" table:formula="of:=IF(INDEX([Tracker.$A$1:.$AG$120];6+9*(MONTH([.$A33])-1)+(COLUMN()-4);DAY([.$A33])+2)&lt;&gt;&quot;&quot;;1;0)" table:style-name="ce92"/>
          <table:table-cell office:value-type="float" office:value="0" table:formula="of:=IF(INDEX([Tracker.$A$1:.$AG$120];6+9*(MONTH([.$A33])-1)+(COLUMN()-4);DAY([.$A33])+2)&lt;&gt;&quot;&quot;;1;0)" table:style-name="ce92"/>
          <table:table-cell office:value-type="float" office:value="0" table:formula="of:=SUM([.D33:.I33])" table:style-name="ce6"/>
          <table:table-cell office:value-type="percentage" office:value="0" table:formula="of:=[.J33]/6" table:style-name="ce8">
            <text:p>0%</text:p>
          </table:table-cell>
          <table:table-cell table:style-name="ce1"/>
          <table:table-cell office:value-type="float" office:value="0" table:formula="of:=IF([.D33]=1;[.M32]+1;0)" table:style-name="ce1">
            <text:p>0</text:p>
          </table:table-cell>
          <table:table-cell office:value-type="float" office:value="0" table:formula="of:=IF([.E33]=1;[.N32]+1;0)" table:style-name="ce1">
            <text:p>0</text:p>
          </table:table-cell>
          <table:table-cell office:value-type="float" office:value="0" table:formula="of:=IF([.F33]=1;[.O32]+1;0)" table:style-name="ce1">
            <text:p>0</text:p>
          </table:table-cell>
          <table:table-cell office:value-type="float" office:value="0" table:formula="of:=IF([.G33]=1;[.P32]+1;0)" table:style-name="ce1">
            <text:p>0</text:p>
          </table:table-cell>
          <table:table-cell office:value-type="float" office:value="0" table:formula="of:=IF([.H33]=1;[.Q32]+1;0)" table:style-name="ce1">
            <text:p>0</text:p>
          </table:table-cell>
          <table:table-cell office:value-type="float" office:value="0" table:formula="of:=IF([.I33]=1;[.R3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1-31T00:00:00" table:formula="of:=[.A33]+1" table:style-name="ce10">
            <text:p>Sat, 31 Jan 2026</text:p>
          </table:table-cell>
          <table:table-cell office:value-type="string" office:string-value="Sat" table:formula="of:=TEXT([.A34];&quot;ddd&quot;)" table:style-name="ce5">
            <text:p>Sat</text:p>
          </table:table-cell>
          <table:table-cell office:value-type="string" office:string-value="Jan" table:formula="of:=TEXT([.A34];&quot;mmm&quot;)" table:style-name="ce5">
            <text:p>Jan</text:p>
          </table:table-cell>
          <table:table-cell office:value-type="float" office:value="0" table:formula="of:=IF(INDEX([Tracker.$A$1:.$AG$120];6+9*(MONTH([.$A34])-1)+(COLUMN()-4);DAY([.$A34])+2)&lt;&gt;&quot;&quot;;1;0)" table:style-name="ce92"/>
          <table:table-cell office:value-type="float" office:value="0" table:formula="of:=IF(INDEX([Tracker.$A$1:.$AG$120];6+9*(MONTH([.$A34])-1)+(COLUMN()-4);DAY([.$A34])+2)&lt;&gt;&quot;&quot;;1;0)" table:style-name="ce92"/>
          <table:table-cell office:value-type="float" office:value="0" table:formula="of:=IF(INDEX([Tracker.$A$1:.$AG$120];6+9*(MONTH([.$A34])-1)+(COLUMN()-4);DAY([.$A34])+2)&lt;&gt;&quot;&quot;;1;0)" table:style-name="ce92"/>
          <table:table-cell office:value-type="float" office:value="0" table:formula="of:=IF(INDEX([Tracker.$A$1:.$AG$120];6+9*(MONTH([.$A34])-1)+(COLUMN()-4);DAY([.$A34])+2)&lt;&gt;&quot;&quot;;1;0)" table:style-name="ce92"/>
          <table:table-cell office:value-type="float" office:value="0" table:formula="of:=IF(INDEX([Tracker.$A$1:.$AG$120];6+9*(MONTH([.$A34])-1)+(COLUMN()-4);DAY([.$A34])+2)&lt;&gt;&quot;&quot;;1;0)" table:style-name="ce92"/>
          <table:table-cell office:value-type="float" office:value="0" table:formula="of:=IF(INDEX([Tracker.$A$1:.$AG$120];6+9*(MONTH([.$A34])-1)+(COLUMN()-4);DAY([.$A34])+2)&lt;&gt;&quot;&quot;;1;0)" table:style-name="ce92"/>
          <table:table-cell office:value-type="float" office:value="0" table:formula="of:=SUM([.D34:.I34])" table:style-name="ce6"/>
          <table:table-cell office:value-type="percentage" office:value="0" table:formula="of:=[.J34]/6" table:style-name="ce8">
            <text:p>0%</text:p>
          </table:table-cell>
          <table:table-cell table:style-name="ce1"/>
          <table:table-cell office:value-type="float" office:value="0" table:formula="of:=IF([.D34]=1;[.M33]+1;0)" table:style-name="ce1">
            <text:p>0</text:p>
          </table:table-cell>
          <table:table-cell office:value-type="float" office:value="0" table:formula="of:=IF([.E34]=1;[.N33]+1;0)" table:style-name="ce1">
            <text:p>0</text:p>
          </table:table-cell>
          <table:table-cell office:value-type="float" office:value="0" table:formula="of:=IF([.F34]=1;[.O33]+1;0)" table:style-name="ce1">
            <text:p>0</text:p>
          </table:table-cell>
          <table:table-cell office:value-type="float" office:value="0" table:formula="of:=IF([.G34]=1;[.P33]+1;0)" table:style-name="ce1">
            <text:p>0</text:p>
          </table:table-cell>
          <table:table-cell office:value-type="float" office:value="0" table:formula="of:=IF([.H34]=1;[.Q33]+1;0)" table:style-name="ce1">
            <text:p>0</text:p>
          </table:table-cell>
          <table:table-cell office:value-type="float" office:value="0" table:formula="of:=IF([.I34]=1;[.R3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1T00:00:00" table:formula="of:=[.A34]+1" table:style-name="ce10">
            <text:p>Sun, 01 Feb 2026</text:p>
          </table:table-cell>
          <table:table-cell office:value-type="string" office:string-value="Sun" table:formula="of:=TEXT([.A35];&quot;ddd&quot;)" table:style-name="ce5">
            <text:p>Sun</text:p>
          </table:table-cell>
          <table:table-cell office:value-type="string" office:string-value="Feb" table:formula="of:=TEXT([.A35];&quot;mmm&quot;)" table:style-name="ce5">
            <text:p>Feb</text:p>
          </table:table-cell>
          <table:table-cell office:value-type="float" office:value="0" table:formula="of:=IF(INDEX([Tracker.$A$1:.$AG$120];6+9*(MONTH([.$A35])-1)+(COLUMN()-4);DAY([.$A35])+2)&lt;&gt;&quot;&quot;;1;0)" table:style-name="ce92"/>
          <table:table-cell office:value-type="float" office:value="0" table:formula="of:=IF(INDEX([Tracker.$A$1:.$AG$120];6+9*(MONTH([.$A35])-1)+(COLUMN()-4);DAY([.$A35])+2)&lt;&gt;&quot;&quot;;1;0)" table:style-name="ce92"/>
          <table:table-cell office:value-type="float" office:value="0" table:formula="of:=IF(INDEX([Tracker.$A$1:.$AG$120];6+9*(MONTH([.$A35])-1)+(COLUMN()-4);DAY([.$A35])+2)&lt;&gt;&quot;&quot;;1;0)" table:style-name="ce92"/>
          <table:table-cell office:value-type="float" office:value="0" table:formula="of:=IF(INDEX([Tracker.$A$1:.$AG$120];6+9*(MONTH([.$A35])-1)+(COLUMN()-4);DAY([.$A35])+2)&lt;&gt;&quot;&quot;;1;0)" table:style-name="ce92"/>
          <table:table-cell office:value-type="float" office:value="0" table:formula="of:=IF(INDEX([Tracker.$A$1:.$AG$120];6+9*(MONTH([.$A35])-1)+(COLUMN()-4);DAY([.$A35])+2)&lt;&gt;&quot;&quot;;1;0)" table:style-name="ce92"/>
          <table:table-cell office:value-type="float" office:value="0" table:formula="of:=IF(INDEX([Tracker.$A$1:.$AG$120];6+9*(MONTH([.$A35])-1)+(COLUMN()-4);DAY([.$A35])+2)&lt;&gt;&quot;&quot;;1;0)" table:style-name="ce92"/>
          <table:table-cell office:value-type="float" office:value="0" table:formula="of:=SUM([.D35:.I35])" table:style-name="ce6"/>
          <table:table-cell office:value-type="percentage" office:value="0" table:formula="of:=[.J35]/6" table:style-name="ce8">
            <text:p>0%</text:p>
          </table:table-cell>
          <table:table-cell table:style-name="ce1"/>
          <table:table-cell office:value-type="float" office:value="0" table:formula="of:=IF([.D35]=1;[.M34]+1;0)" table:style-name="ce1">
            <text:p>0</text:p>
          </table:table-cell>
          <table:table-cell office:value-type="float" office:value="0" table:formula="of:=IF([.E35]=1;[.N34]+1;0)" table:style-name="ce1">
            <text:p>0</text:p>
          </table:table-cell>
          <table:table-cell office:value-type="float" office:value="0" table:formula="of:=IF([.F35]=1;[.O34]+1;0)" table:style-name="ce1">
            <text:p>0</text:p>
          </table:table-cell>
          <table:table-cell office:value-type="float" office:value="0" table:formula="of:=IF([.G35]=1;[.P34]+1;0)" table:style-name="ce1">
            <text:p>0</text:p>
          </table:table-cell>
          <table:table-cell office:value-type="float" office:value="0" table:formula="of:=IF([.H35]=1;[.Q34]+1;0)" table:style-name="ce1">
            <text:p>0</text:p>
          </table:table-cell>
          <table:table-cell office:value-type="float" office:value="0" table:formula="of:=IF([.I35]=1;[.R3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2T00:00:00" table:formula="of:=[.A35]+1" table:style-name="ce10">
            <text:p>Mon, 02 Feb 2026</text:p>
          </table:table-cell>
          <table:table-cell office:value-type="string" office:string-value="Mon" table:formula="of:=TEXT([.A36];&quot;ddd&quot;)" table:style-name="ce5">
            <text:p>Mon</text:p>
          </table:table-cell>
          <table:table-cell office:value-type="string" office:string-value="Feb" table:formula="of:=TEXT([.A36];&quot;mmm&quot;)" table:style-name="ce5">
            <text:p>Feb</text:p>
          </table:table-cell>
          <table:table-cell office:value-type="float" office:value="0" table:formula="of:=IF(INDEX([Tracker.$A$1:.$AG$120];6+9*(MONTH([.$A36])-1)+(COLUMN()-4);DAY([.$A36])+2)&lt;&gt;&quot;&quot;;1;0)" table:style-name="ce92"/>
          <table:table-cell office:value-type="float" office:value="0" table:formula="of:=IF(INDEX([Tracker.$A$1:.$AG$120];6+9*(MONTH([.$A36])-1)+(COLUMN()-4);DAY([.$A36])+2)&lt;&gt;&quot;&quot;;1;0)" table:style-name="ce92"/>
          <table:table-cell office:value-type="float" office:value="0" table:formula="of:=IF(INDEX([Tracker.$A$1:.$AG$120];6+9*(MONTH([.$A36])-1)+(COLUMN()-4);DAY([.$A36])+2)&lt;&gt;&quot;&quot;;1;0)" table:style-name="ce92"/>
          <table:table-cell office:value-type="float" office:value="0" table:formula="of:=IF(INDEX([Tracker.$A$1:.$AG$120];6+9*(MONTH([.$A36])-1)+(COLUMN()-4);DAY([.$A36])+2)&lt;&gt;&quot;&quot;;1;0)" table:style-name="ce92"/>
          <table:table-cell office:value-type="float" office:value="0" table:formula="of:=IF(INDEX([Tracker.$A$1:.$AG$120];6+9*(MONTH([.$A36])-1)+(COLUMN()-4);DAY([.$A36])+2)&lt;&gt;&quot;&quot;;1;0)" table:style-name="ce92"/>
          <table:table-cell office:value-type="float" office:value="0" table:formula="of:=IF(INDEX([Tracker.$A$1:.$AG$120];6+9*(MONTH([.$A36])-1)+(COLUMN()-4);DAY([.$A36])+2)&lt;&gt;&quot;&quot;;1;0)" table:style-name="ce92"/>
          <table:table-cell office:value-type="float" office:value="0" table:formula="of:=SUM([.D36:.I36])" table:style-name="ce6"/>
          <table:table-cell office:value-type="percentage" office:value="0" table:formula="of:=[.J36]/6" table:style-name="ce8">
            <text:p>0%</text:p>
          </table:table-cell>
          <table:table-cell table:style-name="ce1"/>
          <table:table-cell office:value-type="float" office:value="0" table:formula="of:=IF([.D36]=1;[.M35]+1;0)" table:style-name="ce1">
            <text:p>0</text:p>
          </table:table-cell>
          <table:table-cell office:value-type="float" office:value="0" table:formula="of:=IF([.E36]=1;[.N35]+1;0)" table:style-name="ce1">
            <text:p>0</text:p>
          </table:table-cell>
          <table:table-cell office:value-type="float" office:value="0" table:formula="of:=IF([.F36]=1;[.O35]+1;0)" table:style-name="ce1">
            <text:p>0</text:p>
          </table:table-cell>
          <table:table-cell office:value-type="float" office:value="0" table:formula="of:=IF([.G36]=1;[.P35]+1;0)" table:style-name="ce1">
            <text:p>0</text:p>
          </table:table-cell>
          <table:table-cell office:value-type="float" office:value="0" table:formula="of:=IF([.H36]=1;[.Q35]+1;0)" table:style-name="ce1">
            <text:p>0</text:p>
          </table:table-cell>
          <table:table-cell office:value-type="float" office:value="0" table:formula="of:=IF([.I36]=1;[.R3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3T00:00:00" table:formula="of:=[.A36]+1" table:style-name="ce10">
            <text:p>Tue, 03 Feb 2026</text:p>
          </table:table-cell>
          <table:table-cell office:value-type="string" office:string-value="Tue" table:formula="of:=TEXT([.A37];&quot;ddd&quot;)" table:style-name="ce5">
            <text:p>Tue</text:p>
          </table:table-cell>
          <table:table-cell office:value-type="string" office:string-value="Feb" table:formula="of:=TEXT([.A37];&quot;mmm&quot;)" table:style-name="ce5">
            <text:p>Feb</text:p>
          </table:table-cell>
          <table:table-cell office:value-type="float" office:value="0" table:formula="of:=IF(INDEX([Tracker.$A$1:.$AG$120];6+9*(MONTH([.$A37])-1)+(COLUMN()-4);DAY([.$A37])+2)&lt;&gt;&quot;&quot;;1;0)" table:style-name="ce92"/>
          <table:table-cell office:value-type="float" office:value="0" table:formula="of:=IF(INDEX([Tracker.$A$1:.$AG$120];6+9*(MONTH([.$A37])-1)+(COLUMN()-4);DAY([.$A37])+2)&lt;&gt;&quot;&quot;;1;0)" table:style-name="ce92"/>
          <table:table-cell office:value-type="float" office:value="0" table:formula="of:=IF(INDEX([Tracker.$A$1:.$AG$120];6+9*(MONTH([.$A37])-1)+(COLUMN()-4);DAY([.$A37])+2)&lt;&gt;&quot;&quot;;1;0)" table:style-name="ce92"/>
          <table:table-cell office:value-type="float" office:value="0" table:formula="of:=IF(INDEX([Tracker.$A$1:.$AG$120];6+9*(MONTH([.$A37])-1)+(COLUMN()-4);DAY([.$A37])+2)&lt;&gt;&quot;&quot;;1;0)" table:style-name="ce92"/>
          <table:table-cell office:value-type="float" office:value="0" table:formula="of:=IF(INDEX([Tracker.$A$1:.$AG$120];6+9*(MONTH([.$A37])-1)+(COLUMN()-4);DAY([.$A37])+2)&lt;&gt;&quot;&quot;;1;0)" table:style-name="ce92"/>
          <table:table-cell office:value-type="float" office:value="0" table:formula="of:=IF(INDEX([Tracker.$A$1:.$AG$120];6+9*(MONTH([.$A37])-1)+(COLUMN()-4);DAY([.$A37])+2)&lt;&gt;&quot;&quot;;1;0)" table:style-name="ce92"/>
          <table:table-cell office:value-type="float" office:value="0" table:formula="of:=SUM([.D37:.I37])" table:style-name="ce6"/>
          <table:table-cell office:value-type="percentage" office:value="0" table:formula="of:=[.J37]/6" table:style-name="ce8">
            <text:p>0%</text:p>
          </table:table-cell>
          <table:table-cell table:style-name="ce1"/>
          <table:table-cell office:value-type="float" office:value="0" table:formula="of:=IF([.D37]=1;[.M36]+1;0)" table:style-name="ce1">
            <text:p>0</text:p>
          </table:table-cell>
          <table:table-cell office:value-type="float" office:value="0" table:formula="of:=IF([.E37]=1;[.N36]+1;0)" table:style-name="ce1">
            <text:p>0</text:p>
          </table:table-cell>
          <table:table-cell office:value-type="float" office:value="0" table:formula="of:=IF([.F37]=1;[.O36]+1;0)" table:style-name="ce1">
            <text:p>0</text:p>
          </table:table-cell>
          <table:table-cell office:value-type="float" office:value="0" table:formula="of:=IF([.G37]=1;[.P36]+1;0)" table:style-name="ce1">
            <text:p>0</text:p>
          </table:table-cell>
          <table:table-cell office:value-type="float" office:value="0" table:formula="of:=IF([.H37]=1;[.Q36]+1;0)" table:style-name="ce1">
            <text:p>0</text:p>
          </table:table-cell>
          <table:table-cell office:value-type="float" office:value="0" table:formula="of:=IF([.I37]=1;[.R3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4T00:00:00" table:formula="of:=[.A37]+1" table:style-name="ce10">
            <text:p>Wed, 04 Feb 2026</text:p>
          </table:table-cell>
          <table:table-cell office:value-type="string" office:string-value="Wed" table:formula="of:=TEXT([.A38];&quot;ddd&quot;)" table:style-name="ce5">
            <text:p>Wed</text:p>
          </table:table-cell>
          <table:table-cell office:value-type="string" office:string-value="Feb" table:formula="of:=TEXT([.A38];&quot;mmm&quot;)" table:style-name="ce5">
            <text:p>Feb</text:p>
          </table:table-cell>
          <table:table-cell office:value-type="float" office:value="0" table:formula="of:=IF(INDEX([Tracker.$A$1:.$AG$120];6+9*(MONTH([.$A38])-1)+(COLUMN()-4);DAY([.$A38])+2)&lt;&gt;&quot;&quot;;1;0)" table:style-name="ce92"/>
          <table:table-cell office:value-type="float" office:value="0" table:formula="of:=IF(INDEX([Tracker.$A$1:.$AG$120];6+9*(MONTH([.$A38])-1)+(COLUMN()-4);DAY([.$A38])+2)&lt;&gt;&quot;&quot;;1;0)" table:style-name="ce92"/>
          <table:table-cell office:value-type="float" office:value="0" table:formula="of:=IF(INDEX([Tracker.$A$1:.$AG$120];6+9*(MONTH([.$A38])-1)+(COLUMN()-4);DAY([.$A38])+2)&lt;&gt;&quot;&quot;;1;0)" table:style-name="ce92"/>
          <table:table-cell office:value-type="float" office:value="0" table:formula="of:=IF(INDEX([Tracker.$A$1:.$AG$120];6+9*(MONTH([.$A38])-1)+(COLUMN()-4);DAY([.$A38])+2)&lt;&gt;&quot;&quot;;1;0)" table:style-name="ce92"/>
          <table:table-cell office:value-type="float" office:value="0" table:formula="of:=IF(INDEX([Tracker.$A$1:.$AG$120];6+9*(MONTH([.$A38])-1)+(COLUMN()-4);DAY([.$A38])+2)&lt;&gt;&quot;&quot;;1;0)" table:style-name="ce92"/>
          <table:table-cell office:value-type="float" office:value="0" table:formula="of:=IF(INDEX([Tracker.$A$1:.$AG$120];6+9*(MONTH([.$A38])-1)+(COLUMN()-4);DAY([.$A38])+2)&lt;&gt;&quot;&quot;;1;0)" table:style-name="ce92"/>
          <table:table-cell office:value-type="float" office:value="0" table:formula="of:=SUM([.D38:.I38])" table:style-name="ce6"/>
          <table:table-cell office:value-type="percentage" office:value="0" table:formula="of:=[.J38]/6" table:style-name="ce8">
            <text:p>0%</text:p>
          </table:table-cell>
          <table:table-cell table:style-name="ce1"/>
          <table:table-cell office:value-type="float" office:value="0" table:formula="of:=IF([.D38]=1;[.M37]+1;0)" table:style-name="ce1">
            <text:p>0</text:p>
          </table:table-cell>
          <table:table-cell office:value-type="float" office:value="0" table:formula="of:=IF([.E38]=1;[.N37]+1;0)" table:style-name="ce1">
            <text:p>0</text:p>
          </table:table-cell>
          <table:table-cell office:value-type="float" office:value="0" table:formula="of:=IF([.F38]=1;[.O37]+1;0)" table:style-name="ce1">
            <text:p>0</text:p>
          </table:table-cell>
          <table:table-cell office:value-type="float" office:value="0" table:formula="of:=IF([.G38]=1;[.P37]+1;0)" table:style-name="ce1">
            <text:p>0</text:p>
          </table:table-cell>
          <table:table-cell office:value-type="float" office:value="0" table:formula="of:=IF([.H38]=1;[.Q37]+1;0)" table:style-name="ce1">
            <text:p>0</text:p>
          </table:table-cell>
          <table:table-cell office:value-type="float" office:value="0" table:formula="of:=IF([.I38]=1;[.R3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5T00:00:00" table:formula="of:=[.A38]+1" table:style-name="ce10">
            <text:p>Thu, 05 Feb 2026</text:p>
          </table:table-cell>
          <table:table-cell office:value-type="string" office:string-value="Thu" table:formula="of:=TEXT([.A39];&quot;ddd&quot;)" table:style-name="ce5">
            <text:p>Thu</text:p>
          </table:table-cell>
          <table:table-cell office:value-type="string" office:string-value="Feb" table:formula="of:=TEXT([.A39];&quot;mmm&quot;)" table:style-name="ce5">
            <text:p>Feb</text:p>
          </table:table-cell>
          <table:table-cell office:value-type="float" office:value="0" table:formula="of:=IF(INDEX([Tracker.$A$1:.$AG$120];6+9*(MONTH([.$A39])-1)+(COLUMN()-4);DAY([.$A39])+2)&lt;&gt;&quot;&quot;;1;0)" table:style-name="ce92"/>
          <table:table-cell office:value-type="float" office:value="0" table:formula="of:=IF(INDEX([Tracker.$A$1:.$AG$120];6+9*(MONTH([.$A39])-1)+(COLUMN()-4);DAY([.$A39])+2)&lt;&gt;&quot;&quot;;1;0)" table:style-name="ce92"/>
          <table:table-cell office:value-type="float" office:value="0" table:formula="of:=IF(INDEX([Tracker.$A$1:.$AG$120];6+9*(MONTH([.$A39])-1)+(COLUMN()-4);DAY([.$A39])+2)&lt;&gt;&quot;&quot;;1;0)" table:style-name="ce92"/>
          <table:table-cell office:value-type="float" office:value="0" table:formula="of:=IF(INDEX([Tracker.$A$1:.$AG$120];6+9*(MONTH([.$A39])-1)+(COLUMN()-4);DAY([.$A39])+2)&lt;&gt;&quot;&quot;;1;0)" table:style-name="ce92"/>
          <table:table-cell office:value-type="float" office:value="0" table:formula="of:=IF(INDEX([Tracker.$A$1:.$AG$120];6+9*(MONTH([.$A39])-1)+(COLUMN()-4);DAY([.$A39])+2)&lt;&gt;&quot;&quot;;1;0)" table:style-name="ce92"/>
          <table:table-cell office:value-type="float" office:value="0" table:formula="of:=IF(INDEX([Tracker.$A$1:.$AG$120];6+9*(MONTH([.$A39])-1)+(COLUMN()-4);DAY([.$A39])+2)&lt;&gt;&quot;&quot;;1;0)" table:style-name="ce92"/>
          <table:table-cell office:value-type="float" office:value="0" table:formula="of:=SUM([.D39:.I39])" table:style-name="ce6"/>
          <table:table-cell office:value-type="percentage" office:value="0" table:formula="of:=[.J39]/6" table:style-name="ce8">
            <text:p>0%</text:p>
          </table:table-cell>
          <table:table-cell table:style-name="ce1"/>
          <table:table-cell office:value-type="float" office:value="0" table:formula="of:=IF([.D39]=1;[.M38]+1;0)" table:style-name="ce1">
            <text:p>0</text:p>
          </table:table-cell>
          <table:table-cell office:value-type="float" office:value="0" table:formula="of:=IF([.E39]=1;[.N38]+1;0)" table:style-name="ce1">
            <text:p>0</text:p>
          </table:table-cell>
          <table:table-cell office:value-type="float" office:value="0" table:formula="of:=IF([.F39]=1;[.O38]+1;0)" table:style-name="ce1">
            <text:p>0</text:p>
          </table:table-cell>
          <table:table-cell office:value-type="float" office:value="0" table:formula="of:=IF([.G39]=1;[.P38]+1;0)" table:style-name="ce1">
            <text:p>0</text:p>
          </table:table-cell>
          <table:table-cell office:value-type="float" office:value="0" table:formula="of:=IF([.H39]=1;[.Q38]+1;0)" table:style-name="ce1">
            <text:p>0</text:p>
          </table:table-cell>
          <table:table-cell office:value-type="float" office:value="0" table:formula="of:=IF([.I39]=1;[.R3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6T00:00:00" table:formula="of:=[.A39]+1" table:style-name="ce10">
            <text:p>Fri, 06 Feb 2026</text:p>
          </table:table-cell>
          <table:table-cell office:value-type="string" office:string-value="Fri" table:formula="of:=TEXT([.A40];&quot;ddd&quot;)" table:style-name="ce5">
            <text:p>Fri</text:p>
          </table:table-cell>
          <table:table-cell office:value-type="string" office:string-value="Feb" table:formula="of:=TEXT([.A40];&quot;mmm&quot;)" table:style-name="ce5">
            <text:p>Feb</text:p>
          </table:table-cell>
          <table:table-cell office:value-type="float" office:value="0" table:formula="of:=IF(INDEX([Tracker.$A$1:.$AG$120];6+9*(MONTH([.$A40])-1)+(COLUMN()-4);DAY([.$A40])+2)&lt;&gt;&quot;&quot;;1;0)" table:style-name="ce92"/>
          <table:table-cell office:value-type="float" office:value="0" table:formula="of:=IF(INDEX([Tracker.$A$1:.$AG$120];6+9*(MONTH([.$A40])-1)+(COLUMN()-4);DAY([.$A40])+2)&lt;&gt;&quot;&quot;;1;0)" table:style-name="ce92"/>
          <table:table-cell office:value-type="float" office:value="0" table:formula="of:=IF(INDEX([Tracker.$A$1:.$AG$120];6+9*(MONTH([.$A40])-1)+(COLUMN()-4);DAY([.$A40])+2)&lt;&gt;&quot;&quot;;1;0)" table:style-name="ce92"/>
          <table:table-cell office:value-type="float" office:value="0" table:formula="of:=IF(INDEX([Tracker.$A$1:.$AG$120];6+9*(MONTH([.$A40])-1)+(COLUMN()-4);DAY([.$A40])+2)&lt;&gt;&quot;&quot;;1;0)" table:style-name="ce92"/>
          <table:table-cell office:value-type="float" office:value="0" table:formula="of:=IF(INDEX([Tracker.$A$1:.$AG$120];6+9*(MONTH([.$A40])-1)+(COLUMN()-4);DAY([.$A40])+2)&lt;&gt;&quot;&quot;;1;0)" table:style-name="ce92"/>
          <table:table-cell office:value-type="float" office:value="0" table:formula="of:=IF(INDEX([Tracker.$A$1:.$AG$120];6+9*(MONTH([.$A40])-1)+(COLUMN()-4);DAY([.$A40])+2)&lt;&gt;&quot;&quot;;1;0)" table:style-name="ce92"/>
          <table:table-cell office:value-type="float" office:value="0" table:formula="of:=SUM([.D40:.I40])" table:style-name="ce6"/>
          <table:table-cell office:value-type="percentage" office:value="0" table:formula="of:=[.J40]/6" table:style-name="ce8">
            <text:p>0%</text:p>
          </table:table-cell>
          <table:table-cell table:style-name="ce1"/>
          <table:table-cell office:value-type="float" office:value="0" table:formula="of:=IF([.D40]=1;[.M39]+1;0)" table:style-name="ce1">
            <text:p>0</text:p>
          </table:table-cell>
          <table:table-cell office:value-type="float" office:value="0" table:formula="of:=IF([.E40]=1;[.N39]+1;0)" table:style-name="ce1">
            <text:p>0</text:p>
          </table:table-cell>
          <table:table-cell office:value-type="float" office:value="0" table:formula="of:=IF([.F40]=1;[.O39]+1;0)" table:style-name="ce1">
            <text:p>0</text:p>
          </table:table-cell>
          <table:table-cell office:value-type="float" office:value="0" table:formula="of:=IF([.G40]=1;[.P39]+1;0)" table:style-name="ce1">
            <text:p>0</text:p>
          </table:table-cell>
          <table:table-cell office:value-type="float" office:value="0" table:formula="of:=IF([.H40]=1;[.Q39]+1;0)" table:style-name="ce1">
            <text:p>0</text:p>
          </table:table-cell>
          <table:table-cell office:value-type="float" office:value="0" table:formula="of:=IF([.I40]=1;[.R3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7T00:00:00" table:formula="of:=[.A40]+1" table:style-name="ce10">
            <text:p>Sat, 07 Feb 2026</text:p>
          </table:table-cell>
          <table:table-cell office:value-type="string" office:string-value="Sat" table:formula="of:=TEXT([.A41];&quot;ddd&quot;)" table:style-name="ce5">
            <text:p>Sat</text:p>
          </table:table-cell>
          <table:table-cell office:value-type="string" office:string-value="Feb" table:formula="of:=TEXT([.A41];&quot;mmm&quot;)" table:style-name="ce5">
            <text:p>Feb</text:p>
          </table:table-cell>
          <table:table-cell office:value-type="float" office:value="0" table:formula="of:=IF(INDEX([Tracker.$A$1:.$AG$120];6+9*(MONTH([.$A41])-1)+(COLUMN()-4);DAY([.$A41])+2)&lt;&gt;&quot;&quot;;1;0)" table:style-name="ce92"/>
          <table:table-cell office:value-type="float" office:value="0" table:formula="of:=IF(INDEX([Tracker.$A$1:.$AG$120];6+9*(MONTH([.$A41])-1)+(COLUMN()-4);DAY([.$A41])+2)&lt;&gt;&quot;&quot;;1;0)" table:style-name="ce92"/>
          <table:table-cell office:value-type="float" office:value="0" table:formula="of:=IF(INDEX([Tracker.$A$1:.$AG$120];6+9*(MONTH([.$A41])-1)+(COLUMN()-4);DAY([.$A41])+2)&lt;&gt;&quot;&quot;;1;0)" table:style-name="ce92"/>
          <table:table-cell office:value-type="float" office:value="0" table:formula="of:=IF(INDEX([Tracker.$A$1:.$AG$120];6+9*(MONTH([.$A41])-1)+(COLUMN()-4);DAY([.$A41])+2)&lt;&gt;&quot;&quot;;1;0)" table:style-name="ce92"/>
          <table:table-cell office:value-type="float" office:value="0" table:formula="of:=IF(INDEX([Tracker.$A$1:.$AG$120];6+9*(MONTH([.$A41])-1)+(COLUMN()-4);DAY([.$A41])+2)&lt;&gt;&quot;&quot;;1;0)" table:style-name="ce92"/>
          <table:table-cell office:value-type="float" office:value="0" table:formula="of:=IF(INDEX([Tracker.$A$1:.$AG$120];6+9*(MONTH([.$A41])-1)+(COLUMN()-4);DAY([.$A41])+2)&lt;&gt;&quot;&quot;;1;0)" table:style-name="ce92"/>
          <table:table-cell office:value-type="float" office:value="0" table:formula="of:=SUM([.D41:.I41])" table:style-name="ce6"/>
          <table:table-cell office:value-type="percentage" office:value="0" table:formula="of:=[.J41]/6" table:style-name="ce8">
            <text:p>0%</text:p>
          </table:table-cell>
          <table:table-cell table:style-name="ce1"/>
          <table:table-cell office:value-type="float" office:value="0" table:formula="of:=IF([.D41]=1;[.M40]+1;0)" table:style-name="ce1">
            <text:p>0</text:p>
          </table:table-cell>
          <table:table-cell office:value-type="float" office:value="0" table:formula="of:=IF([.E41]=1;[.N40]+1;0)" table:style-name="ce1">
            <text:p>0</text:p>
          </table:table-cell>
          <table:table-cell office:value-type="float" office:value="0" table:formula="of:=IF([.F41]=1;[.O40]+1;0)" table:style-name="ce1">
            <text:p>0</text:p>
          </table:table-cell>
          <table:table-cell office:value-type="float" office:value="0" table:formula="of:=IF([.G41]=1;[.P40]+1;0)" table:style-name="ce1">
            <text:p>0</text:p>
          </table:table-cell>
          <table:table-cell office:value-type="float" office:value="0" table:formula="of:=IF([.H41]=1;[.Q40]+1;0)" table:style-name="ce1">
            <text:p>0</text:p>
          </table:table-cell>
          <table:table-cell office:value-type="float" office:value="0" table:formula="of:=IF([.I41]=1;[.R4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8T00:00:00" table:formula="of:=[.A41]+1" table:style-name="ce10">
            <text:p>Sun, 08 Feb 2026</text:p>
          </table:table-cell>
          <table:table-cell office:value-type="string" office:string-value="Sun" table:formula="of:=TEXT([.A42];&quot;ddd&quot;)" table:style-name="ce5">
            <text:p>Sun</text:p>
          </table:table-cell>
          <table:table-cell office:value-type="string" office:string-value="Feb" table:formula="of:=TEXT([.A42];&quot;mmm&quot;)" table:style-name="ce5">
            <text:p>Feb</text:p>
          </table:table-cell>
          <table:table-cell office:value-type="float" office:value="0" table:formula="of:=IF(INDEX([Tracker.$A$1:.$AG$120];6+9*(MONTH([.$A42])-1)+(COLUMN()-4);DAY([.$A42])+2)&lt;&gt;&quot;&quot;;1;0)" table:style-name="ce92"/>
          <table:table-cell office:value-type="float" office:value="0" table:formula="of:=IF(INDEX([Tracker.$A$1:.$AG$120];6+9*(MONTH([.$A42])-1)+(COLUMN()-4);DAY([.$A42])+2)&lt;&gt;&quot;&quot;;1;0)" table:style-name="ce92"/>
          <table:table-cell office:value-type="float" office:value="0" table:formula="of:=IF(INDEX([Tracker.$A$1:.$AG$120];6+9*(MONTH([.$A42])-1)+(COLUMN()-4);DAY([.$A42])+2)&lt;&gt;&quot;&quot;;1;0)" table:style-name="ce92"/>
          <table:table-cell office:value-type="float" office:value="0" table:formula="of:=IF(INDEX([Tracker.$A$1:.$AG$120];6+9*(MONTH([.$A42])-1)+(COLUMN()-4);DAY([.$A42])+2)&lt;&gt;&quot;&quot;;1;0)" table:style-name="ce92"/>
          <table:table-cell office:value-type="float" office:value="0" table:formula="of:=IF(INDEX([Tracker.$A$1:.$AG$120];6+9*(MONTH([.$A42])-1)+(COLUMN()-4);DAY([.$A42])+2)&lt;&gt;&quot;&quot;;1;0)" table:style-name="ce92"/>
          <table:table-cell office:value-type="float" office:value="0" table:formula="of:=IF(INDEX([Tracker.$A$1:.$AG$120];6+9*(MONTH([.$A42])-1)+(COLUMN()-4);DAY([.$A42])+2)&lt;&gt;&quot;&quot;;1;0)" table:style-name="ce92"/>
          <table:table-cell office:value-type="float" office:value="0" table:formula="of:=SUM([.D42:.I42])" table:style-name="ce6"/>
          <table:table-cell office:value-type="percentage" office:value="0" table:formula="of:=[.J42]/6" table:style-name="ce8">
            <text:p>0%</text:p>
          </table:table-cell>
          <table:table-cell table:style-name="ce1"/>
          <table:table-cell office:value-type="float" office:value="0" table:formula="of:=IF([.D42]=1;[.M41]+1;0)" table:style-name="ce1">
            <text:p>0</text:p>
          </table:table-cell>
          <table:table-cell office:value-type="float" office:value="0" table:formula="of:=IF([.E42]=1;[.N41]+1;0)" table:style-name="ce1">
            <text:p>0</text:p>
          </table:table-cell>
          <table:table-cell office:value-type="float" office:value="0" table:formula="of:=IF([.F42]=1;[.O41]+1;0)" table:style-name="ce1">
            <text:p>0</text:p>
          </table:table-cell>
          <table:table-cell office:value-type="float" office:value="0" table:formula="of:=IF([.G42]=1;[.P41]+1;0)" table:style-name="ce1">
            <text:p>0</text:p>
          </table:table-cell>
          <table:table-cell office:value-type="float" office:value="0" table:formula="of:=IF([.H42]=1;[.Q41]+1;0)" table:style-name="ce1">
            <text:p>0</text:p>
          </table:table-cell>
          <table:table-cell office:value-type="float" office:value="0" table:formula="of:=IF([.I42]=1;[.R4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09T00:00:00" table:formula="of:=[.A42]+1" table:style-name="ce10">
            <text:p>Mon, 09 Feb 2026</text:p>
          </table:table-cell>
          <table:table-cell office:value-type="string" office:string-value="Mon" table:formula="of:=TEXT([.A43];&quot;ddd&quot;)" table:style-name="ce5">
            <text:p>Mon</text:p>
          </table:table-cell>
          <table:table-cell office:value-type="string" office:string-value="Feb" table:formula="of:=TEXT([.A43];&quot;mmm&quot;)" table:style-name="ce5">
            <text:p>Feb</text:p>
          </table:table-cell>
          <table:table-cell office:value-type="float" office:value="0" table:formula="of:=IF(INDEX([Tracker.$A$1:.$AG$120];6+9*(MONTH([.$A43])-1)+(COLUMN()-4);DAY([.$A43])+2)&lt;&gt;&quot;&quot;;1;0)" table:style-name="ce92"/>
          <table:table-cell office:value-type="float" office:value="0" table:formula="of:=IF(INDEX([Tracker.$A$1:.$AG$120];6+9*(MONTH([.$A43])-1)+(COLUMN()-4);DAY([.$A43])+2)&lt;&gt;&quot;&quot;;1;0)" table:style-name="ce92"/>
          <table:table-cell office:value-type="float" office:value="0" table:formula="of:=IF(INDEX([Tracker.$A$1:.$AG$120];6+9*(MONTH([.$A43])-1)+(COLUMN()-4);DAY([.$A43])+2)&lt;&gt;&quot;&quot;;1;0)" table:style-name="ce92"/>
          <table:table-cell office:value-type="float" office:value="0" table:formula="of:=IF(INDEX([Tracker.$A$1:.$AG$120];6+9*(MONTH([.$A43])-1)+(COLUMN()-4);DAY([.$A43])+2)&lt;&gt;&quot;&quot;;1;0)" table:style-name="ce92"/>
          <table:table-cell office:value-type="float" office:value="0" table:formula="of:=IF(INDEX([Tracker.$A$1:.$AG$120];6+9*(MONTH([.$A43])-1)+(COLUMN()-4);DAY([.$A43])+2)&lt;&gt;&quot;&quot;;1;0)" table:style-name="ce92"/>
          <table:table-cell office:value-type="float" office:value="0" table:formula="of:=IF(INDEX([Tracker.$A$1:.$AG$120];6+9*(MONTH([.$A43])-1)+(COLUMN()-4);DAY([.$A43])+2)&lt;&gt;&quot;&quot;;1;0)" table:style-name="ce92"/>
          <table:table-cell office:value-type="float" office:value="0" table:formula="of:=SUM([.D43:.I43])" table:style-name="ce6"/>
          <table:table-cell office:value-type="percentage" office:value="0" table:formula="of:=[.J43]/6" table:style-name="ce8">
            <text:p>0%</text:p>
          </table:table-cell>
          <table:table-cell table:style-name="ce1"/>
          <table:table-cell office:value-type="float" office:value="0" table:formula="of:=IF([.D43]=1;[.M42]+1;0)" table:style-name="ce1">
            <text:p>0</text:p>
          </table:table-cell>
          <table:table-cell office:value-type="float" office:value="0" table:formula="of:=IF([.E43]=1;[.N42]+1;0)" table:style-name="ce1">
            <text:p>0</text:p>
          </table:table-cell>
          <table:table-cell office:value-type="float" office:value="0" table:formula="of:=IF([.F43]=1;[.O42]+1;0)" table:style-name="ce1">
            <text:p>0</text:p>
          </table:table-cell>
          <table:table-cell office:value-type="float" office:value="0" table:formula="of:=IF([.G43]=1;[.P42]+1;0)" table:style-name="ce1">
            <text:p>0</text:p>
          </table:table-cell>
          <table:table-cell office:value-type="float" office:value="0" table:formula="of:=IF([.H43]=1;[.Q42]+1;0)" table:style-name="ce1">
            <text:p>0</text:p>
          </table:table-cell>
          <table:table-cell office:value-type="float" office:value="0" table:formula="of:=IF([.I43]=1;[.R4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0T00:00:00" table:formula="of:=[.A43]+1" table:style-name="ce10">
            <text:p>Tue, 10 Feb 2026</text:p>
          </table:table-cell>
          <table:table-cell office:value-type="string" office:string-value="Tue" table:formula="of:=TEXT([.A44];&quot;ddd&quot;)" table:style-name="ce5">
            <text:p>Tue</text:p>
          </table:table-cell>
          <table:table-cell office:value-type="string" office:string-value="Feb" table:formula="of:=TEXT([.A44];&quot;mmm&quot;)" table:style-name="ce5">
            <text:p>Feb</text:p>
          </table:table-cell>
          <table:table-cell office:value-type="float" office:value="0" table:formula="of:=IF(INDEX([Tracker.$A$1:.$AG$120];6+9*(MONTH([.$A44])-1)+(COLUMN()-4);DAY([.$A44])+2)&lt;&gt;&quot;&quot;;1;0)" table:style-name="ce92"/>
          <table:table-cell office:value-type="float" office:value="0" table:formula="of:=IF(INDEX([Tracker.$A$1:.$AG$120];6+9*(MONTH([.$A44])-1)+(COLUMN()-4);DAY([.$A44])+2)&lt;&gt;&quot;&quot;;1;0)" table:style-name="ce92"/>
          <table:table-cell office:value-type="float" office:value="0" table:formula="of:=IF(INDEX([Tracker.$A$1:.$AG$120];6+9*(MONTH([.$A44])-1)+(COLUMN()-4);DAY([.$A44])+2)&lt;&gt;&quot;&quot;;1;0)" table:style-name="ce92"/>
          <table:table-cell office:value-type="float" office:value="0" table:formula="of:=IF(INDEX([Tracker.$A$1:.$AG$120];6+9*(MONTH([.$A44])-1)+(COLUMN()-4);DAY([.$A44])+2)&lt;&gt;&quot;&quot;;1;0)" table:style-name="ce92"/>
          <table:table-cell office:value-type="float" office:value="0" table:formula="of:=IF(INDEX([Tracker.$A$1:.$AG$120];6+9*(MONTH([.$A44])-1)+(COLUMN()-4);DAY([.$A44])+2)&lt;&gt;&quot;&quot;;1;0)" table:style-name="ce92"/>
          <table:table-cell office:value-type="float" office:value="0" table:formula="of:=IF(INDEX([Tracker.$A$1:.$AG$120];6+9*(MONTH([.$A44])-1)+(COLUMN()-4);DAY([.$A44])+2)&lt;&gt;&quot;&quot;;1;0)" table:style-name="ce92"/>
          <table:table-cell office:value-type="float" office:value="0" table:formula="of:=SUM([.D44:.I44])" table:style-name="ce6"/>
          <table:table-cell office:value-type="percentage" office:value="0" table:formula="of:=[.J44]/6" table:style-name="ce8">
            <text:p>0%</text:p>
          </table:table-cell>
          <table:table-cell table:style-name="ce1"/>
          <table:table-cell office:value-type="float" office:value="0" table:formula="of:=IF([.D44]=1;[.M43]+1;0)" table:style-name="ce1">
            <text:p>0</text:p>
          </table:table-cell>
          <table:table-cell office:value-type="float" office:value="0" table:formula="of:=IF([.E44]=1;[.N43]+1;0)" table:style-name="ce1">
            <text:p>0</text:p>
          </table:table-cell>
          <table:table-cell office:value-type="float" office:value="0" table:formula="of:=IF([.F44]=1;[.O43]+1;0)" table:style-name="ce1">
            <text:p>0</text:p>
          </table:table-cell>
          <table:table-cell office:value-type="float" office:value="0" table:formula="of:=IF([.G44]=1;[.P43]+1;0)" table:style-name="ce1">
            <text:p>0</text:p>
          </table:table-cell>
          <table:table-cell office:value-type="float" office:value="0" table:formula="of:=IF([.H44]=1;[.Q43]+1;0)" table:style-name="ce1">
            <text:p>0</text:p>
          </table:table-cell>
          <table:table-cell office:value-type="float" office:value="0" table:formula="of:=IF([.I44]=1;[.R4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1T00:00:00" table:formula="of:=[.A44]+1" table:style-name="ce10">
            <text:p>Wed, 11 Feb 2026</text:p>
          </table:table-cell>
          <table:table-cell office:value-type="string" office:string-value="Wed" table:formula="of:=TEXT([.A45];&quot;ddd&quot;)" table:style-name="ce5">
            <text:p>Wed</text:p>
          </table:table-cell>
          <table:table-cell office:value-type="string" office:string-value="Feb" table:formula="of:=TEXT([.A45];&quot;mmm&quot;)" table:style-name="ce5">
            <text:p>Feb</text:p>
          </table:table-cell>
          <table:table-cell office:value-type="float" office:value="0" table:formula="of:=IF(INDEX([Tracker.$A$1:.$AG$120];6+9*(MONTH([.$A45])-1)+(COLUMN()-4);DAY([.$A45])+2)&lt;&gt;&quot;&quot;;1;0)" table:style-name="ce92"/>
          <table:table-cell office:value-type="float" office:value="0" table:formula="of:=IF(INDEX([Tracker.$A$1:.$AG$120];6+9*(MONTH([.$A45])-1)+(COLUMN()-4);DAY([.$A45])+2)&lt;&gt;&quot;&quot;;1;0)" table:style-name="ce92"/>
          <table:table-cell office:value-type="float" office:value="0" table:formula="of:=IF(INDEX([Tracker.$A$1:.$AG$120];6+9*(MONTH([.$A45])-1)+(COLUMN()-4);DAY([.$A45])+2)&lt;&gt;&quot;&quot;;1;0)" table:style-name="ce92"/>
          <table:table-cell office:value-type="float" office:value="0" table:formula="of:=IF(INDEX([Tracker.$A$1:.$AG$120];6+9*(MONTH([.$A45])-1)+(COLUMN()-4);DAY([.$A45])+2)&lt;&gt;&quot;&quot;;1;0)" table:style-name="ce92"/>
          <table:table-cell office:value-type="float" office:value="0" table:formula="of:=IF(INDEX([Tracker.$A$1:.$AG$120];6+9*(MONTH([.$A45])-1)+(COLUMN()-4);DAY([.$A45])+2)&lt;&gt;&quot;&quot;;1;0)" table:style-name="ce92"/>
          <table:table-cell office:value-type="float" office:value="0" table:formula="of:=IF(INDEX([Tracker.$A$1:.$AG$120];6+9*(MONTH([.$A45])-1)+(COLUMN()-4);DAY([.$A45])+2)&lt;&gt;&quot;&quot;;1;0)" table:style-name="ce92"/>
          <table:table-cell office:value-type="float" office:value="0" table:formula="of:=SUM([.D45:.I45])" table:style-name="ce6"/>
          <table:table-cell office:value-type="percentage" office:value="0" table:formula="of:=[.J45]/6" table:style-name="ce8">
            <text:p>0%</text:p>
          </table:table-cell>
          <table:table-cell table:style-name="ce1"/>
          <table:table-cell office:value-type="float" office:value="0" table:formula="of:=IF([.D45]=1;[.M44]+1;0)" table:style-name="ce1">
            <text:p>0</text:p>
          </table:table-cell>
          <table:table-cell office:value-type="float" office:value="0" table:formula="of:=IF([.E45]=1;[.N44]+1;0)" table:style-name="ce1">
            <text:p>0</text:p>
          </table:table-cell>
          <table:table-cell office:value-type="float" office:value="0" table:formula="of:=IF([.F45]=1;[.O44]+1;0)" table:style-name="ce1">
            <text:p>0</text:p>
          </table:table-cell>
          <table:table-cell office:value-type="float" office:value="0" table:formula="of:=IF([.G45]=1;[.P44]+1;0)" table:style-name="ce1">
            <text:p>0</text:p>
          </table:table-cell>
          <table:table-cell office:value-type="float" office:value="0" table:formula="of:=IF([.H45]=1;[.Q44]+1;0)" table:style-name="ce1">
            <text:p>0</text:p>
          </table:table-cell>
          <table:table-cell office:value-type="float" office:value="0" table:formula="of:=IF([.I45]=1;[.R4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2T00:00:00" table:formula="of:=[.A45]+1" table:style-name="ce10">
            <text:p>Thu, 12 Feb 2026</text:p>
          </table:table-cell>
          <table:table-cell office:value-type="string" office:string-value="Thu" table:formula="of:=TEXT([.A46];&quot;ddd&quot;)" table:style-name="ce5">
            <text:p>Thu</text:p>
          </table:table-cell>
          <table:table-cell office:value-type="string" office:string-value="Feb" table:formula="of:=TEXT([.A46];&quot;mmm&quot;)" table:style-name="ce5">
            <text:p>Feb</text:p>
          </table:table-cell>
          <table:table-cell office:value-type="float" office:value="0" table:formula="of:=IF(INDEX([Tracker.$A$1:.$AG$120];6+9*(MONTH([.$A46])-1)+(COLUMN()-4);DAY([.$A46])+2)&lt;&gt;&quot;&quot;;1;0)" table:style-name="ce92"/>
          <table:table-cell office:value-type="float" office:value="0" table:formula="of:=IF(INDEX([Tracker.$A$1:.$AG$120];6+9*(MONTH([.$A46])-1)+(COLUMN()-4);DAY([.$A46])+2)&lt;&gt;&quot;&quot;;1;0)" table:style-name="ce92"/>
          <table:table-cell office:value-type="float" office:value="0" table:formula="of:=IF(INDEX([Tracker.$A$1:.$AG$120];6+9*(MONTH([.$A46])-1)+(COLUMN()-4);DAY([.$A46])+2)&lt;&gt;&quot;&quot;;1;0)" table:style-name="ce92"/>
          <table:table-cell office:value-type="float" office:value="0" table:formula="of:=IF(INDEX([Tracker.$A$1:.$AG$120];6+9*(MONTH([.$A46])-1)+(COLUMN()-4);DAY([.$A46])+2)&lt;&gt;&quot;&quot;;1;0)" table:style-name="ce92"/>
          <table:table-cell office:value-type="float" office:value="0" table:formula="of:=IF(INDEX([Tracker.$A$1:.$AG$120];6+9*(MONTH([.$A46])-1)+(COLUMN()-4);DAY([.$A46])+2)&lt;&gt;&quot;&quot;;1;0)" table:style-name="ce92"/>
          <table:table-cell office:value-type="float" office:value="0" table:formula="of:=IF(INDEX([Tracker.$A$1:.$AG$120];6+9*(MONTH([.$A46])-1)+(COLUMN()-4);DAY([.$A46])+2)&lt;&gt;&quot;&quot;;1;0)" table:style-name="ce92"/>
          <table:table-cell office:value-type="float" office:value="0" table:formula="of:=SUM([.D46:.I46])" table:style-name="ce6"/>
          <table:table-cell office:value-type="percentage" office:value="0" table:formula="of:=[.J46]/6" table:style-name="ce8">
            <text:p>0%</text:p>
          </table:table-cell>
          <table:table-cell table:style-name="ce1"/>
          <table:table-cell office:value-type="float" office:value="0" table:formula="of:=IF([.D46]=1;[.M45]+1;0)" table:style-name="ce1">
            <text:p>0</text:p>
          </table:table-cell>
          <table:table-cell office:value-type="float" office:value="0" table:formula="of:=IF([.E46]=1;[.N45]+1;0)" table:style-name="ce1">
            <text:p>0</text:p>
          </table:table-cell>
          <table:table-cell office:value-type="float" office:value="0" table:formula="of:=IF([.F46]=1;[.O45]+1;0)" table:style-name="ce1">
            <text:p>0</text:p>
          </table:table-cell>
          <table:table-cell office:value-type="float" office:value="0" table:formula="of:=IF([.G46]=1;[.P45]+1;0)" table:style-name="ce1">
            <text:p>0</text:p>
          </table:table-cell>
          <table:table-cell office:value-type="float" office:value="0" table:formula="of:=IF([.H46]=1;[.Q45]+1;0)" table:style-name="ce1">
            <text:p>0</text:p>
          </table:table-cell>
          <table:table-cell office:value-type="float" office:value="0" table:formula="of:=IF([.I46]=1;[.R4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3T00:00:00" table:formula="of:=[.A46]+1" table:style-name="ce10">
            <text:p>Fri, 13 Feb 2026</text:p>
          </table:table-cell>
          <table:table-cell office:value-type="string" office:string-value="Fri" table:formula="of:=TEXT([.A47];&quot;ddd&quot;)" table:style-name="ce5">
            <text:p>Fri</text:p>
          </table:table-cell>
          <table:table-cell office:value-type="string" office:string-value="Feb" table:formula="of:=TEXT([.A47];&quot;mmm&quot;)" table:style-name="ce5">
            <text:p>Feb</text:p>
          </table:table-cell>
          <table:table-cell office:value-type="float" office:value="0" table:formula="of:=IF(INDEX([Tracker.$A$1:.$AG$120];6+9*(MONTH([.$A47])-1)+(COLUMN()-4);DAY([.$A47])+2)&lt;&gt;&quot;&quot;;1;0)" table:style-name="ce92"/>
          <table:table-cell office:value-type="float" office:value="0" table:formula="of:=IF(INDEX([Tracker.$A$1:.$AG$120];6+9*(MONTH([.$A47])-1)+(COLUMN()-4);DAY([.$A47])+2)&lt;&gt;&quot;&quot;;1;0)" table:style-name="ce92"/>
          <table:table-cell office:value-type="float" office:value="0" table:formula="of:=IF(INDEX([Tracker.$A$1:.$AG$120];6+9*(MONTH([.$A47])-1)+(COLUMN()-4);DAY([.$A47])+2)&lt;&gt;&quot;&quot;;1;0)" table:style-name="ce92"/>
          <table:table-cell office:value-type="float" office:value="0" table:formula="of:=IF(INDEX([Tracker.$A$1:.$AG$120];6+9*(MONTH([.$A47])-1)+(COLUMN()-4);DAY([.$A47])+2)&lt;&gt;&quot;&quot;;1;0)" table:style-name="ce92"/>
          <table:table-cell office:value-type="float" office:value="0" table:formula="of:=IF(INDEX([Tracker.$A$1:.$AG$120];6+9*(MONTH([.$A47])-1)+(COLUMN()-4);DAY([.$A47])+2)&lt;&gt;&quot;&quot;;1;0)" table:style-name="ce92"/>
          <table:table-cell office:value-type="float" office:value="0" table:formula="of:=IF(INDEX([Tracker.$A$1:.$AG$120];6+9*(MONTH([.$A47])-1)+(COLUMN()-4);DAY([.$A47])+2)&lt;&gt;&quot;&quot;;1;0)" table:style-name="ce92"/>
          <table:table-cell office:value-type="float" office:value="0" table:formula="of:=SUM([.D47:.I47])" table:style-name="ce6"/>
          <table:table-cell office:value-type="percentage" office:value="0" table:formula="of:=[.J47]/6" table:style-name="ce8">
            <text:p>0%</text:p>
          </table:table-cell>
          <table:table-cell table:style-name="ce1"/>
          <table:table-cell office:value-type="float" office:value="0" table:formula="of:=IF([.D47]=1;[.M46]+1;0)" table:style-name="ce1">
            <text:p>0</text:p>
          </table:table-cell>
          <table:table-cell office:value-type="float" office:value="0" table:formula="of:=IF([.E47]=1;[.N46]+1;0)" table:style-name="ce1">
            <text:p>0</text:p>
          </table:table-cell>
          <table:table-cell office:value-type="float" office:value="0" table:formula="of:=IF([.F47]=1;[.O46]+1;0)" table:style-name="ce1">
            <text:p>0</text:p>
          </table:table-cell>
          <table:table-cell office:value-type="float" office:value="0" table:formula="of:=IF([.G47]=1;[.P46]+1;0)" table:style-name="ce1">
            <text:p>0</text:p>
          </table:table-cell>
          <table:table-cell office:value-type="float" office:value="0" table:formula="of:=IF([.H47]=1;[.Q46]+1;0)" table:style-name="ce1">
            <text:p>0</text:p>
          </table:table-cell>
          <table:table-cell office:value-type="float" office:value="0" table:formula="of:=IF([.I47]=1;[.R4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4T00:00:00" table:formula="of:=[.A47]+1" table:style-name="ce10">
            <text:p>Sat, 14 Feb 2026</text:p>
          </table:table-cell>
          <table:table-cell office:value-type="string" office:string-value="Sat" table:formula="of:=TEXT([.A48];&quot;ddd&quot;)" table:style-name="ce5">
            <text:p>Sat</text:p>
          </table:table-cell>
          <table:table-cell office:value-type="string" office:string-value="Feb" table:formula="of:=TEXT([.A48];&quot;mmm&quot;)" table:style-name="ce5">
            <text:p>Feb</text:p>
          </table:table-cell>
          <table:table-cell office:value-type="float" office:value="0" table:formula="of:=IF(INDEX([Tracker.$A$1:.$AG$120];6+9*(MONTH([.$A48])-1)+(COLUMN()-4);DAY([.$A48])+2)&lt;&gt;&quot;&quot;;1;0)" table:style-name="ce92"/>
          <table:table-cell office:value-type="float" office:value="0" table:formula="of:=IF(INDEX([Tracker.$A$1:.$AG$120];6+9*(MONTH([.$A48])-1)+(COLUMN()-4);DAY([.$A48])+2)&lt;&gt;&quot;&quot;;1;0)" table:style-name="ce92"/>
          <table:table-cell office:value-type="float" office:value="0" table:formula="of:=IF(INDEX([Tracker.$A$1:.$AG$120];6+9*(MONTH([.$A48])-1)+(COLUMN()-4);DAY([.$A48])+2)&lt;&gt;&quot;&quot;;1;0)" table:style-name="ce92"/>
          <table:table-cell office:value-type="float" office:value="0" table:formula="of:=IF(INDEX([Tracker.$A$1:.$AG$120];6+9*(MONTH([.$A48])-1)+(COLUMN()-4);DAY([.$A48])+2)&lt;&gt;&quot;&quot;;1;0)" table:style-name="ce92"/>
          <table:table-cell office:value-type="float" office:value="0" table:formula="of:=IF(INDEX([Tracker.$A$1:.$AG$120];6+9*(MONTH([.$A48])-1)+(COLUMN()-4);DAY([.$A48])+2)&lt;&gt;&quot;&quot;;1;0)" table:style-name="ce92"/>
          <table:table-cell office:value-type="float" office:value="0" table:formula="of:=IF(INDEX([Tracker.$A$1:.$AG$120];6+9*(MONTH([.$A48])-1)+(COLUMN()-4);DAY([.$A48])+2)&lt;&gt;&quot;&quot;;1;0)" table:style-name="ce92"/>
          <table:table-cell office:value-type="float" office:value="0" table:formula="of:=SUM([.D48:.I48])" table:style-name="ce6"/>
          <table:table-cell office:value-type="percentage" office:value="0" table:formula="of:=[.J48]/6" table:style-name="ce8">
            <text:p>0%</text:p>
          </table:table-cell>
          <table:table-cell table:style-name="ce1"/>
          <table:table-cell office:value-type="float" office:value="0" table:formula="of:=IF([.D48]=1;[.M47]+1;0)" table:style-name="ce1">
            <text:p>0</text:p>
          </table:table-cell>
          <table:table-cell office:value-type="float" office:value="0" table:formula="of:=IF([.E48]=1;[.N47]+1;0)" table:style-name="ce1">
            <text:p>0</text:p>
          </table:table-cell>
          <table:table-cell office:value-type="float" office:value="0" table:formula="of:=IF([.F48]=1;[.O47]+1;0)" table:style-name="ce1">
            <text:p>0</text:p>
          </table:table-cell>
          <table:table-cell office:value-type="float" office:value="0" table:formula="of:=IF([.G48]=1;[.P47]+1;0)" table:style-name="ce1">
            <text:p>0</text:p>
          </table:table-cell>
          <table:table-cell office:value-type="float" office:value="0" table:formula="of:=IF([.H48]=1;[.Q47]+1;0)" table:style-name="ce1">
            <text:p>0</text:p>
          </table:table-cell>
          <table:table-cell office:value-type="float" office:value="0" table:formula="of:=IF([.I48]=1;[.R4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5T00:00:00" table:formula="of:=[.A48]+1" table:style-name="ce10">
            <text:p>Sun, 15 Feb 2026</text:p>
          </table:table-cell>
          <table:table-cell office:value-type="string" office:string-value="Sun" table:formula="of:=TEXT([.A49];&quot;ddd&quot;)" table:style-name="ce5">
            <text:p>Sun</text:p>
          </table:table-cell>
          <table:table-cell office:value-type="string" office:string-value="Feb" table:formula="of:=TEXT([.A49];&quot;mmm&quot;)" table:style-name="ce5">
            <text:p>Feb</text:p>
          </table:table-cell>
          <table:table-cell office:value-type="float" office:value="0" table:formula="of:=IF(INDEX([Tracker.$A$1:.$AG$120];6+9*(MONTH([.$A49])-1)+(COLUMN()-4);DAY([.$A49])+2)&lt;&gt;&quot;&quot;;1;0)" table:style-name="ce92"/>
          <table:table-cell office:value-type="float" office:value="0" table:formula="of:=IF(INDEX([Tracker.$A$1:.$AG$120];6+9*(MONTH([.$A49])-1)+(COLUMN()-4);DAY([.$A49])+2)&lt;&gt;&quot;&quot;;1;0)" table:style-name="ce92"/>
          <table:table-cell office:value-type="float" office:value="0" table:formula="of:=IF(INDEX([Tracker.$A$1:.$AG$120];6+9*(MONTH([.$A49])-1)+(COLUMN()-4);DAY([.$A49])+2)&lt;&gt;&quot;&quot;;1;0)" table:style-name="ce92"/>
          <table:table-cell office:value-type="float" office:value="0" table:formula="of:=IF(INDEX([Tracker.$A$1:.$AG$120];6+9*(MONTH([.$A49])-1)+(COLUMN()-4);DAY([.$A49])+2)&lt;&gt;&quot;&quot;;1;0)" table:style-name="ce92"/>
          <table:table-cell office:value-type="float" office:value="0" table:formula="of:=IF(INDEX([Tracker.$A$1:.$AG$120];6+9*(MONTH([.$A49])-1)+(COLUMN()-4);DAY([.$A49])+2)&lt;&gt;&quot;&quot;;1;0)" table:style-name="ce92"/>
          <table:table-cell office:value-type="float" office:value="0" table:formula="of:=IF(INDEX([Tracker.$A$1:.$AG$120];6+9*(MONTH([.$A49])-1)+(COLUMN()-4);DAY([.$A49])+2)&lt;&gt;&quot;&quot;;1;0)" table:style-name="ce92"/>
          <table:table-cell office:value-type="float" office:value="0" table:formula="of:=SUM([.D49:.I49])" table:style-name="ce6"/>
          <table:table-cell office:value-type="percentage" office:value="0" table:formula="of:=[.J49]/6" table:style-name="ce8">
            <text:p>0%</text:p>
          </table:table-cell>
          <table:table-cell table:style-name="ce1"/>
          <table:table-cell office:value-type="float" office:value="0" table:formula="of:=IF([.D49]=1;[.M48]+1;0)" table:style-name="ce1">
            <text:p>0</text:p>
          </table:table-cell>
          <table:table-cell office:value-type="float" office:value="0" table:formula="of:=IF([.E49]=1;[.N48]+1;0)" table:style-name="ce1">
            <text:p>0</text:p>
          </table:table-cell>
          <table:table-cell office:value-type="float" office:value="0" table:formula="of:=IF([.F49]=1;[.O48]+1;0)" table:style-name="ce1">
            <text:p>0</text:p>
          </table:table-cell>
          <table:table-cell office:value-type="float" office:value="0" table:formula="of:=IF([.G49]=1;[.P48]+1;0)" table:style-name="ce1">
            <text:p>0</text:p>
          </table:table-cell>
          <table:table-cell office:value-type="float" office:value="0" table:formula="of:=IF([.H49]=1;[.Q48]+1;0)" table:style-name="ce1">
            <text:p>0</text:p>
          </table:table-cell>
          <table:table-cell office:value-type="float" office:value="0" table:formula="of:=IF([.I49]=1;[.R4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6T00:00:00" table:formula="of:=[.A49]+1" table:style-name="ce10">
            <text:p>Mon, 16 Feb 2026</text:p>
          </table:table-cell>
          <table:table-cell office:value-type="string" office:string-value="Mon" table:formula="of:=TEXT([.A50];&quot;ddd&quot;)" table:style-name="ce5">
            <text:p>Mon</text:p>
          </table:table-cell>
          <table:table-cell office:value-type="string" office:string-value="Feb" table:formula="of:=TEXT([.A50];&quot;mmm&quot;)" table:style-name="ce5">
            <text:p>Feb</text:p>
          </table:table-cell>
          <table:table-cell office:value-type="float" office:value="0" table:formula="of:=IF(INDEX([Tracker.$A$1:.$AG$120];6+9*(MONTH([.$A50])-1)+(COLUMN()-4);DAY([.$A50])+2)&lt;&gt;&quot;&quot;;1;0)" table:style-name="ce92"/>
          <table:table-cell office:value-type="float" office:value="0" table:formula="of:=IF(INDEX([Tracker.$A$1:.$AG$120];6+9*(MONTH([.$A50])-1)+(COLUMN()-4);DAY([.$A50])+2)&lt;&gt;&quot;&quot;;1;0)" table:style-name="ce92"/>
          <table:table-cell office:value-type="float" office:value="0" table:formula="of:=IF(INDEX([Tracker.$A$1:.$AG$120];6+9*(MONTH([.$A50])-1)+(COLUMN()-4);DAY([.$A50])+2)&lt;&gt;&quot;&quot;;1;0)" table:style-name="ce92"/>
          <table:table-cell office:value-type="float" office:value="0" table:formula="of:=IF(INDEX([Tracker.$A$1:.$AG$120];6+9*(MONTH([.$A50])-1)+(COLUMN()-4);DAY([.$A50])+2)&lt;&gt;&quot;&quot;;1;0)" table:style-name="ce92"/>
          <table:table-cell office:value-type="float" office:value="0" table:formula="of:=IF(INDEX([Tracker.$A$1:.$AG$120];6+9*(MONTH([.$A50])-1)+(COLUMN()-4);DAY([.$A50])+2)&lt;&gt;&quot;&quot;;1;0)" table:style-name="ce92"/>
          <table:table-cell office:value-type="float" office:value="0" table:formula="of:=IF(INDEX([Tracker.$A$1:.$AG$120];6+9*(MONTH([.$A50])-1)+(COLUMN()-4);DAY([.$A50])+2)&lt;&gt;&quot;&quot;;1;0)" table:style-name="ce92"/>
          <table:table-cell office:value-type="float" office:value="0" table:formula="of:=SUM([.D50:.I50])" table:style-name="ce6"/>
          <table:table-cell office:value-type="percentage" office:value="0" table:formula="of:=[.J50]/6" table:style-name="ce8">
            <text:p>0%</text:p>
          </table:table-cell>
          <table:table-cell table:style-name="ce1"/>
          <table:table-cell office:value-type="float" office:value="0" table:formula="of:=IF([.D50]=1;[.M49]+1;0)" table:style-name="ce1">
            <text:p>0</text:p>
          </table:table-cell>
          <table:table-cell office:value-type="float" office:value="0" table:formula="of:=IF([.E50]=1;[.N49]+1;0)" table:style-name="ce1">
            <text:p>0</text:p>
          </table:table-cell>
          <table:table-cell office:value-type="float" office:value="0" table:formula="of:=IF([.F50]=1;[.O49]+1;0)" table:style-name="ce1">
            <text:p>0</text:p>
          </table:table-cell>
          <table:table-cell office:value-type="float" office:value="0" table:formula="of:=IF([.G50]=1;[.P49]+1;0)" table:style-name="ce1">
            <text:p>0</text:p>
          </table:table-cell>
          <table:table-cell office:value-type="float" office:value="0" table:formula="of:=IF([.H50]=1;[.Q49]+1;0)" table:style-name="ce1">
            <text:p>0</text:p>
          </table:table-cell>
          <table:table-cell office:value-type="float" office:value="0" table:formula="of:=IF([.I50]=1;[.R4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7T00:00:00" table:formula="of:=[.A50]+1" table:style-name="ce10">
            <text:p>Tue, 17 Feb 2026</text:p>
          </table:table-cell>
          <table:table-cell office:value-type="string" office:string-value="Tue" table:formula="of:=TEXT([.A51];&quot;ddd&quot;)" table:style-name="ce5">
            <text:p>Tue</text:p>
          </table:table-cell>
          <table:table-cell office:value-type="string" office:string-value="Feb" table:formula="of:=TEXT([.A51];&quot;mmm&quot;)" table:style-name="ce5">
            <text:p>Feb</text:p>
          </table:table-cell>
          <table:table-cell office:value-type="float" office:value="0" table:formula="of:=IF(INDEX([Tracker.$A$1:.$AG$120];6+9*(MONTH([.$A51])-1)+(COLUMN()-4);DAY([.$A51])+2)&lt;&gt;&quot;&quot;;1;0)" table:style-name="ce92"/>
          <table:table-cell office:value-type="float" office:value="0" table:formula="of:=IF(INDEX([Tracker.$A$1:.$AG$120];6+9*(MONTH([.$A51])-1)+(COLUMN()-4);DAY([.$A51])+2)&lt;&gt;&quot;&quot;;1;0)" table:style-name="ce92"/>
          <table:table-cell office:value-type="float" office:value="0" table:formula="of:=IF(INDEX([Tracker.$A$1:.$AG$120];6+9*(MONTH([.$A51])-1)+(COLUMN()-4);DAY([.$A51])+2)&lt;&gt;&quot;&quot;;1;0)" table:style-name="ce92"/>
          <table:table-cell office:value-type="float" office:value="0" table:formula="of:=IF(INDEX([Tracker.$A$1:.$AG$120];6+9*(MONTH([.$A51])-1)+(COLUMN()-4);DAY([.$A51])+2)&lt;&gt;&quot;&quot;;1;0)" table:style-name="ce92"/>
          <table:table-cell office:value-type="float" office:value="0" table:formula="of:=IF(INDEX([Tracker.$A$1:.$AG$120];6+9*(MONTH([.$A51])-1)+(COLUMN()-4);DAY([.$A51])+2)&lt;&gt;&quot;&quot;;1;0)" table:style-name="ce92"/>
          <table:table-cell office:value-type="float" office:value="0" table:formula="of:=IF(INDEX([Tracker.$A$1:.$AG$120];6+9*(MONTH([.$A51])-1)+(COLUMN()-4);DAY([.$A51])+2)&lt;&gt;&quot;&quot;;1;0)" table:style-name="ce92"/>
          <table:table-cell office:value-type="float" office:value="0" table:formula="of:=SUM([.D51:.I51])" table:style-name="ce6"/>
          <table:table-cell office:value-type="percentage" office:value="0" table:formula="of:=[.J51]/6" table:style-name="ce8">
            <text:p>0%</text:p>
          </table:table-cell>
          <table:table-cell table:style-name="ce1"/>
          <table:table-cell office:value-type="float" office:value="0" table:formula="of:=IF([.D51]=1;[.M50]+1;0)" table:style-name="ce1">
            <text:p>0</text:p>
          </table:table-cell>
          <table:table-cell office:value-type="float" office:value="0" table:formula="of:=IF([.E51]=1;[.N50]+1;0)" table:style-name="ce1">
            <text:p>0</text:p>
          </table:table-cell>
          <table:table-cell office:value-type="float" office:value="0" table:formula="of:=IF([.F51]=1;[.O50]+1;0)" table:style-name="ce1">
            <text:p>0</text:p>
          </table:table-cell>
          <table:table-cell office:value-type="float" office:value="0" table:formula="of:=IF([.G51]=1;[.P50]+1;0)" table:style-name="ce1">
            <text:p>0</text:p>
          </table:table-cell>
          <table:table-cell office:value-type="float" office:value="0" table:formula="of:=IF([.H51]=1;[.Q50]+1;0)" table:style-name="ce1">
            <text:p>0</text:p>
          </table:table-cell>
          <table:table-cell office:value-type="float" office:value="0" table:formula="of:=IF([.I51]=1;[.R5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8T00:00:00" table:formula="of:=[.A51]+1" table:style-name="ce10">
            <text:p>Wed, 18 Feb 2026</text:p>
          </table:table-cell>
          <table:table-cell office:value-type="string" office:string-value="Wed" table:formula="of:=TEXT([.A52];&quot;ddd&quot;)" table:style-name="ce5">
            <text:p>Wed</text:p>
          </table:table-cell>
          <table:table-cell office:value-type="string" office:string-value="Feb" table:formula="of:=TEXT([.A52];&quot;mmm&quot;)" table:style-name="ce5">
            <text:p>Feb</text:p>
          </table:table-cell>
          <table:table-cell office:value-type="float" office:value="0" table:formula="of:=IF(INDEX([Tracker.$A$1:.$AG$120];6+9*(MONTH([.$A52])-1)+(COLUMN()-4);DAY([.$A52])+2)&lt;&gt;&quot;&quot;;1;0)" table:style-name="ce92"/>
          <table:table-cell office:value-type="float" office:value="0" table:formula="of:=IF(INDEX([Tracker.$A$1:.$AG$120];6+9*(MONTH([.$A52])-1)+(COLUMN()-4);DAY([.$A52])+2)&lt;&gt;&quot;&quot;;1;0)" table:style-name="ce92"/>
          <table:table-cell office:value-type="float" office:value="0" table:formula="of:=IF(INDEX([Tracker.$A$1:.$AG$120];6+9*(MONTH([.$A52])-1)+(COLUMN()-4);DAY([.$A52])+2)&lt;&gt;&quot;&quot;;1;0)" table:style-name="ce92"/>
          <table:table-cell office:value-type="float" office:value="0" table:formula="of:=IF(INDEX([Tracker.$A$1:.$AG$120];6+9*(MONTH([.$A52])-1)+(COLUMN()-4);DAY([.$A52])+2)&lt;&gt;&quot;&quot;;1;0)" table:style-name="ce92"/>
          <table:table-cell office:value-type="float" office:value="0" table:formula="of:=IF(INDEX([Tracker.$A$1:.$AG$120];6+9*(MONTH([.$A52])-1)+(COLUMN()-4);DAY([.$A52])+2)&lt;&gt;&quot;&quot;;1;0)" table:style-name="ce92"/>
          <table:table-cell office:value-type="float" office:value="0" table:formula="of:=IF(INDEX([Tracker.$A$1:.$AG$120];6+9*(MONTH([.$A52])-1)+(COLUMN()-4);DAY([.$A52])+2)&lt;&gt;&quot;&quot;;1;0)" table:style-name="ce92"/>
          <table:table-cell office:value-type="float" office:value="0" table:formula="of:=SUM([.D52:.I52])" table:style-name="ce6"/>
          <table:table-cell office:value-type="percentage" office:value="0" table:formula="of:=[.J52]/6" table:style-name="ce8">
            <text:p>0%</text:p>
          </table:table-cell>
          <table:table-cell table:style-name="ce1"/>
          <table:table-cell office:value-type="float" office:value="0" table:formula="of:=IF([.D52]=1;[.M51]+1;0)" table:style-name="ce1">
            <text:p>0</text:p>
          </table:table-cell>
          <table:table-cell office:value-type="float" office:value="0" table:formula="of:=IF([.E52]=1;[.N51]+1;0)" table:style-name="ce1">
            <text:p>0</text:p>
          </table:table-cell>
          <table:table-cell office:value-type="float" office:value="0" table:formula="of:=IF([.F52]=1;[.O51]+1;0)" table:style-name="ce1">
            <text:p>0</text:p>
          </table:table-cell>
          <table:table-cell office:value-type="float" office:value="0" table:formula="of:=IF([.G52]=1;[.P51]+1;0)" table:style-name="ce1">
            <text:p>0</text:p>
          </table:table-cell>
          <table:table-cell office:value-type="float" office:value="0" table:formula="of:=IF([.H52]=1;[.Q51]+1;0)" table:style-name="ce1">
            <text:p>0</text:p>
          </table:table-cell>
          <table:table-cell office:value-type="float" office:value="0" table:formula="of:=IF([.I52]=1;[.R5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19T00:00:00" table:formula="of:=[.A52]+1" table:style-name="ce10">
            <text:p>Thu, 19 Feb 2026</text:p>
          </table:table-cell>
          <table:table-cell office:value-type="string" office:string-value="Thu" table:formula="of:=TEXT([.A53];&quot;ddd&quot;)" table:style-name="ce5">
            <text:p>Thu</text:p>
          </table:table-cell>
          <table:table-cell office:value-type="string" office:string-value="Feb" table:formula="of:=TEXT([.A53];&quot;mmm&quot;)" table:style-name="ce5">
            <text:p>Feb</text:p>
          </table:table-cell>
          <table:table-cell office:value-type="float" office:value="0" table:formula="of:=IF(INDEX([Tracker.$A$1:.$AG$120];6+9*(MONTH([.$A53])-1)+(COLUMN()-4);DAY([.$A53])+2)&lt;&gt;&quot;&quot;;1;0)" table:style-name="ce92"/>
          <table:table-cell office:value-type="float" office:value="0" table:formula="of:=IF(INDEX([Tracker.$A$1:.$AG$120];6+9*(MONTH([.$A53])-1)+(COLUMN()-4);DAY([.$A53])+2)&lt;&gt;&quot;&quot;;1;0)" table:style-name="ce92"/>
          <table:table-cell office:value-type="float" office:value="0" table:formula="of:=IF(INDEX([Tracker.$A$1:.$AG$120];6+9*(MONTH([.$A53])-1)+(COLUMN()-4);DAY([.$A53])+2)&lt;&gt;&quot;&quot;;1;0)" table:style-name="ce92"/>
          <table:table-cell office:value-type="float" office:value="0" table:formula="of:=IF(INDEX([Tracker.$A$1:.$AG$120];6+9*(MONTH([.$A53])-1)+(COLUMN()-4);DAY([.$A53])+2)&lt;&gt;&quot;&quot;;1;0)" table:style-name="ce92"/>
          <table:table-cell office:value-type="float" office:value="0" table:formula="of:=IF(INDEX([Tracker.$A$1:.$AG$120];6+9*(MONTH([.$A53])-1)+(COLUMN()-4);DAY([.$A53])+2)&lt;&gt;&quot;&quot;;1;0)" table:style-name="ce92"/>
          <table:table-cell office:value-type="float" office:value="0" table:formula="of:=IF(INDEX([Tracker.$A$1:.$AG$120];6+9*(MONTH([.$A53])-1)+(COLUMN()-4);DAY([.$A53])+2)&lt;&gt;&quot;&quot;;1;0)" table:style-name="ce92"/>
          <table:table-cell office:value-type="float" office:value="0" table:formula="of:=SUM([.D53:.I53])" table:style-name="ce6"/>
          <table:table-cell office:value-type="percentage" office:value="0" table:formula="of:=[.J53]/6" table:style-name="ce8">
            <text:p>0%</text:p>
          </table:table-cell>
          <table:table-cell table:style-name="ce1"/>
          <table:table-cell office:value-type="float" office:value="0" table:formula="of:=IF([.D53]=1;[.M52]+1;0)" table:style-name="ce1">
            <text:p>0</text:p>
          </table:table-cell>
          <table:table-cell office:value-type="float" office:value="0" table:formula="of:=IF([.E53]=1;[.N52]+1;0)" table:style-name="ce1">
            <text:p>0</text:p>
          </table:table-cell>
          <table:table-cell office:value-type="float" office:value="0" table:formula="of:=IF([.F53]=1;[.O52]+1;0)" table:style-name="ce1">
            <text:p>0</text:p>
          </table:table-cell>
          <table:table-cell office:value-type="float" office:value="0" table:formula="of:=IF([.G53]=1;[.P52]+1;0)" table:style-name="ce1">
            <text:p>0</text:p>
          </table:table-cell>
          <table:table-cell office:value-type="float" office:value="0" table:formula="of:=IF([.H53]=1;[.Q52]+1;0)" table:style-name="ce1">
            <text:p>0</text:p>
          </table:table-cell>
          <table:table-cell office:value-type="float" office:value="0" table:formula="of:=IF([.I53]=1;[.R5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0T00:00:00" table:formula="of:=[.A53]+1" table:style-name="ce10">
            <text:p>Fri, 20 Feb 2026</text:p>
          </table:table-cell>
          <table:table-cell office:value-type="string" office:string-value="Fri" table:formula="of:=TEXT([.A54];&quot;ddd&quot;)" table:style-name="ce5">
            <text:p>Fri</text:p>
          </table:table-cell>
          <table:table-cell office:value-type="string" office:string-value="Feb" table:formula="of:=TEXT([.A54];&quot;mmm&quot;)" table:style-name="ce5">
            <text:p>Feb</text:p>
          </table:table-cell>
          <table:table-cell office:value-type="float" office:value="0" table:formula="of:=IF(INDEX([Tracker.$A$1:.$AG$120];6+9*(MONTH([.$A54])-1)+(COLUMN()-4);DAY([.$A54])+2)&lt;&gt;&quot;&quot;;1;0)" table:style-name="ce92"/>
          <table:table-cell office:value-type="float" office:value="0" table:formula="of:=IF(INDEX([Tracker.$A$1:.$AG$120];6+9*(MONTH([.$A54])-1)+(COLUMN()-4);DAY([.$A54])+2)&lt;&gt;&quot;&quot;;1;0)" table:style-name="ce92"/>
          <table:table-cell office:value-type="float" office:value="0" table:formula="of:=IF(INDEX([Tracker.$A$1:.$AG$120];6+9*(MONTH([.$A54])-1)+(COLUMN()-4);DAY([.$A54])+2)&lt;&gt;&quot;&quot;;1;0)" table:style-name="ce92"/>
          <table:table-cell office:value-type="float" office:value="0" table:formula="of:=IF(INDEX([Tracker.$A$1:.$AG$120];6+9*(MONTH([.$A54])-1)+(COLUMN()-4);DAY([.$A54])+2)&lt;&gt;&quot;&quot;;1;0)" table:style-name="ce92"/>
          <table:table-cell office:value-type="float" office:value="0" table:formula="of:=IF(INDEX([Tracker.$A$1:.$AG$120];6+9*(MONTH([.$A54])-1)+(COLUMN()-4);DAY([.$A54])+2)&lt;&gt;&quot;&quot;;1;0)" table:style-name="ce92"/>
          <table:table-cell office:value-type="float" office:value="0" table:formula="of:=IF(INDEX([Tracker.$A$1:.$AG$120];6+9*(MONTH([.$A54])-1)+(COLUMN()-4);DAY([.$A54])+2)&lt;&gt;&quot;&quot;;1;0)" table:style-name="ce92"/>
          <table:table-cell office:value-type="float" office:value="0" table:formula="of:=SUM([.D54:.I54])" table:style-name="ce6"/>
          <table:table-cell office:value-type="percentage" office:value="0" table:formula="of:=[.J54]/6" table:style-name="ce8">
            <text:p>0%</text:p>
          </table:table-cell>
          <table:table-cell table:style-name="ce1"/>
          <table:table-cell office:value-type="float" office:value="0" table:formula="of:=IF([.D54]=1;[.M53]+1;0)" table:style-name="ce1">
            <text:p>0</text:p>
          </table:table-cell>
          <table:table-cell office:value-type="float" office:value="0" table:formula="of:=IF([.E54]=1;[.N53]+1;0)" table:style-name="ce1">
            <text:p>0</text:p>
          </table:table-cell>
          <table:table-cell office:value-type="float" office:value="0" table:formula="of:=IF([.F54]=1;[.O53]+1;0)" table:style-name="ce1">
            <text:p>0</text:p>
          </table:table-cell>
          <table:table-cell office:value-type="float" office:value="0" table:formula="of:=IF([.G54]=1;[.P53]+1;0)" table:style-name="ce1">
            <text:p>0</text:p>
          </table:table-cell>
          <table:table-cell office:value-type="float" office:value="0" table:formula="of:=IF([.H54]=1;[.Q53]+1;0)" table:style-name="ce1">
            <text:p>0</text:p>
          </table:table-cell>
          <table:table-cell office:value-type="float" office:value="0" table:formula="of:=IF([.I54]=1;[.R5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1T00:00:00" table:formula="of:=[.A54]+1" table:style-name="ce10">
            <text:p>Sat, 21 Feb 2026</text:p>
          </table:table-cell>
          <table:table-cell office:value-type="string" office:string-value="Sat" table:formula="of:=TEXT([.A55];&quot;ddd&quot;)" table:style-name="ce5">
            <text:p>Sat</text:p>
          </table:table-cell>
          <table:table-cell office:value-type="string" office:string-value="Feb" table:formula="of:=TEXT([.A55];&quot;mmm&quot;)" table:style-name="ce5">
            <text:p>Feb</text:p>
          </table:table-cell>
          <table:table-cell office:value-type="float" office:value="0" table:formula="of:=IF(INDEX([Tracker.$A$1:.$AG$120];6+9*(MONTH([.$A55])-1)+(COLUMN()-4);DAY([.$A55])+2)&lt;&gt;&quot;&quot;;1;0)" table:style-name="ce92"/>
          <table:table-cell office:value-type="float" office:value="0" table:formula="of:=IF(INDEX([Tracker.$A$1:.$AG$120];6+9*(MONTH([.$A55])-1)+(COLUMN()-4);DAY([.$A55])+2)&lt;&gt;&quot;&quot;;1;0)" table:style-name="ce92"/>
          <table:table-cell office:value-type="float" office:value="0" table:formula="of:=IF(INDEX([Tracker.$A$1:.$AG$120];6+9*(MONTH([.$A55])-1)+(COLUMN()-4);DAY([.$A55])+2)&lt;&gt;&quot;&quot;;1;0)" table:style-name="ce92"/>
          <table:table-cell office:value-type="float" office:value="0" table:formula="of:=IF(INDEX([Tracker.$A$1:.$AG$120];6+9*(MONTH([.$A55])-1)+(COLUMN()-4);DAY([.$A55])+2)&lt;&gt;&quot;&quot;;1;0)" table:style-name="ce92"/>
          <table:table-cell office:value-type="float" office:value="0" table:formula="of:=IF(INDEX([Tracker.$A$1:.$AG$120];6+9*(MONTH([.$A55])-1)+(COLUMN()-4);DAY([.$A55])+2)&lt;&gt;&quot;&quot;;1;0)" table:style-name="ce92"/>
          <table:table-cell office:value-type="float" office:value="0" table:formula="of:=IF(INDEX([Tracker.$A$1:.$AG$120];6+9*(MONTH([.$A55])-1)+(COLUMN()-4);DAY([.$A55])+2)&lt;&gt;&quot;&quot;;1;0)" table:style-name="ce92"/>
          <table:table-cell office:value-type="float" office:value="0" table:formula="of:=SUM([.D55:.I55])" table:style-name="ce6"/>
          <table:table-cell office:value-type="percentage" office:value="0" table:formula="of:=[.J55]/6" table:style-name="ce8">
            <text:p>0%</text:p>
          </table:table-cell>
          <table:table-cell table:style-name="ce1"/>
          <table:table-cell office:value-type="float" office:value="0" table:formula="of:=IF([.D55]=1;[.M54]+1;0)" table:style-name="ce1">
            <text:p>0</text:p>
          </table:table-cell>
          <table:table-cell office:value-type="float" office:value="0" table:formula="of:=IF([.E55]=1;[.N54]+1;0)" table:style-name="ce1">
            <text:p>0</text:p>
          </table:table-cell>
          <table:table-cell office:value-type="float" office:value="0" table:formula="of:=IF([.F55]=1;[.O54]+1;0)" table:style-name="ce1">
            <text:p>0</text:p>
          </table:table-cell>
          <table:table-cell office:value-type="float" office:value="0" table:formula="of:=IF([.G55]=1;[.P54]+1;0)" table:style-name="ce1">
            <text:p>0</text:p>
          </table:table-cell>
          <table:table-cell office:value-type="float" office:value="0" table:formula="of:=IF([.H55]=1;[.Q54]+1;0)" table:style-name="ce1">
            <text:p>0</text:p>
          </table:table-cell>
          <table:table-cell office:value-type="float" office:value="0" table:formula="of:=IF([.I55]=1;[.R5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2T00:00:00" table:formula="of:=[.A55]+1" table:style-name="ce10">
            <text:p>Sun, 22 Feb 2026</text:p>
          </table:table-cell>
          <table:table-cell office:value-type="string" office:string-value="Sun" table:formula="of:=TEXT([.A56];&quot;ddd&quot;)" table:style-name="ce5">
            <text:p>Sun</text:p>
          </table:table-cell>
          <table:table-cell office:value-type="string" office:string-value="Feb" table:formula="of:=TEXT([.A56];&quot;mmm&quot;)" table:style-name="ce5">
            <text:p>Feb</text:p>
          </table:table-cell>
          <table:table-cell office:value-type="float" office:value="0" table:formula="of:=IF(INDEX([Tracker.$A$1:.$AG$120];6+9*(MONTH([.$A56])-1)+(COLUMN()-4);DAY([.$A56])+2)&lt;&gt;&quot;&quot;;1;0)" table:style-name="ce92"/>
          <table:table-cell office:value-type="float" office:value="0" table:formula="of:=IF(INDEX([Tracker.$A$1:.$AG$120];6+9*(MONTH([.$A56])-1)+(COLUMN()-4);DAY([.$A56])+2)&lt;&gt;&quot;&quot;;1;0)" table:style-name="ce92"/>
          <table:table-cell office:value-type="float" office:value="0" table:formula="of:=IF(INDEX([Tracker.$A$1:.$AG$120];6+9*(MONTH([.$A56])-1)+(COLUMN()-4);DAY([.$A56])+2)&lt;&gt;&quot;&quot;;1;0)" table:style-name="ce92"/>
          <table:table-cell office:value-type="float" office:value="0" table:formula="of:=IF(INDEX([Tracker.$A$1:.$AG$120];6+9*(MONTH([.$A56])-1)+(COLUMN()-4);DAY([.$A56])+2)&lt;&gt;&quot;&quot;;1;0)" table:style-name="ce92"/>
          <table:table-cell office:value-type="float" office:value="0" table:formula="of:=IF(INDEX([Tracker.$A$1:.$AG$120];6+9*(MONTH([.$A56])-1)+(COLUMN()-4);DAY([.$A56])+2)&lt;&gt;&quot;&quot;;1;0)" table:style-name="ce92"/>
          <table:table-cell office:value-type="float" office:value="0" table:formula="of:=IF(INDEX([Tracker.$A$1:.$AG$120];6+9*(MONTH([.$A56])-1)+(COLUMN()-4);DAY([.$A56])+2)&lt;&gt;&quot;&quot;;1;0)" table:style-name="ce92"/>
          <table:table-cell office:value-type="float" office:value="0" table:formula="of:=SUM([.D56:.I56])" table:style-name="ce6"/>
          <table:table-cell office:value-type="percentage" office:value="0" table:formula="of:=[.J56]/6" table:style-name="ce8">
            <text:p>0%</text:p>
          </table:table-cell>
          <table:table-cell table:style-name="ce1"/>
          <table:table-cell office:value-type="float" office:value="0" table:formula="of:=IF([.D56]=1;[.M55]+1;0)" table:style-name="ce1">
            <text:p>0</text:p>
          </table:table-cell>
          <table:table-cell office:value-type="float" office:value="0" table:formula="of:=IF([.E56]=1;[.N55]+1;0)" table:style-name="ce1">
            <text:p>0</text:p>
          </table:table-cell>
          <table:table-cell office:value-type="float" office:value="0" table:formula="of:=IF([.F56]=1;[.O55]+1;0)" table:style-name="ce1">
            <text:p>0</text:p>
          </table:table-cell>
          <table:table-cell office:value-type="float" office:value="0" table:formula="of:=IF([.G56]=1;[.P55]+1;0)" table:style-name="ce1">
            <text:p>0</text:p>
          </table:table-cell>
          <table:table-cell office:value-type="float" office:value="0" table:formula="of:=IF([.H56]=1;[.Q55]+1;0)" table:style-name="ce1">
            <text:p>0</text:p>
          </table:table-cell>
          <table:table-cell office:value-type="float" office:value="0" table:formula="of:=IF([.I56]=1;[.R5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3T00:00:00" table:formula="of:=[.A56]+1" table:style-name="ce10">
            <text:p>Mon, 23 Feb 2026</text:p>
          </table:table-cell>
          <table:table-cell office:value-type="string" office:string-value="Mon" table:formula="of:=TEXT([.A57];&quot;ddd&quot;)" table:style-name="ce5">
            <text:p>Mon</text:p>
          </table:table-cell>
          <table:table-cell office:value-type="string" office:string-value="Feb" table:formula="of:=TEXT([.A57];&quot;mmm&quot;)" table:style-name="ce5">
            <text:p>Feb</text:p>
          </table:table-cell>
          <table:table-cell office:value-type="float" office:value="0" table:formula="of:=IF(INDEX([Tracker.$A$1:.$AG$120];6+9*(MONTH([.$A57])-1)+(COLUMN()-4);DAY([.$A57])+2)&lt;&gt;&quot;&quot;;1;0)" table:style-name="ce92"/>
          <table:table-cell office:value-type="float" office:value="0" table:formula="of:=IF(INDEX([Tracker.$A$1:.$AG$120];6+9*(MONTH([.$A57])-1)+(COLUMN()-4);DAY([.$A57])+2)&lt;&gt;&quot;&quot;;1;0)" table:style-name="ce92"/>
          <table:table-cell office:value-type="float" office:value="0" table:formula="of:=IF(INDEX([Tracker.$A$1:.$AG$120];6+9*(MONTH([.$A57])-1)+(COLUMN()-4);DAY([.$A57])+2)&lt;&gt;&quot;&quot;;1;0)" table:style-name="ce92"/>
          <table:table-cell office:value-type="float" office:value="0" table:formula="of:=IF(INDEX([Tracker.$A$1:.$AG$120];6+9*(MONTH([.$A57])-1)+(COLUMN()-4);DAY([.$A57])+2)&lt;&gt;&quot;&quot;;1;0)" table:style-name="ce92"/>
          <table:table-cell office:value-type="float" office:value="0" table:formula="of:=IF(INDEX([Tracker.$A$1:.$AG$120];6+9*(MONTH([.$A57])-1)+(COLUMN()-4);DAY([.$A57])+2)&lt;&gt;&quot;&quot;;1;0)" table:style-name="ce92"/>
          <table:table-cell office:value-type="float" office:value="0" table:formula="of:=IF(INDEX([Tracker.$A$1:.$AG$120];6+9*(MONTH([.$A57])-1)+(COLUMN()-4);DAY([.$A57])+2)&lt;&gt;&quot;&quot;;1;0)" table:style-name="ce92"/>
          <table:table-cell office:value-type="float" office:value="0" table:formula="of:=SUM([.D57:.I57])" table:style-name="ce6"/>
          <table:table-cell office:value-type="percentage" office:value="0" table:formula="of:=[.J57]/6" table:style-name="ce8">
            <text:p>0%</text:p>
          </table:table-cell>
          <table:table-cell table:style-name="ce1"/>
          <table:table-cell office:value-type="float" office:value="0" table:formula="of:=IF([.D57]=1;[.M56]+1;0)" table:style-name="ce1">
            <text:p>0</text:p>
          </table:table-cell>
          <table:table-cell office:value-type="float" office:value="0" table:formula="of:=IF([.E57]=1;[.N56]+1;0)" table:style-name="ce1">
            <text:p>0</text:p>
          </table:table-cell>
          <table:table-cell office:value-type="float" office:value="0" table:formula="of:=IF([.F57]=1;[.O56]+1;0)" table:style-name="ce1">
            <text:p>0</text:p>
          </table:table-cell>
          <table:table-cell office:value-type="float" office:value="0" table:formula="of:=IF([.G57]=1;[.P56]+1;0)" table:style-name="ce1">
            <text:p>0</text:p>
          </table:table-cell>
          <table:table-cell office:value-type="float" office:value="0" table:formula="of:=IF([.H57]=1;[.Q56]+1;0)" table:style-name="ce1">
            <text:p>0</text:p>
          </table:table-cell>
          <table:table-cell office:value-type="float" office:value="0" table:formula="of:=IF([.I57]=1;[.R5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4T00:00:00" table:formula="of:=[.A57]+1" table:style-name="ce10">
            <text:p>Tue, 24 Feb 2026</text:p>
          </table:table-cell>
          <table:table-cell office:value-type="string" office:string-value="Tue" table:formula="of:=TEXT([.A58];&quot;ddd&quot;)" table:style-name="ce5">
            <text:p>Tue</text:p>
          </table:table-cell>
          <table:table-cell office:value-type="string" office:string-value="Feb" table:formula="of:=TEXT([.A58];&quot;mmm&quot;)" table:style-name="ce5">
            <text:p>Feb</text:p>
          </table:table-cell>
          <table:table-cell office:value-type="float" office:value="0" table:formula="of:=IF(INDEX([Tracker.$A$1:.$AG$120];6+9*(MONTH([.$A58])-1)+(COLUMN()-4);DAY([.$A58])+2)&lt;&gt;&quot;&quot;;1;0)" table:style-name="ce92"/>
          <table:table-cell office:value-type="float" office:value="0" table:formula="of:=IF(INDEX([Tracker.$A$1:.$AG$120];6+9*(MONTH([.$A58])-1)+(COLUMN()-4);DAY([.$A58])+2)&lt;&gt;&quot;&quot;;1;0)" table:style-name="ce92"/>
          <table:table-cell office:value-type="float" office:value="0" table:formula="of:=IF(INDEX([Tracker.$A$1:.$AG$120];6+9*(MONTH([.$A58])-1)+(COLUMN()-4);DAY([.$A58])+2)&lt;&gt;&quot;&quot;;1;0)" table:style-name="ce92"/>
          <table:table-cell office:value-type="float" office:value="0" table:formula="of:=IF(INDEX([Tracker.$A$1:.$AG$120];6+9*(MONTH([.$A58])-1)+(COLUMN()-4);DAY([.$A58])+2)&lt;&gt;&quot;&quot;;1;0)" table:style-name="ce92"/>
          <table:table-cell office:value-type="float" office:value="0" table:formula="of:=IF(INDEX([Tracker.$A$1:.$AG$120];6+9*(MONTH([.$A58])-1)+(COLUMN()-4);DAY([.$A58])+2)&lt;&gt;&quot;&quot;;1;0)" table:style-name="ce92"/>
          <table:table-cell office:value-type="float" office:value="0" table:formula="of:=IF(INDEX([Tracker.$A$1:.$AG$120];6+9*(MONTH([.$A58])-1)+(COLUMN()-4);DAY([.$A58])+2)&lt;&gt;&quot;&quot;;1;0)" table:style-name="ce92"/>
          <table:table-cell office:value-type="float" office:value="0" table:formula="of:=SUM([.D58:.I58])" table:style-name="ce6"/>
          <table:table-cell office:value-type="percentage" office:value="0" table:formula="of:=[.J58]/6" table:style-name="ce8">
            <text:p>0%</text:p>
          </table:table-cell>
          <table:table-cell table:style-name="ce1"/>
          <table:table-cell office:value-type="float" office:value="0" table:formula="of:=IF([.D58]=1;[.M57]+1;0)" table:style-name="ce1">
            <text:p>0</text:p>
          </table:table-cell>
          <table:table-cell office:value-type="float" office:value="0" table:formula="of:=IF([.E58]=1;[.N57]+1;0)" table:style-name="ce1">
            <text:p>0</text:p>
          </table:table-cell>
          <table:table-cell office:value-type="float" office:value="0" table:formula="of:=IF([.F58]=1;[.O57]+1;0)" table:style-name="ce1">
            <text:p>0</text:p>
          </table:table-cell>
          <table:table-cell office:value-type="float" office:value="0" table:formula="of:=IF([.G58]=1;[.P57]+1;0)" table:style-name="ce1">
            <text:p>0</text:p>
          </table:table-cell>
          <table:table-cell office:value-type="float" office:value="0" table:formula="of:=IF([.H58]=1;[.Q57]+1;0)" table:style-name="ce1">
            <text:p>0</text:p>
          </table:table-cell>
          <table:table-cell office:value-type="float" office:value="0" table:formula="of:=IF([.I58]=1;[.R5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5T00:00:00" table:formula="of:=[.A58]+1" table:style-name="ce10">
            <text:p>Wed, 25 Feb 2026</text:p>
          </table:table-cell>
          <table:table-cell office:value-type="string" office:string-value="Wed" table:formula="of:=TEXT([.A59];&quot;ddd&quot;)" table:style-name="ce5">
            <text:p>Wed</text:p>
          </table:table-cell>
          <table:table-cell office:value-type="string" office:string-value="Feb" table:formula="of:=TEXT([.A59];&quot;mmm&quot;)" table:style-name="ce5">
            <text:p>Feb</text:p>
          </table:table-cell>
          <table:table-cell office:value-type="float" office:value="0" table:formula="of:=IF(INDEX([Tracker.$A$1:.$AG$120];6+9*(MONTH([.$A59])-1)+(COLUMN()-4);DAY([.$A59])+2)&lt;&gt;&quot;&quot;;1;0)" table:style-name="ce92"/>
          <table:table-cell office:value-type="float" office:value="0" table:formula="of:=IF(INDEX([Tracker.$A$1:.$AG$120];6+9*(MONTH([.$A59])-1)+(COLUMN()-4);DAY([.$A59])+2)&lt;&gt;&quot;&quot;;1;0)" table:style-name="ce92"/>
          <table:table-cell office:value-type="float" office:value="0" table:formula="of:=IF(INDEX([Tracker.$A$1:.$AG$120];6+9*(MONTH([.$A59])-1)+(COLUMN()-4);DAY([.$A59])+2)&lt;&gt;&quot;&quot;;1;0)" table:style-name="ce92"/>
          <table:table-cell office:value-type="float" office:value="0" table:formula="of:=IF(INDEX([Tracker.$A$1:.$AG$120];6+9*(MONTH([.$A59])-1)+(COLUMN()-4);DAY([.$A59])+2)&lt;&gt;&quot;&quot;;1;0)" table:style-name="ce92"/>
          <table:table-cell office:value-type="float" office:value="0" table:formula="of:=IF(INDEX([Tracker.$A$1:.$AG$120];6+9*(MONTH([.$A59])-1)+(COLUMN()-4);DAY([.$A59])+2)&lt;&gt;&quot;&quot;;1;0)" table:style-name="ce92"/>
          <table:table-cell office:value-type="float" office:value="0" table:formula="of:=IF(INDEX([Tracker.$A$1:.$AG$120];6+9*(MONTH([.$A59])-1)+(COLUMN()-4);DAY([.$A59])+2)&lt;&gt;&quot;&quot;;1;0)" table:style-name="ce92"/>
          <table:table-cell office:value-type="float" office:value="0" table:formula="of:=SUM([.D59:.I59])" table:style-name="ce6"/>
          <table:table-cell office:value-type="percentage" office:value="0" table:formula="of:=[.J59]/6" table:style-name="ce8">
            <text:p>0%</text:p>
          </table:table-cell>
          <table:table-cell table:style-name="ce1"/>
          <table:table-cell office:value-type="float" office:value="0" table:formula="of:=IF([.D59]=1;[.M58]+1;0)" table:style-name="ce1">
            <text:p>0</text:p>
          </table:table-cell>
          <table:table-cell office:value-type="float" office:value="0" table:formula="of:=IF([.E59]=1;[.N58]+1;0)" table:style-name="ce1">
            <text:p>0</text:p>
          </table:table-cell>
          <table:table-cell office:value-type="float" office:value="0" table:formula="of:=IF([.F59]=1;[.O58]+1;0)" table:style-name="ce1">
            <text:p>0</text:p>
          </table:table-cell>
          <table:table-cell office:value-type="float" office:value="0" table:formula="of:=IF([.G59]=1;[.P58]+1;0)" table:style-name="ce1">
            <text:p>0</text:p>
          </table:table-cell>
          <table:table-cell office:value-type="float" office:value="0" table:formula="of:=IF([.H59]=1;[.Q58]+1;0)" table:style-name="ce1">
            <text:p>0</text:p>
          </table:table-cell>
          <table:table-cell office:value-type="float" office:value="0" table:formula="of:=IF([.I59]=1;[.R5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6T00:00:00" table:formula="of:=[.A59]+1" table:style-name="ce10">
            <text:p>Thu, 26 Feb 2026</text:p>
          </table:table-cell>
          <table:table-cell office:value-type="string" office:string-value="Thu" table:formula="of:=TEXT([.A60];&quot;ddd&quot;)" table:style-name="ce5">
            <text:p>Thu</text:p>
          </table:table-cell>
          <table:table-cell office:value-type="string" office:string-value="Feb" table:formula="of:=TEXT([.A60];&quot;mmm&quot;)" table:style-name="ce5">
            <text:p>Feb</text:p>
          </table:table-cell>
          <table:table-cell office:value-type="float" office:value="0" table:formula="of:=IF(INDEX([Tracker.$A$1:.$AG$120];6+9*(MONTH([.$A60])-1)+(COLUMN()-4);DAY([.$A60])+2)&lt;&gt;&quot;&quot;;1;0)" table:style-name="ce92"/>
          <table:table-cell office:value-type="float" office:value="0" table:formula="of:=IF(INDEX([Tracker.$A$1:.$AG$120];6+9*(MONTH([.$A60])-1)+(COLUMN()-4);DAY([.$A60])+2)&lt;&gt;&quot;&quot;;1;0)" table:style-name="ce92"/>
          <table:table-cell office:value-type="float" office:value="0" table:formula="of:=IF(INDEX([Tracker.$A$1:.$AG$120];6+9*(MONTH([.$A60])-1)+(COLUMN()-4);DAY([.$A60])+2)&lt;&gt;&quot;&quot;;1;0)" table:style-name="ce92"/>
          <table:table-cell office:value-type="float" office:value="0" table:formula="of:=IF(INDEX([Tracker.$A$1:.$AG$120];6+9*(MONTH([.$A60])-1)+(COLUMN()-4);DAY([.$A60])+2)&lt;&gt;&quot;&quot;;1;0)" table:style-name="ce92"/>
          <table:table-cell office:value-type="float" office:value="0" table:formula="of:=IF(INDEX([Tracker.$A$1:.$AG$120];6+9*(MONTH([.$A60])-1)+(COLUMN()-4);DAY([.$A60])+2)&lt;&gt;&quot;&quot;;1;0)" table:style-name="ce92"/>
          <table:table-cell office:value-type="float" office:value="0" table:formula="of:=IF(INDEX([Tracker.$A$1:.$AG$120];6+9*(MONTH([.$A60])-1)+(COLUMN()-4);DAY([.$A60])+2)&lt;&gt;&quot;&quot;;1;0)" table:style-name="ce92"/>
          <table:table-cell office:value-type="float" office:value="0" table:formula="of:=SUM([.D60:.I60])" table:style-name="ce6"/>
          <table:table-cell office:value-type="percentage" office:value="0" table:formula="of:=[.J60]/6" table:style-name="ce8">
            <text:p>0%</text:p>
          </table:table-cell>
          <table:table-cell table:style-name="ce1"/>
          <table:table-cell office:value-type="float" office:value="0" table:formula="of:=IF([.D60]=1;[.M59]+1;0)" table:style-name="ce1">
            <text:p>0</text:p>
          </table:table-cell>
          <table:table-cell office:value-type="float" office:value="0" table:formula="of:=IF([.E60]=1;[.N59]+1;0)" table:style-name="ce1">
            <text:p>0</text:p>
          </table:table-cell>
          <table:table-cell office:value-type="float" office:value="0" table:formula="of:=IF([.F60]=1;[.O59]+1;0)" table:style-name="ce1">
            <text:p>0</text:p>
          </table:table-cell>
          <table:table-cell office:value-type="float" office:value="0" table:formula="of:=IF([.G60]=1;[.P59]+1;0)" table:style-name="ce1">
            <text:p>0</text:p>
          </table:table-cell>
          <table:table-cell office:value-type="float" office:value="0" table:formula="of:=IF([.H60]=1;[.Q59]+1;0)" table:style-name="ce1">
            <text:p>0</text:p>
          </table:table-cell>
          <table:table-cell office:value-type="float" office:value="0" table:formula="of:=IF([.I60]=1;[.R5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7T00:00:00" table:formula="of:=[.A60]+1" table:style-name="ce10">
            <text:p>Fri, 27 Feb 2026</text:p>
          </table:table-cell>
          <table:table-cell office:value-type="string" office:string-value="Fri" table:formula="of:=TEXT([.A61];&quot;ddd&quot;)" table:style-name="ce5">
            <text:p>Fri</text:p>
          </table:table-cell>
          <table:table-cell office:value-type="string" office:string-value="Feb" table:formula="of:=TEXT([.A61];&quot;mmm&quot;)" table:style-name="ce5">
            <text:p>Feb</text:p>
          </table:table-cell>
          <table:table-cell office:value-type="float" office:value="0" table:formula="of:=IF(INDEX([Tracker.$A$1:.$AG$120];6+9*(MONTH([.$A61])-1)+(COLUMN()-4);DAY([.$A61])+2)&lt;&gt;&quot;&quot;;1;0)" table:style-name="ce92"/>
          <table:table-cell office:value-type="float" office:value="0" table:formula="of:=IF(INDEX([Tracker.$A$1:.$AG$120];6+9*(MONTH([.$A61])-1)+(COLUMN()-4);DAY([.$A61])+2)&lt;&gt;&quot;&quot;;1;0)" table:style-name="ce92"/>
          <table:table-cell office:value-type="float" office:value="0" table:formula="of:=IF(INDEX([Tracker.$A$1:.$AG$120];6+9*(MONTH([.$A61])-1)+(COLUMN()-4);DAY([.$A61])+2)&lt;&gt;&quot;&quot;;1;0)" table:style-name="ce92"/>
          <table:table-cell office:value-type="float" office:value="0" table:formula="of:=IF(INDEX([Tracker.$A$1:.$AG$120];6+9*(MONTH([.$A61])-1)+(COLUMN()-4);DAY([.$A61])+2)&lt;&gt;&quot;&quot;;1;0)" table:style-name="ce92"/>
          <table:table-cell office:value-type="float" office:value="0" table:formula="of:=IF(INDEX([Tracker.$A$1:.$AG$120];6+9*(MONTH([.$A61])-1)+(COLUMN()-4);DAY([.$A61])+2)&lt;&gt;&quot;&quot;;1;0)" table:style-name="ce92"/>
          <table:table-cell office:value-type="float" office:value="0" table:formula="of:=IF(INDEX([Tracker.$A$1:.$AG$120];6+9*(MONTH([.$A61])-1)+(COLUMN()-4);DAY([.$A61])+2)&lt;&gt;&quot;&quot;;1;0)" table:style-name="ce92"/>
          <table:table-cell office:value-type="float" office:value="0" table:formula="of:=SUM([.D61:.I61])" table:style-name="ce6"/>
          <table:table-cell office:value-type="percentage" office:value="0" table:formula="of:=[.J61]/6" table:style-name="ce8">
            <text:p>0%</text:p>
          </table:table-cell>
          <table:table-cell table:style-name="ce1"/>
          <table:table-cell office:value-type="float" office:value="0" table:formula="of:=IF([.D61]=1;[.M60]+1;0)" table:style-name="ce1">
            <text:p>0</text:p>
          </table:table-cell>
          <table:table-cell office:value-type="float" office:value="0" table:formula="of:=IF([.E61]=1;[.N60]+1;0)" table:style-name="ce1">
            <text:p>0</text:p>
          </table:table-cell>
          <table:table-cell office:value-type="float" office:value="0" table:formula="of:=IF([.F61]=1;[.O60]+1;0)" table:style-name="ce1">
            <text:p>0</text:p>
          </table:table-cell>
          <table:table-cell office:value-type="float" office:value="0" table:formula="of:=IF([.G61]=1;[.P60]+1;0)" table:style-name="ce1">
            <text:p>0</text:p>
          </table:table-cell>
          <table:table-cell office:value-type="float" office:value="0" table:formula="of:=IF([.H61]=1;[.Q60]+1;0)" table:style-name="ce1">
            <text:p>0</text:p>
          </table:table-cell>
          <table:table-cell office:value-type="float" office:value="0" table:formula="of:=IF([.I61]=1;[.R6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2-28T00:00:00" table:formula="of:=[.A61]+1" table:style-name="ce10">
            <text:p>Sat, 28 Feb 2026</text:p>
          </table:table-cell>
          <table:table-cell office:value-type="string" office:string-value="Sat" table:formula="of:=TEXT([.A62];&quot;ddd&quot;)" table:style-name="ce5">
            <text:p>Sat</text:p>
          </table:table-cell>
          <table:table-cell office:value-type="string" office:string-value="Feb" table:formula="of:=TEXT([.A62];&quot;mmm&quot;)" table:style-name="ce5">
            <text:p>Feb</text:p>
          </table:table-cell>
          <table:table-cell office:value-type="float" office:value="0" table:formula="of:=IF(INDEX([Tracker.$A$1:.$AG$120];6+9*(MONTH([.$A62])-1)+(COLUMN()-4);DAY([.$A62])+2)&lt;&gt;&quot;&quot;;1;0)" table:style-name="ce92"/>
          <table:table-cell office:value-type="float" office:value="0" table:formula="of:=IF(INDEX([Tracker.$A$1:.$AG$120];6+9*(MONTH([.$A62])-1)+(COLUMN()-4);DAY([.$A62])+2)&lt;&gt;&quot;&quot;;1;0)" table:style-name="ce92"/>
          <table:table-cell office:value-type="float" office:value="0" table:formula="of:=IF(INDEX([Tracker.$A$1:.$AG$120];6+9*(MONTH([.$A62])-1)+(COLUMN()-4);DAY([.$A62])+2)&lt;&gt;&quot;&quot;;1;0)" table:style-name="ce92"/>
          <table:table-cell office:value-type="float" office:value="0" table:formula="of:=IF(INDEX([Tracker.$A$1:.$AG$120];6+9*(MONTH([.$A62])-1)+(COLUMN()-4);DAY([.$A62])+2)&lt;&gt;&quot;&quot;;1;0)" table:style-name="ce92"/>
          <table:table-cell office:value-type="float" office:value="0" table:formula="of:=IF(INDEX([Tracker.$A$1:.$AG$120];6+9*(MONTH([.$A62])-1)+(COLUMN()-4);DAY([.$A62])+2)&lt;&gt;&quot;&quot;;1;0)" table:style-name="ce92"/>
          <table:table-cell office:value-type="float" office:value="0" table:formula="of:=IF(INDEX([Tracker.$A$1:.$AG$120];6+9*(MONTH([.$A62])-1)+(COLUMN()-4);DAY([.$A62])+2)&lt;&gt;&quot;&quot;;1;0)" table:style-name="ce92"/>
          <table:table-cell office:value-type="float" office:value="0" table:formula="of:=SUM([.D62:.I62])" table:style-name="ce6"/>
          <table:table-cell office:value-type="percentage" office:value="0" table:formula="of:=[.J62]/6" table:style-name="ce8">
            <text:p>0%</text:p>
          </table:table-cell>
          <table:table-cell table:style-name="ce1"/>
          <table:table-cell office:value-type="float" office:value="0" table:formula="of:=IF([.D62]=1;[.M61]+1;0)" table:style-name="ce1">
            <text:p>0</text:p>
          </table:table-cell>
          <table:table-cell office:value-type="float" office:value="0" table:formula="of:=IF([.E62]=1;[.N61]+1;0)" table:style-name="ce1">
            <text:p>0</text:p>
          </table:table-cell>
          <table:table-cell office:value-type="float" office:value="0" table:formula="of:=IF([.F62]=1;[.O61]+1;0)" table:style-name="ce1">
            <text:p>0</text:p>
          </table:table-cell>
          <table:table-cell office:value-type="float" office:value="0" table:formula="of:=IF([.G62]=1;[.P61]+1;0)" table:style-name="ce1">
            <text:p>0</text:p>
          </table:table-cell>
          <table:table-cell office:value-type="float" office:value="0" table:formula="of:=IF([.H62]=1;[.Q61]+1;0)" table:style-name="ce1">
            <text:p>0</text:p>
          </table:table-cell>
          <table:table-cell office:value-type="float" office:value="0" table:formula="of:=IF([.I62]=1;[.R6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1T00:00:00" table:formula="of:=[.A62]+1" table:style-name="ce10">
            <text:p>Sun, 01 Mar 2026</text:p>
          </table:table-cell>
          <table:table-cell office:value-type="string" office:string-value="Sun" table:formula="of:=TEXT([.A63];&quot;ddd&quot;)" table:style-name="ce5">
            <text:p>Sun</text:p>
          </table:table-cell>
          <table:table-cell office:value-type="string" office:string-value="Mar" table:formula="of:=TEXT([.A63];&quot;mmm&quot;)" table:style-name="ce5">
            <text:p>Mar</text:p>
          </table:table-cell>
          <table:table-cell office:value-type="float" office:value="0" table:formula="of:=IF(INDEX([Tracker.$A$1:.$AG$120];6+9*(MONTH([.$A63])-1)+(COLUMN()-4);DAY([.$A63])+2)&lt;&gt;&quot;&quot;;1;0)" table:style-name="ce92"/>
          <table:table-cell office:value-type="float" office:value="0" table:formula="of:=IF(INDEX([Tracker.$A$1:.$AG$120];6+9*(MONTH([.$A63])-1)+(COLUMN()-4);DAY([.$A63])+2)&lt;&gt;&quot;&quot;;1;0)" table:style-name="ce92"/>
          <table:table-cell office:value-type="float" office:value="0" table:formula="of:=IF(INDEX([Tracker.$A$1:.$AG$120];6+9*(MONTH([.$A63])-1)+(COLUMN()-4);DAY([.$A63])+2)&lt;&gt;&quot;&quot;;1;0)" table:style-name="ce92"/>
          <table:table-cell office:value-type="float" office:value="0" table:formula="of:=IF(INDEX([Tracker.$A$1:.$AG$120];6+9*(MONTH([.$A63])-1)+(COLUMN()-4);DAY([.$A63])+2)&lt;&gt;&quot;&quot;;1;0)" table:style-name="ce92"/>
          <table:table-cell office:value-type="float" office:value="0" table:formula="of:=IF(INDEX([Tracker.$A$1:.$AG$120];6+9*(MONTH([.$A63])-1)+(COLUMN()-4);DAY([.$A63])+2)&lt;&gt;&quot;&quot;;1;0)" table:style-name="ce92"/>
          <table:table-cell office:value-type="float" office:value="0" table:formula="of:=IF(INDEX([Tracker.$A$1:.$AG$120];6+9*(MONTH([.$A63])-1)+(COLUMN()-4);DAY([.$A63])+2)&lt;&gt;&quot;&quot;;1;0)" table:style-name="ce92"/>
          <table:table-cell office:value-type="float" office:value="0" table:formula="of:=SUM([.D63:.I63])" table:style-name="ce6"/>
          <table:table-cell office:value-type="percentage" office:value="0" table:formula="of:=[.J63]/6" table:style-name="ce8">
            <text:p>0%</text:p>
          </table:table-cell>
          <table:table-cell table:style-name="ce1"/>
          <table:table-cell office:value-type="float" office:value="0" table:formula="of:=IF([.D63]=1;[.M62]+1;0)" table:style-name="ce1">
            <text:p>0</text:p>
          </table:table-cell>
          <table:table-cell office:value-type="float" office:value="0" table:formula="of:=IF([.E63]=1;[.N62]+1;0)" table:style-name="ce1">
            <text:p>0</text:p>
          </table:table-cell>
          <table:table-cell office:value-type="float" office:value="0" table:formula="of:=IF([.F63]=1;[.O62]+1;0)" table:style-name="ce1">
            <text:p>0</text:p>
          </table:table-cell>
          <table:table-cell office:value-type="float" office:value="0" table:formula="of:=IF([.G63]=1;[.P62]+1;0)" table:style-name="ce1">
            <text:p>0</text:p>
          </table:table-cell>
          <table:table-cell office:value-type="float" office:value="0" table:formula="of:=IF([.H63]=1;[.Q62]+1;0)" table:style-name="ce1">
            <text:p>0</text:p>
          </table:table-cell>
          <table:table-cell office:value-type="float" office:value="0" table:formula="of:=IF([.I63]=1;[.R6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2T00:00:00" table:formula="of:=[.A63]+1" table:style-name="ce10">
            <text:p>Mon, 02 Mar 2026</text:p>
          </table:table-cell>
          <table:table-cell office:value-type="string" office:string-value="Mon" table:formula="of:=TEXT([.A64];&quot;ddd&quot;)" table:style-name="ce5">
            <text:p>Mon</text:p>
          </table:table-cell>
          <table:table-cell office:value-type="string" office:string-value="Mar" table:formula="of:=TEXT([.A64];&quot;mmm&quot;)" table:style-name="ce5">
            <text:p>Mar</text:p>
          </table:table-cell>
          <table:table-cell office:value-type="float" office:value="0" table:formula="of:=IF(INDEX([Tracker.$A$1:.$AG$120];6+9*(MONTH([.$A64])-1)+(COLUMN()-4);DAY([.$A64])+2)&lt;&gt;&quot;&quot;;1;0)" table:style-name="ce92"/>
          <table:table-cell office:value-type="float" office:value="0" table:formula="of:=IF(INDEX([Tracker.$A$1:.$AG$120];6+9*(MONTH([.$A64])-1)+(COLUMN()-4);DAY([.$A64])+2)&lt;&gt;&quot;&quot;;1;0)" table:style-name="ce92"/>
          <table:table-cell office:value-type="float" office:value="0" table:formula="of:=IF(INDEX([Tracker.$A$1:.$AG$120];6+9*(MONTH([.$A64])-1)+(COLUMN()-4);DAY([.$A64])+2)&lt;&gt;&quot;&quot;;1;0)" table:style-name="ce92"/>
          <table:table-cell office:value-type="float" office:value="0" table:formula="of:=IF(INDEX([Tracker.$A$1:.$AG$120];6+9*(MONTH([.$A64])-1)+(COLUMN()-4);DAY([.$A64])+2)&lt;&gt;&quot;&quot;;1;0)" table:style-name="ce92"/>
          <table:table-cell office:value-type="float" office:value="0" table:formula="of:=IF(INDEX([Tracker.$A$1:.$AG$120];6+9*(MONTH([.$A64])-1)+(COLUMN()-4);DAY([.$A64])+2)&lt;&gt;&quot;&quot;;1;0)" table:style-name="ce92"/>
          <table:table-cell office:value-type="float" office:value="0" table:formula="of:=IF(INDEX([Tracker.$A$1:.$AG$120];6+9*(MONTH([.$A64])-1)+(COLUMN()-4);DAY([.$A64])+2)&lt;&gt;&quot;&quot;;1;0)" table:style-name="ce92"/>
          <table:table-cell office:value-type="float" office:value="0" table:formula="of:=SUM([.D64:.I64])" table:style-name="ce6"/>
          <table:table-cell office:value-type="percentage" office:value="0" table:formula="of:=[.J64]/6" table:style-name="ce8">
            <text:p>0%</text:p>
          </table:table-cell>
          <table:table-cell table:style-name="ce1"/>
          <table:table-cell office:value-type="float" office:value="0" table:formula="of:=IF([.D64]=1;[.M63]+1;0)" table:style-name="ce1">
            <text:p>0</text:p>
          </table:table-cell>
          <table:table-cell office:value-type="float" office:value="0" table:formula="of:=IF([.E64]=1;[.N63]+1;0)" table:style-name="ce1">
            <text:p>0</text:p>
          </table:table-cell>
          <table:table-cell office:value-type="float" office:value="0" table:formula="of:=IF([.F64]=1;[.O63]+1;0)" table:style-name="ce1">
            <text:p>0</text:p>
          </table:table-cell>
          <table:table-cell office:value-type="float" office:value="0" table:formula="of:=IF([.G64]=1;[.P63]+1;0)" table:style-name="ce1">
            <text:p>0</text:p>
          </table:table-cell>
          <table:table-cell office:value-type="float" office:value="0" table:formula="of:=IF([.H64]=1;[.Q63]+1;0)" table:style-name="ce1">
            <text:p>0</text:p>
          </table:table-cell>
          <table:table-cell office:value-type="float" office:value="0" table:formula="of:=IF([.I64]=1;[.R6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3T00:00:00" table:formula="of:=[.A64]+1" table:style-name="ce10">
            <text:p>Tue, 03 Mar 2026</text:p>
          </table:table-cell>
          <table:table-cell office:value-type="string" office:string-value="Tue" table:formula="of:=TEXT([.A65];&quot;ddd&quot;)" table:style-name="ce5">
            <text:p>Tue</text:p>
          </table:table-cell>
          <table:table-cell office:value-type="string" office:string-value="Mar" table:formula="of:=TEXT([.A65];&quot;mmm&quot;)" table:style-name="ce5">
            <text:p>Mar</text:p>
          </table:table-cell>
          <table:table-cell office:value-type="float" office:value="0" table:formula="of:=IF(INDEX([Tracker.$A$1:.$AG$120];6+9*(MONTH([.$A65])-1)+(COLUMN()-4);DAY([.$A65])+2)&lt;&gt;&quot;&quot;;1;0)" table:style-name="ce92"/>
          <table:table-cell office:value-type="float" office:value="0" table:formula="of:=IF(INDEX([Tracker.$A$1:.$AG$120];6+9*(MONTH([.$A65])-1)+(COLUMN()-4);DAY([.$A65])+2)&lt;&gt;&quot;&quot;;1;0)" table:style-name="ce92"/>
          <table:table-cell office:value-type="float" office:value="0" table:formula="of:=IF(INDEX([Tracker.$A$1:.$AG$120];6+9*(MONTH([.$A65])-1)+(COLUMN()-4);DAY([.$A65])+2)&lt;&gt;&quot;&quot;;1;0)" table:style-name="ce92"/>
          <table:table-cell office:value-type="float" office:value="0" table:formula="of:=IF(INDEX([Tracker.$A$1:.$AG$120];6+9*(MONTH([.$A65])-1)+(COLUMN()-4);DAY([.$A65])+2)&lt;&gt;&quot;&quot;;1;0)" table:style-name="ce92"/>
          <table:table-cell office:value-type="float" office:value="0" table:formula="of:=IF(INDEX([Tracker.$A$1:.$AG$120];6+9*(MONTH([.$A65])-1)+(COLUMN()-4);DAY([.$A65])+2)&lt;&gt;&quot;&quot;;1;0)" table:style-name="ce92"/>
          <table:table-cell office:value-type="float" office:value="0" table:formula="of:=IF(INDEX([Tracker.$A$1:.$AG$120];6+9*(MONTH([.$A65])-1)+(COLUMN()-4);DAY([.$A65])+2)&lt;&gt;&quot;&quot;;1;0)" table:style-name="ce92"/>
          <table:table-cell office:value-type="float" office:value="0" table:formula="of:=SUM([.D65:.I65])" table:style-name="ce6"/>
          <table:table-cell office:value-type="percentage" office:value="0" table:formula="of:=[.J65]/6" table:style-name="ce8">
            <text:p>0%</text:p>
          </table:table-cell>
          <table:table-cell table:style-name="ce1"/>
          <table:table-cell office:value-type="float" office:value="0" table:formula="of:=IF([.D65]=1;[.M64]+1;0)" table:style-name="ce1">
            <text:p>0</text:p>
          </table:table-cell>
          <table:table-cell office:value-type="float" office:value="0" table:formula="of:=IF([.E65]=1;[.N64]+1;0)" table:style-name="ce1">
            <text:p>0</text:p>
          </table:table-cell>
          <table:table-cell office:value-type="float" office:value="0" table:formula="of:=IF([.F65]=1;[.O64]+1;0)" table:style-name="ce1">
            <text:p>0</text:p>
          </table:table-cell>
          <table:table-cell office:value-type="float" office:value="0" table:formula="of:=IF([.G65]=1;[.P64]+1;0)" table:style-name="ce1">
            <text:p>0</text:p>
          </table:table-cell>
          <table:table-cell office:value-type="float" office:value="0" table:formula="of:=IF([.H65]=1;[.Q64]+1;0)" table:style-name="ce1">
            <text:p>0</text:p>
          </table:table-cell>
          <table:table-cell office:value-type="float" office:value="0" table:formula="of:=IF([.I65]=1;[.R6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4T00:00:00" table:formula="of:=[.A65]+1" table:style-name="ce10">
            <text:p>Wed, 04 Mar 2026</text:p>
          </table:table-cell>
          <table:table-cell office:value-type="string" office:string-value="Wed" table:formula="of:=TEXT([.A66];&quot;ddd&quot;)" table:style-name="ce5">
            <text:p>Wed</text:p>
          </table:table-cell>
          <table:table-cell office:value-type="string" office:string-value="Mar" table:formula="of:=TEXT([.A66];&quot;mmm&quot;)" table:style-name="ce5">
            <text:p>Mar</text:p>
          </table:table-cell>
          <table:table-cell office:value-type="float" office:value="0" table:formula="of:=IF(INDEX([Tracker.$A$1:.$AG$120];6+9*(MONTH([.$A66])-1)+(COLUMN()-4);DAY([.$A66])+2)&lt;&gt;&quot;&quot;;1;0)" table:style-name="ce92"/>
          <table:table-cell office:value-type="float" office:value="0" table:formula="of:=IF(INDEX([Tracker.$A$1:.$AG$120];6+9*(MONTH([.$A66])-1)+(COLUMN()-4);DAY([.$A66])+2)&lt;&gt;&quot;&quot;;1;0)" table:style-name="ce92"/>
          <table:table-cell office:value-type="float" office:value="0" table:formula="of:=IF(INDEX([Tracker.$A$1:.$AG$120];6+9*(MONTH([.$A66])-1)+(COLUMN()-4);DAY([.$A66])+2)&lt;&gt;&quot;&quot;;1;0)" table:style-name="ce92"/>
          <table:table-cell office:value-type="float" office:value="0" table:formula="of:=IF(INDEX([Tracker.$A$1:.$AG$120];6+9*(MONTH([.$A66])-1)+(COLUMN()-4);DAY([.$A66])+2)&lt;&gt;&quot;&quot;;1;0)" table:style-name="ce92"/>
          <table:table-cell office:value-type="float" office:value="0" table:formula="of:=IF(INDEX([Tracker.$A$1:.$AG$120];6+9*(MONTH([.$A66])-1)+(COLUMN()-4);DAY([.$A66])+2)&lt;&gt;&quot;&quot;;1;0)" table:style-name="ce92"/>
          <table:table-cell office:value-type="float" office:value="0" table:formula="of:=IF(INDEX([Tracker.$A$1:.$AG$120];6+9*(MONTH([.$A66])-1)+(COLUMN()-4);DAY([.$A66])+2)&lt;&gt;&quot;&quot;;1;0)" table:style-name="ce92"/>
          <table:table-cell office:value-type="float" office:value="0" table:formula="of:=SUM([.D66:.I66])" table:style-name="ce6"/>
          <table:table-cell office:value-type="percentage" office:value="0" table:formula="of:=[.J66]/6" table:style-name="ce8">
            <text:p>0%</text:p>
          </table:table-cell>
          <table:table-cell table:style-name="ce1"/>
          <table:table-cell office:value-type="float" office:value="0" table:formula="of:=IF([.D66]=1;[.M65]+1;0)" table:style-name="ce1">
            <text:p>0</text:p>
          </table:table-cell>
          <table:table-cell office:value-type="float" office:value="0" table:formula="of:=IF([.E66]=1;[.N65]+1;0)" table:style-name="ce1">
            <text:p>0</text:p>
          </table:table-cell>
          <table:table-cell office:value-type="float" office:value="0" table:formula="of:=IF([.F66]=1;[.O65]+1;0)" table:style-name="ce1">
            <text:p>0</text:p>
          </table:table-cell>
          <table:table-cell office:value-type="float" office:value="0" table:formula="of:=IF([.G66]=1;[.P65]+1;0)" table:style-name="ce1">
            <text:p>0</text:p>
          </table:table-cell>
          <table:table-cell office:value-type="float" office:value="0" table:formula="of:=IF([.H66]=1;[.Q65]+1;0)" table:style-name="ce1">
            <text:p>0</text:p>
          </table:table-cell>
          <table:table-cell office:value-type="float" office:value="0" table:formula="of:=IF([.I66]=1;[.R6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5T00:00:00" table:formula="of:=[.A66]+1" table:style-name="ce10">
            <text:p>Thu, 05 Mar 2026</text:p>
          </table:table-cell>
          <table:table-cell office:value-type="string" office:string-value="Thu" table:formula="of:=TEXT([.A67];&quot;ddd&quot;)" table:style-name="ce5">
            <text:p>Thu</text:p>
          </table:table-cell>
          <table:table-cell office:value-type="string" office:string-value="Mar" table:formula="of:=TEXT([.A67];&quot;mmm&quot;)" table:style-name="ce5">
            <text:p>Mar</text:p>
          </table:table-cell>
          <table:table-cell office:value-type="float" office:value="0" table:formula="of:=IF(INDEX([Tracker.$A$1:.$AG$120];6+9*(MONTH([.$A67])-1)+(COLUMN()-4);DAY([.$A67])+2)&lt;&gt;&quot;&quot;;1;0)" table:style-name="ce92"/>
          <table:table-cell office:value-type="float" office:value="0" table:formula="of:=IF(INDEX([Tracker.$A$1:.$AG$120];6+9*(MONTH([.$A67])-1)+(COLUMN()-4);DAY([.$A67])+2)&lt;&gt;&quot;&quot;;1;0)" table:style-name="ce92"/>
          <table:table-cell office:value-type="float" office:value="0" table:formula="of:=IF(INDEX([Tracker.$A$1:.$AG$120];6+9*(MONTH([.$A67])-1)+(COLUMN()-4);DAY([.$A67])+2)&lt;&gt;&quot;&quot;;1;0)" table:style-name="ce92"/>
          <table:table-cell office:value-type="float" office:value="0" table:formula="of:=IF(INDEX([Tracker.$A$1:.$AG$120];6+9*(MONTH([.$A67])-1)+(COLUMN()-4);DAY([.$A67])+2)&lt;&gt;&quot;&quot;;1;0)" table:style-name="ce92"/>
          <table:table-cell office:value-type="float" office:value="0" table:formula="of:=IF(INDEX([Tracker.$A$1:.$AG$120];6+9*(MONTH([.$A67])-1)+(COLUMN()-4);DAY([.$A67])+2)&lt;&gt;&quot;&quot;;1;0)" table:style-name="ce92"/>
          <table:table-cell office:value-type="float" office:value="0" table:formula="of:=IF(INDEX([Tracker.$A$1:.$AG$120];6+9*(MONTH([.$A67])-1)+(COLUMN()-4);DAY([.$A67])+2)&lt;&gt;&quot;&quot;;1;0)" table:style-name="ce92"/>
          <table:table-cell office:value-type="float" office:value="0" table:formula="of:=SUM([.D67:.I67])" table:style-name="ce6"/>
          <table:table-cell office:value-type="percentage" office:value="0" table:formula="of:=[.J67]/6" table:style-name="ce8">
            <text:p>0%</text:p>
          </table:table-cell>
          <table:table-cell table:style-name="ce1"/>
          <table:table-cell office:value-type="float" office:value="0" table:formula="of:=IF([.D67]=1;[.M66]+1;0)" table:style-name="ce1">
            <text:p>0</text:p>
          </table:table-cell>
          <table:table-cell office:value-type="float" office:value="0" table:formula="of:=IF([.E67]=1;[.N66]+1;0)" table:style-name="ce1">
            <text:p>0</text:p>
          </table:table-cell>
          <table:table-cell office:value-type="float" office:value="0" table:formula="of:=IF([.F67]=1;[.O66]+1;0)" table:style-name="ce1">
            <text:p>0</text:p>
          </table:table-cell>
          <table:table-cell office:value-type="float" office:value="0" table:formula="of:=IF([.G67]=1;[.P66]+1;0)" table:style-name="ce1">
            <text:p>0</text:p>
          </table:table-cell>
          <table:table-cell office:value-type="float" office:value="0" table:formula="of:=IF([.H67]=1;[.Q66]+1;0)" table:style-name="ce1">
            <text:p>0</text:p>
          </table:table-cell>
          <table:table-cell office:value-type="float" office:value="0" table:formula="of:=IF([.I67]=1;[.R6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6T00:00:00" table:formula="of:=[.A67]+1" table:style-name="ce10">
            <text:p>Fri, 06 Mar 2026</text:p>
          </table:table-cell>
          <table:table-cell office:value-type="string" office:string-value="Fri" table:formula="of:=TEXT([.A68];&quot;ddd&quot;)" table:style-name="ce5">
            <text:p>Fri</text:p>
          </table:table-cell>
          <table:table-cell office:value-type="string" office:string-value="Mar" table:formula="of:=TEXT([.A68];&quot;mmm&quot;)" table:style-name="ce5">
            <text:p>Mar</text:p>
          </table:table-cell>
          <table:table-cell office:value-type="float" office:value="0" table:formula="of:=IF(INDEX([Tracker.$A$1:.$AG$120];6+9*(MONTH([.$A68])-1)+(COLUMN()-4);DAY([.$A68])+2)&lt;&gt;&quot;&quot;;1;0)" table:style-name="ce92"/>
          <table:table-cell office:value-type="float" office:value="0" table:formula="of:=IF(INDEX([Tracker.$A$1:.$AG$120];6+9*(MONTH([.$A68])-1)+(COLUMN()-4);DAY([.$A68])+2)&lt;&gt;&quot;&quot;;1;0)" table:style-name="ce92"/>
          <table:table-cell office:value-type="float" office:value="0" table:formula="of:=IF(INDEX([Tracker.$A$1:.$AG$120];6+9*(MONTH([.$A68])-1)+(COLUMN()-4);DAY([.$A68])+2)&lt;&gt;&quot;&quot;;1;0)" table:style-name="ce92"/>
          <table:table-cell office:value-type="float" office:value="0" table:formula="of:=IF(INDEX([Tracker.$A$1:.$AG$120];6+9*(MONTH([.$A68])-1)+(COLUMN()-4);DAY([.$A68])+2)&lt;&gt;&quot;&quot;;1;0)" table:style-name="ce92"/>
          <table:table-cell office:value-type="float" office:value="0" table:formula="of:=IF(INDEX([Tracker.$A$1:.$AG$120];6+9*(MONTH([.$A68])-1)+(COLUMN()-4);DAY([.$A68])+2)&lt;&gt;&quot;&quot;;1;0)" table:style-name="ce92"/>
          <table:table-cell office:value-type="float" office:value="0" table:formula="of:=IF(INDEX([Tracker.$A$1:.$AG$120];6+9*(MONTH([.$A68])-1)+(COLUMN()-4);DAY([.$A68])+2)&lt;&gt;&quot;&quot;;1;0)" table:style-name="ce92"/>
          <table:table-cell office:value-type="float" office:value="0" table:formula="of:=SUM([.D68:.I68])" table:style-name="ce6"/>
          <table:table-cell office:value-type="percentage" office:value="0" table:formula="of:=[.J68]/6" table:style-name="ce8">
            <text:p>0%</text:p>
          </table:table-cell>
          <table:table-cell table:style-name="ce1"/>
          <table:table-cell office:value-type="float" office:value="0" table:formula="of:=IF([.D68]=1;[.M67]+1;0)" table:style-name="ce1">
            <text:p>0</text:p>
          </table:table-cell>
          <table:table-cell office:value-type="float" office:value="0" table:formula="of:=IF([.E68]=1;[.N67]+1;0)" table:style-name="ce1">
            <text:p>0</text:p>
          </table:table-cell>
          <table:table-cell office:value-type="float" office:value="0" table:formula="of:=IF([.F68]=1;[.O67]+1;0)" table:style-name="ce1">
            <text:p>0</text:p>
          </table:table-cell>
          <table:table-cell office:value-type="float" office:value="0" table:formula="of:=IF([.G68]=1;[.P67]+1;0)" table:style-name="ce1">
            <text:p>0</text:p>
          </table:table-cell>
          <table:table-cell office:value-type="float" office:value="0" table:formula="of:=IF([.H68]=1;[.Q67]+1;0)" table:style-name="ce1">
            <text:p>0</text:p>
          </table:table-cell>
          <table:table-cell office:value-type="float" office:value="0" table:formula="of:=IF([.I68]=1;[.R6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7T00:00:00" table:formula="of:=[.A68]+1" table:style-name="ce10">
            <text:p>Sat, 07 Mar 2026</text:p>
          </table:table-cell>
          <table:table-cell office:value-type="string" office:string-value="Sat" table:formula="of:=TEXT([.A69];&quot;ddd&quot;)" table:style-name="ce5">
            <text:p>Sat</text:p>
          </table:table-cell>
          <table:table-cell office:value-type="string" office:string-value="Mar" table:formula="of:=TEXT([.A69];&quot;mmm&quot;)" table:style-name="ce5">
            <text:p>Mar</text:p>
          </table:table-cell>
          <table:table-cell office:value-type="float" office:value="0" table:formula="of:=IF(INDEX([Tracker.$A$1:.$AG$120];6+9*(MONTH([.$A69])-1)+(COLUMN()-4);DAY([.$A69])+2)&lt;&gt;&quot;&quot;;1;0)" table:style-name="ce92"/>
          <table:table-cell office:value-type="float" office:value="0" table:formula="of:=IF(INDEX([Tracker.$A$1:.$AG$120];6+9*(MONTH([.$A69])-1)+(COLUMN()-4);DAY([.$A69])+2)&lt;&gt;&quot;&quot;;1;0)" table:style-name="ce92"/>
          <table:table-cell office:value-type="float" office:value="0" table:formula="of:=IF(INDEX([Tracker.$A$1:.$AG$120];6+9*(MONTH([.$A69])-1)+(COLUMN()-4);DAY([.$A69])+2)&lt;&gt;&quot;&quot;;1;0)" table:style-name="ce92"/>
          <table:table-cell office:value-type="float" office:value="0" table:formula="of:=IF(INDEX([Tracker.$A$1:.$AG$120];6+9*(MONTH([.$A69])-1)+(COLUMN()-4);DAY([.$A69])+2)&lt;&gt;&quot;&quot;;1;0)" table:style-name="ce92"/>
          <table:table-cell office:value-type="float" office:value="0" table:formula="of:=IF(INDEX([Tracker.$A$1:.$AG$120];6+9*(MONTH([.$A69])-1)+(COLUMN()-4);DAY([.$A69])+2)&lt;&gt;&quot;&quot;;1;0)" table:style-name="ce92"/>
          <table:table-cell office:value-type="float" office:value="0" table:formula="of:=IF(INDEX([Tracker.$A$1:.$AG$120];6+9*(MONTH([.$A69])-1)+(COLUMN()-4);DAY([.$A69])+2)&lt;&gt;&quot;&quot;;1;0)" table:style-name="ce92"/>
          <table:table-cell office:value-type="float" office:value="0" table:formula="of:=SUM([.D69:.I69])" table:style-name="ce6"/>
          <table:table-cell office:value-type="percentage" office:value="0" table:formula="of:=[.J69]/6" table:style-name="ce8">
            <text:p>0%</text:p>
          </table:table-cell>
          <table:table-cell table:style-name="ce1"/>
          <table:table-cell office:value-type="float" office:value="0" table:formula="of:=IF([.D69]=1;[.M68]+1;0)" table:style-name="ce1">
            <text:p>0</text:p>
          </table:table-cell>
          <table:table-cell office:value-type="float" office:value="0" table:formula="of:=IF([.E69]=1;[.N68]+1;0)" table:style-name="ce1">
            <text:p>0</text:p>
          </table:table-cell>
          <table:table-cell office:value-type="float" office:value="0" table:formula="of:=IF([.F69]=1;[.O68]+1;0)" table:style-name="ce1">
            <text:p>0</text:p>
          </table:table-cell>
          <table:table-cell office:value-type="float" office:value="0" table:formula="of:=IF([.G69]=1;[.P68]+1;0)" table:style-name="ce1">
            <text:p>0</text:p>
          </table:table-cell>
          <table:table-cell office:value-type="float" office:value="0" table:formula="of:=IF([.H69]=1;[.Q68]+1;0)" table:style-name="ce1">
            <text:p>0</text:p>
          </table:table-cell>
          <table:table-cell office:value-type="float" office:value="0" table:formula="of:=IF([.I69]=1;[.R6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8T00:00:00" table:formula="of:=[.A69]+1" table:style-name="ce10">
            <text:p>Sun, 08 Mar 2026</text:p>
          </table:table-cell>
          <table:table-cell office:value-type="string" office:string-value="Sun" table:formula="of:=TEXT([.A70];&quot;ddd&quot;)" table:style-name="ce5">
            <text:p>Sun</text:p>
          </table:table-cell>
          <table:table-cell office:value-type="string" office:string-value="Mar" table:formula="of:=TEXT([.A70];&quot;mmm&quot;)" table:style-name="ce5">
            <text:p>Mar</text:p>
          </table:table-cell>
          <table:table-cell office:value-type="float" office:value="0" table:formula="of:=IF(INDEX([Tracker.$A$1:.$AG$120];6+9*(MONTH([.$A70])-1)+(COLUMN()-4);DAY([.$A70])+2)&lt;&gt;&quot;&quot;;1;0)" table:style-name="ce92"/>
          <table:table-cell office:value-type="float" office:value="0" table:formula="of:=IF(INDEX([Tracker.$A$1:.$AG$120];6+9*(MONTH([.$A70])-1)+(COLUMN()-4);DAY([.$A70])+2)&lt;&gt;&quot;&quot;;1;0)" table:style-name="ce92"/>
          <table:table-cell office:value-type="float" office:value="0" table:formula="of:=IF(INDEX([Tracker.$A$1:.$AG$120];6+9*(MONTH([.$A70])-1)+(COLUMN()-4);DAY([.$A70])+2)&lt;&gt;&quot;&quot;;1;0)" table:style-name="ce92"/>
          <table:table-cell office:value-type="float" office:value="0" table:formula="of:=IF(INDEX([Tracker.$A$1:.$AG$120];6+9*(MONTH([.$A70])-1)+(COLUMN()-4);DAY([.$A70])+2)&lt;&gt;&quot;&quot;;1;0)" table:style-name="ce92"/>
          <table:table-cell office:value-type="float" office:value="0" table:formula="of:=IF(INDEX([Tracker.$A$1:.$AG$120];6+9*(MONTH([.$A70])-1)+(COLUMN()-4);DAY([.$A70])+2)&lt;&gt;&quot;&quot;;1;0)" table:style-name="ce92"/>
          <table:table-cell office:value-type="float" office:value="0" table:formula="of:=IF(INDEX([Tracker.$A$1:.$AG$120];6+9*(MONTH([.$A70])-1)+(COLUMN()-4);DAY([.$A70])+2)&lt;&gt;&quot;&quot;;1;0)" table:style-name="ce92"/>
          <table:table-cell office:value-type="float" office:value="0" table:formula="of:=SUM([.D70:.I70])" table:style-name="ce6"/>
          <table:table-cell office:value-type="percentage" office:value="0" table:formula="of:=[.J70]/6" table:style-name="ce8">
            <text:p>0%</text:p>
          </table:table-cell>
          <table:table-cell table:style-name="ce1"/>
          <table:table-cell office:value-type="float" office:value="0" table:formula="of:=IF([.D70]=1;[.M69]+1;0)" table:style-name="ce1">
            <text:p>0</text:p>
          </table:table-cell>
          <table:table-cell office:value-type="float" office:value="0" table:formula="of:=IF([.E70]=1;[.N69]+1;0)" table:style-name="ce1">
            <text:p>0</text:p>
          </table:table-cell>
          <table:table-cell office:value-type="float" office:value="0" table:formula="of:=IF([.F70]=1;[.O69]+1;0)" table:style-name="ce1">
            <text:p>0</text:p>
          </table:table-cell>
          <table:table-cell office:value-type="float" office:value="0" table:formula="of:=IF([.G70]=1;[.P69]+1;0)" table:style-name="ce1">
            <text:p>0</text:p>
          </table:table-cell>
          <table:table-cell office:value-type="float" office:value="0" table:formula="of:=IF([.H70]=1;[.Q69]+1;0)" table:style-name="ce1">
            <text:p>0</text:p>
          </table:table-cell>
          <table:table-cell office:value-type="float" office:value="0" table:formula="of:=IF([.I70]=1;[.R6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09T00:00:00" table:formula="of:=[.A70]+1" table:style-name="ce10">
            <text:p>Mon, 09 Mar 2026</text:p>
          </table:table-cell>
          <table:table-cell office:value-type="string" office:string-value="Mon" table:formula="of:=TEXT([.A71];&quot;ddd&quot;)" table:style-name="ce5">
            <text:p>Mon</text:p>
          </table:table-cell>
          <table:table-cell office:value-type="string" office:string-value="Mar" table:formula="of:=TEXT([.A71];&quot;mmm&quot;)" table:style-name="ce5">
            <text:p>Mar</text:p>
          </table:table-cell>
          <table:table-cell office:value-type="float" office:value="0" table:formula="of:=IF(INDEX([Tracker.$A$1:.$AG$120];6+9*(MONTH([.$A71])-1)+(COLUMN()-4);DAY([.$A71])+2)&lt;&gt;&quot;&quot;;1;0)" table:style-name="ce92"/>
          <table:table-cell office:value-type="float" office:value="0" table:formula="of:=IF(INDEX([Tracker.$A$1:.$AG$120];6+9*(MONTH([.$A71])-1)+(COLUMN()-4);DAY([.$A71])+2)&lt;&gt;&quot;&quot;;1;0)" table:style-name="ce92"/>
          <table:table-cell office:value-type="float" office:value="0" table:formula="of:=IF(INDEX([Tracker.$A$1:.$AG$120];6+9*(MONTH([.$A71])-1)+(COLUMN()-4);DAY([.$A71])+2)&lt;&gt;&quot;&quot;;1;0)" table:style-name="ce92"/>
          <table:table-cell office:value-type="float" office:value="0" table:formula="of:=IF(INDEX([Tracker.$A$1:.$AG$120];6+9*(MONTH([.$A71])-1)+(COLUMN()-4);DAY([.$A71])+2)&lt;&gt;&quot;&quot;;1;0)" table:style-name="ce92"/>
          <table:table-cell office:value-type="float" office:value="0" table:formula="of:=IF(INDEX([Tracker.$A$1:.$AG$120];6+9*(MONTH([.$A71])-1)+(COLUMN()-4);DAY([.$A71])+2)&lt;&gt;&quot;&quot;;1;0)" table:style-name="ce92"/>
          <table:table-cell office:value-type="float" office:value="0" table:formula="of:=IF(INDEX([Tracker.$A$1:.$AG$120];6+9*(MONTH([.$A71])-1)+(COLUMN()-4);DAY([.$A71])+2)&lt;&gt;&quot;&quot;;1;0)" table:style-name="ce92"/>
          <table:table-cell office:value-type="float" office:value="0" table:formula="of:=SUM([.D71:.I71])" table:style-name="ce6"/>
          <table:table-cell office:value-type="percentage" office:value="0" table:formula="of:=[.J71]/6" table:style-name="ce8">
            <text:p>0%</text:p>
          </table:table-cell>
          <table:table-cell table:style-name="ce1"/>
          <table:table-cell office:value-type="float" office:value="0" table:formula="of:=IF([.D71]=1;[.M70]+1;0)" table:style-name="ce1">
            <text:p>0</text:p>
          </table:table-cell>
          <table:table-cell office:value-type="float" office:value="0" table:formula="of:=IF([.E71]=1;[.N70]+1;0)" table:style-name="ce1">
            <text:p>0</text:p>
          </table:table-cell>
          <table:table-cell office:value-type="float" office:value="0" table:formula="of:=IF([.F71]=1;[.O70]+1;0)" table:style-name="ce1">
            <text:p>0</text:p>
          </table:table-cell>
          <table:table-cell office:value-type="float" office:value="0" table:formula="of:=IF([.G71]=1;[.P70]+1;0)" table:style-name="ce1">
            <text:p>0</text:p>
          </table:table-cell>
          <table:table-cell office:value-type="float" office:value="0" table:formula="of:=IF([.H71]=1;[.Q70]+1;0)" table:style-name="ce1">
            <text:p>0</text:p>
          </table:table-cell>
          <table:table-cell office:value-type="float" office:value="0" table:formula="of:=IF([.I71]=1;[.R7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0T00:00:00" table:formula="of:=[.A71]+1" table:style-name="ce10">
            <text:p>Tue, 10 Mar 2026</text:p>
          </table:table-cell>
          <table:table-cell office:value-type="string" office:string-value="Tue" table:formula="of:=TEXT([.A72];&quot;ddd&quot;)" table:style-name="ce5">
            <text:p>Tue</text:p>
          </table:table-cell>
          <table:table-cell office:value-type="string" office:string-value="Mar" table:formula="of:=TEXT([.A72];&quot;mmm&quot;)" table:style-name="ce5">
            <text:p>Mar</text:p>
          </table:table-cell>
          <table:table-cell office:value-type="float" office:value="0" table:formula="of:=IF(INDEX([Tracker.$A$1:.$AG$120];6+9*(MONTH([.$A72])-1)+(COLUMN()-4);DAY([.$A72])+2)&lt;&gt;&quot;&quot;;1;0)" table:style-name="ce92"/>
          <table:table-cell office:value-type="float" office:value="0" table:formula="of:=IF(INDEX([Tracker.$A$1:.$AG$120];6+9*(MONTH([.$A72])-1)+(COLUMN()-4);DAY([.$A72])+2)&lt;&gt;&quot;&quot;;1;0)" table:style-name="ce92"/>
          <table:table-cell office:value-type="float" office:value="0" table:formula="of:=IF(INDEX([Tracker.$A$1:.$AG$120];6+9*(MONTH([.$A72])-1)+(COLUMN()-4);DAY([.$A72])+2)&lt;&gt;&quot;&quot;;1;0)" table:style-name="ce92"/>
          <table:table-cell office:value-type="float" office:value="0" table:formula="of:=IF(INDEX([Tracker.$A$1:.$AG$120];6+9*(MONTH([.$A72])-1)+(COLUMN()-4);DAY([.$A72])+2)&lt;&gt;&quot;&quot;;1;0)" table:style-name="ce92"/>
          <table:table-cell office:value-type="float" office:value="0" table:formula="of:=IF(INDEX([Tracker.$A$1:.$AG$120];6+9*(MONTH([.$A72])-1)+(COLUMN()-4);DAY([.$A72])+2)&lt;&gt;&quot;&quot;;1;0)" table:style-name="ce92"/>
          <table:table-cell office:value-type="float" office:value="0" table:formula="of:=IF(INDEX([Tracker.$A$1:.$AG$120];6+9*(MONTH([.$A72])-1)+(COLUMN()-4);DAY([.$A72])+2)&lt;&gt;&quot;&quot;;1;0)" table:style-name="ce92"/>
          <table:table-cell office:value-type="float" office:value="0" table:formula="of:=SUM([.D72:.I72])" table:style-name="ce6"/>
          <table:table-cell office:value-type="percentage" office:value="0" table:formula="of:=[.J72]/6" table:style-name="ce8">
            <text:p>0%</text:p>
          </table:table-cell>
          <table:table-cell table:style-name="ce1"/>
          <table:table-cell office:value-type="float" office:value="0" table:formula="of:=IF([.D72]=1;[.M71]+1;0)" table:style-name="ce1">
            <text:p>0</text:p>
          </table:table-cell>
          <table:table-cell office:value-type="float" office:value="0" table:formula="of:=IF([.E72]=1;[.N71]+1;0)" table:style-name="ce1">
            <text:p>0</text:p>
          </table:table-cell>
          <table:table-cell office:value-type="float" office:value="0" table:formula="of:=IF([.F72]=1;[.O71]+1;0)" table:style-name="ce1">
            <text:p>0</text:p>
          </table:table-cell>
          <table:table-cell office:value-type="float" office:value="0" table:formula="of:=IF([.G72]=1;[.P71]+1;0)" table:style-name="ce1">
            <text:p>0</text:p>
          </table:table-cell>
          <table:table-cell office:value-type="float" office:value="0" table:formula="of:=IF([.H72]=1;[.Q71]+1;0)" table:style-name="ce1">
            <text:p>0</text:p>
          </table:table-cell>
          <table:table-cell office:value-type="float" office:value="0" table:formula="of:=IF([.I72]=1;[.R7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1T00:00:00" table:formula="of:=[.A72]+1" table:style-name="ce10">
            <text:p>Wed, 11 Mar 2026</text:p>
          </table:table-cell>
          <table:table-cell office:value-type="string" office:string-value="Wed" table:formula="of:=TEXT([.A73];&quot;ddd&quot;)" table:style-name="ce5">
            <text:p>Wed</text:p>
          </table:table-cell>
          <table:table-cell office:value-type="string" office:string-value="Mar" table:formula="of:=TEXT([.A73];&quot;mmm&quot;)" table:style-name="ce5">
            <text:p>Mar</text:p>
          </table:table-cell>
          <table:table-cell office:value-type="float" office:value="0" table:formula="of:=IF(INDEX([Tracker.$A$1:.$AG$120];6+9*(MONTH([.$A73])-1)+(COLUMN()-4);DAY([.$A73])+2)&lt;&gt;&quot;&quot;;1;0)" table:style-name="ce92"/>
          <table:table-cell office:value-type="float" office:value="0" table:formula="of:=IF(INDEX([Tracker.$A$1:.$AG$120];6+9*(MONTH([.$A73])-1)+(COLUMN()-4);DAY([.$A73])+2)&lt;&gt;&quot;&quot;;1;0)" table:style-name="ce92"/>
          <table:table-cell office:value-type="float" office:value="0" table:formula="of:=IF(INDEX([Tracker.$A$1:.$AG$120];6+9*(MONTH([.$A73])-1)+(COLUMN()-4);DAY([.$A73])+2)&lt;&gt;&quot;&quot;;1;0)" table:style-name="ce92"/>
          <table:table-cell office:value-type="float" office:value="0" table:formula="of:=IF(INDEX([Tracker.$A$1:.$AG$120];6+9*(MONTH([.$A73])-1)+(COLUMN()-4);DAY([.$A73])+2)&lt;&gt;&quot;&quot;;1;0)" table:style-name="ce92"/>
          <table:table-cell office:value-type="float" office:value="0" table:formula="of:=IF(INDEX([Tracker.$A$1:.$AG$120];6+9*(MONTH([.$A73])-1)+(COLUMN()-4);DAY([.$A73])+2)&lt;&gt;&quot;&quot;;1;0)" table:style-name="ce92"/>
          <table:table-cell office:value-type="float" office:value="0" table:formula="of:=IF(INDEX([Tracker.$A$1:.$AG$120];6+9*(MONTH([.$A73])-1)+(COLUMN()-4);DAY([.$A73])+2)&lt;&gt;&quot;&quot;;1;0)" table:style-name="ce92"/>
          <table:table-cell office:value-type="float" office:value="0" table:formula="of:=SUM([.D73:.I73])" table:style-name="ce6"/>
          <table:table-cell office:value-type="percentage" office:value="0" table:formula="of:=[.J73]/6" table:style-name="ce8">
            <text:p>0%</text:p>
          </table:table-cell>
          <table:table-cell table:style-name="ce1"/>
          <table:table-cell office:value-type="float" office:value="0" table:formula="of:=IF([.D73]=1;[.M72]+1;0)" table:style-name="ce1">
            <text:p>0</text:p>
          </table:table-cell>
          <table:table-cell office:value-type="float" office:value="0" table:formula="of:=IF([.E73]=1;[.N72]+1;0)" table:style-name="ce1">
            <text:p>0</text:p>
          </table:table-cell>
          <table:table-cell office:value-type="float" office:value="0" table:formula="of:=IF([.F73]=1;[.O72]+1;0)" table:style-name="ce1">
            <text:p>0</text:p>
          </table:table-cell>
          <table:table-cell office:value-type="float" office:value="0" table:formula="of:=IF([.G73]=1;[.P72]+1;0)" table:style-name="ce1">
            <text:p>0</text:p>
          </table:table-cell>
          <table:table-cell office:value-type="float" office:value="0" table:formula="of:=IF([.H73]=1;[.Q72]+1;0)" table:style-name="ce1">
            <text:p>0</text:p>
          </table:table-cell>
          <table:table-cell office:value-type="float" office:value="0" table:formula="of:=IF([.I73]=1;[.R7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2T00:00:00" table:formula="of:=[.A73]+1" table:style-name="ce10">
            <text:p>Thu, 12 Mar 2026</text:p>
          </table:table-cell>
          <table:table-cell office:value-type="string" office:string-value="Thu" table:formula="of:=TEXT([.A74];&quot;ddd&quot;)" table:style-name="ce5">
            <text:p>Thu</text:p>
          </table:table-cell>
          <table:table-cell office:value-type="string" office:string-value="Mar" table:formula="of:=TEXT([.A74];&quot;mmm&quot;)" table:style-name="ce5">
            <text:p>Mar</text:p>
          </table:table-cell>
          <table:table-cell office:value-type="float" office:value="0" table:formula="of:=IF(INDEX([Tracker.$A$1:.$AG$120];6+9*(MONTH([.$A74])-1)+(COLUMN()-4);DAY([.$A74])+2)&lt;&gt;&quot;&quot;;1;0)" table:style-name="ce92"/>
          <table:table-cell office:value-type="float" office:value="0" table:formula="of:=IF(INDEX([Tracker.$A$1:.$AG$120];6+9*(MONTH([.$A74])-1)+(COLUMN()-4);DAY([.$A74])+2)&lt;&gt;&quot;&quot;;1;0)" table:style-name="ce92"/>
          <table:table-cell office:value-type="float" office:value="0" table:formula="of:=IF(INDEX([Tracker.$A$1:.$AG$120];6+9*(MONTH([.$A74])-1)+(COLUMN()-4);DAY([.$A74])+2)&lt;&gt;&quot;&quot;;1;0)" table:style-name="ce92"/>
          <table:table-cell office:value-type="float" office:value="0" table:formula="of:=IF(INDEX([Tracker.$A$1:.$AG$120];6+9*(MONTH([.$A74])-1)+(COLUMN()-4);DAY([.$A74])+2)&lt;&gt;&quot;&quot;;1;0)" table:style-name="ce92"/>
          <table:table-cell office:value-type="float" office:value="0" table:formula="of:=IF(INDEX([Tracker.$A$1:.$AG$120];6+9*(MONTH([.$A74])-1)+(COLUMN()-4);DAY([.$A74])+2)&lt;&gt;&quot;&quot;;1;0)" table:style-name="ce92"/>
          <table:table-cell office:value-type="float" office:value="0" table:formula="of:=IF(INDEX([Tracker.$A$1:.$AG$120];6+9*(MONTH([.$A74])-1)+(COLUMN()-4);DAY([.$A74])+2)&lt;&gt;&quot;&quot;;1;0)" table:style-name="ce92"/>
          <table:table-cell office:value-type="float" office:value="0" table:formula="of:=SUM([.D74:.I74])" table:style-name="ce6"/>
          <table:table-cell office:value-type="percentage" office:value="0" table:formula="of:=[.J74]/6" table:style-name="ce8">
            <text:p>0%</text:p>
          </table:table-cell>
          <table:table-cell table:style-name="ce1"/>
          <table:table-cell office:value-type="float" office:value="0" table:formula="of:=IF([.D74]=1;[.M73]+1;0)" table:style-name="ce1">
            <text:p>0</text:p>
          </table:table-cell>
          <table:table-cell office:value-type="float" office:value="0" table:formula="of:=IF([.E74]=1;[.N73]+1;0)" table:style-name="ce1">
            <text:p>0</text:p>
          </table:table-cell>
          <table:table-cell office:value-type="float" office:value="0" table:formula="of:=IF([.F74]=1;[.O73]+1;0)" table:style-name="ce1">
            <text:p>0</text:p>
          </table:table-cell>
          <table:table-cell office:value-type="float" office:value="0" table:formula="of:=IF([.G74]=1;[.P73]+1;0)" table:style-name="ce1">
            <text:p>0</text:p>
          </table:table-cell>
          <table:table-cell office:value-type="float" office:value="0" table:formula="of:=IF([.H74]=1;[.Q73]+1;0)" table:style-name="ce1">
            <text:p>0</text:p>
          </table:table-cell>
          <table:table-cell office:value-type="float" office:value="0" table:formula="of:=IF([.I74]=1;[.R7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3T00:00:00" table:formula="of:=[.A74]+1" table:style-name="ce10">
            <text:p>Fri, 13 Mar 2026</text:p>
          </table:table-cell>
          <table:table-cell office:value-type="string" office:string-value="Fri" table:formula="of:=TEXT([.A75];&quot;ddd&quot;)" table:style-name="ce5">
            <text:p>Fri</text:p>
          </table:table-cell>
          <table:table-cell office:value-type="string" office:string-value="Mar" table:formula="of:=TEXT([.A75];&quot;mmm&quot;)" table:style-name="ce5">
            <text:p>Mar</text:p>
          </table:table-cell>
          <table:table-cell office:value-type="float" office:value="0" table:formula="of:=IF(INDEX([Tracker.$A$1:.$AG$120];6+9*(MONTH([.$A75])-1)+(COLUMN()-4);DAY([.$A75])+2)&lt;&gt;&quot;&quot;;1;0)" table:style-name="ce92"/>
          <table:table-cell office:value-type="float" office:value="0" table:formula="of:=IF(INDEX([Tracker.$A$1:.$AG$120];6+9*(MONTH([.$A75])-1)+(COLUMN()-4);DAY([.$A75])+2)&lt;&gt;&quot;&quot;;1;0)" table:style-name="ce92"/>
          <table:table-cell office:value-type="float" office:value="0" table:formula="of:=IF(INDEX([Tracker.$A$1:.$AG$120];6+9*(MONTH([.$A75])-1)+(COLUMN()-4);DAY([.$A75])+2)&lt;&gt;&quot;&quot;;1;0)" table:style-name="ce92"/>
          <table:table-cell office:value-type="float" office:value="0" table:formula="of:=IF(INDEX([Tracker.$A$1:.$AG$120];6+9*(MONTH([.$A75])-1)+(COLUMN()-4);DAY([.$A75])+2)&lt;&gt;&quot;&quot;;1;0)" table:style-name="ce92"/>
          <table:table-cell office:value-type="float" office:value="0" table:formula="of:=IF(INDEX([Tracker.$A$1:.$AG$120];6+9*(MONTH([.$A75])-1)+(COLUMN()-4);DAY([.$A75])+2)&lt;&gt;&quot;&quot;;1;0)" table:style-name="ce92"/>
          <table:table-cell office:value-type="float" office:value="0" table:formula="of:=IF(INDEX([Tracker.$A$1:.$AG$120];6+9*(MONTH([.$A75])-1)+(COLUMN()-4);DAY([.$A75])+2)&lt;&gt;&quot;&quot;;1;0)" table:style-name="ce92"/>
          <table:table-cell office:value-type="float" office:value="0" table:formula="of:=SUM([.D75:.I75])" table:style-name="ce6"/>
          <table:table-cell office:value-type="percentage" office:value="0" table:formula="of:=[.J75]/6" table:style-name="ce8">
            <text:p>0%</text:p>
          </table:table-cell>
          <table:table-cell table:style-name="ce1"/>
          <table:table-cell office:value-type="float" office:value="0" table:formula="of:=IF([.D75]=1;[.M74]+1;0)" table:style-name="ce1">
            <text:p>0</text:p>
          </table:table-cell>
          <table:table-cell office:value-type="float" office:value="0" table:formula="of:=IF([.E75]=1;[.N74]+1;0)" table:style-name="ce1">
            <text:p>0</text:p>
          </table:table-cell>
          <table:table-cell office:value-type="float" office:value="0" table:formula="of:=IF([.F75]=1;[.O74]+1;0)" table:style-name="ce1">
            <text:p>0</text:p>
          </table:table-cell>
          <table:table-cell office:value-type="float" office:value="0" table:formula="of:=IF([.G75]=1;[.P74]+1;0)" table:style-name="ce1">
            <text:p>0</text:p>
          </table:table-cell>
          <table:table-cell office:value-type="float" office:value="0" table:formula="of:=IF([.H75]=1;[.Q74]+1;0)" table:style-name="ce1">
            <text:p>0</text:p>
          </table:table-cell>
          <table:table-cell office:value-type="float" office:value="0" table:formula="of:=IF([.I75]=1;[.R7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4T00:00:00" table:formula="of:=[.A75]+1" table:style-name="ce10">
            <text:p>Sat, 14 Mar 2026</text:p>
          </table:table-cell>
          <table:table-cell office:value-type="string" office:string-value="Sat" table:formula="of:=TEXT([.A76];&quot;ddd&quot;)" table:style-name="ce5">
            <text:p>Sat</text:p>
          </table:table-cell>
          <table:table-cell office:value-type="string" office:string-value="Mar" table:formula="of:=TEXT([.A76];&quot;mmm&quot;)" table:style-name="ce5">
            <text:p>Mar</text:p>
          </table:table-cell>
          <table:table-cell office:value-type="float" office:value="0" table:formula="of:=IF(INDEX([Tracker.$A$1:.$AG$120];6+9*(MONTH([.$A76])-1)+(COLUMN()-4);DAY([.$A76])+2)&lt;&gt;&quot;&quot;;1;0)" table:style-name="ce92"/>
          <table:table-cell office:value-type="float" office:value="0" table:formula="of:=IF(INDEX([Tracker.$A$1:.$AG$120];6+9*(MONTH([.$A76])-1)+(COLUMN()-4);DAY([.$A76])+2)&lt;&gt;&quot;&quot;;1;0)" table:style-name="ce92"/>
          <table:table-cell office:value-type="float" office:value="0" table:formula="of:=IF(INDEX([Tracker.$A$1:.$AG$120];6+9*(MONTH([.$A76])-1)+(COLUMN()-4);DAY([.$A76])+2)&lt;&gt;&quot;&quot;;1;0)" table:style-name="ce92"/>
          <table:table-cell office:value-type="float" office:value="0" table:formula="of:=IF(INDEX([Tracker.$A$1:.$AG$120];6+9*(MONTH([.$A76])-1)+(COLUMN()-4);DAY([.$A76])+2)&lt;&gt;&quot;&quot;;1;0)" table:style-name="ce92"/>
          <table:table-cell office:value-type="float" office:value="0" table:formula="of:=IF(INDEX([Tracker.$A$1:.$AG$120];6+9*(MONTH([.$A76])-1)+(COLUMN()-4);DAY([.$A76])+2)&lt;&gt;&quot;&quot;;1;0)" table:style-name="ce92"/>
          <table:table-cell office:value-type="float" office:value="0" table:formula="of:=IF(INDEX([Tracker.$A$1:.$AG$120];6+9*(MONTH([.$A76])-1)+(COLUMN()-4);DAY([.$A76])+2)&lt;&gt;&quot;&quot;;1;0)" table:style-name="ce92"/>
          <table:table-cell office:value-type="float" office:value="0" table:formula="of:=SUM([.D76:.I76])" table:style-name="ce6"/>
          <table:table-cell office:value-type="percentage" office:value="0" table:formula="of:=[.J76]/6" table:style-name="ce8">
            <text:p>0%</text:p>
          </table:table-cell>
          <table:table-cell table:style-name="ce1"/>
          <table:table-cell office:value-type="float" office:value="0" table:formula="of:=IF([.D76]=1;[.M75]+1;0)" table:style-name="ce1">
            <text:p>0</text:p>
          </table:table-cell>
          <table:table-cell office:value-type="float" office:value="0" table:formula="of:=IF([.E76]=1;[.N75]+1;0)" table:style-name="ce1">
            <text:p>0</text:p>
          </table:table-cell>
          <table:table-cell office:value-type="float" office:value="0" table:formula="of:=IF([.F76]=1;[.O75]+1;0)" table:style-name="ce1">
            <text:p>0</text:p>
          </table:table-cell>
          <table:table-cell office:value-type="float" office:value="0" table:formula="of:=IF([.G76]=1;[.P75]+1;0)" table:style-name="ce1">
            <text:p>0</text:p>
          </table:table-cell>
          <table:table-cell office:value-type="float" office:value="0" table:formula="of:=IF([.H76]=1;[.Q75]+1;0)" table:style-name="ce1">
            <text:p>0</text:p>
          </table:table-cell>
          <table:table-cell office:value-type="float" office:value="0" table:formula="of:=IF([.I76]=1;[.R7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5T00:00:00" table:formula="of:=[.A76]+1" table:style-name="ce10">
            <text:p>Sun, 15 Mar 2026</text:p>
          </table:table-cell>
          <table:table-cell office:value-type="string" office:string-value="Sun" table:formula="of:=TEXT([.A77];&quot;ddd&quot;)" table:style-name="ce5">
            <text:p>Sun</text:p>
          </table:table-cell>
          <table:table-cell office:value-type="string" office:string-value="Mar" table:formula="of:=TEXT([.A77];&quot;mmm&quot;)" table:style-name="ce5">
            <text:p>Mar</text:p>
          </table:table-cell>
          <table:table-cell office:value-type="float" office:value="0" table:formula="of:=IF(INDEX([Tracker.$A$1:.$AG$120];6+9*(MONTH([.$A77])-1)+(COLUMN()-4);DAY([.$A77])+2)&lt;&gt;&quot;&quot;;1;0)" table:style-name="ce92"/>
          <table:table-cell office:value-type="float" office:value="0" table:formula="of:=IF(INDEX([Tracker.$A$1:.$AG$120];6+9*(MONTH([.$A77])-1)+(COLUMN()-4);DAY([.$A77])+2)&lt;&gt;&quot;&quot;;1;0)" table:style-name="ce92"/>
          <table:table-cell office:value-type="float" office:value="0" table:formula="of:=IF(INDEX([Tracker.$A$1:.$AG$120];6+9*(MONTH([.$A77])-1)+(COLUMN()-4);DAY([.$A77])+2)&lt;&gt;&quot;&quot;;1;0)" table:style-name="ce92"/>
          <table:table-cell office:value-type="float" office:value="0" table:formula="of:=IF(INDEX([Tracker.$A$1:.$AG$120];6+9*(MONTH([.$A77])-1)+(COLUMN()-4);DAY([.$A77])+2)&lt;&gt;&quot;&quot;;1;0)" table:style-name="ce92"/>
          <table:table-cell office:value-type="float" office:value="0" table:formula="of:=IF(INDEX([Tracker.$A$1:.$AG$120];6+9*(MONTH([.$A77])-1)+(COLUMN()-4);DAY([.$A77])+2)&lt;&gt;&quot;&quot;;1;0)" table:style-name="ce92"/>
          <table:table-cell office:value-type="float" office:value="0" table:formula="of:=IF(INDEX([Tracker.$A$1:.$AG$120];6+9*(MONTH([.$A77])-1)+(COLUMN()-4);DAY([.$A77])+2)&lt;&gt;&quot;&quot;;1;0)" table:style-name="ce92"/>
          <table:table-cell office:value-type="float" office:value="0" table:formula="of:=SUM([.D77:.I77])" table:style-name="ce6"/>
          <table:table-cell office:value-type="percentage" office:value="0" table:formula="of:=[.J77]/6" table:style-name="ce8">
            <text:p>0%</text:p>
          </table:table-cell>
          <table:table-cell table:style-name="ce1"/>
          <table:table-cell office:value-type="float" office:value="0" table:formula="of:=IF([.D77]=1;[.M76]+1;0)" table:style-name="ce1">
            <text:p>0</text:p>
          </table:table-cell>
          <table:table-cell office:value-type="float" office:value="0" table:formula="of:=IF([.E77]=1;[.N76]+1;0)" table:style-name="ce1">
            <text:p>0</text:p>
          </table:table-cell>
          <table:table-cell office:value-type="float" office:value="0" table:formula="of:=IF([.F77]=1;[.O76]+1;0)" table:style-name="ce1">
            <text:p>0</text:p>
          </table:table-cell>
          <table:table-cell office:value-type="float" office:value="0" table:formula="of:=IF([.G77]=1;[.P76]+1;0)" table:style-name="ce1">
            <text:p>0</text:p>
          </table:table-cell>
          <table:table-cell office:value-type="float" office:value="0" table:formula="of:=IF([.H77]=1;[.Q76]+1;0)" table:style-name="ce1">
            <text:p>0</text:p>
          </table:table-cell>
          <table:table-cell office:value-type="float" office:value="0" table:formula="of:=IF([.I77]=1;[.R7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6T00:00:00" table:formula="of:=[.A77]+1" table:style-name="ce10">
            <text:p>Mon, 16 Mar 2026</text:p>
          </table:table-cell>
          <table:table-cell office:value-type="string" office:string-value="Mon" table:formula="of:=TEXT([.A78];&quot;ddd&quot;)" table:style-name="ce5">
            <text:p>Mon</text:p>
          </table:table-cell>
          <table:table-cell office:value-type="string" office:string-value="Mar" table:formula="of:=TEXT([.A78];&quot;mmm&quot;)" table:style-name="ce5">
            <text:p>Mar</text:p>
          </table:table-cell>
          <table:table-cell office:value-type="float" office:value="0" table:formula="of:=IF(INDEX([Tracker.$A$1:.$AG$120];6+9*(MONTH([.$A78])-1)+(COLUMN()-4);DAY([.$A78])+2)&lt;&gt;&quot;&quot;;1;0)" table:style-name="ce92"/>
          <table:table-cell office:value-type="float" office:value="0" table:formula="of:=IF(INDEX([Tracker.$A$1:.$AG$120];6+9*(MONTH([.$A78])-1)+(COLUMN()-4);DAY([.$A78])+2)&lt;&gt;&quot;&quot;;1;0)" table:style-name="ce92"/>
          <table:table-cell office:value-type="float" office:value="0" table:formula="of:=IF(INDEX([Tracker.$A$1:.$AG$120];6+9*(MONTH([.$A78])-1)+(COLUMN()-4);DAY([.$A78])+2)&lt;&gt;&quot;&quot;;1;0)" table:style-name="ce92"/>
          <table:table-cell office:value-type="float" office:value="0" table:formula="of:=IF(INDEX([Tracker.$A$1:.$AG$120];6+9*(MONTH([.$A78])-1)+(COLUMN()-4);DAY([.$A78])+2)&lt;&gt;&quot;&quot;;1;0)" table:style-name="ce92"/>
          <table:table-cell office:value-type="float" office:value="0" table:formula="of:=IF(INDEX([Tracker.$A$1:.$AG$120];6+9*(MONTH([.$A78])-1)+(COLUMN()-4);DAY([.$A78])+2)&lt;&gt;&quot;&quot;;1;0)" table:style-name="ce92"/>
          <table:table-cell office:value-type="float" office:value="0" table:formula="of:=IF(INDEX([Tracker.$A$1:.$AG$120];6+9*(MONTH([.$A78])-1)+(COLUMN()-4);DAY([.$A78])+2)&lt;&gt;&quot;&quot;;1;0)" table:style-name="ce92"/>
          <table:table-cell office:value-type="float" office:value="0" table:formula="of:=SUM([.D78:.I78])" table:style-name="ce6"/>
          <table:table-cell office:value-type="percentage" office:value="0" table:formula="of:=[.J78]/6" table:style-name="ce8">
            <text:p>0%</text:p>
          </table:table-cell>
          <table:table-cell table:style-name="ce1"/>
          <table:table-cell office:value-type="float" office:value="0" table:formula="of:=IF([.D78]=1;[.M77]+1;0)" table:style-name="ce1">
            <text:p>0</text:p>
          </table:table-cell>
          <table:table-cell office:value-type="float" office:value="0" table:formula="of:=IF([.E78]=1;[.N77]+1;0)" table:style-name="ce1">
            <text:p>0</text:p>
          </table:table-cell>
          <table:table-cell office:value-type="float" office:value="0" table:formula="of:=IF([.F78]=1;[.O77]+1;0)" table:style-name="ce1">
            <text:p>0</text:p>
          </table:table-cell>
          <table:table-cell office:value-type="float" office:value="0" table:formula="of:=IF([.G78]=1;[.P77]+1;0)" table:style-name="ce1">
            <text:p>0</text:p>
          </table:table-cell>
          <table:table-cell office:value-type="float" office:value="0" table:formula="of:=IF([.H78]=1;[.Q77]+1;0)" table:style-name="ce1">
            <text:p>0</text:p>
          </table:table-cell>
          <table:table-cell office:value-type="float" office:value="0" table:formula="of:=IF([.I78]=1;[.R7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7T00:00:00" table:formula="of:=[.A78]+1" table:style-name="ce10">
            <text:p>Tue, 17 Mar 2026</text:p>
          </table:table-cell>
          <table:table-cell office:value-type="string" office:string-value="Tue" table:formula="of:=TEXT([.A79];&quot;ddd&quot;)" table:style-name="ce5">
            <text:p>Tue</text:p>
          </table:table-cell>
          <table:table-cell office:value-type="string" office:string-value="Mar" table:formula="of:=TEXT([.A79];&quot;mmm&quot;)" table:style-name="ce5">
            <text:p>Mar</text:p>
          </table:table-cell>
          <table:table-cell office:value-type="float" office:value="0" table:formula="of:=IF(INDEX([Tracker.$A$1:.$AG$120];6+9*(MONTH([.$A79])-1)+(COLUMN()-4);DAY([.$A79])+2)&lt;&gt;&quot;&quot;;1;0)" table:style-name="ce92"/>
          <table:table-cell office:value-type="float" office:value="0" table:formula="of:=IF(INDEX([Tracker.$A$1:.$AG$120];6+9*(MONTH([.$A79])-1)+(COLUMN()-4);DAY([.$A79])+2)&lt;&gt;&quot;&quot;;1;0)" table:style-name="ce92"/>
          <table:table-cell office:value-type="float" office:value="0" table:formula="of:=IF(INDEX([Tracker.$A$1:.$AG$120];6+9*(MONTH([.$A79])-1)+(COLUMN()-4);DAY([.$A79])+2)&lt;&gt;&quot;&quot;;1;0)" table:style-name="ce92"/>
          <table:table-cell office:value-type="float" office:value="0" table:formula="of:=IF(INDEX([Tracker.$A$1:.$AG$120];6+9*(MONTH([.$A79])-1)+(COLUMN()-4);DAY([.$A79])+2)&lt;&gt;&quot;&quot;;1;0)" table:style-name="ce92"/>
          <table:table-cell office:value-type="float" office:value="0" table:formula="of:=IF(INDEX([Tracker.$A$1:.$AG$120];6+9*(MONTH([.$A79])-1)+(COLUMN()-4);DAY([.$A79])+2)&lt;&gt;&quot;&quot;;1;0)" table:style-name="ce92"/>
          <table:table-cell office:value-type="float" office:value="0" table:formula="of:=IF(INDEX([Tracker.$A$1:.$AG$120];6+9*(MONTH([.$A79])-1)+(COLUMN()-4);DAY([.$A79])+2)&lt;&gt;&quot;&quot;;1;0)" table:style-name="ce92"/>
          <table:table-cell office:value-type="float" office:value="0" table:formula="of:=SUM([.D79:.I79])" table:style-name="ce6"/>
          <table:table-cell office:value-type="percentage" office:value="0" table:formula="of:=[.J79]/6" table:style-name="ce8">
            <text:p>0%</text:p>
          </table:table-cell>
          <table:table-cell table:style-name="ce1"/>
          <table:table-cell office:value-type="float" office:value="0" table:formula="of:=IF([.D79]=1;[.M78]+1;0)" table:style-name="ce1">
            <text:p>0</text:p>
          </table:table-cell>
          <table:table-cell office:value-type="float" office:value="0" table:formula="of:=IF([.E79]=1;[.N78]+1;0)" table:style-name="ce1">
            <text:p>0</text:p>
          </table:table-cell>
          <table:table-cell office:value-type="float" office:value="0" table:formula="of:=IF([.F79]=1;[.O78]+1;0)" table:style-name="ce1">
            <text:p>0</text:p>
          </table:table-cell>
          <table:table-cell office:value-type="float" office:value="0" table:formula="of:=IF([.G79]=1;[.P78]+1;0)" table:style-name="ce1">
            <text:p>0</text:p>
          </table:table-cell>
          <table:table-cell office:value-type="float" office:value="0" table:formula="of:=IF([.H79]=1;[.Q78]+1;0)" table:style-name="ce1">
            <text:p>0</text:p>
          </table:table-cell>
          <table:table-cell office:value-type="float" office:value="0" table:formula="of:=IF([.I79]=1;[.R7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8T00:00:00" table:formula="of:=[.A79]+1" table:style-name="ce10">
            <text:p>Wed, 18 Mar 2026</text:p>
          </table:table-cell>
          <table:table-cell office:value-type="string" office:string-value="Wed" table:formula="of:=TEXT([.A80];&quot;ddd&quot;)" table:style-name="ce5">
            <text:p>Wed</text:p>
          </table:table-cell>
          <table:table-cell office:value-type="string" office:string-value="Mar" table:formula="of:=TEXT([.A80];&quot;mmm&quot;)" table:style-name="ce5">
            <text:p>Mar</text:p>
          </table:table-cell>
          <table:table-cell office:value-type="float" office:value="0" table:formula="of:=IF(INDEX([Tracker.$A$1:.$AG$120];6+9*(MONTH([.$A80])-1)+(COLUMN()-4);DAY([.$A80])+2)&lt;&gt;&quot;&quot;;1;0)" table:style-name="ce92"/>
          <table:table-cell office:value-type="float" office:value="0" table:formula="of:=IF(INDEX([Tracker.$A$1:.$AG$120];6+9*(MONTH([.$A80])-1)+(COLUMN()-4);DAY([.$A80])+2)&lt;&gt;&quot;&quot;;1;0)" table:style-name="ce92"/>
          <table:table-cell office:value-type="float" office:value="0" table:formula="of:=IF(INDEX([Tracker.$A$1:.$AG$120];6+9*(MONTH([.$A80])-1)+(COLUMN()-4);DAY([.$A80])+2)&lt;&gt;&quot;&quot;;1;0)" table:style-name="ce92"/>
          <table:table-cell office:value-type="float" office:value="0" table:formula="of:=IF(INDEX([Tracker.$A$1:.$AG$120];6+9*(MONTH([.$A80])-1)+(COLUMN()-4);DAY([.$A80])+2)&lt;&gt;&quot;&quot;;1;0)" table:style-name="ce92"/>
          <table:table-cell office:value-type="float" office:value="0" table:formula="of:=IF(INDEX([Tracker.$A$1:.$AG$120];6+9*(MONTH([.$A80])-1)+(COLUMN()-4);DAY([.$A80])+2)&lt;&gt;&quot;&quot;;1;0)" table:style-name="ce92"/>
          <table:table-cell office:value-type="float" office:value="0" table:formula="of:=IF(INDEX([Tracker.$A$1:.$AG$120];6+9*(MONTH([.$A80])-1)+(COLUMN()-4);DAY([.$A80])+2)&lt;&gt;&quot;&quot;;1;0)" table:style-name="ce92"/>
          <table:table-cell office:value-type="float" office:value="0" table:formula="of:=SUM([.D80:.I80])" table:style-name="ce6"/>
          <table:table-cell office:value-type="percentage" office:value="0" table:formula="of:=[.J80]/6" table:style-name="ce8">
            <text:p>0%</text:p>
          </table:table-cell>
          <table:table-cell table:style-name="ce1"/>
          <table:table-cell office:value-type="float" office:value="0" table:formula="of:=IF([.D80]=1;[.M79]+1;0)" table:style-name="ce1">
            <text:p>0</text:p>
          </table:table-cell>
          <table:table-cell office:value-type="float" office:value="0" table:formula="of:=IF([.E80]=1;[.N79]+1;0)" table:style-name="ce1">
            <text:p>0</text:p>
          </table:table-cell>
          <table:table-cell office:value-type="float" office:value="0" table:formula="of:=IF([.F80]=1;[.O79]+1;0)" table:style-name="ce1">
            <text:p>0</text:p>
          </table:table-cell>
          <table:table-cell office:value-type="float" office:value="0" table:formula="of:=IF([.G80]=1;[.P79]+1;0)" table:style-name="ce1">
            <text:p>0</text:p>
          </table:table-cell>
          <table:table-cell office:value-type="float" office:value="0" table:formula="of:=IF([.H80]=1;[.Q79]+1;0)" table:style-name="ce1">
            <text:p>0</text:p>
          </table:table-cell>
          <table:table-cell office:value-type="float" office:value="0" table:formula="of:=IF([.I80]=1;[.R7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19T00:00:00" table:formula="of:=[.A80]+1" table:style-name="ce10">
            <text:p>Thu, 19 Mar 2026</text:p>
          </table:table-cell>
          <table:table-cell office:value-type="string" office:string-value="Thu" table:formula="of:=TEXT([.A81];&quot;ddd&quot;)" table:style-name="ce5">
            <text:p>Thu</text:p>
          </table:table-cell>
          <table:table-cell office:value-type="string" office:string-value="Mar" table:formula="of:=TEXT([.A81];&quot;mmm&quot;)" table:style-name="ce5">
            <text:p>Mar</text:p>
          </table:table-cell>
          <table:table-cell office:value-type="float" office:value="0" table:formula="of:=IF(INDEX([Tracker.$A$1:.$AG$120];6+9*(MONTH([.$A81])-1)+(COLUMN()-4);DAY([.$A81])+2)&lt;&gt;&quot;&quot;;1;0)" table:style-name="ce92"/>
          <table:table-cell office:value-type="float" office:value="0" table:formula="of:=IF(INDEX([Tracker.$A$1:.$AG$120];6+9*(MONTH([.$A81])-1)+(COLUMN()-4);DAY([.$A81])+2)&lt;&gt;&quot;&quot;;1;0)" table:style-name="ce92"/>
          <table:table-cell office:value-type="float" office:value="0" table:formula="of:=IF(INDEX([Tracker.$A$1:.$AG$120];6+9*(MONTH([.$A81])-1)+(COLUMN()-4);DAY([.$A81])+2)&lt;&gt;&quot;&quot;;1;0)" table:style-name="ce92"/>
          <table:table-cell office:value-type="float" office:value="0" table:formula="of:=IF(INDEX([Tracker.$A$1:.$AG$120];6+9*(MONTH([.$A81])-1)+(COLUMN()-4);DAY([.$A81])+2)&lt;&gt;&quot;&quot;;1;0)" table:style-name="ce92"/>
          <table:table-cell office:value-type="float" office:value="0" table:formula="of:=IF(INDEX([Tracker.$A$1:.$AG$120];6+9*(MONTH([.$A81])-1)+(COLUMN()-4);DAY([.$A81])+2)&lt;&gt;&quot;&quot;;1;0)" table:style-name="ce92"/>
          <table:table-cell office:value-type="float" office:value="0" table:formula="of:=IF(INDEX([Tracker.$A$1:.$AG$120];6+9*(MONTH([.$A81])-1)+(COLUMN()-4);DAY([.$A81])+2)&lt;&gt;&quot;&quot;;1;0)" table:style-name="ce92"/>
          <table:table-cell office:value-type="float" office:value="0" table:formula="of:=SUM([.D81:.I81])" table:style-name="ce6"/>
          <table:table-cell office:value-type="percentage" office:value="0" table:formula="of:=[.J81]/6" table:style-name="ce8">
            <text:p>0%</text:p>
          </table:table-cell>
          <table:table-cell table:style-name="ce1"/>
          <table:table-cell office:value-type="float" office:value="0" table:formula="of:=IF([.D81]=1;[.M80]+1;0)" table:style-name="ce1">
            <text:p>0</text:p>
          </table:table-cell>
          <table:table-cell office:value-type="float" office:value="0" table:formula="of:=IF([.E81]=1;[.N80]+1;0)" table:style-name="ce1">
            <text:p>0</text:p>
          </table:table-cell>
          <table:table-cell office:value-type="float" office:value="0" table:formula="of:=IF([.F81]=1;[.O80]+1;0)" table:style-name="ce1">
            <text:p>0</text:p>
          </table:table-cell>
          <table:table-cell office:value-type="float" office:value="0" table:formula="of:=IF([.G81]=1;[.P80]+1;0)" table:style-name="ce1">
            <text:p>0</text:p>
          </table:table-cell>
          <table:table-cell office:value-type="float" office:value="0" table:formula="of:=IF([.H81]=1;[.Q80]+1;0)" table:style-name="ce1">
            <text:p>0</text:p>
          </table:table-cell>
          <table:table-cell office:value-type="float" office:value="0" table:formula="of:=IF([.I81]=1;[.R8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0T00:00:00" table:formula="of:=[.A81]+1" table:style-name="ce10">
            <text:p>Fri, 20 Mar 2026</text:p>
          </table:table-cell>
          <table:table-cell office:value-type="string" office:string-value="Fri" table:formula="of:=TEXT([.A82];&quot;ddd&quot;)" table:style-name="ce5">
            <text:p>Fri</text:p>
          </table:table-cell>
          <table:table-cell office:value-type="string" office:string-value="Mar" table:formula="of:=TEXT([.A82];&quot;mmm&quot;)" table:style-name="ce5">
            <text:p>Mar</text:p>
          </table:table-cell>
          <table:table-cell office:value-type="float" office:value="0" table:formula="of:=IF(INDEX([Tracker.$A$1:.$AG$120];6+9*(MONTH([.$A82])-1)+(COLUMN()-4);DAY([.$A82])+2)&lt;&gt;&quot;&quot;;1;0)" table:style-name="ce92"/>
          <table:table-cell office:value-type="float" office:value="0" table:formula="of:=IF(INDEX([Tracker.$A$1:.$AG$120];6+9*(MONTH([.$A82])-1)+(COLUMN()-4);DAY([.$A82])+2)&lt;&gt;&quot;&quot;;1;0)" table:style-name="ce92"/>
          <table:table-cell office:value-type="float" office:value="0" table:formula="of:=IF(INDEX([Tracker.$A$1:.$AG$120];6+9*(MONTH([.$A82])-1)+(COLUMN()-4);DAY([.$A82])+2)&lt;&gt;&quot;&quot;;1;0)" table:style-name="ce92"/>
          <table:table-cell office:value-type="float" office:value="0" table:formula="of:=IF(INDEX([Tracker.$A$1:.$AG$120];6+9*(MONTH([.$A82])-1)+(COLUMN()-4);DAY([.$A82])+2)&lt;&gt;&quot;&quot;;1;0)" table:style-name="ce92"/>
          <table:table-cell office:value-type="float" office:value="0" table:formula="of:=IF(INDEX([Tracker.$A$1:.$AG$120];6+9*(MONTH([.$A82])-1)+(COLUMN()-4);DAY([.$A82])+2)&lt;&gt;&quot;&quot;;1;0)" table:style-name="ce92"/>
          <table:table-cell office:value-type="float" office:value="0" table:formula="of:=IF(INDEX([Tracker.$A$1:.$AG$120];6+9*(MONTH([.$A82])-1)+(COLUMN()-4);DAY([.$A82])+2)&lt;&gt;&quot;&quot;;1;0)" table:style-name="ce92"/>
          <table:table-cell office:value-type="float" office:value="0" table:formula="of:=SUM([.D82:.I82])" table:style-name="ce6"/>
          <table:table-cell office:value-type="percentage" office:value="0" table:formula="of:=[.J82]/6" table:style-name="ce8">
            <text:p>0%</text:p>
          </table:table-cell>
          <table:table-cell table:style-name="ce1"/>
          <table:table-cell office:value-type="float" office:value="0" table:formula="of:=IF([.D82]=1;[.M81]+1;0)" table:style-name="ce1">
            <text:p>0</text:p>
          </table:table-cell>
          <table:table-cell office:value-type="float" office:value="0" table:formula="of:=IF([.E82]=1;[.N81]+1;0)" table:style-name="ce1">
            <text:p>0</text:p>
          </table:table-cell>
          <table:table-cell office:value-type="float" office:value="0" table:formula="of:=IF([.F82]=1;[.O81]+1;0)" table:style-name="ce1">
            <text:p>0</text:p>
          </table:table-cell>
          <table:table-cell office:value-type="float" office:value="0" table:formula="of:=IF([.G82]=1;[.P81]+1;0)" table:style-name="ce1">
            <text:p>0</text:p>
          </table:table-cell>
          <table:table-cell office:value-type="float" office:value="0" table:formula="of:=IF([.H82]=1;[.Q81]+1;0)" table:style-name="ce1">
            <text:p>0</text:p>
          </table:table-cell>
          <table:table-cell office:value-type="float" office:value="0" table:formula="of:=IF([.I82]=1;[.R8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1T00:00:00" table:formula="of:=[.A82]+1" table:style-name="ce10">
            <text:p>Sat, 21 Mar 2026</text:p>
          </table:table-cell>
          <table:table-cell office:value-type="string" office:string-value="Sat" table:formula="of:=TEXT([.A83];&quot;ddd&quot;)" table:style-name="ce5">
            <text:p>Sat</text:p>
          </table:table-cell>
          <table:table-cell office:value-type="string" office:string-value="Mar" table:formula="of:=TEXT([.A83];&quot;mmm&quot;)" table:style-name="ce5">
            <text:p>Mar</text:p>
          </table:table-cell>
          <table:table-cell office:value-type="float" office:value="0" table:formula="of:=IF(INDEX([Tracker.$A$1:.$AG$120];6+9*(MONTH([.$A83])-1)+(COLUMN()-4);DAY([.$A83])+2)&lt;&gt;&quot;&quot;;1;0)" table:style-name="ce92"/>
          <table:table-cell office:value-type="float" office:value="0" table:formula="of:=IF(INDEX([Tracker.$A$1:.$AG$120];6+9*(MONTH([.$A83])-1)+(COLUMN()-4);DAY([.$A83])+2)&lt;&gt;&quot;&quot;;1;0)" table:style-name="ce92"/>
          <table:table-cell office:value-type="float" office:value="0" table:formula="of:=IF(INDEX([Tracker.$A$1:.$AG$120];6+9*(MONTH([.$A83])-1)+(COLUMN()-4);DAY([.$A83])+2)&lt;&gt;&quot;&quot;;1;0)" table:style-name="ce92"/>
          <table:table-cell office:value-type="float" office:value="0" table:formula="of:=IF(INDEX([Tracker.$A$1:.$AG$120];6+9*(MONTH([.$A83])-1)+(COLUMN()-4);DAY([.$A83])+2)&lt;&gt;&quot;&quot;;1;0)" table:style-name="ce92"/>
          <table:table-cell office:value-type="float" office:value="0" table:formula="of:=IF(INDEX([Tracker.$A$1:.$AG$120];6+9*(MONTH([.$A83])-1)+(COLUMN()-4);DAY([.$A83])+2)&lt;&gt;&quot;&quot;;1;0)" table:style-name="ce92"/>
          <table:table-cell office:value-type="float" office:value="0" table:formula="of:=IF(INDEX([Tracker.$A$1:.$AG$120];6+9*(MONTH([.$A83])-1)+(COLUMN()-4);DAY([.$A83])+2)&lt;&gt;&quot;&quot;;1;0)" table:style-name="ce92"/>
          <table:table-cell office:value-type="float" office:value="0" table:formula="of:=SUM([.D83:.I83])" table:style-name="ce6"/>
          <table:table-cell office:value-type="percentage" office:value="0" table:formula="of:=[.J83]/6" table:style-name="ce8">
            <text:p>0%</text:p>
          </table:table-cell>
          <table:table-cell table:style-name="ce1"/>
          <table:table-cell office:value-type="float" office:value="0" table:formula="of:=IF([.D83]=1;[.M82]+1;0)" table:style-name="ce1">
            <text:p>0</text:p>
          </table:table-cell>
          <table:table-cell office:value-type="float" office:value="0" table:formula="of:=IF([.E83]=1;[.N82]+1;0)" table:style-name="ce1">
            <text:p>0</text:p>
          </table:table-cell>
          <table:table-cell office:value-type="float" office:value="0" table:formula="of:=IF([.F83]=1;[.O82]+1;0)" table:style-name="ce1">
            <text:p>0</text:p>
          </table:table-cell>
          <table:table-cell office:value-type="float" office:value="0" table:formula="of:=IF([.G83]=1;[.P82]+1;0)" table:style-name="ce1">
            <text:p>0</text:p>
          </table:table-cell>
          <table:table-cell office:value-type="float" office:value="0" table:formula="of:=IF([.H83]=1;[.Q82]+1;0)" table:style-name="ce1">
            <text:p>0</text:p>
          </table:table-cell>
          <table:table-cell office:value-type="float" office:value="0" table:formula="of:=IF([.I83]=1;[.R8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2T00:00:00" table:formula="of:=[.A83]+1" table:style-name="ce10">
            <text:p>Sun, 22 Mar 2026</text:p>
          </table:table-cell>
          <table:table-cell office:value-type="string" office:string-value="Sun" table:formula="of:=TEXT([.A84];&quot;ddd&quot;)" table:style-name="ce5">
            <text:p>Sun</text:p>
          </table:table-cell>
          <table:table-cell office:value-type="string" office:string-value="Mar" table:formula="of:=TEXT([.A84];&quot;mmm&quot;)" table:style-name="ce5">
            <text:p>Mar</text:p>
          </table:table-cell>
          <table:table-cell office:value-type="float" office:value="0" table:formula="of:=IF(INDEX([Tracker.$A$1:.$AG$120];6+9*(MONTH([.$A84])-1)+(COLUMN()-4);DAY([.$A84])+2)&lt;&gt;&quot;&quot;;1;0)" table:style-name="ce92"/>
          <table:table-cell office:value-type="float" office:value="0" table:formula="of:=IF(INDEX([Tracker.$A$1:.$AG$120];6+9*(MONTH([.$A84])-1)+(COLUMN()-4);DAY([.$A84])+2)&lt;&gt;&quot;&quot;;1;0)" table:style-name="ce92"/>
          <table:table-cell office:value-type="float" office:value="0" table:formula="of:=IF(INDEX([Tracker.$A$1:.$AG$120];6+9*(MONTH([.$A84])-1)+(COLUMN()-4);DAY([.$A84])+2)&lt;&gt;&quot;&quot;;1;0)" table:style-name="ce92"/>
          <table:table-cell office:value-type="float" office:value="0" table:formula="of:=IF(INDEX([Tracker.$A$1:.$AG$120];6+9*(MONTH([.$A84])-1)+(COLUMN()-4);DAY([.$A84])+2)&lt;&gt;&quot;&quot;;1;0)" table:style-name="ce92"/>
          <table:table-cell office:value-type="float" office:value="0" table:formula="of:=IF(INDEX([Tracker.$A$1:.$AG$120];6+9*(MONTH([.$A84])-1)+(COLUMN()-4);DAY([.$A84])+2)&lt;&gt;&quot;&quot;;1;0)" table:style-name="ce92"/>
          <table:table-cell office:value-type="float" office:value="0" table:formula="of:=IF(INDEX([Tracker.$A$1:.$AG$120];6+9*(MONTH([.$A84])-1)+(COLUMN()-4);DAY([.$A84])+2)&lt;&gt;&quot;&quot;;1;0)" table:style-name="ce92"/>
          <table:table-cell office:value-type="float" office:value="0" table:formula="of:=SUM([.D84:.I84])" table:style-name="ce6"/>
          <table:table-cell office:value-type="percentage" office:value="0" table:formula="of:=[.J84]/6" table:style-name="ce8">
            <text:p>0%</text:p>
          </table:table-cell>
          <table:table-cell table:style-name="ce1"/>
          <table:table-cell office:value-type="float" office:value="0" table:formula="of:=IF([.D84]=1;[.M83]+1;0)" table:style-name="ce1">
            <text:p>0</text:p>
          </table:table-cell>
          <table:table-cell office:value-type="float" office:value="0" table:formula="of:=IF([.E84]=1;[.N83]+1;0)" table:style-name="ce1">
            <text:p>0</text:p>
          </table:table-cell>
          <table:table-cell office:value-type="float" office:value="0" table:formula="of:=IF([.F84]=1;[.O83]+1;0)" table:style-name="ce1">
            <text:p>0</text:p>
          </table:table-cell>
          <table:table-cell office:value-type="float" office:value="0" table:formula="of:=IF([.G84]=1;[.P83]+1;0)" table:style-name="ce1">
            <text:p>0</text:p>
          </table:table-cell>
          <table:table-cell office:value-type="float" office:value="0" table:formula="of:=IF([.H84]=1;[.Q83]+1;0)" table:style-name="ce1">
            <text:p>0</text:p>
          </table:table-cell>
          <table:table-cell office:value-type="float" office:value="0" table:formula="of:=IF([.I84]=1;[.R8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3T00:00:00" table:formula="of:=[.A84]+1" table:style-name="ce10">
            <text:p>Mon, 23 Mar 2026</text:p>
          </table:table-cell>
          <table:table-cell office:value-type="string" office:string-value="Mon" table:formula="of:=TEXT([.A85];&quot;ddd&quot;)" table:style-name="ce5">
            <text:p>Mon</text:p>
          </table:table-cell>
          <table:table-cell office:value-type="string" office:string-value="Mar" table:formula="of:=TEXT([.A85];&quot;mmm&quot;)" table:style-name="ce5">
            <text:p>Mar</text:p>
          </table:table-cell>
          <table:table-cell office:value-type="float" office:value="0" table:formula="of:=IF(INDEX([Tracker.$A$1:.$AG$120];6+9*(MONTH([.$A85])-1)+(COLUMN()-4);DAY([.$A85])+2)&lt;&gt;&quot;&quot;;1;0)" table:style-name="ce92"/>
          <table:table-cell office:value-type="float" office:value="0" table:formula="of:=IF(INDEX([Tracker.$A$1:.$AG$120];6+9*(MONTH([.$A85])-1)+(COLUMN()-4);DAY([.$A85])+2)&lt;&gt;&quot;&quot;;1;0)" table:style-name="ce92"/>
          <table:table-cell office:value-type="float" office:value="0" table:formula="of:=IF(INDEX([Tracker.$A$1:.$AG$120];6+9*(MONTH([.$A85])-1)+(COLUMN()-4);DAY([.$A85])+2)&lt;&gt;&quot;&quot;;1;0)" table:style-name="ce92"/>
          <table:table-cell office:value-type="float" office:value="0" table:formula="of:=IF(INDEX([Tracker.$A$1:.$AG$120];6+9*(MONTH([.$A85])-1)+(COLUMN()-4);DAY([.$A85])+2)&lt;&gt;&quot;&quot;;1;0)" table:style-name="ce92"/>
          <table:table-cell office:value-type="float" office:value="0" table:formula="of:=IF(INDEX([Tracker.$A$1:.$AG$120];6+9*(MONTH([.$A85])-1)+(COLUMN()-4);DAY([.$A85])+2)&lt;&gt;&quot;&quot;;1;0)" table:style-name="ce92"/>
          <table:table-cell office:value-type="float" office:value="0" table:formula="of:=IF(INDEX([Tracker.$A$1:.$AG$120];6+9*(MONTH([.$A85])-1)+(COLUMN()-4);DAY([.$A85])+2)&lt;&gt;&quot;&quot;;1;0)" table:style-name="ce92"/>
          <table:table-cell office:value-type="float" office:value="0" table:formula="of:=SUM([.D85:.I85])" table:style-name="ce6"/>
          <table:table-cell office:value-type="percentage" office:value="0" table:formula="of:=[.J85]/6" table:style-name="ce8">
            <text:p>0%</text:p>
          </table:table-cell>
          <table:table-cell table:style-name="ce1"/>
          <table:table-cell office:value-type="float" office:value="0" table:formula="of:=IF([.D85]=1;[.M84]+1;0)" table:style-name="ce1">
            <text:p>0</text:p>
          </table:table-cell>
          <table:table-cell office:value-type="float" office:value="0" table:formula="of:=IF([.E85]=1;[.N84]+1;0)" table:style-name="ce1">
            <text:p>0</text:p>
          </table:table-cell>
          <table:table-cell office:value-type="float" office:value="0" table:formula="of:=IF([.F85]=1;[.O84]+1;0)" table:style-name="ce1">
            <text:p>0</text:p>
          </table:table-cell>
          <table:table-cell office:value-type="float" office:value="0" table:formula="of:=IF([.G85]=1;[.P84]+1;0)" table:style-name="ce1">
            <text:p>0</text:p>
          </table:table-cell>
          <table:table-cell office:value-type="float" office:value="0" table:formula="of:=IF([.H85]=1;[.Q84]+1;0)" table:style-name="ce1">
            <text:p>0</text:p>
          </table:table-cell>
          <table:table-cell office:value-type="float" office:value="0" table:formula="of:=IF([.I85]=1;[.R8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4T00:00:00" table:formula="of:=[.A85]+1" table:style-name="ce10">
            <text:p>Tue, 24 Mar 2026</text:p>
          </table:table-cell>
          <table:table-cell office:value-type="string" office:string-value="Tue" table:formula="of:=TEXT([.A86];&quot;ddd&quot;)" table:style-name="ce5">
            <text:p>Tue</text:p>
          </table:table-cell>
          <table:table-cell office:value-type="string" office:string-value="Mar" table:formula="of:=TEXT([.A86];&quot;mmm&quot;)" table:style-name="ce5">
            <text:p>Mar</text:p>
          </table:table-cell>
          <table:table-cell office:value-type="float" office:value="0" table:formula="of:=IF(INDEX([Tracker.$A$1:.$AG$120];6+9*(MONTH([.$A86])-1)+(COLUMN()-4);DAY([.$A86])+2)&lt;&gt;&quot;&quot;;1;0)" table:style-name="ce92"/>
          <table:table-cell office:value-type="float" office:value="0" table:formula="of:=IF(INDEX([Tracker.$A$1:.$AG$120];6+9*(MONTH([.$A86])-1)+(COLUMN()-4);DAY([.$A86])+2)&lt;&gt;&quot;&quot;;1;0)" table:style-name="ce92"/>
          <table:table-cell office:value-type="float" office:value="0" table:formula="of:=IF(INDEX([Tracker.$A$1:.$AG$120];6+9*(MONTH([.$A86])-1)+(COLUMN()-4);DAY([.$A86])+2)&lt;&gt;&quot;&quot;;1;0)" table:style-name="ce92"/>
          <table:table-cell office:value-type="float" office:value="0" table:formula="of:=IF(INDEX([Tracker.$A$1:.$AG$120];6+9*(MONTH([.$A86])-1)+(COLUMN()-4);DAY([.$A86])+2)&lt;&gt;&quot;&quot;;1;0)" table:style-name="ce92"/>
          <table:table-cell office:value-type="float" office:value="0" table:formula="of:=IF(INDEX([Tracker.$A$1:.$AG$120];6+9*(MONTH([.$A86])-1)+(COLUMN()-4);DAY([.$A86])+2)&lt;&gt;&quot;&quot;;1;0)" table:style-name="ce92"/>
          <table:table-cell office:value-type="float" office:value="0" table:formula="of:=IF(INDEX([Tracker.$A$1:.$AG$120];6+9*(MONTH([.$A86])-1)+(COLUMN()-4);DAY([.$A86])+2)&lt;&gt;&quot;&quot;;1;0)" table:style-name="ce92"/>
          <table:table-cell office:value-type="float" office:value="0" table:formula="of:=SUM([.D86:.I86])" table:style-name="ce6"/>
          <table:table-cell office:value-type="percentage" office:value="0" table:formula="of:=[.J86]/6" table:style-name="ce8">
            <text:p>0%</text:p>
          </table:table-cell>
          <table:table-cell table:style-name="ce1"/>
          <table:table-cell office:value-type="float" office:value="0" table:formula="of:=IF([.D86]=1;[.M85]+1;0)" table:style-name="ce1">
            <text:p>0</text:p>
          </table:table-cell>
          <table:table-cell office:value-type="float" office:value="0" table:formula="of:=IF([.E86]=1;[.N85]+1;0)" table:style-name="ce1">
            <text:p>0</text:p>
          </table:table-cell>
          <table:table-cell office:value-type="float" office:value="0" table:formula="of:=IF([.F86]=1;[.O85]+1;0)" table:style-name="ce1">
            <text:p>0</text:p>
          </table:table-cell>
          <table:table-cell office:value-type="float" office:value="0" table:formula="of:=IF([.G86]=1;[.P85]+1;0)" table:style-name="ce1">
            <text:p>0</text:p>
          </table:table-cell>
          <table:table-cell office:value-type="float" office:value="0" table:formula="of:=IF([.H86]=1;[.Q85]+1;0)" table:style-name="ce1">
            <text:p>0</text:p>
          </table:table-cell>
          <table:table-cell office:value-type="float" office:value="0" table:formula="of:=IF([.I86]=1;[.R8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5T00:00:00" table:formula="of:=[.A86]+1" table:style-name="ce10">
            <text:p>Wed, 25 Mar 2026</text:p>
          </table:table-cell>
          <table:table-cell office:value-type="string" office:string-value="Wed" table:formula="of:=TEXT([.A87];&quot;ddd&quot;)" table:style-name="ce5">
            <text:p>Wed</text:p>
          </table:table-cell>
          <table:table-cell office:value-type="string" office:string-value="Mar" table:formula="of:=TEXT([.A87];&quot;mmm&quot;)" table:style-name="ce5">
            <text:p>Mar</text:p>
          </table:table-cell>
          <table:table-cell office:value-type="float" office:value="0" table:formula="of:=IF(INDEX([Tracker.$A$1:.$AG$120];6+9*(MONTH([.$A87])-1)+(COLUMN()-4);DAY([.$A87])+2)&lt;&gt;&quot;&quot;;1;0)" table:style-name="ce92"/>
          <table:table-cell office:value-type="float" office:value="0" table:formula="of:=IF(INDEX([Tracker.$A$1:.$AG$120];6+9*(MONTH([.$A87])-1)+(COLUMN()-4);DAY([.$A87])+2)&lt;&gt;&quot;&quot;;1;0)" table:style-name="ce92"/>
          <table:table-cell office:value-type="float" office:value="0" table:formula="of:=IF(INDEX([Tracker.$A$1:.$AG$120];6+9*(MONTH([.$A87])-1)+(COLUMN()-4);DAY([.$A87])+2)&lt;&gt;&quot;&quot;;1;0)" table:style-name="ce92"/>
          <table:table-cell office:value-type="float" office:value="0" table:formula="of:=IF(INDEX([Tracker.$A$1:.$AG$120];6+9*(MONTH([.$A87])-1)+(COLUMN()-4);DAY([.$A87])+2)&lt;&gt;&quot;&quot;;1;0)" table:style-name="ce92"/>
          <table:table-cell office:value-type="float" office:value="0" table:formula="of:=IF(INDEX([Tracker.$A$1:.$AG$120];6+9*(MONTH([.$A87])-1)+(COLUMN()-4);DAY([.$A87])+2)&lt;&gt;&quot;&quot;;1;0)" table:style-name="ce92"/>
          <table:table-cell office:value-type="float" office:value="0" table:formula="of:=IF(INDEX([Tracker.$A$1:.$AG$120];6+9*(MONTH([.$A87])-1)+(COLUMN()-4);DAY([.$A87])+2)&lt;&gt;&quot;&quot;;1;0)" table:style-name="ce92"/>
          <table:table-cell office:value-type="float" office:value="0" table:formula="of:=SUM([.D87:.I87])" table:style-name="ce6"/>
          <table:table-cell office:value-type="percentage" office:value="0" table:formula="of:=[.J87]/6" table:style-name="ce8">
            <text:p>0%</text:p>
          </table:table-cell>
          <table:table-cell table:style-name="ce1"/>
          <table:table-cell office:value-type="float" office:value="0" table:formula="of:=IF([.D87]=1;[.M86]+1;0)" table:style-name="ce1">
            <text:p>0</text:p>
          </table:table-cell>
          <table:table-cell office:value-type="float" office:value="0" table:formula="of:=IF([.E87]=1;[.N86]+1;0)" table:style-name="ce1">
            <text:p>0</text:p>
          </table:table-cell>
          <table:table-cell office:value-type="float" office:value="0" table:formula="of:=IF([.F87]=1;[.O86]+1;0)" table:style-name="ce1">
            <text:p>0</text:p>
          </table:table-cell>
          <table:table-cell office:value-type="float" office:value="0" table:formula="of:=IF([.G87]=1;[.P86]+1;0)" table:style-name="ce1">
            <text:p>0</text:p>
          </table:table-cell>
          <table:table-cell office:value-type="float" office:value="0" table:formula="of:=IF([.H87]=1;[.Q86]+1;0)" table:style-name="ce1">
            <text:p>0</text:p>
          </table:table-cell>
          <table:table-cell office:value-type="float" office:value="0" table:formula="of:=IF([.I87]=1;[.R8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6T00:00:00" table:formula="of:=[.A87]+1" table:style-name="ce10">
            <text:p>Thu, 26 Mar 2026</text:p>
          </table:table-cell>
          <table:table-cell office:value-type="string" office:string-value="Thu" table:formula="of:=TEXT([.A88];&quot;ddd&quot;)" table:style-name="ce5">
            <text:p>Thu</text:p>
          </table:table-cell>
          <table:table-cell office:value-type="string" office:string-value="Mar" table:formula="of:=TEXT([.A88];&quot;mmm&quot;)" table:style-name="ce5">
            <text:p>Mar</text:p>
          </table:table-cell>
          <table:table-cell office:value-type="float" office:value="0" table:formula="of:=IF(INDEX([Tracker.$A$1:.$AG$120];6+9*(MONTH([.$A88])-1)+(COLUMN()-4);DAY([.$A88])+2)&lt;&gt;&quot;&quot;;1;0)" table:style-name="ce92"/>
          <table:table-cell office:value-type="float" office:value="0" table:formula="of:=IF(INDEX([Tracker.$A$1:.$AG$120];6+9*(MONTH([.$A88])-1)+(COLUMN()-4);DAY([.$A88])+2)&lt;&gt;&quot;&quot;;1;0)" table:style-name="ce92"/>
          <table:table-cell office:value-type="float" office:value="0" table:formula="of:=IF(INDEX([Tracker.$A$1:.$AG$120];6+9*(MONTH([.$A88])-1)+(COLUMN()-4);DAY([.$A88])+2)&lt;&gt;&quot;&quot;;1;0)" table:style-name="ce92"/>
          <table:table-cell office:value-type="float" office:value="0" table:formula="of:=IF(INDEX([Tracker.$A$1:.$AG$120];6+9*(MONTH([.$A88])-1)+(COLUMN()-4);DAY([.$A88])+2)&lt;&gt;&quot;&quot;;1;0)" table:style-name="ce92"/>
          <table:table-cell office:value-type="float" office:value="0" table:formula="of:=IF(INDEX([Tracker.$A$1:.$AG$120];6+9*(MONTH([.$A88])-1)+(COLUMN()-4);DAY([.$A88])+2)&lt;&gt;&quot;&quot;;1;0)" table:style-name="ce92"/>
          <table:table-cell office:value-type="float" office:value="0" table:formula="of:=IF(INDEX([Tracker.$A$1:.$AG$120];6+9*(MONTH([.$A88])-1)+(COLUMN()-4);DAY([.$A88])+2)&lt;&gt;&quot;&quot;;1;0)" table:style-name="ce92"/>
          <table:table-cell office:value-type="float" office:value="0" table:formula="of:=SUM([.D88:.I88])" table:style-name="ce6"/>
          <table:table-cell office:value-type="percentage" office:value="0" table:formula="of:=[.J88]/6" table:style-name="ce8">
            <text:p>0%</text:p>
          </table:table-cell>
          <table:table-cell table:style-name="ce1"/>
          <table:table-cell office:value-type="float" office:value="0" table:formula="of:=IF([.D88]=1;[.M87]+1;0)" table:style-name="ce1">
            <text:p>0</text:p>
          </table:table-cell>
          <table:table-cell office:value-type="float" office:value="0" table:formula="of:=IF([.E88]=1;[.N87]+1;0)" table:style-name="ce1">
            <text:p>0</text:p>
          </table:table-cell>
          <table:table-cell office:value-type="float" office:value="0" table:formula="of:=IF([.F88]=1;[.O87]+1;0)" table:style-name="ce1">
            <text:p>0</text:p>
          </table:table-cell>
          <table:table-cell office:value-type="float" office:value="0" table:formula="of:=IF([.G88]=1;[.P87]+1;0)" table:style-name="ce1">
            <text:p>0</text:p>
          </table:table-cell>
          <table:table-cell office:value-type="float" office:value="0" table:formula="of:=IF([.H88]=1;[.Q87]+1;0)" table:style-name="ce1">
            <text:p>0</text:p>
          </table:table-cell>
          <table:table-cell office:value-type="float" office:value="0" table:formula="of:=IF([.I88]=1;[.R8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7T00:00:00" table:formula="of:=[.A88]+1" table:style-name="ce10">
            <text:p>Fri, 27 Mar 2026</text:p>
          </table:table-cell>
          <table:table-cell office:value-type="string" office:string-value="Fri" table:formula="of:=TEXT([.A89];&quot;ddd&quot;)" table:style-name="ce5">
            <text:p>Fri</text:p>
          </table:table-cell>
          <table:table-cell office:value-type="string" office:string-value="Mar" table:formula="of:=TEXT([.A89];&quot;mmm&quot;)" table:style-name="ce5">
            <text:p>Mar</text:p>
          </table:table-cell>
          <table:table-cell office:value-type="float" office:value="0" table:formula="of:=IF(INDEX([Tracker.$A$1:.$AG$120];6+9*(MONTH([.$A89])-1)+(COLUMN()-4);DAY([.$A89])+2)&lt;&gt;&quot;&quot;;1;0)" table:style-name="ce92"/>
          <table:table-cell office:value-type="float" office:value="0" table:formula="of:=IF(INDEX([Tracker.$A$1:.$AG$120];6+9*(MONTH([.$A89])-1)+(COLUMN()-4);DAY([.$A89])+2)&lt;&gt;&quot;&quot;;1;0)" table:style-name="ce92"/>
          <table:table-cell office:value-type="float" office:value="0" table:formula="of:=IF(INDEX([Tracker.$A$1:.$AG$120];6+9*(MONTH([.$A89])-1)+(COLUMN()-4);DAY([.$A89])+2)&lt;&gt;&quot;&quot;;1;0)" table:style-name="ce92"/>
          <table:table-cell office:value-type="float" office:value="0" table:formula="of:=IF(INDEX([Tracker.$A$1:.$AG$120];6+9*(MONTH([.$A89])-1)+(COLUMN()-4);DAY([.$A89])+2)&lt;&gt;&quot;&quot;;1;0)" table:style-name="ce92"/>
          <table:table-cell office:value-type="float" office:value="0" table:formula="of:=IF(INDEX([Tracker.$A$1:.$AG$120];6+9*(MONTH([.$A89])-1)+(COLUMN()-4);DAY([.$A89])+2)&lt;&gt;&quot;&quot;;1;0)" table:style-name="ce92"/>
          <table:table-cell office:value-type="float" office:value="0" table:formula="of:=IF(INDEX([Tracker.$A$1:.$AG$120];6+9*(MONTH([.$A89])-1)+(COLUMN()-4);DAY([.$A89])+2)&lt;&gt;&quot;&quot;;1;0)" table:style-name="ce92"/>
          <table:table-cell office:value-type="float" office:value="0" table:formula="of:=SUM([.D89:.I89])" table:style-name="ce6"/>
          <table:table-cell office:value-type="percentage" office:value="0" table:formula="of:=[.J89]/6" table:style-name="ce8">
            <text:p>0%</text:p>
          </table:table-cell>
          <table:table-cell table:style-name="ce1"/>
          <table:table-cell office:value-type="float" office:value="0" table:formula="of:=IF([.D89]=1;[.M88]+1;0)" table:style-name="ce1">
            <text:p>0</text:p>
          </table:table-cell>
          <table:table-cell office:value-type="float" office:value="0" table:formula="of:=IF([.E89]=1;[.N88]+1;0)" table:style-name="ce1">
            <text:p>0</text:p>
          </table:table-cell>
          <table:table-cell office:value-type="float" office:value="0" table:formula="of:=IF([.F89]=1;[.O88]+1;0)" table:style-name="ce1">
            <text:p>0</text:p>
          </table:table-cell>
          <table:table-cell office:value-type="float" office:value="0" table:formula="of:=IF([.G89]=1;[.P88]+1;0)" table:style-name="ce1">
            <text:p>0</text:p>
          </table:table-cell>
          <table:table-cell office:value-type="float" office:value="0" table:formula="of:=IF([.H89]=1;[.Q88]+1;0)" table:style-name="ce1">
            <text:p>0</text:p>
          </table:table-cell>
          <table:table-cell office:value-type="float" office:value="0" table:formula="of:=IF([.I89]=1;[.R8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8T00:00:00" table:formula="of:=[.A89]+1" table:style-name="ce10">
            <text:p>Sat, 28 Mar 2026</text:p>
          </table:table-cell>
          <table:table-cell office:value-type="string" office:string-value="Sat" table:formula="of:=TEXT([.A90];&quot;ddd&quot;)" table:style-name="ce5">
            <text:p>Sat</text:p>
          </table:table-cell>
          <table:table-cell office:value-type="string" office:string-value="Mar" table:formula="of:=TEXT([.A90];&quot;mmm&quot;)" table:style-name="ce5">
            <text:p>Mar</text:p>
          </table:table-cell>
          <table:table-cell office:value-type="float" office:value="0" table:formula="of:=IF(INDEX([Tracker.$A$1:.$AG$120];6+9*(MONTH([.$A90])-1)+(COLUMN()-4);DAY([.$A90])+2)&lt;&gt;&quot;&quot;;1;0)" table:style-name="ce92"/>
          <table:table-cell office:value-type="float" office:value="0" table:formula="of:=IF(INDEX([Tracker.$A$1:.$AG$120];6+9*(MONTH([.$A90])-1)+(COLUMN()-4);DAY([.$A90])+2)&lt;&gt;&quot;&quot;;1;0)" table:style-name="ce92"/>
          <table:table-cell office:value-type="float" office:value="0" table:formula="of:=IF(INDEX([Tracker.$A$1:.$AG$120];6+9*(MONTH([.$A90])-1)+(COLUMN()-4);DAY([.$A90])+2)&lt;&gt;&quot;&quot;;1;0)" table:style-name="ce92"/>
          <table:table-cell office:value-type="float" office:value="0" table:formula="of:=IF(INDEX([Tracker.$A$1:.$AG$120];6+9*(MONTH([.$A90])-1)+(COLUMN()-4);DAY([.$A90])+2)&lt;&gt;&quot;&quot;;1;0)" table:style-name="ce92"/>
          <table:table-cell office:value-type="float" office:value="0" table:formula="of:=IF(INDEX([Tracker.$A$1:.$AG$120];6+9*(MONTH([.$A90])-1)+(COLUMN()-4);DAY([.$A90])+2)&lt;&gt;&quot;&quot;;1;0)" table:style-name="ce92"/>
          <table:table-cell office:value-type="float" office:value="0" table:formula="of:=IF(INDEX([Tracker.$A$1:.$AG$120];6+9*(MONTH([.$A90])-1)+(COLUMN()-4);DAY([.$A90])+2)&lt;&gt;&quot;&quot;;1;0)" table:style-name="ce92"/>
          <table:table-cell office:value-type="float" office:value="0" table:formula="of:=SUM([.D90:.I90])" table:style-name="ce6"/>
          <table:table-cell office:value-type="percentage" office:value="0" table:formula="of:=[.J90]/6" table:style-name="ce8">
            <text:p>0%</text:p>
          </table:table-cell>
          <table:table-cell table:style-name="ce1"/>
          <table:table-cell office:value-type="float" office:value="0" table:formula="of:=IF([.D90]=1;[.M89]+1;0)" table:style-name="ce1">
            <text:p>0</text:p>
          </table:table-cell>
          <table:table-cell office:value-type="float" office:value="0" table:formula="of:=IF([.E90]=1;[.N89]+1;0)" table:style-name="ce1">
            <text:p>0</text:p>
          </table:table-cell>
          <table:table-cell office:value-type="float" office:value="0" table:formula="of:=IF([.F90]=1;[.O89]+1;0)" table:style-name="ce1">
            <text:p>0</text:p>
          </table:table-cell>
          <table:table-cell office:value-type="float" office:value="0" table:formula="of:=IF([.G90]=1;[.P89]+1;0)" table:style-name="ce1">
            <text:p>0</text:p>
          </table:table-cell>
          <table:table-cell office:value-type="float" office:value="0" table:formula="of:=IF([.H90]=1;[.Q89]+1;0)" table:style-name="ce1">
            <text:p>0</text:p>
          </table:table-cell>
          <table:table-cell office:value-type="float" office:value="0" table:formula="of:=IF([.I90]=1;[.R8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29T00:00:00" table:formula="of:=[.A90]+1" table:style-name="ce10">
            <text:p>Sun, 29 Mar 2026</text:p>
          </table:table-cell>
          <table:table-cell office:value-type="string" office:string-value="Sun" table:formula="of:=TEXT([.A91];&quot;ddd&quot;)" table:style-name="ce5">
            <text:p>Sun</text:p>
          </table:table-cell>
          <table:table-cell office:value-type="string" office:string-value="Mar" table:formula="of:=TEXT([.A91];&quot;mmm&quot;)" table:style-name="ce5">
            <text:p>Mar</text:p>
          </table:table-cell>
          <table:table-cell office:value-type="float" office:value="0" table:formula="of:=IF(INDEX([Tracker.$A$1:.$AG$120];6+9*(MONTH([.$A91])-1)+(COLUMN()-4);DAY([.$A91])+2)&lt;&gt;&quot;&quot;;1;0)" table:style-name="ce92"/>
          <table:table-cell office:value-type="float" office:value="0" table:formula="of:=IF(INDEX([Tracker.$A$1:.$AG$120];6+9*(MONTH([.$A91])-1)+(COLUMN()-4);DAY([.$A91])+2)&lt;&gt;&quot;&quot;;1;0)" table:style-name="ce92"/>
          <table:table-cell office:value-type="float" office:value="0" table:formula="of:=IF(INDEX([Tracker.$A$1:.$AG$120];6+9*(MONTH([.$A91])-1)+(COLUMN()-4);DAY([.$A91])+2)&lt;&gt;&quot;&quot;;1;0)" table:style-name="ce92"/>
          <table:table-cell office:value-type="float" office:value="0" table:formula="of:=IF(INDEX([Tracker.$A$1:.$AG$120];6+9*(MONTH([.$A91])-1)+(COLUMN()-4);DAY([.$A91])+2)&lt;&gt;&quot;&quot;;1;0)" table:style-name="ce92"/>
          <table:table-cell office:value-type="float" office:value="0" table:formula="of:=IF(INDEX([Tracker.$A$1:.$AG$120];6+9*(MONTH([.$A91])-1)+(COLUMN()-4);DAY([.$A91])+2)&lt;&gt;&quot;&quot;;1;0)" table:style-name="ce92"/>
          <table:table-cell office:value-type="float" office:value="0" table:formula="of:=IF(INDEX([Tracker.$A$1:.$AG$120];6+9*(MONTH([.$A91])-1)+(COLUMN()-4);DAY([.$A91])+2)&lt;&gt;&quot;&quot;;1;0)" table:style-name="ce92"/>
          <table:table-cell office:value-type="float" office:value="0" table:formula="of:=SUM([.D91:.I91])" table:style-name="ce6"/>
          <table:table-cell office:value-type="percentage" office:value="0" table:formula="of:=[.J91]/6" table:style-name="ce8">
            <text:p>0%</text:p>
          </table:table-cell>
          <table:table-cell table:style-name="ce1"/>
          <table:table-cell office:value-type="float" office:value="0" table:formula="of:=IF([.D91]=1;[.M90]+1;0)" table:style-name="ce1">
            <text:p>0</text:p>
          </table:table-cell>
          <table:table-cell office:value-type="float" office:value="0" table:formula="of:=IF([.E91]=1;[.N90]+1;0)" table:style-name="ce1">
            <text:p>0</text:p>
          </table:table-cell>
          <table:table-cell office:value-type="float" office:value="0" table:formula="of:=IF([.F91]=1;[.O90]+1;0)" table:style-name="ce1">
            <text:p>0</text:p>
          </table:table-cell>
          <table:table-cell office:value-type="float" office:value="0" table:formula="of:=IF([.G91]=1;[.P90]+1;0)" table:style-name="ce1">
            <text:p>0</text:p>
          </table:table-cell>
          <table:table-cell office:value-type="float" office:value="0" table:formula="of:=IF([.H91]=1;[.Q90]+1;0)" table:style-name="ce1">
            <text:p>0</text:p>
          </table:table-cell>
          <table:table-cell office:value-type="float" office:value="0" table:formula="of:=IF([.I91]=1;[.R9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30T00:00:00" table:formula="of:=[.A91]+1" table:style-name="ce10">
            <text:p>Mon, 30 Mar 2026</text:p>
          </table:table-cell>
          <table:table-cell office:value-type="string" office:string-value="Mon" table:formula="of:=TEXT([.A92];&quot;ddd&quot;)" table:style-name="ce5">
            <text:p>Mon</text:p>
          </table:table-cell>
          <table:table-cell office:value-type="string" office:string-value="Mar" table:formula="of:=TEXT([.A92];&quot;mmm&quot;)" table:style-name="ce5">
            <text:p>Mar</text:p>
          </table:table-cell>
          <table:table-cell office:value-type="float" office:value="0" table:formula="of:=IF(INDEX([Tracker.$A$1:.$AG$120];6+9*(MONTH([.$A92])-1)+(COLUMN()-4);DAY([.$A92])+2)&lt;&gt;&quot;&quot;;1;0)" table:style-name="ce92"/>
          <table:table-cell office:value-type="float" office:value="0" table:formula="of:=IF(INDEX([Tracker.$A$1:.$AG$120];6+9*(MONTH([.$A92])-1)+(COLUMN()-4);DAY([.$A92])+2)&lt;&gt;&quot;&quot;;1;0)" table:style-name="ce92"/>
          <table:table-cell office:value-type="float" office:value="0" table:formula="of:=IF(INDEX([Tracker.$A$1:.$AG$120];6+9*(MONTH([.$A92])-1)+(COLUMN()-4);DAY([.$A92])+2)&lt;&gt;&quot;&quot;;1;0)" table:style-name="ce92"/>
          <table:table-cell office:value-type="float" office:value="0" table:formula="of:=IF(INDEX([Tracker.$A$1:.$AG$120];6+9*(MONTH([.$A92])-1)+(COLUMN()-4);DAY([.$A92])+2)&lt;&gt;&quot;&quot;;1;0)" table:style-name="ce92"/>
          <table:table-cell office:value-type="float" office:value="0" table:formula="of:=IF(INDEX([Tracker.$A$1:.$AG$120];6+9*(MONTH([.$A92])-1)+(COLUMN()-4);DAY([.$A92])+2)&lt;&gt;&quot;&quot;;1;0)" table:style-name="ce92"/>
          <table:table-cell office:value-type="float" office:value="0" table:formula="of:=IF(INDEX([Tracker.$A$1:.$AG$120];6+9*(MONTH([.$A92])-1)+(COLUMN()-4);DAY([.$A92])+2)&lt;&gt;&quot;&quot;;1;0)" table:style-name="ce92"/>
          <table:table-cell office:value-type="float" office:value="0" table:formula="of:=SUM([.D92:.I92])" table:style-name="ce6"/>
          <table:table-cell office:value-type="percentage" office:value="0" table:formula="of:=[.J92]/6" table:style-name="ce8">
            <text:p>0%</text:p>
          </table:table-cell>
          <table:table-cell table:style-name="ce1"/>
          <table:table-cell office:value-type="float" office:value="0" table:formula="of:=IF([.D92]=1;[.M91]+1;0)" table:style-name="ce1">
            <text:p>0</text:p>
          </table:table-cell>
          <table:table-cell office:value-type="float" office:value="0" table:formula="of:=IF([.E92]=1;[.N91]+1;0)" table:style-name="ce1">
            <text:p>0</text:p>
          </table:table-cell>
          <table:table-cell office:value-type="float" office:value="0" table:formula="of:=IF([.F92]=1;[.O91]+1;0)" table:style-name="ce1">
            <text:p>0</text:p>
          </table:table-cell>
          <table:table-cell office:value-type="float" office:value="0" table:formula="of:=IF([.G92]=1;[.P91]+1;0)" table:style-name="ce1">
            <text:p>0</text:p>
          </table:table-cell>
          <table:table-cell office:value-type="float" office:value="0" table:formula="of:=IF([.H92]=1;[.Q91]+1;0)" table:style-name="ce1">
            <text:p>0</text:p>
          </table:table-cell>
          <table:table-cell office:value-type="float" office:value="0" table:formula="of:=IF([.I92]=1;[.R9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3-31T00:00:00" table:formula="of:=[.A92]+1" table:style-name="ce10">
            <text:p>Tue, 31 Mar 2026</text:p>
          </table:table-cell>
          <table:table-cell office:value-type="string" office:string-value="Tue" table:formula="of:=TEXT([.A93];&quot;ddd&quot;)" table:style-name="ce5">
            <text:p>Tue</text:p>
          </table:table-cell>
          <table:table-cell office:value-type="string" office:string-value="Mar" table:formula="of:=TEXT([.A93];&quot;mmm&quot;)" table:style-name="ce5">
            <text:p>Mar</text:p>
          </table:table-cell>
          <table:table-cell office:value-type="float" office:value="0" table:formula="of:=IF(INDEX([Tracker.$A$1:.$AG$120];6+9*(MONTH([.$A93])-1)+(COLUMN()-4);DAY([.$A93])+2)&lt;&gt;&quot;&quot;;1;0)" table:style-name="ce92"/>
          <table:table-cell office:value-type="float" office:value="0" table:formula="of:=IF(INDEX([Tracker.$A$1:.$AG$120];6+9*(MONTH([.$A93])-1)+(COLUMN()-4);DAY([.$A93])+2)&lt;&gt;&quot;&quot;;1;0)" table:style-name="ce92"/>
          <table:table-cell office:value-type="float" office:value="0" table:formula="of:=IF(INDEX([Tracker.$A$1:.$AG$120];6+9*(MONTH([.$A93])-1)+(COLUMN()-4);DAY([.$A93])+2)&lt;&gt;&quot;&quot;;1;0)" table:style-name="ce92"/>
          <table:table-cell office:value-type="float" office:value="0" table:formula="of:=IF(INDEX([Tracker.$A$1:.$AG$120];6+9*(MONTH([.$A93])-1)+(COLUMN()-4);DAY([.$A93])+2)&lt;&gt;&quot;&quot;;1;0)" table:style-name="ce92"/>
          <table:table-cell office:value-type="float" office:value="0" table:formula="of:=IF(INDEX([Tracker.$A$1:.$AG$120];6+9*(MONTH([.$A93])-1)+(COLUMN()-4);DAY([.$A93])+2)&lt;&gt;&quot;&quot;;1;0)" table:style-name="ce92"/>
          <table:table-cell office:value-type="float" office:value="0" table:formula="of:=IF(INDEX([Tracker.$A$1:.$AG$120];6+9*(MONTH([.$A93])-1)+(COLUMN()-4);DAY([.$A93])+2)&lt;&gt;&quot;&quot;;1;0)" table:style-name="ce92"/>
          <table:table-cell office:value-type="float" office:value="0" table:formula="of:=SUM([.D93:.I93])" table:style-name="ce6"/>
          <table:table-cell office:value-type="percentage" office:value="0" table:formula="of:=[.J93]/6" table:style-name="ce8">
            <text:p>0%</text:p>
          </table:table-cell>
          <table:table-cell table:style-name="ce1"/>
          <table:table-cell office:value-type="float" office:value="0" table:formula="of:=IF([.D93]=1;[.M92]+1;0)" table:style-name="ce1">
            <text:p>0</text:p>
          </table:table-cell>
          <table:table-cell office:value-type="float" office:value="0" table:formula="of:=IF([.E93]=1;[.N92]+1;0)" table:style-name="ce1">
            <text:p>0</text:p>
          </table:table-cell>
          <table:table-cell office:value-type="float" office:value="0" table:formula="of:=IF([.F93]=1;[.O92]+1;0)" table:style-name="ce1">
            <text:p>0</text:p>
          </table:table-cell>
          <table:table-cell office:value-type="float" office:value="0" table:formula="of:=IF([.G93]=1;[.P92]+1;0)" table:style-name="ce1">
            <text:p>0</text:p>
          </table:table-cell>
          <table:table-cell office:value-type="float" office:value="0" table:formula="of:=IF([.H93]=1;[.Q92]+1;0)" table:style-name="ce1">
            <text:p>0</text:p>
          </table:table-cell>
          <table:table-cell office:value-type="float" office:value="0" table:formula="of:=IF([.I93]=1;[.R9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1T00:00:00" table:formula="of:=[.A93]+1" table:style-name="ce10">
            <text:p>Wed, 01 Apr 2026</text:p>
          </table:table-cell>
          <table:table-cell office:value-type="string" office:string-value="Wed" table:formula="of:=TEXT([.A94];&quot;ddd&quot;)" table:style-name="ce5">
            <text:p>Wed</text:p>
          </table:table-cell>
          <table:table-cell office:value-type="string" office:string-value="Apr" table:formula="of:=TEXT([.A94];&quot;mmm&quot;)" table:style-name="ce5">
            <text:p>Apr</text:p>
          </table:table-cell>
          <table:table-cell office:value-type="float" office:value="0" table:formula="of:=IF(INDEX([Tracker.$A$1:.$AG$120];6+9*(MONTH([.$A94])-1)+(COLUMN()-4);DAY([.$A94])+2)&lt;&gt;&quot;&quot;;1;0)" table:style-name="ce92"/>
          <table:table-cell office:value-type="float" office:value="0" table:formula="of:=IF(INDEX([Tracker.$A$1:.$AG$120];6+9*(MONTH([.$A94])-1)+(COLUMN()-4);DAY([.$A94])+2)&lt;&gt;&quot;&quot;;1;0)" table:style-name="ce92"/>
          <table:table-cell office:value-type="float" office:value="0" table:formula="of:=IF(INDEX([Tracker.$A$1:.$AG$120];6+9*(MONTH([.$A94])-1)+(COLUMN()-4);DAY([.$A94])+2)&lt;&gt;&quot;&quot;;1;0)" table:style-name="ce92"/>
          <table:table-cell office:value-type="float" office:value="0" table:formula="of:=IF(INDEX([Tracker.$A$1:.$AG$120];6+9*(MONTH([.$A94])-1)+(COLUMN()-4);DAY([.$A94])+2)&lt;&gt;&quot;&quot;;1;0)" table:style-name="ce92"/>
          <table:table-cell office:value-type="float" office:value="0" table:formula="of:=IF(INDEX([Tracker.$A$1:.$AG$120];6+9*(MONTH([.$A94])-1)+(COLUMN()-4);DAY([.$A94])+2)&lt;&gt;&quot;&quot;;1;0)" table:style-name="ce92"/>
          <table:table-cell office:value-type="float" office:value="0" table:formula="of:=IF(INDEX([Tracker.$A$1:.$AG$120];6+9*(MONTH([.$A94])-1)+(COLUMN()-4);DAY([.$A94])+2)&lt;&gt;&quot;&quot;;1;0)" table:style-name="ce92"/>
          <table:table-cell office:value-type="float" office:value="0" table:formula="of:=SUM([.D94:.I94])" table:style-name="ce6"/>
          <table:table-cell office:value-type="percentage" office:value="0" table:formula="of:=[.J94]/6" table:style-name="ce8">
            <text:p>0%</text:p>
          </table:table-cell>
          <table:table-cell table:style-name="ce1"/>
          <table:table-cell office:value-type="float" office:value="0" table:formula="of:=IF([.D94]=1;[.M93]+1;0)" table:style-name="ce1">
            <text:p>0</text:p>
          </table:table-cell>
          <table:table-cell office:value-type="float" office:value="0" table:formula="of:=IF([.E94]=1;[.N93]+1;0)" table:style-name="ce1">
            <text:p>0</text:p>
          </table:table-cell>
          <table:table-cell office:value-type="float" office:value="0" table:formula="of:=IF([.F94]=1;[.O93]+1;0)" table:style-name="ce1">
            <text:p>0</text:p>
          </table:table-cell>
          <table:table-cell office:value-type="float" office:value="0" table:formula="of:=IF([.G94]=1;[.P93]+1;0)" table:style-name="ce1">
            <text:p>0</text:p>
          </table:table-cell>
          <table:table-cell office:value-type="float" office:value="0" table:formula="of:=IF([.H94]=1;[.Q93]+1;0)" table:style-name="ce1">
            <text:p>0</text:p>
          </table:table-cell>
          <table:table-cell office:value-type="float" office:value="0" table:formula="of:=IF([.I94]=1;[.R9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2T00:00:00" table:formula="of:=[.A94]+1" table:style-name="ce10">
            <text:p>Thu, 02 Apr 2026</text:p>
          </table:table-cell>
          <table:table-cell office:value-type="string" office:string-value="Thu" table:formula="of:=TEXT([.A95];&quot;ddd&quot;)" table:style-name="ce5">
            <text:p>Thu</text:p>
          </table:table-cell>
          <table:table-cell office:value-type="string" office:string-value="Apr" table:formula="of:=TEXT([.A95];&quot;mmm&quot;)" table:style-name="ce5">
            <text:p>Apr</text:p>
          </table:table-cell>
          <table:table-cell office:value-type="float" office:value="0" table:formula="of:=IF(INDEX([Tracker.$A$1:.$AG$120];6+9*(MONTH([.$A95])-1)+(COLUMN()-4);DAY([.$A95])+2)&lt;&gt;&quot;&quot;;1;0)" table:style-name="ce92"/>
          <table:table-cell office:value-type="float" office:value="0" table:formula="of:=IF(INDEX([Tracker.$A$1:.$AG$120];6+9*(MONTH([.$A95])-1)+(COLUMN()-4);DAY([.$A95])+2)&lt;&gt;&quot;&quot;;1;0)" table:style-name="ce92"/>
          <table:table-cell office:value-type="float" office:value="0" table:formula="of:=IF(INDEX([Tracker.$A$1:.$AG$120];6+9*(MONTH([.$A95])-1)+(COLUMN()-4);DAY([.$A95])+2)&lt;&gt;&quot;&quot;;1;0)" table:style-name="ce92"/>
          <table:table-cell office:value-type="float" office:value="0" table:formula="of:=IF(INDEX([Tracker.$A$1:.$AG$120];6+9*(MONTH([.$A95])-1)+(COLUMN()-4);DAY([.$A95])+2)&lt;&gt;&quot;&quot;;1;0)" table:style-name="ce92"/>
          <table:table-cell office:value-type="float" office:value="0" table:formula="of:=IF(INDEX([Tracker.$A$1:.$AG$120];6+9*(MONTH([.$A95])-1)+(COLUMN()-4);DAY([.$A95])+2)&lt;&gt;&quot;&quot;;1;0)" table:style-name="ce92"/>
          <table:table-cell office:value-type="float" office:value="0" table:formula="of:=IF(INDEX([Tracker.$A$1:.$AG$120];6+9*(MONTH([.$A95])-1)+(COLUMN()-4);DAY([.$A95])+2)&lt;&gt;&quot;&quot;;1;0)" table:style-name="ce92"/>
          <table:table-cell office:value-type="float" office:value="0" table:formula="of:=SUM([.D95:.I95])" table:style-name="ce6"/>
          <table:table-cell office:value-type="percentage" office:value="0" table:formula="of:=[.J95]/6" table:style-name="ce8">
            <text:p>0%</text:p>
          </table:table-cell>
          <table:table-cell table:style-name="ce1"/>
          <table:table-cell office:value-type="float" office:value="0" table:formula="of:=IF([.D95]=1;[.M94]+1;0)" table:style-name="ce1">
            <text:p>0</text:p>
          </table:table-cell>
          <table:table-cell office:value-type="float" office:value="0" table:formula="of:=IF([.E95]=1;[.N94]+1;0)" table:style-name="ce1">
            <text:p>0</text:p>
          </table:table-cell>
          <table:table-cell office:value-type="float" office:value="0" table:formula="of:=IF([.F95]=1;[.O94]+1;0)" table:style-name="ce1">
            <text:p>0</text:p>
          </table:table-cell>
          <table:table-cell office:value-type="float" office:value="0" table:formula="of:=IF([.G95]=1;[.P94]+1;0)" table:style-name="ce1">
            <text:p>0</text:p>
          </table:table-cell>
          <table:table-cell office:value-type="float" office:value="0" table:formula="of:=IF([.H95]=1;[.Q94]+1;0)" table:style-name="ce1">
            <text:p>0</text:p>
          </table:table-cell>
          <table:table-cell office:value-type="float" office:value="0" table:formula="of:=IF([.I95]=1;[.R9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3T00:00:00" table:formula="of:=[.A95]+1" table:style-name="ce10">
            <text:p>Fri, 03 Apr 2026</text:p>
          </table:table-cell>
          <table:table-cell office:value-type="string" office:string-value="Fri" table:formula="of:=TEXT([.A96];&quot;ddd&quot;)" table:style-name="ce5">
            <text:p>Fri</text:p>
          </table:table-cell>
          <table:table-cell office:value-type="string" office:string-value="Apr" table:formula="of:=TEXT([.A96];&quot;mmm&quot;)" table:style-name="ce5">
            <text:p>Apr</text:p>
          </table:table-cell>
          <table:table-cell office:value-type="float" office:value="0" table:formula="of:=IF(INDEX([Tracker.$A$1:.$AG$120];6+9*(MONTH([.$A96])-1)+(COLUMN()-4);DAY([.$A96])+2)&lt;&gt;&quot;&quot;;1;0)" table:style-name="ce92"/>
          <table:table-cell office:value-type="float" office:value="0" table:formula="of:=IF(INDEX([Tracker.$A$1:.$AG$120];6+9*(MONTH([.$A96])-1)+(COLUMN()-4);DAY([.$A96])+2)&lt;&gt;&quot;&quot;;1;0)" table:style-name="ce92"/>
          <table:table-cell office:value-type="float" office:value="0" table:formula="of:=IF(INDEX([Tracker.$A$1:.$AG$120];6+9*(MONTH([.$A96])-1)+(COLUMN()-4);DAY([.$A96])+2)&lt;&gt;&quot;&quot;;1;0)" table:style-name="ce92"/>
          <table:table-cell office:value-type="float" office:value="0" table:formula="of:=IF(INDEX([Tracker.$A$1:.$AG$120];6+9*(MONTH([.$A96])-1)+(COLUMN()-4);DAY([.$A96])+2)&lt;&gt;&quot;&quot;;1;0)" table:style-name="ce92"/>
          <table:table-cell office:value-type="float" office:value="0" table:formula="of:=IF(INDEX([Tracker.$A$1:.$AG$120];6+9*(MONTH([.$A96])-1)+(COLUMN()-4);DAY([.$A96])+2)&lt;&gt;&quot;&quot;;1;0)" table:style-name="ce92"/>
          <table:table-cell office:value-type="float" office:value="0" table:formula="of:=IF(INDEX([Tracker.$A$1:.$AG$120];6+9*(MONTH([.$A96])-1)+(COLUMN()-4);DAY([.$A96])+2)&lt;&gt;&quot;&quot;;1;0)" table:style-name="ce92"/>
          <table:table-cell office:value-type="float" office:value="0" table:formula="of:=SUM([.D96:.I96])" table:style-name="ce6"/>
          <table:table-cell office:value-type="percentage" office:value="0" table:formula="of:=[.J96]/6" table:style-name="ce8">
            <text:p>0%</text:p>
          </table:table-cell>
          <table:table-cell table:style-name="ce1"/>
          <table:table-cell office:value-type="float" office:value="0" table:formula="of:=IF([.D96]=1;[.M95]+1;0)" table:style-name="ce1">
            <text:p>0</text:p>
          </table:table-cell>
          <table:table-cell office:value-type="float" office:value="0" table:formula="of:=IF([.E96]=1;[.N95]+1;0)" table:style-name="ce1">
            <text:p>0</text:p>
          </table:table-cell>
          <table:table-cell office:value-type="float" office:value="0" table:formula="of:=IF([.F96]=1;[.O95]+1;0)" table:style-name="ce1">
            <text:p>0</text:p>
          </table:table-cell>
          <table:table-cell office:value-type="float" office:value="0" table:formula="of:=IF([.G96]=1;[.P95]+1;0)" table:style-name="ce1">
            <text:p>0</text:p>
          </table:table-cell>
          <table:table-cell office:value-type="float" office:value="0" table:formula="of:=IF([.H96]=1;[.Q95]+1;0)" table:style-name="ce1">
            <text:p>0</text:p>
          </table:table-cell>
          <table:table-cell office:value-type="float" office:value="0" table:formula="of:=IF([.I96]=1;[.R9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4T00:00:00" table:formula="of:=[.A96]+1" table:style-name="ce10">
            <text:p>Sat, 04 Apr 2026</text:p>
          </table:table-cell>
          <table:table-cell office:value-type="string" office:string-value="Sat" table:formula="of:=TEXT([.A97];&quot;ddd&quot;)" table:style-name="ce5">
            <text:p>Sat</text:p>
          </table:table-cell>
          <table:table-cell office:value-type="string" office:string-value="Apr" table:formula="of:=TEXT([.A97];&quot;mmm&quot;)" table:style-name="ce5">
            <text:p>Apr</text:p>
          </table:table-cell>
          <table:table-cell office:value-type="float" office:value="0" table:formula="of:=IF(INDEX([Tracker.$A$1:.$AG$120];6+9*(MONTH([.$A97])-1)+(COLUMN()-4);DAY([.$A97])+2)&lt;&gt;&quot;&quot;;1;0)" table:style-name="ce92"/>
          <table:table-cell office:value-type="float" office:value="0" table:formula="of:=IF(INDEX([Tracker.$A$1:.$AG$120];6+9*(MONTH([.$A97])-1)+(COLUMN()-4);DAY([.$A97])+2)&lt;&gt;&quot;&quot;;1;0)" table:style-name="ce92"/>
          <table:table-cell office:value-type="float" office:value="0" table:formula="of:=IF(INDEX([Tracker.$A$1:.$AG$120];6+9*(MONTH([.$A97])-1)+(COLUMN()-4);DAY([.$A97])+2)&lt;&gt;&quot;&quot;;1;0)" table:style-name="ce92"/>
          <table:table-cell office:value-type="float" office:value="0" table:formula="of:=IF(INDEX([Tracker.$A$1:.$AG$120];6+9*(MONTH([.$A97])-1)+(COLUMN()-4);DAY([.$A97])+2)&lt;&gt;&quot;&quot;;1;0)" table:style-name="ce92"/>
          <table:table-cell office:value-type="float" office:value="0" table:formula="of:=IF(INDEX([Tracker.$A$1:.$AG$120];6+9*(MONTH([.$A97])-1)+(COLUMN()-4);DAY([.$A97])+2)&lt;&gt;&quot;&quot;;1;0)" table:style-name="ce92"/>
          <table:table-cell office:value-type="float" office:value="0" table:formula="of:=IF(INDEX([Tracker.$A$1:.$AG$120];6+9*(MONTH([.$A97])-1)+(COLUMN()-4);DAY([.$A97])+2)&lt;&gt;&quot;&quot;;1;0)" table:style-name="ce92"/>
          <table:table-cell office:value-type="float" office:value="0" table:formula="of:=SUM([.D97:.I97])" table:style-name="ce6"/>
          <table:table-cell office:value-type="percentage" office:value="0" table:formula="of:=[.J97]/6" table:style-name="ce8">
            <text:p>0%</text:p>
          </table:table-cell>
          <table:table-cell table:style-name="ce1"/>
          <table:table-cell office:value-type="float" office:value="0" table:formula="of:=IF([.D97]=1;[.M96]+1;0)" table:style-name="ce1">
            <text:p>0</text:p>
          </table:table-cell>
          <table:table-cell office:value-type="float" office:value="0" table:formula="of:=IF([.E97]=1;[.N96]+1;0)" table:style-name="ce1">
            <text:p>0</text:p>
          </table:table-cell>
          <table:table-cell office:value-type="float" office:value="0" table:formula="of:=IF([.F97]=1;[.O96]+1;0)" table:style-name="ce1">
            <text:p>0</text:p>
          </table:table-cell>
          <table:table-cell office:value-type="float" office:value="0" table:formula="of:=IF([.G97]=1;[.P96]+1;0)" table:style-name="ce1">
            <text:p>0</text:p>
          </table:table-cell>
          <table:table-cell office:value-type="float" office:value="0" table:formula="of:=IF([.H97]=1;[.Q96]+1;0)" table:style-name="ce1">
            <text:p>0</text:p>
          </table:table-cell>
          <table:table-cell office:value-type="float" office:value="0" table:formula="of:=IF([.I97]=1;[.R9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5T00:00:00" table:formula="of:=[.A97]+1" table:style-name="ce10">
            <text:p>Sun, 05 Apr 2026</text:p>
          </table:table-cell>
          <table:table-cell office:value-type="string" office:string-value="Sun" table:formula="of:=TEXT([.A98];&quot;ddd&quot;)" table:style-name="ce5">
            <text:p>Sun</text:p>
          </table:table-cell>
          <table:table-cell office:value-type="string" office:string-value="Apr" table:formula="of:=TEXT([.A98];&quot;mmm&quot;)" table:style-name="ce5">
            <text:p>Apr</text:p>
          </table:table-cell>
          <table:table-cell office:value-type="float" office:value="0" table:formula="of:=IF(INDEX([Tracker.$A$1:.$AG$120];6+9*(MONTH([.$A98])-1)+(COLUMN()-4);DAY([.$A98])+2)&lt;&gt;&quot;&quot;;1;0)" table:style-name="ce92"/>
          <table:table-cell office:value-type="float" office:value="0" table:formula="of:=IF(INDEX([Tracker.$A$1:.$AG$120];6+9*(MONTH([.$A98])-1)+(COLUMN()-4);DAY([.$A98])+2)&lt;&gt;&quot;&quot;;1;0)" table:style-name="ce92"/>
          <table:table-cell office:value-type="float" office:value="0" table:formula="of:=IF(INDEX([Tracker.$A$1:.$AG$120];6+9*(MONTH([.$A98])-1)+(COLUMN()-4);DAY([.$A98])+2)&lt;&gt;&quot;&quot;;1;0)" table:style-name="ce92"/>
          <table:table-cell office:value-type="float" office:value="0" table:formula="of:=IF(INDEX([Tracker.$A$1:.$AG$120];6+9*(MONTH([.$A98])-1)+(COLUMN()-4);DAY([.$A98])+2)&lt;&gt;&quot;&quot;;1;0)" table:style-name="ce92"/>
          <table:table-cell office:value-type="float" office:value="0" table:formula="of:=IF(INDEX([Tracker.$A$1:.$AG$120];6+9*(MONTH([.$A98])-1)+(COLUMN()-4);DAY([.$A98])+2)&lt;&gt;&quot;&quot;;1;0)" table:style-name="ce92"/>
          <table:table-cell office:value-type="float" office:value="0" table:formula="of:=IF(INDEX([Tracker.$A$1:.$AG$120];6+9*(MONTH([.$A98])-1)+(COLUMN()-4);DAY([.$A98])+2)&lt;&gt;&quot;&quot;;1;0)" table:style-name="ce92"/>
          <table:table-cell office:value-type="float" office:value="0" table:formula="of:=SUM([.D98:.I98])" table:style-name="ce6"/>
          <table:table-cell office:value-type="percentage" office:value="0" table:formula="of:=[.J98]/6" table:style-name="ce8">
            <text:p>0%</text:p>
          </table:table-cell>
          <table:table-cell table:style-name="ce1"/>
          <table:table-cell office:value-type="float" office:value="0" table:formula="of:=IF([.D98]=1;[.M97]+1;0)" table:style-name="ce1">
            <text:p>0</text:p>
          </table:table-cell>
          <table:table-cell office:value-type="float" office:value="0" table:formula="of:=IF([.E98]=1;[.N97]+1;0)" table:style-name="ce1">
            <text:p>0</text:p>
          </table:table-cell>
          <table:table-cell office:value-type="float" office:value="0" table:formula="of:=IF([.F98]=1;[.O97]+1;0)" table:style-name="ce1">
            <text:p>0</text:p>
          </table:table-cell>
          <table:table-cell office:value-type="float" office:value="0" table:formula="of:=IF([.G98]=1;[.P97]+1;0)" table:style-name="ce1">
            <text:p>0</text:p>
          </table:table-cell>
          <table:table-cell office:value-type="float" office:value="0" table:formula="of:=IF([.H98]=1;[.Q97]+1;0)" table:style-name="ce1">
            <text:p>0</text:p>
          </table:table-cell>
          <table:table-cell office:value-type="float" office:value="0" table:formula="of:=IF([.I98]=1;[.R9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6T00:00:00" table:formula="of:=[.A98]+1" table:style-name="ce10">
            <text:p>Mon, 06 Apr 2026</text:p>
          </table:table-cell>
          <table:table-cell office:value-type="string" office:string-value="Mon" table:formula="of:=TEXT([.A99];&quot;ddd&quot;)" table:style-name="ce5">
            <text:p>Mon</text:p>
          </table:table-cell>
          <table:table-cell office:value-type="string" office:string-value="Apr" table:formula="of:=TEXT([.A99];&quot;mmm&quot;)" table:style-name="ce5">
            <text:p>Apr</text:p>
          </table:table-cell>
          <table:table-cell office:value-type="float" office:value="0" table:formula="of:=IF(INDEX([Tracker.$A$1:.$AG$120];6+9*(MONTH([.$A99])-1)+(COLUMN()-4);DAY([.$A99])+2)&lt;&gt;&quot;&quot;;1;0)" table:style-name="ce92"/>
          <table:table-cell office:value-type="float" office:value="0" table:formula="of:=IF(INDEX([Tracker.$A$1:.$AG$120];6+9*(MONTH([.$A99])-1)+(COLUMN()-4);DAY([.$A99])+2)&lt;&gt;&quot;&quot;;1;0)" table:style-name="ce92"/>
          <table:table-cell office:value-type="float" office:value="0" table:formula="of:=IF(INDEX([Tracker.$A$1:.$AG$120];6+9*(MONTH([.$A99])-1)+(COLUMN()-4);DAY([.$A99])+2)&lt;&gt;&quot;&quot;;1;0)" table:style-name="ce92"/>
          <table:table-cell office:value-type="float" office:value="0" table:formula="of:=IF(INDEX([Tracker.$A$1:.$AG$120];6+9*(MONTH([.$A99])-1)+(COLUMN()-4);DAY([.$A99])+2)&lt;&gt;&quot;&quot;;1;0)" table:style-name="ce92"/>
          <table:table-cell office:value-type="float" office:value="0" table:formula="of:=IF(INDEX([Tracker.$A$1:.$AG$120];6+9*(MONTH([.$A99])-1)+(COLUMN()-4);DAY([.$A99])+2)&lt;&gt;&quot;&quot;;1;0)" table:style-name="ce92"/>
          <table:table-cell office:value-type="float" office:value="0" table:formula="of:=IF(INDEX([Tracker.$A$1:.$AG$120];6+9*(MONTH([.$A99])-1)+(COLUMN()-4);DAY([.$A99])+2)&lt;&gt;&quot;&quot;;1;0)" table:style-name="ce92"/>
          <table:table-cell office:value-type="float" office:value="0" table:formula="of:=SUM([.D99:.I99])" table:style-name="ce6"/>
          <table:table-cell office:value-type="percentage" office:value="0" table:formula="of:=[.J99]/6" table:style-name="ce8">
            <text:p>0%</text:p>
          </table:table-cell>
          <table:table-cell table:style-name="ce1"/>
          <table:table-cell office:value-type="float" office:value="0" table:formula="of:=IF([.D99]=1;[.M98]+1;0)" table:style-name="ce1">
            <text:p>0</text:p>
          </table:table-cell>
          <table:table-cell office:value-type="float" office:value="0" table:formula="of:=IF([.E99]=1;[.N98]+1;0)" table:style-name="ce1">
            <text:p>0</text:p>
          </table:table-cell>
          <table:table-cell office:value-type="float" office:value="0" table:formula="of:=IF([.F99]=1;[.O98]+1;0)" table:style-name="ce1">
            <text:p>0</text:p>
          </table:table-cell>
          <table:table-cell office:value-type="float" office:value="0" table:formula="of:=IF([.G99]=1;[.P98]+1;0)" table:style-name="ce1">
            <text:p>0</text:p>
          </table:table-cell>
          <table:table-cell office:value-type="float" office:value="0" table:formula="of:=IF([.H99]=1;[.Q98]+1;0)" table:style-name="ce1">
            <text:p>0</text:p>
          </table:table-cell>
          <table:table-cell office:value-type="float" office:value="0" table:formula="of:=IF([.I99]=1;[.R9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7T00:00:00" table:formula="of:=[.A99]+1" table:style-name="ce10">
            <text:p>Tue, 07 Apr 2026</text:p>
          </table:table-cell>
          <table:table-cell office:value-type="string" office:string-value="Tue" table:formula="of:=TEXT([.A100];&quot;ddd&quot;)" table:style-name="ce5">
            <text:p>Tue</text:p>
          </table:table-cell>
          <table:table-cell office:value-type="string" office:string-value="Apr" table:formula="of:=TEXT([.A100];&quot;mmm&quot;)" table:style-name="ce5">
            <text:p>Apr</text:p>
          </table:table-cell>
          <table:table-cell office:value-type="float" office:value="0" table:formula="of:=IF(INDEX([Tracker.$A$1:.$AG$120];6+9*(MONTH([.$A100])-1)+(COLUMN()-4);DAY([.$A100])+2)&lt;&gt;&quot;&quot;;1;0)" table:style-name="ce92"/>
          <table:table-cell office:value-type="float" office:value="0" table:formula="of:=IF(INDEX([Tracker.$A$1:.$AG$120];6+9*(MONTH([.$A100])-1)+(COLUMN()-4);DAY([.$A100])+2)&lt;&gt;&quot;&quot;;1;0)" table:style-name="ce92"/>
          <table:table-cell office:value-type="float" office:value="0" table:formula="of:=IF(INDEX([Tracker.$A$1:.$AG$120];6+9*(MONTH([.$A100])-1)+(COLUMN()-4);DAY([.$A100])+2)&lt;&gt;&quot;&quot;;1;0)" table:style-name="ce92"/>
          <table:table-cell office:value-type="float" office:value="0" table:formula="of:=IF(INDEX([Tracker.$A$1:.$AG$120];6+9*(MONTH([.$A100])-1)+(COLUMN()-4);DAY([.$A100])+2)&lt;&gt;&quot;&quot;;1;0)" table:style-name="ce92"/>
          <table:table-cell office:value-type="float" office:value="0" table:formula="of:=IF(INDEX([Tracker.$A$1:.$AG$120];6+9*(MONTH([.$A100])-1)+(COLUMN()-4);DAY([.$A100])+2)&lt;&gt;&quot;&quot;;1;0)" table:style-name="ce92"/>
          <table:table-cell office:value-type="float" office:value="0" table:formula="of:=IF(INDEX([Tracker.$A$1:.$AG$120];6+9*(MONTH([.$A100])-1)+(COLUMN()-4);DAY([.$A100])+2)&lt;&gt;&quot;&quot;;1;0)" table:style-name="ce92"/>
          <table:table-cell office:value-type="float" office:value="0" table:formula="of:=SUM([.D100:.I100])" table:style-name="ce6"/>
          <table:table-cell office:value-type="percentage" office:value="0" table:formula="of:=[.J100]/6" table:style-name="ce8">
            <text:p>0%</text:p>
          </table:table-cell>
          <table:table-cell table:style-name="ce1"/>
          <table:table-cell office:value-type="float" office:value="0" table:formula="of:=IF([.D100]=1;[.M99]+1;0)" table:style-name="ce1">
            <text:p>0</text:p>
          </table:table-cell>
          <table:table-cell office:value-type="float" office:value="0" table:formula="of:=IF([.E100]=1;[.N99]+1;0)" table:style-name="ce1">
            <text:p>0</text:p>
          </table:table-cell>
          <table:table-cell office:value-type="float" office:value="0" table:formula="of:=IF([.F100]=1;[.O99]+1;0)" table:style-name="ce1">
            <text:p>0</text:p>
          </table:table-cell>
          <table:table-cell office:value-type="float" office:value="0" table:formula="of:=IF([.G100]=1;[.P99]+1;0)" table:style-name="ce1">
            <text:p>0</text:p>
          </table:table-cell>
          <table:table-cell office:value-type="float" office:value="0" table:formula="of:=IF([.H100]=1;[.Q99]+1;0)" table:style-name="ce1">
            <text:p>0</text:p>
          </table:table-cell>
          <table:table-cell office:value-type="float" office:value="0" table:formula="of:=IF([.I100]=1;[.R9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8T00:00:00" table:formula="of:=[.A100]+1" table:style-name="ce10">
            <text:p>Wed, 08 Apr 2026</text:p>
          </table:table-cell>
          <table:table-cell office:value-type="string" office:string-value="Wed" table:formula="of:=TEXT([.A101];&quot;ddd&quot;)" table:style-name="ce5">
            <text:p>Wed</text:p>
          </table:table-cell>
          <table:table-cell office:value-type="string" office:string-value="Apr" table:formula="of:=TEXT([.A101];&quot;mmm&quot;)" table:style-name="ce5">
            <text:p>Apr</text:p>
          </table:table-cell>
          <table:table-cell office:value-type="float" office:value="0" table:formula="of:=IF(INDEX([Tracker.$A$1:.$AG$120];6+9*(MONTH([.$A101])-1)+(COLUMN()-4);DAY([.$A101])+2)&lt;&gt;&quot;&quot;;1;0)" table:style-name="ce92"/>
          <table:table-cell office:value-type="float" office:value="0" table:formula="of:=IF(INDEX([Tracker.$A$1:.$AG$120];6+9*(MONTH([.$A101])-1)+(COLUMN()-4);DAY([.$A101])+2)&lt;&gt;&quot;&quot;;1;0)" table:style-name="ce92"/>
          <table:table-cell office:value-type="float" office:value="0" table:formula="of:=IF(INDEX([Tracker.$A$1:.$AG$120];6+9*(MONTH([.$A101])-1)+(COLUMN()-4);DAY([.$A101])+2)&lt;&gt;&quot;&quot;;1;0)" table:style-name="ce92"/>
          <table:table-cell office:value-type="float" office:value="0" table:formula="of:=IF(INDEX([Tracker.$A$1:.$AG$120];6+9*(MONTH([.$A101])-1)+(COLUMN()-4);DAY([.$A101])+2)&lt;&gt;&quot;&quot;;1;0)" table:style-name="ce92"/>
          <table:table-cell office:value-type="float" office:value="0" table:formula="of:=IF(INDEX([Tracker.$A$1:.$AG$120];6+9*(MONTH([.$A101])-1)+(COLUMN()-4);DAY([.$A101])+2)&lt;&gt;&quot;&quot;;1;0)" table:style-name="ce92"/>
          <table:table-cell office:value-type="float" office:value="0" table:formula="of:=IF(INDEX([Tracker.$A$1:.$AG$120];6+9*(MONTH([.$A101])-1)+(COLUMN()-4);DAY([.$A101])+2)&lt;&gt;&quot;&quot;;1;0)" table:style-name="ce92"/>
          <table:table-cell office:value-type="float" office:value="0" table:formula="of:=SUM([.D101:.I101])" table:style-name="ce6"/>
          <table:table-cell office:value-type="percentage" office:value="0" table:formula="of:=[.J101]/6" table:style-name="ce8">
            <text:p>0%</text:p>
          </table:table-cell>
          <table:table-cell table:style-name="ce1"/>
          <table:table-cell office:value-type="float" office:value="0" table:formula="of:=IF([.D101]=1;[.M100]+1;0)" table:style-name="ce1">
            <text:p>0</text:p>
          </table:table-cell>
          <table:table-cell office:value-type="float" office:value="0" table:formula="of:=IF([.E101]=1;[.N100]+1;0)" table:style-name="ce1">
            <text:p>0</text:p>
          </table:table-cell>
          <table:table-cell office:value-type="float" office:value="0" table:formula="of:=IF([.F101]=1;[.O100]+1;0)" table:style-name="ce1">
            <text:p>0</text:p>
          </table:table-cell>
          <table:table-cell office:value-type="float" office:value="0" table:formula="of:=IF([.G101]=1;[.P100]+1;0)" table:style-name="ce1">
            <text:p>0</text:p>
          </table:table-cell>
          <table:table-cell office:value-type="float" office:value="0" table:formula="of:=IF([.H101]=1;[.Q100]+1;0)" table:style-name="ce1">
            <text:p>0</text:p>
          </table:table-cell>
          <table:table-cell office:value-type="float" office:value="0" table:formula="of:=IF([.I101]=1;[.R10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09T00:00:00" table:formula="of:=[.A101]+1" table:style-name="ce10">
            <text:p>Thu, 09 Apr 2026</text:p>
          </table:table-cell>
          <table:table-cell office:value-type="string" office:string-value="Thu" table:formula="of:=TEXT([.A102];&quot;ddd&quot;)" table:style-name="ce5">
            <text:p>Thu</text:p>
          </table:table-cell>
          <table:table-cell office:value-type="string" office:string-value="Apr" table:formula="of:=TEXT([.A102];&quot;mmm&quot;)" table:style-name="ce5">
            <text:p>Apr</text:p>
          </table:table-cell>
          <table:table-cell office:value-type="float" office:value="0" table:formula="of:=IF(INDEX([Tracker.$A$1:.$AG$120];6+9*(MONTH([.$A102])-1)+(COLUMN()-4);DAY([.$A102])+2)&lt;&gt;&quot;&quot;;1;0)" table:style-name="ce92"/>
          <table:table-cell office:value-type="float" office:value="0" table:formula="of:=IF(INDEX([Tracker.$A$1:.$AG$120];6+9*(MONTH([.$A102])-1)+(COLUMN()-4);DAY([.$A102])+2)&lt;&gt;&quot;&quot;;1;0)" table:style-name="ce92"/>
          <table:table-cell office:value-type="float" office:value="0" table:formula="of:=IF(INDEX([Tracker.$A$1:.$AG$120];6+9*(MONTH([.$A102])-1)+(COLUMN()-4);DAY([.$A102])+2)&lt;&gt;&quot;&quot;;1;0)" table:style-name="ce92"/>
          <table:table-cell office:value-type="float" office:value="0" table:formula="of:=IF(INDEX([Tracker.$A$1:.$AG$120];6+9*(MONTH([.$A102])-1)+(COLUMN()-4);DAY([.$A102])+2)&lt;&gt;&quot;&quot;;1;0)" table:style-name="ce92"/>
          <table:table-cell office:value-type="float" office:value="0" table:formula="of:=IF(INDEX([Tracker.$A$1:.$AG$120];6+9*(MONTH([.$A102])-1)+(COLUMN()-4);DAY([.$A102])+2)&lt;&gt;&quot;&quot;;1;0)" table:style-name="ce92"/>
          <table:table-cell office:value-type="float" office:value="0" table:formula="of:=IF(INDEX([Tracker.$A$1:.$AG$120];6+9*(MONTH([.$A102])-1)+(COLUMN()-4);DAY([.$A102])+2)&lt;&gt;&quot;&quot;;1;0)" table:style-name="ce92"/>
          <table:table-cell office:value-type="float" office:value="0" table:formula="of:=SUM([.D102:.I102])" table:style-name="ce6"/>
          <table:table-cell office:value-type="percentage" office:value="0" table:formula="of:=[.J102]/6" table:style-name="ce8">
            <text:p>0%</text:p>
          </table:table-cell>
          <table:table-cell table:style-name="ce1"/>
          <table:table-cell office:value-type="float" office:value="0" table:formula="of:=IF([.D102]=1;[.M101]+1;0)" table:style-name="ce1">
            <text:p>0</text:p>
          </table:table-cell>
          <table:table-cell office:value-type="float" office:value="0" table:formula="of:=IF([.E102]=1;[.N101]+1;0)" table:style-name="ce1">
            <text:p>0</text:p>
          </table:table-cell>
          <table:table-cell office:value-type="float" office:value="0" table:formula="of:=IF([.F102]=1;[.O101]+1;0)" table:style-name="ce1">
            <text:p>0</text:p>
          </table:table-cell>
          <table:table-cell office:value-type="float" office:value="0" table:formula="of:=IF([.G102]=1;[.P101]+1;0)" table:style-name="ce1">
            <text:p>0</text:p>
          </table:table-cell>
          <table:table-cell office:value-type="float" office:value="0" table:formula="of:=IF([.H102]=1;[.Q101]+1;0)" table:style-name="ce1">
            <text:p>0</text:p>
          </table:table-cell>
          <table:table-cell office:value-type="float" office:value="0" table:formula="of:=IF([.I102]=1;[.R10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0T00:00:00" table:formula="of:=[.A102]+1" table:style-name="ce10">
            <text:p>Fri, 10 Apr 2026</text:p>
          </table:table-cell>
          <table:table-cell office:value-type="string" office:string-value="Fri" table:formula="of:=TEXT([.A103];&quot;ddd&quot;)" table:style-name="ce5">
            <text:p>Fri</text:p>
          </table:table-cell>
          <table:table-cell office:value-type="string" office:string-value="Apr" table:formula="of:=TEXT([.A103];&quot;mmm&quot;)" table:style-name="ce5">
            <text:p>Apr</text:p>
          </table:table-cell>
          <table:table-cell office:value-type="float" office:value="0" table:formula="of:=IF(INDEX([Tracker.$A$1:.$AG$120];6+9*(MONTH([.$A103])-1)+(COLUMN()-4);DAY([.$A103])+2)&lt;&gt;&quot;&quot;;1;0)" table:style-name="ce92"/>
          <table:table-cell office:value-type="float" office:value="0" table:formula="of:=IF(INDEX([Tracker.$A$1:.$AG$120];6+9*(MONTH([.$A103])-1)+(COLUMN()-4);DAY([.$A103])+2)&lt;&gt;&quot;&quot;;1;0)" table:style-name="ce92"/>
          <table:table-cell office:value-type="float" office:value="0" table:formula="of:=IF(INDEX([Tracker.$A$1:.$AG$120];6+9*(MONTH([.$A103])-1)+(COLUMN()-4);DAY([.$A103])+2)&lt;&gt;&quot;&quot;;1;0)" table:style-name="ce92"/>
          <table:table-cell office:value-type="float" office:value="0" table:formula="of:=IF(INDEX([Tracker.$A$1:.$AG$120];6+9*(MONTH([.$A103])-1)+(COLUMN()-4);DAY([.$A103])+2)&lt;&gt;&quot;&quot;;1;0)" table:style-name="ce92"/>
          <table:table-cell office:value-type="float" office:value="0" table:formula="of:=IF(INDEX([Tracker.$A$1:.$AG$120];6+9*(MONTH([.$A103])-1)+(COLUMN()-4);DAY([.$A103])+2)&lt;&gt;&quot;&quot;;1;0)" table:style-name="ce92"/>
          <table:table-cell office:value-type="float" office:value="0" table:formula="of:=IF(INDEX([Tracker.$A$1:.$AG$120];6+9*(MONTH([.$A103])-1)+(COLUMN()-4);DAY([.$A103])+2)&lt;&gt;&quot;&quot;;1;0)" table:style-name="ce92"/>
          <table:table-cell office:value-type="float" office:value="0" table:formula="of:=SUM([.D103:.I103])" table:style-name="ce6"/>
          <table:table-cell office:value-type="percentage" office:value="0" table:formula="of:=[.J103]/6" table:style-name="ce8">
            <text:p>0%</text:p>
          </table:table-cell>
          <table:table-cell table:style-name="ce1"/>
          <table:table-cell office:value-type="float" office:value="0" table:formula="of:=IF([.D103]=1;[.M102]+1;0)" table:style-name="ce1">
            <text:p>0</text:p>
          </table:table-cell>
          <table:table-cell office:value-type="float" office:value="0" table:formula="of:=IF([.E103]=1;[.N102]+1;0)" table:style-name="ce1">
            <text:p>0</text:p>
          </table:table-cell>
          <table:table-cell office:value-type="float" office:value="0" table:formula="of:=IF([.F103]=1;[.O102]+1;0)" table:style-name="ce1">
            <text:p>0</text:p>
          </table:table-cell>
          <table:table-cell office:value-type="float" office:value="0" table:formula="of:=IF([.G103]=1;[.P102]+1;0)" table:style-name="ce1">
            <text:p>0</text:p>
          </table:table-cell>
          <table:table-cell office:value-type="float" office:value="0" table:formula="of:=IF([.H103]=1;[.Q102]+1;0)" table:style-name="ce1">
            <text:p>0</text:p>
          </table:table-cell>
          <table:table-cell office:value-type="float" office:value="0" table:formula="of:=IF([.I103]=1;[.R10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1T00:00:00" table:formula="of:=[.A103]+1" table:style-name="ce10">
            <text:p>Sat, 11 Apr 2026</text:p>
          </table:table-cell>
          <table:table-cell office:value-type="string" office:string-value="Sat" table:formula="of:=TEXT([.A104];&quot;ddd&quot;)" table:style-name="ce5">
            <text:p>Sat</text:p>
          </table:table-cell>
          <table:table-cell office:value-type="string" office:string-value="Apr" table:formula="of:=TEXT([.A104];&quot;mmm&quot;)" table:style-name="ce5">
            <text:p>Apr</text:p>
          </table:table-cell>
          <table:table-cell office:value-type="float" office:value="0" table:formula="of:=IF(INDEX([Tracker.$A$1:.$AG$120];6+9*(MONTH([.$A104])-1)+(COLUMN()-4);DAY([.$A104])+2)&lt;&gt;&quot;&quot;;1;0)" table:style-name="ce92"/>
          <table:table-cell office:value-type="float" office:value="0" table:formula="of:=IF(INDEX([Tracker.$A$1:.$AG$120];6+9*(MONTH([.$A104])-1)+(COLUMN()-4);DAY([.$A104])+2)&lt;&gt;&quot;&quot;;1;0)" table:style-name="ce92"/>
          <table:table-cell office:value-type="float" office:value="0" table:formula="of:=IF(INDEX([Tracker.$A$1:.$AG$120];6+9*(MONTH([.$A104])-1)+(COLUMN()-4);DAY([.$A104])+2)&lt;&gt;&quot;&quot;;1;0)" table:style-name="ce92"/>
          <table:table-cell office:value-type="float" office:value="0" table:formula="of:=IF(INDEX([Tracker.$A$1:.$AG$120];6+9*(MONTH([.$A104])-1)+(COLUMN()-4);DAY([.$A104])+2)&lt;&gt;&quot;&quot;;1;0)" table:style-name="ce92"/>
          <table:table-cell office:value-type="float" office:value="0" table:formula="of:=IF(INDEX([Tracker.$A$1:.$AG$120];6+9*(MONTH([.$A104])-1)+(COLUMN()-4);DAY([.$A104])+2)&lt;&gt;&quot;&quot;;1;0)" table:style-name="ce92"/>
          <table:table-cell office:value-type="float" office:value="0" table:formula="of:=IF(INDEX([Tracker.$A$1:.$AG$120];6+9*(MONTH([.$A104])-1)+(COLUMN()-4);DAY([.$A104])+2)&lt;&gt;&quot;&quot;;1;0)" table:style-name="ce92"/>
          <table:table-cell office:value-type="float" office:value="0" table:formula="of:=SUM([.D104:.I104])" table:style-name="ce6"/>
          <table:table-cell office:value-type="percentage" office:value="0" table:formula="of:=[.J104]/6" table:style-name="ce8">
            <text:p>0%</text:p>
          </table:table-cell>
          <table:table-cell table:style-name="ce1"/>
          <table:table-cell office:value-type="float" office:value="0" table:formula="of:=IF([.D104]=1;[.M103]+1;0)" table:style-name="ce1">
            <text:p>0</text:p>
          </table:table-cell>
          <table:table-cell office:value-type="float" office:value="0" table:formula="of:=IF([.E104]=1;[.N103]+1;0)" table:style-name="ce1">
            <text:p>0</text:p>
          </table:table-cell>
          <table:table-cell office:value-type="float" office:value="0" table:formula="of:=IF([.F104]=1;[.O103]+1;0)" table:style-name="ce1">
            <text:p>0</text:p>
          </table:table-cell>
          <table:table-cell office:value-type="float" office:value="0" table:formula="of:=IF([.G104]=1;[.P103]+1;0)" table:style-name="ce1">
            <text:p>0</text:p>
          </table:table-cell>
          <table:table-cell office:value-type="float" office:value="0" table:formula="of:=IF([.H104]=1;[.Q103]+1;0)" table:style-name="ce1">
            <text:p>0</text:p>
          </table:table-cell>
          <table:table-cell office:value-type="float" office:value="0" table:formula="of:=IF([.I104]=1;[.R10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2T00:00:00" table:formula="of:=[.A104]+1" table:style-name="ce10">
            <text:p>Sun, 12 Apr 2026</text:p>
          </table:table-cell>
          <table:table-cell office:value-type="string" office:string-value="Sun" table:formula="of:=TEXT([.A105];&quot;ddd&quot;)" table:style-name="ce5">
            <text:p>Sun</text:p>
          </table:table-cell>
          <table:table-cell office:value-type="string" office:string-value="Apr" table:formula="of:=TEXT([.A105];&quot;mmm&quot;)" table:style-name="ce5">
            <text:p>Apr</text:p>
          </table:table-cell>
          <table:table-cell office:value-type="float" office:value="0" table:formula="of:=IF(INDEX([Tracker.$A$1:.$AG$120];6+9*(MONTH([.$A105])-1)+(COLUMN()-4);DAY([.$A105])+2)&lt;&gt;&quot;&quot;;1;0)" table:style-name="ce92"/>
          <table:table-cell office:value-type="float" office:value="0" table:formula="of:=IF(INDEX([Tracker.$A$1:.$AG$120];6+9*(MONTH([.$A105])-1)+(COLUMN()-4);DAY([.$A105])+2)&lt;&gt;&quot;&quot;;1;0)" table:style-name="ce92"/>
          <table:table-cell office:value-type="float" office:value="0" table:formula="of:=IF(INDEX([Tracker.$A$1:.$AG$120];6+9*(MONTH([.$A105])-1)+(COLUMN()-4);DAY([.$A105])+2)&lt;&gt;&quot;&quot;;1;0)" table:style-name="ce92"/>
          <table:table-cell office:value-type="float" office:value="0" table:formula="of:=IF(INDEX([Tracker.$A$1:.$AG$120];6+9*(MONTH([.$A105])-1)+(COLUMN()-4);DAY([.$A105])+2)&lt;&gt;&quot;&quot;;1;0)" table:style-name="ce92"/>
          <table:table-cell office:value-type="float" office:value="0" table:formula="of:=IF(INDEX([Tracker.$A$1:.$AG$120];6+9*(MONTH([.$A105])-1)+(COLUMN()-4);DAY([.$A105])+2)&lt;&gt;&quot;&quot;;1;0)" table:style-name="ce92"/>
          <table:table-cell office:value-type="float" office:value="0" table:formula="of:=IF(INDEX([Tracker.$A$1:.$AG$120];6+9*(MONTH([.$A105])-1)+(COLUMN()-4);DAY([.$A105])+2)&lt;&gt;&quot;&quot;;1;0)" table:style-name="ce92"/>
          <table:table-cell office:value-type="float" office:value="0" table:formula="of:=SUM([.D105:.I105])" table:style-name="ce6"/>
          <table:table-cell office:value-type="percentage" office:value="0" table:formula="of:=[.J105]/6" table:style-name="ce8">
            <text:p>0%</text:p>
          </table:table-cell>
          <table:table-cell table:style-name="ce1"/>
          <table:table-cell office:value-type="float" office:value="0" table:formula="of:=IF([.D105]=1;[.M104]+1;0)" table:style-name="ce1">
            <text:p>0</text:p>
          </table:table-cell>
          <table:table-cell office:value-type="float" office:value="0" table:formula="of:=IF([.E105]=1;[.N104]+1;0)" table:style-name="ce1">
            <text:p>0</text:p>
          </table:table-cell>
          <table:table-cell office:value-type="float" office:value="0" table:formula="of:=IF([.F105]=1;[.O104]+1;0)" table:style-name="ce1">
            <text:p>0</text:p>
          </table:table-cell>
          <table:table-cell office:value-type="float" office:value="0" table:formula="of:=IF([.G105]=1;[.P104]+1;0)" table:style-name="ce1">
            <text:p>0</text:p>
          </table:table-cell>
          <table:table-cell office:value-type="float" office:value="0" table:formula="of:=IF([.H105]=1;[.Q104]+1;0)" table:style-name="ce1">
            <text:p>0</text:p>
          </table:table-cell>
          <table:table-cell office:value-type="float" office:value="0" table:formula="of:=IF([.I105]=1;[.R10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3T00:00:00" table:formula="of:=[.A105]+1" table:style-name="ce10">
            <text:p>Mon, 13 Apr 2026</text:p>
          </table:table-cell>
          <table:table-cell office:value-type="string" office:string-value="Mon" table:formula="of:=TEXT([.A106];&quot;ddd&quot;)" table:style-name="ce5">
            <text:p>Mon</text:p>
          </table:table-cell>
          <table:table-cell office:value-type="string" office:string-value="Apr" table:formula="of:=TEXT([.A106];&quot;mmm&quot;)" table:style-name="ce5">
            <text:p>Apr</text:p>
          </table:table-cell>
          <table:table-cell office:value-type="float" office:value="0" table:formula="of:=IF(INDEX([Tracker.$A$1:.$AG$120];6+9*(MONTH([.$A106])-1)+(COLUMN()-4);DAY([.$A106])+2)&lt;&gt;&quot;&quot;;1;0)" table:style-name="ce92"/>
          <table:table-cell office:value-type="float" office:value="0" table:formula="of:=IF(INDEX([Tracker.$A$1:.$AG$120];6+9*(MONTH([.$A106])-1)+(COLUMN()-4);DAY([.$A106])+2)&lt;&gt;&quot;&quot;;1;0)" table:style-name="ce92"/>
          <table:table-cell office:value-type="float" office:value="0" table:formula="of:=IF(INDEX([Tracker.$A$1:.$AG$120];6+9*(MONTH([.$A106])-1)+(COLUMN()-4);DAY([.$A106])+2)&lt;&gt;&quot;&quot;;1;0)" table:style-name="ce92"/>
          <table:table-cell office:value-type="float" office:value="0" table:formula="of:=IF(INDEX([Tracker.$A$1:.$AG$120];6+9*(MONTH([.$A106])-1)+(COLUMN()-4);DAY([.$A106])+2)&lt;&gt;&quot;&quot;;1;0)" table:style-name="ce92"/>
          <table:table-cell office:value-type="float" office:value="0" table:formula="of:=IF(INDEX([Tracker.$A$1:.$AG$120];6+9*(MONTH([.$A106])-1)+(COLUMN()-4);DAY([.$A106])+2)&lt;&gt;&quot;&quot;;1;0)" table:style-name="ce92"/>
          <table:table-cell office:value-type="float" office:value="0" table:formula="of:=IF(INDEX([Tracker.$A$1:.$AG$120];6+9*(MONTH([.$A106])-1)+(COLUMN()-4);DAY([.$A106])+2)&lt;&gt;&quot;&quot;;1;0)" table:style-name="ce92"/>
          <table:table-cell office:value-type="float" office:value="0" table:formula="of:=SUM([.D106:.I106])" table:style-name="ce6"/>
          <table:table-cell office:value-type="percentage" office:value="0" table:formula="of:=[.J106]/6" table:style-name="ce8">
            <text:p>0%</text:p>
          </table:table-cell>
          <table:table-cell table:style-name="ce1"/>
          <table:table-cell office:value-type="float" office:value="0" table:formula="of:=IF([.D106]=1;[.M105]+1;0)" table:style-name="ce1">
            <text:p>0</text:p>
          </table:table-cell>
          <table:table-cell office:value-type="float" office:value="0" table:formula="of:=IF([.E106]=1;[.N105]+1;0)" table:style-name="ce1">
            <text:p>0</text:p>
          </table:table-cell>
          <table:table-cell office:value-type="float" office:value="0" table:formula="of:=IF([.F106]=1;[.O105]+1;0)" table:style-name="ce1">
            <text:p>0</text:p>
          </table:table-cell>
          <table:table-cell office:value-type="float" office:value="0" table:formula="of:=IF([.G106]=1;[.P105]+1;0)" table:style-name="ce1">
            <text:p>0</text:p>
          </table:table-cell>
          <table:table-cell office:value-type="float" office:value="0" table:formula="of:=IF([.H106]=1;[.Q105]+1;0)" table:style-name="ce1">
            <text:p>0</text:p>
          </table:table-cell>
          <table:table-cell office:value-type="float" office:value="0" table:formula="of:=IF([.I106]=1;[.R10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4T00:00:00" table:formula="of:=[.A106]+1" table:style-name="ce10">
            <text:p>Tue, 14 Apr 2026</text:p>
          </table:table-cell>
          <table:table-cell office:value-type="string" office:string-value="Tue" table:formula="of:=TEXT([.A107];&quot;ddd&quot;)" table:style-name="ce5">
            <text:p>Tue</text:p>
          </table:table-cell>
          <table:table-cell office:value-type="string" office:string-value="Apr" table:formula="of:=TEXT([.A107];&quot;mmm&quot;)" table:style-name="ce5">
            <text:p>Apr</text:p>
          </table:table-cell>
          <table:table-cell office:value-type="float" office:value="0" table:formula="of:=IF(INDEX([Tracker.$A$1:.$AG$120];6+9*(MONTH([.$A107])-1)+(COLUMN()-4);DAY([.$A107])+2)&lt;&gt;&quot;&quot;;1;0)" table:style-name="ce92"/>
          <table:table-cell office:value-type="float" office:value="0" table:formula="of:=IF(INDEX([Tracker.$A$1:.$AG$120];6+9*(MONTH([.$A107])-1)+(COLUMN()-4);DAY([.$A107])+2)&lt;&gt;&quot;&quot;;1;0)" table:style-name="ce92"/>
          <table:table-cell office:value-type="float" office:value="0" table:formula="of:=IF(INDEX([Tracker.$A$1:.$AG$120];6+9*(MONTH([.$A107])-1)+(COLUMN()-4);DAY([.$A107])+2)&lt;&gt;&quot;&quot;;1;0)" table:style-name="ce92"/>
          <table:table-cell office:value-type="float" office:value="0" table:formula="of:=IF(INDEX([Tracker.$A$1:.$AG$120];6+9*(MONTH([.$A107])-1)+(COLUMN()-4);DAY([.$A107])+2)&lt;&gt;&quot;&quot;;1;0)" table:style-name="ce92"/>
          <table:table-cell office:value-type="float" office:value="0" table:formula="of:=IF(INDEX([Tracker.$A$1:.$AG$120];6+9*(MONTH([.$A107])-1)+(COLUMN()-4);DAY([.$A107])+2)&lt;&gt;&quot;&quot;;1;0)" table:style-name="ce92"/>
          <table:table-cell office:value-type="float" office:value="0" table:formula="of:=IF(INDEX([Tracker.$A$1:.$AG$120];6+9*(MONTH([.$A107])-1)+(COLUMN()-4);DAY([.$A107])+2)&lt;&gt;&quot;&quot;;1;0)" table:style-name="ce92"/>
          <table:table-cell office:value-type="float" office:value="0" table:formula="of:=SUM([.D107:.I107])" table:style-name="ce6"/>
          <table:table-cell office:value-type="percentage" office:value="0" table:formula="of:=[.J107]/6" table:style-name="ce8">
            <text:p>0%</text:p>
          </table:table-cell>
          <table:table-cell table:style-name="ce1"/>
          <table:table-cell office:value-type="float" office:value="0" table:formula="of:=IF([.D107]=1;[.M106]+1;0)" table:style-name="ce1">
            <text:p>0</text:p>
          </table:table-cell>
          <table:table-cell office:value-type="float" office:value="0" table:formula="of:=IF([.E107]=1;[.N106]+1;0)" table:style-name="ce1">
            <text:p>0</text:p>
          </table:table-cell>
          <table:table-cell office:value-type="float" office:value="0" table:formula="of:=IF([.F107]=1;[.O106]+1;0)" table:style-name="ce1">
            <text:p>0</text:p>
          </table:table-cell>
          <table:table-cell office:value-type="float" office:value="0" table:formula="of:=IF([.G107]=1;[.P106]+1;0)" table:style-name="ce1">
            <text:p>0</text:p>
          </table:table-cell>
          <table:table-cell office:value-type="float" office:value="0" table:formula="of:=IF([.H107]=1;[.Q106]+1;0)" table:style-name="ce1">
            <text:p>0</text:p>
          </table:table-cell>
          <table:table-cell office:value-type="float" office:value="0" table:formula="of:=IF([.I107]=1;[.R10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5T00:00:00" table:formula="of:=[.A107]+1" table:style-name="ce10">
            <text:p>Wed, 15 Apr 2026</text:p>
          </table:table-cell>
          <table:table-cell office:value-type="string" office:string-value="Wed" table:formula="of:=TEXT([.A108];&quot;ddd&quot;)" table:style-name="ce5">
            <text:p>Wed</text:p>
          </table:table-cell>
          <table:table-cell office:value-type="string" office:string-value="Apr" table:formula="of:=TEXT([.A108];&quot;mmm&quot;)" table:style-name="ce5">
            <text:p>Apr</text:p>
          </table:table-cell>
          <table:table-cell office:value-type="float" office:value="0" table:formula="of:=IF(INDEX([Tracker.$A$1:.$AG$120];6+9*(MONTH([.$A108])-1)+(COLUMN()-4);DAY([.$A108])+2)&lt;&gt;&quot;&quot;;1;0)" table:style-name="ce92"/>
          <table:table-cell office:value-type="float" office:value="0" table:formula="of:=IF(INDEX([Tracker.$A$1:.$AG$120];6+9*(MONTH([.$A108])-1)+(COLUMN()-4);DAY([.$A108])+2)&lt;&gt;&quot;&quot;;1;0)" table:style-name="ce92"/>
          <table:table-cell office:value-type="float" office:value="0" table:formula="of:=IF(INDEX([Tracker.$A$1:.$AG$120];6+9*(MONTH([.$A108])-1)+(COLUMN()-4);DAY([.$A108])+2)&lt;&gt;&quot;&quot;;1;0)" table:style-name="ce92"/>
          <table:table-cell office:value-type="float" office:value="0" table:formula="of:=IF(INDEX([Tracker.$A$1:.$AG$120];6+9*(MONTH([.$A108])-1)+(COLUMN()-4);DAY([.$A108])+2)&lt;&gt;&quot;&quot;;1;0)" table:style-name="ce92"/>
          <table:table-cell office:value-type="float" office:value="0" table:formula="of:=IF(INDEX([Tracker.$A$1:.$AG$120];6+9*(MONTH([.$A108])-1)+(COLUMN()-4);DAY([.$A108])+2)&lt;&gt;&quot;&quot;;1;0)" table:style-name="ce92"/>
          <table:table-cell office:value-type="float" office:value="0" table:formula="of:=IF(INDEX([Tracker.$A$1:.$AG$120];6+9*(MONTH([.$A108])-1)+(COLUMN()-4);DAY([.$A108])+2)&lt;&gt;&quot;&quot;;1;0)" table:style-name="ce92"/>
          <table:table-cell office:value-type="float" office:value="0" table:formula="of:=SUM([.D108:.I108])" table:style-name="ce6"/>
          <table:table-cell office:value-type="percentage" office:value="0" table:formula="of:=[.J108]/6" table:style-name="ce8">
            <text:p>0%</text:p>
          </table:table-cell>
          <table:table-cell table:style-name="ce1"/>
          <table:table-cell office:value-type="float" office:value="0" table:formula="of:=IF([.D108]=1;[.M107]+1;0)" table:style-name="ce1">
            <text:p>0</text:p>
          </table:table-cell>
          <table:table-cell office:value-type="float" office:value="0" table:formula="of:=IF([.E108]=1;[.N107]+1;0)" table:style-name="ce1">
            <text:p>0</text:p>
          </table:table-cell>
          <table:table-cell office:value-type="float" office:value="0" table:formula="of:=IF([.F108]=1;[.O107]+1;0)" table:style-name="ce1">
            <text:p>0</text:p>
          </table:table-cell>
          <table:table-cell office:value-type="float" office:value="0" table:formula="of:=IF([.G108]=1;[.P107]+1;0)" table:style-name="ce1">
            <text:p>0</text:p>
          </table:table-cell>
          <table:table-cell office:value-type="float" office:value="0" table:formula="of:=IF([.H108]=1;[.Q107]+1;0)" table:style-name="ce1">
            <text:p>0</text:p>
          </table:table-cell>
          <table:table-cell office:value-type="float" office:value="0" table:formula="of:=IF([.I108]=1;[.R10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6T00:00:00" table:formula="of:=[.A108]+1" table:style-name="ce10">
            <text:p>Thu, 16 Apr 2026</text:p>
          </table:table-cell>
          <table:table-cell office:value-type="string" office:string-value="Thu" table:formula="of:=TEXT([.A109];&quot;ddd&quot;)" table:style-name="ce5">
            <text:p>Thu</text:p>
          </table:table-cell>
          <table:table-cell office:value-type="string" office:string-value="Apr" table:formula="of:=TEXT([.A109];&quot;mmm&quot;)" table:style-name="ce5">
            <text:p>Apr</text:p>
          </table:table-cell>
          <table:table-cell office:value-type="float" office:value="0" table:formula="of:=IF(INDEX([Tracker.$A$1:.$AG$120];6+9*(MONTH([.$A109])-1)+(COLUMN()-4);DAY([.$A109])+2)&lt;&gt;&quot;&quot;;1;0)" table:style-name="ce92"/>
          <table:table-cell office:value-type="float" office:value="0" table:formula="of:=IF(INDEX([Tracker.$A$1:.$AG$120];6+9*(MONTH([.$A109])-1)+(COLUMN()-4);DAY([.$A109])+2)&lt;&gt;&quot;&quot;;1;0)" table:style-name="ce92"/>
          <table:table-cell office:value-type="float" office:value="0" table:formula="of:=IF(INDEX([Tracker.$A$1:.$AG$120];6+9*(MONTH([.$A109])-1)+(COLUMN()-4);DAY([.$A109])+2)&lt;&gt;&quot;&quot;;1;0)" table:style-name="ce92"/>
          <table:table-cell office:value-type="float" office:value="0" table:formula="of:=IF(INDEX([Tracker.$A$1:.$AG$120];6+9*(MONTH([.$A109])-1)+(COLUMN()-4);DAY([.$A109])+2)&lt;&gt;&quot;&quot;;1;0)" table:style-name="ce92"/>
          <table:table-cell office:value-type="float" office:value="0" table:formula="of:=IF(INDEX([Tracker.$A$1:.$AG$120];6+9*(MONTH([.$A109])-1)+(COLUMN()-4);DAY([.$A109])+2)&lt;&gt;&quot;&quot;;1;0)" table:style-name="ce92"/>
          <table:table-cell office:value-type="float" office:value="0" table:formula="of:=IF(INDEX([Tracker.$A$1:.$AG$120];6+9*(MONTH([.$A109])-1)+(COLUMN()-4);DAY([.$A109])+2)&lt;&gt;&quot;&quot;;1;0)" table:style-name="ce92"/>
          <table:table-cell office:value-type="float" office:value="0" table:formula="of:=SUM([.D109:.I109])" table:style-name="ce6"/>
          <table:table-cell office:value-type="percentage" office:value="0" table:formula="of:=[.J109]/6" table:style-name="ce8">
            <text:p>0%</text:p>
          </table:table-cell>
          <table:table-cell table:style-name="ce1"/>
          <table:table-cell office:value-type="float" office:value="0" table:formula="of:=IF([.D109]=1;[.M108]+1;0)" table:style-name="ce1">
            <text:p>0</text:p>
          </table:table-cell>
          <table:table-cell office:value-type="float" office:value="0" table:formula="of:=IF([.E109]=1;[.N108]+1;0)" table:style-name="ce1">
            <text:p>0</text:p>
          </table:table-cell>
          <table:table-cell office:value-type="float" office:value="0" table:formula="of:=IF([.F109]=1;[.O108]+1;0)" table:style-name="ce1">
            <text:p>0</text:p>
          </table:table-cell>
          <table:table-cell office:value-type="float" office:value="0" table:formula="of:=IF([.G109]=1;[.P108]+1;0)" table:style-name="ce1">
            <text:p>0</text:p>
          </table:table-cell>
          <table:table-cell office:value-type="float" office:value="0" table:formula="of:=IF([.H109]=1;[.Q108]+1;0)" table:style-name="ce1">
            <text:p>0</text:p>
          </table:table-cell>
          <table:table-cell office:value-type="float" office:value="0" table:formula="of:=IF([.I109]=1;[.R10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7T00:00:00" table:formula="of:=[.A109]+1" table:style-name="ce10">
            <text:p>Fri, 17 Apr 2026</text:p>
          </table:table-cell>
          <table:table-cell office:value-type="string" office:string-value="Fri" table:formula="of:=TEXT([.A110];&quot;ddd&quot;)" table:style-name="ce5">
            <text:p>Fri</text:p>
          </table:table-cell>
          <table:table-cell office:value-type="string" office:string-value="Apr" table:formula="of:=TEXT([.A110];&quot;mmm&quot;)" table:style-name="ce5">
            <text:p>Apr</text:p>
          </table:table-cell>
          <table:table-cell office:value-type="float" office:value="0" table:formula="of:=IF(INDEX([Tracker.$A$1:.$AG$120];6+9*(MONTH([.$A110])-1)+(COLUMN()-4);DAY([.$A110])+2)&lt;&gt;&quot;&quot;;1;0)" table:style-name="ce92"/>
          <table:table-cell office:value-type="float" office:value="0" table:formula="of:=IF(INDEX([Tracker.$A$1:.$AG$120];6+9*(MONTH([.$A110])-1)+(COLUMN()-4);DAY([.$A110])+2)&lt;&gt;&quot;&quot;;1;0)" table:style-name="ce92"/>
          <table:table-cell office:value-type="float" office:value="0" table:formula="of:=IF(INDEX([Tracker.$A$1:.$AG$120];6+9*(MONTH([.$A110])-1)+(COLUMN()-4);DAY([.$A110])+2)&lt;&gt;&quot;&quot;;1;0)" table:style-name="ce92"/>
          <table:table-cell office:value-type="float" office:value="0" table:formula="of:=IF(INDEX([Tracker.$A$1:.$AG$120];6+9*(MONTH([.$A110])-1)+(COLUMN()-4);DAY([.$A110])+2)&lt;&gt;&quot;&quot;;1;0)" table:style-name="ce92"/>
          <table:table-cell office:value-type="float" office:value="0" table:formula="of:=IF(INDEX([Tracker.$A$1:.$AG$120];6+9*(MONTH([.$A110])-1)+(COLUMN()-4);DAY([.$A110])+2)&lt;&gt;&quot;&quot;;1;0)" table:style-name="ce92"/>
          <table:table-cell office:value-type="float" office:value="0" table:formula="of:=IF(INDEX([Tracker.$A$1:.$AG$120];6+9*(MONTH([.$A110])-1)+(COLUMN()-4);DAY([.$A110])+2)&lt;&gt;&quot;&quot;;1;0)" table:style-name="ce92"/>
          <table:table-cell office:value-type="float" office:value="0" table:formula="of:=SUM([.D110:.I110])" table:style-name="ce6"/>
          <table:table-cell office:value-type="percentage" office:value="0" table:formula="of:=[.J110]/6" table:style-name="ce8">
            <text:p>0%</text:p>
          </table:table-cell>
          <table:table-cell table:style-name="ce1"/>
          <table:table-cell office:value-type="float" office:value="0" table:formula="of:=IF([.D110]=1;[.M109]+1;0)" table:style-name="ce1">
            <text:p>0</text:p>
          </table:table-cell>
          <table:table-cell office:value-type="float" office:value="0" table:formula="of:=IF([.E110]=1;[.N109]+1;0)" table:style-name="ce1">
            <text:p>0</text:p>
          </table:table-cell>
          <table:table-cell office:value-type="float" office:value="0" table:formula="of:=IF([.F110]=1;[.O109]+1;0)" table:style-name="ce1">
            <text:p>0</text:p>
          </table:table-cell>
          <table:table-cell office:value-type="float" office:value="0" table:formula="of:=IF([.G110]=1;[.P109]+1;0)" table:style-name="ce1">
            <text:p>0</text:p>
          </table:table-cell>
          <table:table-cell office:value-type="float" office:value="0" table:formula="of:=IF([.H110]=1;[.Q109]+1;0)" table:style-name="ce1">
            <text:p>0</text:p>
          </table:table-cell>
          <table:table-cell office:value-type="float" office:value="0" table:formula="of:=IF([.I110]=1;[.R10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8T00:00:00" table:formula="of:=[.A110]+1" table:style-name="ce10">
            <text:p>Sat, 18 Apr 2026</text:p>
          </table:table-cell>
          <table:table-cell office:value-type="string" office:string-value="Sat" table:formula="of:=TEXT([.A111];&quot;ddd&quot;)" table:style-name="ce5">
            <text:p>Sat</text:p>
          </table:table-cell>
          <table:table-cell office:value-type="string" office:string-value="Apr" table:formula="of:=TEXT([.A111];&quot;mmm&quot;)" table:style-name="ce5">
            <text:p>Apr</text:p>
          </table:table-cell>
          <table:table-cell office:value-type="float" office:value="0" table:formula="of:=IF(INDEX([Tracker.$A$1:.$AG$120];6+9*(MONTH([.$A111])-1)+(COLUMN()-4);DAY([.$A111])+2)&lt;&gt;&quot;&quot;;1;0)" table:style-name="ce92"/>
          <table:table-cell office:value-type="float" office:value="0" table:formula="of:=IF(INDEX([Tracker.$A$1:.$AG$120];6+9*(MONTH([.$A111])-1)+(COLUMN()-4);DAY([.$A111])+2)&lt;&gt;&quot;&quot;;1;0)" table:style-name="ce92"/>
          <table:table-cell office:value-type="float" office:value="0" table:formula="of:=IF(INDEX([Tracker.$A$1:.$AG$120];6+9*(MONTH([.$A111])-1)+(COLUMN()-4);DAY([.$A111])+2)&lt;&gt;&quot;&quot;;1;0)" table:style-name="ce92"/>
          <table:table-cell office:value-type="float" office:value="0" table:formula="of:=IF(INDEX([Tracker.$A$1:.$AG$120];6+9*(MONTH([.$A111])-1)+(COLUMN()-4);DAY([.$A111])+2)&lt;&gt;&quot;&quot;;1;0)" table:style-name="ce92"/>
          <table:table-cell office:value-type="float" office:value="0" table:formula="of:=IF(INDEX([Tracker.$A$1:.$AG$120];6+9*(MONTH([.$A111])-1)+(COLUMN()-4);DAY([.$A111])+2)&lt;&gt;&quot;&quot;;1;0)" table:style-name="ce92"/>
          <table:table-cell office:value-type="float" office:value="0" table:formula="of:=IF(INDEX([Tracker.$A$1:.$AG$120];6+9*(MONTH([.$A111])-1)+(COLUMN()-4);DAY([.$A111])+2)&lt;&gt;&quot;&quot;;1;0)" table:style-name="ce92"/>
          <table:table-cell office:value-type="float" office:value="0" table:formula="of:=SUM([.D111:.I111])" table:style-name="ce6"/>
          <table:table-cell office:value-type="percentage" office:value="0" table:formula="of:=[.J111]/6" table:style-name="ce8">
            <text:p>0%</text:p>
          </table:table-cell>
          <table:table-cell table:style-name="ce1"/>
          <table:table-cell office:value-type="float" office:value="0" table:formula="of:=IF([.D111]=1;[.M110]+1;0)" table:style-name="ce1">
            <text:p>0</text:p>
          </table:table-cell>
          <table:table-cell office:value-type="float" office:value="0" table:formula="of:=IF([.E111]=1;[.N110]+1;0)" table:style-name="ce1">
            <text:p>0</text:p>
          </table:table-cell>
          <table:table-cell office:value-type="float" office:value="0" table:formula="of:=IF([.F111]=1;[.O110]+1;0)" table:style-name="ce1">
            <text:p>0</text:p>
          </table:table-cell>
          <table:table-cell office:value-type="float" office:value="0" table:formula="of:=IF([.G111]=1;[.P110]+1;0)" table:style-name="ce1">
            <text:p>0</text:p>
          </table:table-cell>
          <table:table-cell office:value-type="float" office:value="0" table:formula="of:=IF([.H111]=1;[.Q110]+1;0)" table:style-name="ce1">
            <text:p>0</text:p>
          </table:table-cell>
          <table:table-cell office:value-type="float" office:value="0" table:formula="of:=IF([.I111]=1;[.R11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19T00:00:00" table:formula="of:=[.A111]+1" table:style-name="ce10">
            <text:p>Sun, 19 Apr 2026</text:p>
          </table:table-cell>
          <table:table-cell office:value-type="string" office:string-value="Sun" table:formula="of:=TEXT([.A112];&quot;ddd&quot;)" table:style-name="ce5">
            <text:p>Sun</text:p>
          </table:table-cell>
          <table:table-cell office:value-type="string" office:string-value="Apr" table:formula="of:=TEXT([.A112];&quot;mmm&quot;)" table:style-name="ce5">
            <text:p>Apr</text:p>
          </table:table-cell>
          <table:table-cell office:value-type="float" office:value="0" table:formula="of:=IF(INDEX([Tracker.$A$1:.$AG$120];6+9*(MONTH([.$A112])-1)+(COLUMN()-4);DAY([.$A112])+2)&lt;&gt;&quot;&quot;;1;0)" table:style-name="ce92"/>
          <table:table-cell office:value-type="float" office:value="0" table:formula="of:=IF(INDEX([Tracker.$A$1:.$AG$120];6+9*(MONTH([.$A112])-1)+(COLUMN()-4);DAY([.$A112])+2)&lt;&gt;&quot;&quot;;1;0)" table:style-name="ce92"/>
          <table:table-cell office:value-type="float" office:value="0" table:formula="of:=IF(INDEX([Tracker.$A$1:.$AG$120];6+9*(MONTH([.$A112])-1)+(COLUMN()-4);DAY([.$A112])+2)&lt;&gt;&quot;&quot;;1;0)" table:style-name="ce92"/>
          <table:table-cell office:value-type="float" office:value="0" table:formula="of:=IF(INDEX([Tracker.$A$1:.$AG$120];6+9*(MONTH([.$A112])-1)+(COLUMN()-4);DAY([.$A112])+2)&lt;&gt;&quot;&quot;;1;0)" table:style-name="ce92"/>
          <table:table-cell office:value-type="float" office:value="0" table:formula="of:=IF(INDEX([Tracker.$A$1:.$AG$120];6+9*(MONTH([.$A112])-1)+(COLUMN()-4);DAY([.$A112])+2)&lt;&gt;&quot;&quot;;1;0)" table:style-name="ce92"/>
          <table:table-cell office:value-type="float" office:value="0" table:formula="of:=IF(INDEX([Tracker.$A$1:.$AG$120];6+9*(MONTH([.$A112])-1)+(COLUMN()-4);DAY([.$A112])+2)&lt;&gt;&quot;&quot;;1;0)" table:style-name="ce92"/>
          <table:table-cell office:value-type="float" office:value="0" table:formula="of:=SUM([.D112:.I112])" table:style-name="ce6"/>
          <table:table-cell office:value-type="percentage" office:value="0" table:formula="of:=[.J112]/6" table:style-name="ce8">
            <text:p>0%</text:p>
          </table:table-cell>
          <table:table-cell table:style-name="ce1"/>
          <table:table-cell office:value-type="float" office:value="0" table:formula="of:=IF([.D112]=1;[.M111]+1;0)" table:style-name="ce1">
            <text:p>0</text:p>
          </table:table-cell>
          <table:table-cell office:value-type="float" office:value="0" table:formula="of:=IF([.E112]=1;[.N111]+1;0)" table:style-name="ce1">
            <text:p>0</text:p>
          </table:table-cell>
          <table:table-cell office:value-type="float" office:value="0" table:formula="of:=IF([.F112]=1;[.O111]+1;0)" table:style-name="ce1">
            <text:p>0</text:p>
          </table:table-cell>
          <table:table-cell office:value-type="float" office:value="0" table:formula="of:=IF([.G112]=1;[.P111]+1;0)" table:style-name="ce1">
            <text:p>0</text:p>
          </table:table-cell>
          <table:table-cell office:value-type="float" office:value="0" table:formula="of:=IF([.H112]=1;[.Q111]+1;0)" table:style-name="ce1">
            <text:p>0</text:p>
          </table:table-cell>
          <table:table-cell office:value-type="float" office:value="0" table:formula="of:=IF([.I112]=1;[.R11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0T00:00:00" table:formula="of:=[.A112]+1" table:style-name="ce10">
            <text:p>Mon, 20 Apr 2026</text:p>
          </table:table-cell>
          <table:table-cell office:value-type="string" office:string-value="Mon" table:formula="of:=TEXT([.A113];&quot;ddd&quot;)" table:style-name="ce5">
            <text:p>Mon</text:p>
          </table:table-cell>
          <table:table-cell office:value-type="string" office:string-value="Apr" table:formula="of:=TEXT([.A113];&quot;mmm&quot;)" table:style-name="ce5">
            <text:p>Apr</text:p>
          </table:table-cell>
          <table:table-cell office:value-type="float" office:value="0" table:formula="of:=IF(INDEX([Tracker.$A$1:.$AG$120];6+9*(MONTH([.$A113])-1)+(COLUMN()-4);DAY([.$A113])+2)&lt;&gt;&quot;&quot;;1;0)" table:style-name="ce92"/>
          <table:table-cell office:value-type="float" office:value="0" table:formula="of:=IF(INDEX([Tracker.$A$1:.$AG$120];6+9*(MONTH([.$A113])-1)+(COLUMN()-4);DAY([.$A113])+2)&lt;&gt;&quot;&quot;;1;0)" table:style-name="ce92"/>
          <table:table-cell office:value-type="float" office:value="0" table:formula="of:=IF(INDEX([Tracker.$A$1:.$AG$120];6+9*(MONTH([.$A113])-1)+(COLUMN()-4);DAY([.$A113])+2)&lt;&gt;&quot;&quot;;1;0)" table:style-name="ce92"/>
          <table:table-cell office:value-type="float" office:value="0" table:formula="of:=IF(INDEX([Tracker.$A$1:.$AG$120];6+9*(MONTH([.$A113])-1)+(COLUMN()-4);DAY([.$A113])+2)&lt;&gt;&quot;&quot;;1;0)" table:style-name="ce92"/>
          <table:table-cell office:value-type="float" office:value="0" table:formula="of:=IF(INDEX([Tracker.$A$1:.$AG$120];6+9*(MONTH([.$A113])-1)+(COLUMN()-4);DAY([.$A113])+2)&lt;&gt;&quot;&quot;;1;0)" table:style-name="ce92"/>
          <table:table-cell office:value-type="float" office:value="0" table:formula="of:=IF(INDEX([Tracker.$A$1:.$AG$120];6+9*(MONTH([.$A113])-1)+(COLUMN()-4);DAY([.$A113])+2)&lt;&gt;&quot;&quot;;1;0)" table:style-name="ce92"/>
          <table:table-cell office:value-type="float" office:value="0" table:formula="of:=SUM([.D113:.I113])" table:style-name="ce6"/>
          <table:table-cell office:value-type="percentage" office:value="0" table:formula="of:=[.J113]/6" table:style-name="ce8">
            <text:p>0%</text:p>
          </table:table-cell>
          <table:table-cell table:style-name="ce1"/>
          <table:table-cell office:value-type="float" office:value="0" table:formula="of:=IF([.D113]=1;[.M112]+1;0)" table:style-name="ce1">
            <text:p>0</text:p>
          </table:table-cell>
          <table:table-cell office:value-type="float" office:value="0" table:formula="of:=IF([.E113]=1;[.N112]+1;0)" table:style-name="ce1">
            <text:p>0</text:p>
          </table:table-cell>
          <table:table-cell office:value-type="float" office:value="0" table:formula="of:=IF([.F113]=1;[.O112]+1;0)" table:style-name="ce1">
            <text:p>0</text:p>
          </table:table-cell>
          <table:table-cell office:value-type="float" office:value="0" table:formula="of:=IF([.G113]=1;[.P112]+1;0)" table:style-name="ce1">
            <text:p>0</text:p>
          </table:table-cell>
          <table:table-cell office:value-type="float" office:value="0" table:formula="of:=IF([.H113]=1;[.Q112]+1;0)" table:style-name="ce1">
            <text:p>0</text:p>
          </table:table-cell>
          <table:table-cell office:value-type="float" office:value="0" table:formula="of:=IF([.I113]=1;[.R11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1T00:00:00" table:formula="of:=[.A113]+1" table:style-name="ce10">
            <text:p>Tue, 21 Apr 2026</text:p>
          </table:table-cell>
          <table:table-cell office:value-type="string" office:string-value="Tue" table:formula="of:=TEXT([.A114];&quot;ddd&quot;)" table:style-name="ce5">
            <text:p>Tue</text:p>
          </table:table-cell>
          <table:table-cell office:value-type="string" office:string-value="Apr" table:formula="of:=TEXT([.A114];&quot;mmm&quot;)" table:style-name="ce5">
            <text:p>Apr</text:p>
          </table:table-cell>
          <table:table-cell office:value-type="float" office:value="0" table:formula="of:=IF(INDEX([Tracker.$A$1:.$AG$120];6+9*(MONTH([.$A114])-1)+(COLUMN()-4);DAY([.$A114])+2)&lt;&gt;&quot;&quot;;1;0)" table:style-name="ce92"/>
          <table:table-cell office:value-type="float" office:value="0" table:formula="of:=IF(INDEX([Tracker.$A$1:.$AG$120];6+9*(MONTH([.$A114])-1)+(COLUMN()-4);DAY([.$A114])+2)&lt;&gt;&quot;&quot;;1;0)" table:style-name="ce92"/>
          <table:table-cell office:value-type="float" office:value="0" table:formula="of:=IF(INDEX([Tracker.$A$1:.$AG$120];6+9*(MONTH([.$A114])-1)+(COLUMN()-4);DAY([.$A114])+2)&lt;&gt;&quot;&quot;;1;0)" table:style-name="ce92"/>
          <table:table-cell office:value-type="float" office:value="0" table:formula="of:=IF(INDEX([Tracker.$A$1:.$AG$120];6+9*(MONTH([.$A114])-1)+(COLUMN()-4);DAY([.$A114])+2)&lt;&gt;&quot;&quot;;1;0)" table:style-name="ce92"/>
          <table:table-cell office:value-type="float" office:value="0" table:formula="of:=IF(INDEX([Tracker.$A$1:.$AG$120];6+9*(MONTH([.$A114])-1)+(COLUMN()-4);DAY([.$A114])+2)&lt;&gt;&quot;&quot;;1;0)" table:style-name="ce92"/>
          <table:table-cell office:value-type="float" office:value="0" table:formula="of:=IF(INDEX([Tracker.$A$1:.$AG$120];6+9*(MONTH([.$A114])-1)+(COLUMN()-4);DAY([.$A114])+2)&lt;&gt;&quot;&quot;;1;0)" table:style-name="ce92"/>
          <table:table-cell office:value-type="float" office:value="0" table:formula="of:=SUM([.D114:.I114])" table:style-name="ce6"/>
          <table:table-cell office:value-type="percentage" office:value="0" table:formula="of:=[.J114]/6" table:style-name="ce8">
            <text:p>0%</text:p>
          </table:table-cell>
          <table:table-cell table:style-name="ce1"/>
          <table:table-cell office:value-type="float" office:value="0" table:formula="of:=IF([.D114]=1;[.M113]+1;0)" table:style-name="ce1">
            <text:p>0</text:p>
          </table:table-cell>
          <table:table-cell office:value-type="float" office:value="0" table:formula="of:=IF([.E114]=1;[.N113]+1;0)" table:style-name="ce1">
            <text:p>0</text:p>
          </table:table-cell>
          <table:table-cell office:value-type="float" office:value="0" table:formula="of:=IF([.F114]=1;[.O113]+1;0)" table:style-name="ce1">
            <text:p>0</text:p>
          </table:table-cell>
          <table:table-cell office:value-type="float" office:value="0" table:formula="of:=IF([.G114]=1;[.P113]+1;0)" table:style-name="ce1">
            <text:p>0</text:p>
          </table:table-cell>
          <table:table-cell office:value-type="float" office:value="0" table:formula="of:=IF([.H114]=1;[.Q113]+1;0)" table:style-name="ce1">
            <text:p>0</text:p>
          </table:table-cell>
          <table:table-cell office:value-type="float" office:value="0" table:formula="of:=IF([.I114]=1;[.R11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2T00:00:00" table:formula="of:=[.A114]+1" table:style-name="ce10">
            <text:p>Wed, 22 Apr 2026</text:p>
          </table:table-cell>
          <table:table-cell office:value-type="string" office:string-value="Wed" table:formula="of:=TEXT([.A115];&quot;ddd&quot;)" table:style-name="ce5">
            <text:p>Wed</text:p>
          </table:table-cell>
          <table:table-cell office:value-type="string" office:string-value="Apr" table:formula="of:=TEXT([.A115];&quot;mmm&quot;)" table:style-name="ce5">
            <text:p>Apr</text:p>
          </table:table-cell>
          <table:table-cell office:value-type="float" office:value="0" table:formula="of:=IF(INDEX([Tracker.$A$1:.$AG$120];6+9*(MONTH([.$A115])-1)+(COLUMN()-4);DAY([.$A115])+2)&lt;&gt;&quot;&quot;;1;0)" table:style-name="ce92"/>
          <table:table-cell office:value-type="float" office:value="0" table:formula="of:=IF(INDEX([Tracker.$A$1:.$AG$120];6+9*(MONTH([.$A115])-1)+(COLUMN()-4);DAY([.$A115])+2)&lt;&gt;&quot;&quot;;1;0)" table:style-name="ce92"/>
          <table:table-cell office:value-type="float" office:value="0" table:formula="of:=IF(INDEX([Tracker.$A$1:.$AG$120];6+9*(MONTH([.$A115])-1)+(COLUMN()-4);DAY([.$A115])+2)&lt;&gt;&quot;&quot;;1;0)" table:style-name="ce92"/>
          <table:table-cell office:value-type="float" office:value="0" table:formula="of:=IF(INDEX([Tracker.$A$1:.$AG$120];6+9*(MONTH([.$A115])-1)+(COLUMN()-4);DAY([.$A115])+2)&lt;&gt;&quot;&quot;;1;0)" table:style-name="ce92"/>
          <table:table-cell office:value-type="float" office:value="0" table:formula="of:=IF(INDEX([Tracker.$A$1:.$AG$120];6+9*(MONTH([.$A115])-1)+(COLUMN()-4);DAY([.$A115])+2)&lt;&gt;&quot;&quot;;1;0)" table:style-name="ce92"/>
          <table:table-cell office:value-type="float" office:value="0" table:formula="of:=IF(INDEX([Tracker.$A$1:.$AG$120];6+9*(MONTH([.$A115])-1)+(COLUMN()-4);DAY([.$A115])+2)&lt;&gt;&quot;&quot;;1;0)" table:style-name="ce92"/>
          <table:table-cell office:value-type="float" office:value="0" table:formula="of:=SUM([.D115:.I115])" table:style-name="ce6"/>
          <table:table-cell office:value-type="percentage" office:value="0" table:formula="of:=[.J115]/6" table:style-name="ce8">
            <text:p>0%</text:p>
          </table:table-cell>
          <table:table-cell table:style-name="ce1"/>
          <table:table-cell office:value-type="float" office:value="0" table:formula="of:=IF([.D115]=1;[.M114]+1;0)" table:style-name="ce1">
            <text:p>0</text:p>
          </table:table-cell>
          <table:table-cell office:value-type="float" office:value="0" table:formula="of:=IF([.E115]=1;[.N114]+1;0)" table:style-name="ce1">
            <text:p>0</text:p>
          </table:table-cell>
          <table:table-cell office:value-type="float" office:value="0" table:formula="of:=IF([.F115]=1;[.O114]+1;0)" table:style-name="ce1">
            <text:p>0</text:p>
          </table:table-cell>
          <table:table-cell office:value-type="float" office:value="0" table:formula="of:=IF([.G115]=1;[.P114]+1;0)" table:style-name="ce1">
            <text:p>0</text:p>
          </table:table-cell>
          <table:table-cell office:value-type="float" office:value="0" table:formula="of:=IF([.H115]=1;[.Q114]+1;0)" table:style-name="ce1">
            <text:p>0</text:p>
          </table:table-cell>
          <table:table-cell office:value-type="float" office:value="0" table:formula="of:=IF([.I115]=1;[.R11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3T00:00:00" table:formula="of:=[.A115]+1" table:style-name="ce10">
            <text:p>Thu, 23 Apr 2026</text:p>
          </table:table-cell>
          <table:table-cell office:value-type="string" office:string-value="Thu" table:formula="of:=TEXT([.A116];&quot;ddd&quot;)" table:style-name="ce5">
            <text:p>Thu</text:p>
          </table:table-cell>
          <table:table-cell office:value-type="string" office:string-value="Apr" table:formula="of:=TEXT([.A116];&quot;mmm&quot;)" table:style-name="ce5">
            <text:p>Apr</text:p>
          </table:table-cell>
          <table:table-cell office:value-type="float" office:value="0" table:formula="of:=IF(INDEX([Tracker.$A$1:.$AG$120];6+9*(MONTH([.$A116])-1)+(COLUMN()-4);DAY([.$A116])+2)&lt;&gt;&quot;&quot;;1;0)" table:style-name="ce92"/>
          <table:table-cell office:value-type="float" office:value="0" table:formula="of:=IF(INDEX([Tracker.$A$1:.$AG$120];6+9*(MONTH([.$A116])-1)+(COLUMN()-4);DAY([.$A116])+2)&lt;&gt;&quot;&quot;;1;0)" table:style-name="ce92"/>
          <table:table-cell office:value-type="float" office:value="0" table:formula="of:=IF(INDEX([Tracker.$A$1:.$AG$120];6+9*(MONTH([.$A116])-1)+(COLUMN()-4);DAY([.$A116])+2)&lt;&gt;&quot;&quot;;1;0)" table:style-name="ce92"/>
          <table:table-cell office:value-type="float" office:value="0" table:formula="of:=IF(INDEX([Tracker.$A$1:.$AG$120];6+9*(MONTH([.$A116])-1)+(COLUMN()-4);DAY([.$A116])+2)&lt;&gt;&quot;&quot;;1;0)" table:style-name="ce92"/>
          <table:table-cell office:value-type="float" office:value="0" table:formula="of:=IF(INDEX([Tracker.$A$1:.$AG$120];6+9*(MONTH([.$A116])-1)+(COLUMN()-4);DAY([.$A116])+2)&lt;&gt;&quot;&quot;;1;0)" table:style-name="ce92"/>
          <table:table-cell office:value-type="float" office:value="0" table:formula="of:=IF(INDEX([Tracker.$A$1:.$AG$120];6+9*(MONTH([.$A116])-1)+(COLUMN()-4);DAY([.$A116])+2)&lt;&gt;&quot;&quot;;1;0)" table:style-name="ce92"/>
          <table:table-cell office:value-type="float" office:value="0" table:formula="of:=SUM([.D116:.I116])" table:style-name="ce6"/>
          <table:table-cell office:value-type="percentage" office:value="0" table:formula="of:=[.J116]/6" table:style-name="ce8">
            <text:p>0%</text:p>
          </table:table-cell>
          <table:table-cell table:style-name="ce1"/>
          <table:table-cell office:value-type="float" office:value="0" table:formula="of:=IF([.D116]=1;[.M115]+1;0)" table:style-name="ce1">
            <text:p>0</text:p>
          </table:table-cell>
          <table:table-cell office:value-type="float" office:value="0" table:formula="of:=IF([.E116]=1;[.N115]+1;0)" table:style-name="ce1">
            <text:p>0</text:p>
          </table:table-cell>
          <table:table-cell office:value-type="float" office:value="0" table:formula="of:=IF([.F116]=1;[.O115]+1;0)" table:style-name="ce1">
            <text:p>0</text:p>
          </table:table-cell>
          <table:table-cell office:value-type="float" office:value="0" table:formula="of:=IF([.G116]=1;[.P115]+1;0)" table:style-name="ce1">
            <text:p>0</text:p>
          </table:table-cell>
          <table:table-cell office:value-type="float" office:value="0" table:formula="of:=IF([.H116]=1;[.Q115]+1;0)" table:style-name="ce1">
            <text:p>0</text:p>
          </table:table-cell>
          <table:table-cell office:value-type="float" office:value="0" table:formula="of:=IF([.I116]=1;[.R11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4T00:00:00" table:formula="of:=[.A116]+1" table:style-name="ce10">
            <text:p>Fri, 24 Apr 2026</text:p>
          </table:table-cell>
          <table:table-cell office:value-type="string" office:string-value="Fri" table:formula="of:=TEXT([.A117];&quot;ddd&quot;)" table:style-name="ce5">
            <text:p>Fri</text:p>
          </table:table-cell>
          <table:table-cell office:value-type="string" office:string-value="Apr" table:formula="of:=TEXT([.A117];&quot;mmm&quot;)" table:style-name="ce5">
            <text:p>Apr</text:p>
          </table:table-cell>
          <table:table-cell office:value-type="float" office:value="0" table:formula="of:=IF(INDEX([Tracker.$A$1:.$AG$120];6+9*(MONTH([.$A117])-1)+(COLUMN()-4);DAY([.$A117])+2)&lt;&gt;&quot;&quot;;1;0)" table:style-name="ce92"/>
          <table:table-cell office:value-type="float" office:value="0" table:formula="of:=IF(INDEX([Tracker.$A$1:.$AG$120];6+9*(MONTH([.$A117])-1)+(COLUMN()-4);DAY([.$A117])+2)&lt;&gt;&quot;&quot;;1;0)" table:style-name="ce92"/>
          <table:table-cell office:value-type="float" office:value="0" table:formula="of:=IF(INDEX([Tracker.$A$1:.$AG$120];6+9*(MONTH([.$A117])-1)+(COLUMN()-4);DAY([.$A117])+2)&lt;&gt;&quot;&quot;;1;0)" table:style-name="ce92"/>
          <table:table-cell office:value-type="float" office:value="0" table:formula="of:=IF(INDEX([Tracker.$A$1:.$AG$120];6+9*(MONTH([.$A117])-1)+(COLUMN()-4);DAY([.$A117])+2)&lt;&gt;&quot;&quot;;1;0)" table:style-name="ce92"/>
          <table:table-cell office:value-type="float" office:value="0" table:formula="of:=IF(INDEX([Tracker.$A$1:.$AG$120];6+9*(MONTH([.$A117])-1)+(COLUMN()-4);DAY([.$A117])+2)&lt;&gt;&quot;&quot;;1;0)" table:style-name="ce92"/>
          <table:table-cell office:value-type="float" office:value="0" table:formula="of:=IF(INDEX([Tracker.$A$1:.$AG$120];6+9*(MONTH([.$A117])-1)+(COLUMN()-4);DAY([.$A117])+2)&lt;&gt;&quot;&quot;;1;0)" table:style-name="ce92"/>
          <table:table-cell office:value-type="float" office:value="0" table:formula="of:=SUM([.D117:.I117])" table:style-name="ce6"/>
          <table:table-cell office:value-type="percentage" office:value="0" table:formula="of:=[.J117]/6" table:style-name="ce8">
            <text:p>0%</text:p>
          </table:table-cell>
          <table:table-cell table:style-name="ce1"/>
          <table:table-cell office:value-type="float" office:value="0" table:formula="of:=IF([.D117]=1;[.M116]+1;0)" table:style-name="ce1">
            <text:p>0</text:p>
          </table:table-cell>
          <table:table-cell office:value-type="float" office:value="0" table:formula="of:=IF([.E117]=1;[.N116]+1;0)" table:style-name="ce1">
            <text:p>0</text:p>
          </table:table-cell>
          <table:table-cell office:value-type="float" office:value="0" table:formula="of:=IF([.F117]=1;[.O116]+1;0)" table:style-name="ce1">
            <text:p>0</text:p>
          </table:table-cell>
          <table:table-cell office:value-type="float" office:value="0" table:formula="of:=IF([.G117]=1;[.P116]+1;0)" table:style-name="ce1">
            <text:p>0</text:p>
          </table:table-cell>
          <table:table-cell office:value-type="float" office:value="0" table:formula="of:=IF([.H117]=1;[.Q116]+1;0)" table:style-name="ce1">
            <text:p>0</text:p>
          </table:table-cell>
          <table:table-cell office:value-type="float" office:value="0" table:formula="of:=IF([.I117]=1;[.R11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5T00:00:00" table:formula="of:=[.A117]+1" table:style-name="ce10">
            <text:p>Sat, 25 Apr 2026</text:p>
          </table:table-cell>
          <table:table-cell office:value-type="string" office:string-value="Sat" table:formula="of:=TEXT([.A118];&quot;ddd&quot;)" table:style-name="ce5">
            <text:p>Sat</text:p>
          </table:table-cell>
          <table:table-cell office:value-type="string" office:string-value="Apr" table:formula="of:=TEXT([.A118];&quot;mmm&quot;)" table:style-name="ce5">
            <text:p>Apr</text:p>
          </table:table-cell>
          <table:table-cell office:value-type="float" office:value="0" table:formula="of:=IF(INDEX([Tracker.$A$1:.$AG$120];6+9*(MONTH([.$A118])-1)+(COLUMN()-4);DAY([.$A118])+2)&lt;&gt;&quot;&quot;;1;0)" table:style-name="ce92"/>
          <table:table-cell office:value-type="float" office:value="0" table:formula="of:=IF(INDEX([Tracker.$A$1:.$AG$120];6+9*(MONTH([.$A118])-1)+(COLUMN()-4);DAY([.$A118])+2)&lt;&gt;&quot;&quot;;1;0)" table:style-name="ce92"/>
          <table:table-cell office:value-type="float" office:value="0" table:formula="of:=IF(INDEX([Tracker.$A$1:.$AG$120];6+9*(MONTH([.$A118])-1)+(COLUMN()-4);DAY([.$A118])+2)&lt;&gt;&quot;&quot;;1;0)" table:style-name="ce92"/>
          <table:table-cell office:value-type="float" office:value="0" table:formula="of:=IF(INDEX([Tracker.$A$1:.$AG$120];6+9*(MONTH([.$A118])-1)+(COLUMN()-4);DAY([.$A118])+2)&lt;&gt;&quot;&quot;;1;0)" table:style-name="ce92"/>
          <table:table-cell office:value-type="float" office:value="0" table:formula="of:=IF(INDEX([Tracker.$A$1:.$AG$120];6+9*(MONTH([.$A118])-1)+(COLUMN()-4);DAY([.$A118])+2)&lt;&gt;&quot;&quot;;1;0)" table:style-name="ce92"/>
          <table:table-cell office:value-type="float" office:value="0" table:formula="of:=IF(INDEX([Tracker.$A$1:.$AG$120];6+9*(MONTH([.$A118])-1)+(COLUMN()-4);DAY([.$A118])+2)&lt;&gt;&quot;&quot;;1;0)" table:style-name="ce92"/>
          <table:table-cell office:value-type="float" office:value="0" table:formula="of:=SUM([.D118:.I118])" table:style-name="ce6"/>
          <table:table-cell office:value-type="percentage" office:value="0" table:formula="of:=[.J118]/6" table:style-name="ce8">
            <text:p>0%</text:p>
          </table:table-cell>
          <table:table-cell table:style-name="ce1"/>
          <table:table-cell office:value-type="float" office:value="0" table:formula="of:=IF([.D118]=1;[.M117]+1;0)" table:style-name="ce1">
            <text:p>0</text:p>
          </table:table-cell>
          <table:table-cell office:value-type="float" office:value="0" table:formula="of:=IF([.E118]=1;[.N117]+1;0)" table:style-name="ce1">
            <text:p>0</text:p>
          </table:table-cell>
          <table:table-cell office:value-type="float" office:value="0" table:formula="of:=IF([.F118]=1;[.O117]+1;0)" table:style-name="ce1">
            <text:p>0</text:p>
          </table:table-cell>
          <table:table-cell office:value-type="float" office:value="0" table:formula="of:=IF([.G118]=1;[.P117]+1;0)" table:style-name="ce1">
            <text:p>0</text:p>
          </table:table-cell>
          <table:table-cell office:value-type="float" office:value="0" table:formula="of:=IF([.H118]=1;[.Q117]+1;0)" table:style-name="ce1">
            <text:p>0</text:p>
          </table:table-cell>
          <table:table-cell office:value-type="float" office:value="0" table:formula="of:=IF([.I118]=1;[.R11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6T00:00:00" table:formula="of:=[.A118]+1" table:style-name="ce10">
            <text:p>Sun, 26 Apr 2026</text:p>
          </table:table-cell>
          <table:table-cell office:value-type="string" office:string-value="Sun" table:formula="of:=TEXT([.A119];&quot;ddd&quot;)" table:style-name="ce5">
            <text:p>Sun</text:p>
          </table:table-cell>
          <table:table-cell office:value-type="string" office:string-value="Apr" table:formula="of:=TEXT([.A119];&quot;mmm&quot;)" table:style-name="ce5">
            <text:p>Apr</text:p>
          </table:table-cell>
          <table:table-cell office:value-type="float" office:value="0" table:formula="of:=IF(INDEX([Tracker.$A$1:.$AG$120];6+9*(MONTH([.$A119])-1)+(COLUMN()-4);DAY([.$A119])+2)&lt;&gt;&quot;&quot;;1;0)" table:style-name="ce92"/>
          <table:table-cell office:value-type="float" office:value="0" table:formula="of:=IF(INDEX([Tracker.$A$1:.$AG$120];6+9*(MONTH([.$A119])-1)+(COLUMN()-4);DAY([.$A119])+2)&lt;&gt;&quot;&quot;;1;0)" table:style-name="ce92"/>
          <table:table-cell office:value-type="float" office:value="0" table:formula="of:=IF(INDEX([Tracker.$A$1:.$AG$120];6+9*(MONTH([.$A119])-1)+(COLUMN()-4);DAY([.$A119])+2)&lt;&gt;&quot;&quot;;1;0)" table:style-name="ce92"/>
          <table:table-cell office:value-type="float" office:value="0" table:formula="of:=IF(INDEX([Tracker.$A$1:.$AG$120];6+9*(MONTH([.$A119])-1)+(COLUMN()-4);DAY([.$A119])+2)&lt;&gt;&quot;&quot;;1;0)" table:style-name="ce92"/>
          <table:table-cell office:value-type="float" office:value="0" table:formula="of:=IF(INDEX([Tracker.$A$1:.$AG$120];6+9*(MONTH([.$A119])-1)+(COLUMN()-4);DAY([.$A119])+2)&lt;&gt;&quot;&quot;;1;0)" table:style-name="ce92"/>
          <table:table-cell office:value-type="float" office:value="0" table:formula="of:=IF(INDEX([Tracker.$A$1:.$AG$120];6+9*(MONTH([.$A119])-1)+(COLUMN()-4);DAY([.$A119])+2)&lt;&gt;&quot;&quot;;1;0)" table:style-name="ce92"/>
          <table:table-cell office:value-type="float" office:value="0" table:formula="of:=SUM([.D119:.I119])" table:style-name="ce6"/>
          <table:table-cell office:value-type="percentage" office:value="0" table:formula="of:=[.J119]/6" table:style-name="ce8">
            <text:p>0%</text:p>
          </table:table-cell>
          <table:table-cell table:style-name="ce1"/>
          <table:table-cell office:value-type="float" office:value="0" table:formula="of:=IF([.D119]=1;[.M118]+1;0)" table:style-name="ce1">
            <text:p>0</text:p>
          </table:table-cell>
          <table:table-cell office:value-type="float" office:value="0" table:formula="of:=IF([.E119]=1;[.N118]+1;0)" table:style-name="ce1">
            <text:p>0</text:p>
          </table:table-cell>
          <table:table-cell office:value-type="float" office:value="0" table:formula="of:=IF([.F119]=1;[.O118]+1;0)" table:style-name="ce1">
            <text:p>0</text:p>
          </table:table-cell>
          <table:table-cell office:value-type="float" office:value="0" table:formula="of:=IF([.G119]=1;[.P118]+1;0)" table:style-name="ce1">
            <text:p>0</text:p>
          </table:table-cell>
          <table:table-cell office:value-type="float" office:value="0" table:formula="of:=IF([.H119]=1;[.Q118]+1;0)" table:style-name="ce1">
            <text:p>0</text:p>
          </table:table-cell>
          <table:table-cell office:value-type="float" office:value="0" table:formula="of:=IF([.I119]=1;[.R11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7T00:00:00" table:formula="of:=[.A119]+1" table:style-name="ce10">
            <text:p>Mon, 27 Apr 2026</text:p>
          </table:table-cell>
          <table:table-cell office:value-type="string" office:string-value="Mon" table:formula="of:=TEXT([.A120];&quot;ddd&quot;)" table:style-name="ce5">
            <text:p>Mon</text:p>
          </table:table-cell>
          <table:table-cell office:value-type="string" office:string-value="Apr" table:formula="of:=TEXT([.A120];&quot;mmm&quot;)" table:style-name="ce5">
            <text:p>Apr</text:p>
          </table:table-cell>
          <table:table-cell office:value-type="float" office:value="0" table:formula="of:=IF(INDEX([Tracker.$A$1:.$AG$120];6+9*(MONTH([.$A120])-1)+(COLUMN()-4);DAY([.$A120])+2)&lt;&gt;&quot;&quot;;1;0)" table:style-name="ce92"/>
          <table:table-cell office:value-type="float" office:value="0" table:formula="of:=IF(INDEX([Tracker.$A$1:.$AG$120];6+9*(MONTH([.$A120])-1)+(COLUMN()-4);DAY([.$A120])+2)&lt;&gt;&quot;&quot;;1;0)" table:style-name="ce92"/>
          <table:table-cell office:value-type="float" office:value="0" table:formula="of:=IF(INDEX([Tracker.$A$1:.$AG$120];6+9*(MONTH([.$A120])-1)+(COLUMN()-4);DAY([.$A120])+2)&lt;&gt;&quot;&quot;;1;0)" table:style-name="ce92"/>
          <table:table-cell office:value-type="float" office:value="0" table:formula="of:=IF(INDEX([Tracker.$A$1:.$AG$120];6+9*(MONTH([.$A120])-1)+(COLUMN()-4);DAY([.$A120])+2)&lt;&gt;&quot;&quot;;1;0)" table:style-name="ce92"/>
          <table:table-cell office:value-type="float" office:value="0" table:formula="of:=IF(INDEX([Tracker.$A$1:.$AG$120];6+9*(MONTH([.$A120])-1)+(COLUMN()-4);DAY([.$A120])+2)&lt;&gt;&quot;&quot;;1;0)" table:style-name="ce92"/>
          <table:table-cell office:value-type="float" office:value="0" table:formula="of:=IF(INDEX([Tracker.$A$1:.$AG$120];6+9*(MONTH([.$A120])-1)+(COLUMN()-4);DAY([.$A120])+2)&lt;&gt;&quot;&quot;;1;0)" table:style-name="ce92"/>
          <table:table-cell office:value-type="float" office:value="0" table:formula="of:=SUM([.D120:.I120])" table:style-name="ce6"/>
          <table:table-cell office:value-type="percentage" office:value="0" table:formula="of:=[.J120]/6" table:style-name="ce8">
            <text:p>0%</text:p>
          </table:table-cell>
          <table:table-cell table:style-name="ce1"/>
          <table:table-cell office:value-type="float" office:value="0" table:formula="of:=IF([.D120]=1;[.M119]+1;0)" table:style-name="ce1">
            <text:p>0</text:p>
          </table:table-cell>
          <table:table-cell office:value-type="float" office:value="0" table:formula="of:=IF([.E120]=1;[.N119]+1;0)" table:style-name="ce1">
            <text:p>0</text:p>
          </table:table-cell>
          <table:table-cell office:value-type="float" office:value="0" table:formula="of:=IF([.F120]=1;[.O119]+1;0)" table:style-name="ce1">
            <text:p>0</text:p>
          </table:table-cell>
          <table:table-cell office:value-type="float" office:value="0" table:formula="of:=IF([.G120]=1;[.P119]+1;0)" table:style-name="ce1">
            <text:p>0</text:p>
          </table:table-cell>
          <table:table-cell office:value-type="float" office:value="0" table:formula="of:=IF([.H120]=1;[.Q119]+1;0)" table:style-name="ce1">
            <text:p>0</text:p>
          </table:table-cell>
          <table:table-cell office:value-type="float" office:value="0" table:formula="of:=IF([.I120]=1;[.R11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8T00:00:00" table:formula="of:=[.A120]+1" table:style-name="ce10">
            <text:p>Tue, 28 Apr 2026</text:p>
          </table:table-cell>
          <table:table-cell office:value-type="string" office:string-value="Tue" table:formula="of:=TEXT([.A121];&quot;ddd&quot;)" table:style-name="ce5">
            <text:p>Tue</text:p>
          </table:table-cell>
          <table:table-cell office:value-type="string" office:string-value="Apr" table:formula="of:=TEXT([.A121];&quot;mmm&quot;)" table:style-name="ce5">
            <text:p>Apr</text:p>
          </table:table-cell>
          <table:table-cell office:value-type="float" office:value="0" table:formula="of:=IF(INDEX([Tracker.$A$1:.$AG$120];6+9*(MONTH([.$A121])-1)+(COLUMN()-4);DAY([.$A121])+2)&lt;&gt;&quot;&quot;;1;0)" table:style-name="ce92"/>
          <table:table-cell office:value-type="float" office:value="0" table:formula="of:=IF(INDEX([Tracker.$A$1:.$AG$120];6+9*(MONTH([.$A121])-1)+(COLUMN()-4);DAY([.$A121])+2)&lt;&gt;&quot;&quot;;1;0)" table:style-name="ce92"/>
          <table:table-cell office:value-type="float" office:value="0" table:formula="of:=IF(INDEX([Tracker.$A$1:.$AG$120];6+9*(MONTH([.$A121])-1)+(COLUMN()-4);DAY([.$A121])+2)&lt;&gt;&quot;&quot;;1;0)" table:style-name="ce92"/>
          <table:table-cell office:value-type="float" office:value="0" table:formula="of:=IF(INDEX([Tracker.$A$1:.$AG$120];6+9*(MONTH([.$A121])-1)+(COLUMN()-4);DAY([.$A121])+2)&lt;&gt;&quot;&quot;;1;0)" table:style-name="ce92"/>
          <table:table-cell office:value-type="float" office:value="0" table:formula="of:=IF(INDEX([Tracker.$A$1:.$AG$120];6+9*(MONTH([.$A121])-1)+(COLUMN()-4);DAY([.$A121])+2)&lt;&gt;&quot;&quot;;1;0)" table:style-name="ce92"/>
          <table:table-cell office:value-type="float" office:value="0" table:formula="of:=IF(INDEX([Tracker.$A$1:.$AG$120];6+9*(MONTH([.$A121])-1)+(COLUMN()-4);DAY([.$A121])+2)&lt;&gt;&quot;&quot;;1;0)" table:style-name="ce92"/>
          <table:table-cell office:value-type="float" office:value="0" table:formula="of:=SUM([.D121:.I121])" table:style-name="ce6"/>
          <table:table-cell office:value-type="percentage" office:value="0" table:formula="of:=[.J121]/6" table:style-name="ce8">
            <text:p>0%</text:p>
          </table:table-cell>
          <table:table-cell table:style-name="ce1"/>
          <table:table-cell office:value-type="float" office:value="0" table:formula="of:=IF([.D121]=1;[.M120]+1;0)" table:style-name="ce1">
            <text:p>0</text:p>
          </table:table-cell>
          <table:table-cell office:value-type="float" office:value="0" table:formula="of:=IF([.E121]=1;[.N120]+1;0)" table:style-name="ce1">
            <text:p>0</text:p>
          </table:table-cell>
          <table:table-cell office:value-type="float" office:value="0" table:formula="of:=IF([.F121]=1;[.O120]+1;0)" table:style-name="ce1">
            <text:p>0</text:p>
          </table:table-cell>
          <table:table-cell office:value-type="float" office:value="0" table:formula="of:=IF([.G121]=1;[.P120]+1;0)" table:style-name="ce1">
            <text:p>0</text:p>
          </table:table-cell>
          <table:table-cell office:value-type="float" office:value="0" table:formula="of:=IF([.H121]=1;[.Q120]+1;0)" table:style-name="ce1">
            <text:p>0</text:p>
          </table:table-cell>
          <table:table-cell office:value-type="float" office:value="0" table:formula="of:=IF([.I121]=1;[.R12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29T00:00:00" table:formula="of:=[.A121]+1" table:style-name="ce10">
            <text:p>Wed, 29 Apr 2026</text:p>
          </table:table-cell>
          <table:table-cell office:value-type="string" office:string-value="Wed" table:formula="of:=TEXT([.A122];&quot;ddd&quot;)" table:style-name="ce5">
            <text:p>Wed</text:p>
          </table:table-cell>
          <table:table-cell office:value-type="string" office:string-value="Apr" table:formula="of:=TEXT([.A122];&quot;mmm&quot;)" table:style-name="ce5">
            <text:p>Apr</text:p>
          </table:table-cell>
          <table:table-cell office:value-type="float" office:value="0" table:formula="of:=IF(INDEX([Tracker.$A$1:.$AG$120];6+9*(MONTH([.$A122])-1)+(COLUMN()-4);DAY([.$A122])+2)&lt;&gt;&quot;&quot;;1;0)" table:style-name="ce92"/>
          <table:table-cell office:value-type="float" office:value="0" table:formula="of:=IF(INDEX([Tracker.$A$1:.$AG$120];6+9*(MONTH([.$A122])-1)+(COLUMN()-4);DAY([.$A122])+2)&lt;&gt;&quot;&quot;;1;0)" table:style-name="ce92"/>
          <table:table-cell office:value-type="float" office:value="0" table:formula="of:=IF(INDEX([Tracker.$A$1:.$AG$120];6+9*(MONTH([.$A122])-1)+(COLUMN()-4);DAY([.$A122])+2)&lt;&gt;&quot;&quot;;1;0)" table:style-name="ce92"/>
          <table:table-cell office:value-type="float" office:value="0" table:formula="of:=IF(INDEX([Tracker.$A$1:.$AG$120];6+9*(MONTH([.$A122])-1)+(COLUMN()-4);DAY([.$A122])+2)&lt;&gt;&quot;&quot;;1;0)" table:style-name="ce92"/>
          <table:table-cell office:value-type="float" office:value="0" table:formula="of:=IF(INDEX([Tracker.$A$1:.$AG$120];6+9*(MONTH([.$A122])-1)+(COLUMN()-4);DAY([.$A122])+2)&lt;&gt;&quot;&quot;;1;0)" table:style-name="ce92"/>
          <table:table-cell office:value-type="float" office:value="0" table:formula="of:=IF(INDEX([Tracker.$A$1:.$AG$120];6+9*(MONTH([.$A122])-1)+(COLUMN()-4);DAY([.$A122])+2)&lt;&gt;&quot;&quot;;1;0)" table:style-name="ce92"/>
          <table:table-cell office:value-type="float" office:value="0" table:formula="of:=SUM([.D122:.I122])" table:style-name="ce6"/>
          <table:table-cell office:value-type="percentage" office:value="0" table:formula="of:=[.J122]/6" table:style-name="ce8">
            <text:p>0%</text:p>
          </table:table-cell>
          <table:table-cell table:style-name="ce1"/>
          <table:table-cell office:value-type="float" office:value="0" table:formula="of:=IF([.D122]=1;[.M121]+1;0)" table:style-name="ce1">
            <text:p>0</text:p>
          </table:table-cell>
          <table:table-cell office:value-type="float" office:value="0" table:formula="of:=IF([.E122]=1;[.N121]+1;0)" table:style-name="ce1">
            <text:p>0</text:p>
          </table:table-cell>
          <table:table-cell office:value-type="float" office:value="0" table:formula="of:=IF([.F122]=1;[.O121]+1;0)" table:style-name="ce1">
            <text:p>0</text:p>
          </table:table-cell>
          <table:table-cell office:value-type="float" office:value="0" table:formula="of:=IF([.G122]=1;[.P121]+1;0)" table:style-name="ce1">
            <text:p>0</text:p>
          </table:table-cell>
          <table:table-cell office:value-type="float" office:value="0" table:formula="of:=IF([.H122]=1;[.Q121]+1;0)" table:style-name="ce1">
            <text:p>0</text:p>
          </table:table-cell>
          <table:table-cell office:value-type="float" office:value="0" table:formula="of:=IF([.I122]=1;[.R12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4-30T00:00:00" table:formula="of:=[.A122]+1" table:style-name="ce10">
            <text:p>Thu, 30 Apr 2026</text:p>
          </table:table-cell>
          <table:table-cell office:value-type="string" office:string-value="Thu" table:formula="of:=TEXT([.A123];&quot;ddd&quot;)" table:style-name="ce5">
            <text:p>Thu</text:p>
          </table:table-cell>
          <table:table-cell office:value-type="string" office:string-value="Apr" table:formula="of:=TEXT([.A123];&quot;mmm&quot;)" table:style-name="ce5">
            <text:p>Apr</text:p>
          </table:table-cell>
          <table:table-cell office:value-type="float" office:value="0" table:formula="of:=IF(INDEX([Tracker.$A$1:.$AG$120];6+9*(MONTH([.$A123])-1)+(COLUMN()-4);DAY([.$A123])+2)&lt;&gt;&quot;&quot;;1;0)" table:style-name="ce92"/>
          <table:table-cell office:value-type="float" office:value="0" table:formula="of:=IF(INDEX([Tracker.$A$1:.$AG$120];6+9*(MONTH([.$A123])-1)+(COLUMN()-4);DAY([.$A123])+2)&lt;&gt;&quot;&quot;;1;0)" table:style-name="ce92"/>
          <table:table-cell office:value-type="float" office:value="0" table:formula="of:=IF(INDEX([Tracker.$A$1:.$AG$120];6+9*(MONTH([.$A123])-1)+(COLUMN()-4);DAY([.$A123])+2)&lt;&gt;&quot;&quot;;1;0)" table:style-name="ce92"/>
          <table:table-cell office:value-type="float" office:value="0" table:formula="of:=IF(INDEX([Tracker.$A$1:.$AG$120];6+9*(MONTH([.$A123])-1)+(COLUMN()-4);DAY([.$A123])+2)&lt;&gt;&quot;&quot;;1;0)" table:style-name="ce92"/>
          <table:table-cell office:value-type="float" office:value="0" table:formula="of:=IF(INDEX([Tracker.$A$1:.$AG$120];6+9*(MONTH([.$A123])-1)+(COLUMN()-4);DAY([.$A123])+2)&lt;&gt;&quot;&quot;;1;0)" table:style-name="ce92"/>
          <table:table-cell office:value-type="float" office:value="0" table:formula="of:=IF(INDEX([Tracker.$A$1:.$AG$120];6+9*(MONTH([.$A123])-1)+(COLUMN()-4);DAY([.$A123])+2)&lt;&gt;&quot;&quot;;1;0)" table:style-name="ce92"/>
          <table:table-cell office:value-type="float" office:value="0" table:formula="of:=SUM([.D123:.I123])" table:style-name="ce6"/>
          <table:table-cell office:value-type="percentage" office:value="0" table:formula="of:=[.J123]/6" table:style-name="ce8">
            <text:p>0%</text:p>
          </table:table-cell>
          <table:table-cell table:style-name="ce1"/>
          <table:table-cell office:value-type="float" office:value="0" table:formula="of:=IF([.D123]=1;[.M122]+1;0)" table:style-name="ce1">
            <text:p>0</text:p>
          </table:table-cell>
          <table:table-cell office:value-type="float" office:value="0" table:formula="of:=IF([.E123]=1;[.N122]+1;0)" table:style-name="ce1">
            <text:p>0</text:p>
          </table:table-cell>
          <table:table-cell office:value-type="float" office:value="0" table:formula="of:=IF([.F123]=1;[.O122]+1;0)" table:style-name="ce1">
            <text:p>0</text:p>
          </table:table-cell>
          <table:table-cell office:value-type="float" office:value="0" table:formula="of:=IF([.G123]=1;[.P122]+1;0)" table:style-name="ce1">
            <text:p>0</text:p>
          </table:table-cell>
          <table:table-cell office:value-type="float" office:value="0" table:formula="of:=IF([.H123]=1;[.Q122]+1;0)" table:style-name="ce1">
            <text:p>0</text:p>
          </table:table-cell>
          <table:table-cell office:value-type="float" office:value="0" table:formula="of:=IF([.I123]=1;[.R12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1T00:00:00" table:formula="of:=[.A123]+1" table:style-name="ce10">
            <text:p>Fri, 01 May 2026</text:p>
          </table:table-cell>
          <table:table-cell office:value-type="string" office:string-value="Fri" table:formula="of:=TEXT([.A124];&quot;ddd&quot;)" table:style-name="ce5">
            <text:p>Fri</text:p>
          </table:table-cell>
          <table:table-cell office:value-type="string" office:string-value="May" table:formula="of:=TEXT([.A124];&quot;mmm&quot;)" table:style-name="ce5">
            <text:p>May</text:p>
          </table:table-cell>
          <table:table-cell office:value-type="float" office:value="0" table:formula="of:=IF(INDEX([Tracker.$A$1:.$AG$120];6+9*(MONTH([.$A124])-1)+(COLUMN()-4);DAY([.$A124])+2)&lt;&gt;&quot;&quot;;1;0)" table:style-name="ce92"/>
          <table:table-cell office:value-type="float" office:value="0" table:formula="of:=IF(INDEX([Tracker.$A$1:.$AG$120];6+9*(MONTH([.$A124])-1)+(COLUMN()-4);DAY([.$A124])+2)&lt;&gt;&quot;&quot;;1;0)" table:style-name="ce92"/>
          <table:table-cell office:value-type="float" office:value="0" table:formula="of:=IF(INDEX([Tracker.$A$1:.$AG$120];6+9*(MONTH([.$A124])-1)+(COLUMN()-4);DAY([.$A124])+2)&lt;&gt;&quot;&quot;;1;0)" table:style-name="ce92"/>
          <table:table-cell office:value-type="float" office:value="0" table:formula="of:=IF(INDEX([Tracker.$A$1:.$AG$120];6+9*(MONTH([.$A124])-1)+(COLUMN()-4);DAY([.$A124])+2)&lt;&gt;&quot;&quot;;1;0)" table:style-name="ce92"/>
          <table:table-cell office:value-type="float" office:value="0" table:formula="of:=IF(INDEX([Tracker.$A$1:.$AG$120];6+9*(MONTH([.$A124])-1)+(COLUMN()-4);DAY([.$A124])+2)&lt;&gt;&quot;&quot;;1;0)" table:style-name="ce92"/>
          <table:table-cell office:value-type="float" office:value="0" table:formula="of:=IF(INDEX([Tracker.$A$1:.$AG$120];6+9*(MONTH([.$A124])-1)+(COLUMN()-4);DAY([.$A124])+2)&lt;&gt;&quot;&quot;;1;0)" table:style-name="ce92"/>
          <table:table-cell office:value-type="float" office:value="0" table:formula="of:=SUM([.D124:.I124])" table:style-name="ce6"/>
          <table:table-cell office:value-type="percentage" office:value="0" table:formula="of:=[.J124]/6" table:style-name="ce8">
            <text:p>0%</text:p>
          </table:table-cell>
          <table:table-cell table:style-name="ce1"/>
          <table:table-cell office:value-type="float" office:value="0" table:formula="of:=IF([.D124]=1;[.M123]+1;0)" table:style-name="ce1">
            <text:p>0</text:p>
          </table:table-cell>
          <table:table-cell office:value-type="float" office:value="0" table:formula="of:=IF([.E124]=1;[.N123]+1;0)" table:style-name="ce1">
            <text:p>0</text:p>
          </table:table-cell>
          <table:table-cell office:value-type="float" office:value="0" table:formula="of:=IF([.F124]=1;[.O123]+1;0)" table:style-name="ce1">
            <text:p>0</text:p>
          </table:table-cell>
          <table:table-cell office:value-type="float" office:value="0" table:formula="of:=IF([.G124]=1;[.P123]+1;0)" table:style-name="ce1">
            <text:p>0</text:p>
          </table:table-cell>
          <table:table-cell office:value-type="float" office:value="0" table:formula="of:=IF([.H124]=1;[.Q123]+1;0)" table:style-name="ce1">
            <text:p>0</text:p>
          </table:table-cell>
          <table:table-cell office:value-type="float" office:value="0" table:formula="of:=IF([.I124]=1;[.R12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2T00:00:00" table:formula="of:=[.A124]+1" table:style-name="ce10">
            <text:p>Sat, 02 May 2026</text:p>
          </table:table-cell>
          <table:table-cell office:value-type="string" office:string-value="Sat" table:formula="of:=TEXT([.A125];&quot;ddd&quot;)" table:style-name="ce5">
            <text:p>Sat</text:p>
          </table:table-cell>
          <table:table-cell office:value-type="string" office:string-value="May" table:formula="of:=TEXT([.A125];&quot;mmm&quot;)" table:style-name="ce5">
            <text:p>May</text:p>
          </table:table-cell>
          <table:table-cell office:value-type="float" office:value="0" table:formula="of:=IF(INDEX([Tracker.$A$1:.$AG$120];6+9*(MONTH([.$A125])-1)+(COLUMN()-4);DAY([.$A125])+2)&lt;&gt;&quot;&quot;;1;0)" table:style-name="ce92"/>
          <table:table-cell office:value-type="float" office:value="0" table:formula="of:=IF(INDEX([Tracker.$A$1:.$AG$120];6+9*(MONTH([.$A125])-1)+(COLUMN()-4);DAY([.$A125])+2)&lt;&gt;&quot;&quot;;1;0)" table:style-name="ce92"/>
          <table:table-cell office:value-type="float" office:value="0" table:formula="of:=IF(INDEX([Tracker.$A$1:.$AG$120];6+9*(MONTH([.$A125])-1)+(COLUMN()-4);DAY([.$A125])+2)&lt;&gt;&quot;&quot;;1;0)" table:style-name="ce92"/>
          <table:table-cell office:value-type="float" office:value="0" table:formula="of:=IF(INDEX([Tracker.$A$1:.$AG$120];6+9*(MONTH([.$A125])-1)+(COLUMN()-4);DAY([.$A125])+2)&lt;&gt;&quot;&quot;;1;0)" table:style-name="ce92"/>
          <table:table-cell office:value-type="float" office:value="0" table:formula="of:=IF(INDEX([Tracker.$A$1:.$AG$120];6+9*(MONTH([.$A125])-1)+(COLUMN()-4);DAY([.$A125])+2)&lt;&gt;&quot;&quot;;1;0)" table:style-name="ce92"/>
          <table:table-cell office:value-type="float" office:value="0" table:formula="of:=IF(INDEX([Tracker.$A$1:.$AG$120];6+9*(MONTH([.$A125])-1)+(COLUMN()-4);DAY([.$A125])+2)&lt;&gt;&quot;&quot;;1;0)" table:style-name="ce92"/>
          <table:table-cell office:value-type="float" office:value="0" table:formula="of:=SUM([.D125:.I125])" table:style-name="ce6"/>
          <table:table-cell office:value-type="percentage" office:value="0" table:formula="of:=[.J125]/6" table:style-name="ce8">
            <text:p>0%</text:p>
          </table:table-cell>
          <table:table-cell table:style-name="ce1"/>
          <table:table-cell office:value-type="float" office:value="0" table:formula="of:=IF([.D125]=1;[.M124]+1;0)" table:style-name="ce1">
            <text:p>0</text:p>
          </table:table-cell>
          <table:table-cell office:value-type="float" office:value="0" table:formula="of:=IF([.E125]=1;[.N124]+1;0)" table:style-name="ce1">
            <text:p>0</text:p>
          </table:table-cell>
          <table:table-cell office:value-type="float" office:value="0" table:formula="of:=IF([.F125]=1;[.O124]+1;0)" table:style-name="ce1">
            <text:p>0</text:p>
          </table:table-cell>
          <table:table-cell office:value-type="float" office:value="0" table:formula="of:=IF([.G125]=1;[.P124]+1;0)" table:style-name="ce1">
            <text:p>0</text:p>
          </table:table-cell>
          <table:table-cell office:value-type="float" office:value="0" table:formula="of:=IF([.H125]=1;[.Q124]+1;0)" table:style-name="ce1">
            <text:p>0</text:p>
          </table:table-cell>
          <table:table-cell office:value-type="float" office:value="0" table:formula="of:=IF([.I125]=1;[.R12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3T00:00:00" table:formula="of:=[.A125]+1" table:style-name="ce10">
            <text:p>Sun, 03 May 2026</text:p>
          </table:table-cell>
          <table:table-cell office:value-type="string" office:string-value="Sun" table:formula="of:=TEXT([.A126];&quot;ddd&quot;)" table:style-name="ce5">
            <text:p>Sun</text:p>
          </table:table-cell>
          <table:table-cell office:value-type="string" office:string-value="May" table:formula="of:=TEXT([.A126];&quot;mmm&quot;)" table:style-name="ce5">
            <text:p>May</text:p>
          </table:table-cell>
          <table:table-cell office:value-type="float" office:value="0" table:formula="of:=IF(INDEX([Tracker.$A$1:.$AG$120];6+9*(MONTH([.$A126])-1)+(COLUMN()-4);DAY([.$A126])+2)&lt;&gt;&quot;&quot;;1;0)" table:style-name="ce92"/>
          <table:table-cell office:value-type="float" office:value="0" table:formula="of:=IF(INDEX([Tracker.$A$1:.$AG$120];6+9*(MONTH([.$A126])-1)+(COLUMN()-4);DAY([.$A126])+2)&lt;&gt;&quot;&quot;;1;0)" table:style-name="ce92"/>
          <table:table-cell office:value-type="float" office:value="0" table:formula="of:=IF(INDEX([Tracker.$A$1:.$AG$120];6+9*(MONTH([.$A126])-1)+(COLUMN()-4);DAY([.$A126])+2)&lt;&gt;&quot;&quot;;1;0)" table:style-name="ce92"/>
          <table:table-cell office:value-type="float" office:value="0" table:formula="of:=IF(INDEX([Tracker.$A$1:.$AG$120];6+9*(MONTH([.$A126])-1)+(COLUMN()-4);DAY([.$A126])+2)&lt;&gt;&quot;&quot;;1;0)" table:style-name="ce92"/>
          <table:table-cell office:value-type="float" office:value="0" table:formula="of:=IF(INDEX([Tracker.$A$1:.$AG$120];6+9*(MONTH([.$A126])-1)+(COLUMN()-4);DAY([.$A126])+2)&lt;&gt;&quot;&quot;;1;0)" table:style-name="ce92"/>
          <table:table-cell office:value-type="float" office:value="0" table:formula="of:=IF(INDEX([Tracker.$A$1:.$AG$120];6+9*(MONTH([.$A126])-1)+(COLUMN()-4);DAY([.$A126])+2)&lt;&gt;&quot;&quot;;1;0)" table:style-name="ce92"/>
          <table:table-cell office:value-type="float" office:value="0" table:formula="of:=SUM([.D126:.I126])" table:style-name="ce6"/>
          <table:table-cell office:value-type="percentage" office:value="0" table:formula="of:=[.J126]/6" table:style-name="ce8">
            <text:p>0%</text:p>
          </table:table-cell>
          <table:table-cell table:style-name="ce1"/>
          <table:table-cell office:value-type="float" office:value="0" table:formula="of:=IF([.D126]=1;[.M125]+1;0)" table:style-name="ce1">
            <text:p>0</text:p>
          </table:table-cell>
          <table:table-cell office:value-type="float" office:value="0" table:formula="of:=IF([.E126]=1;[.N125]+1;0)" table:style-name="ce1">
            <text:p>0</text:p>
          </table:table-cell>
          <table:table-cell office:value-type="float" office:value="0" table:formula="of:=IF([.F126]=1;[.O125]+1;0)" table:style-name="ce1">
            <text:p>0</text:p>
          </table:table-cell>
          <table:table-cell office:value-type="float" office:value="0" table:formula="of:=IF([.G126]=1;[.P125]+1;0)" table:style-name="ce1">
            <text:p>0</text:p>
          </table:table-cell>
          <table:table-cell office:value-type="float" office:value="0" table:formula="of:=IF([.H126]=1;[.Q125]+1;0)" table:style-name="ce1">
            <text:p>0</text:p>
          </table:table-cell>
          <table:table-cell office:value-type="float" office:value="0" table:formula="of:=IF([.I126]=1;[.R12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4T00:00:00" table:formula="of:=[.A126]+1" table:style-name="ce10">
            <text:p>Mon, 04 May 2026</text:p>
          </table:table-cell>
          <table:table-cell office:value-type="string" office:string-value="Mon" table:formula="of:=TEXT([.A127];&quot;ddd&quot;)" table:style-name="ce5">
            <text:p>Mon</text:p>
          </table:table-cell>
          <table:table-cell office:value-type="string" office:string-value="May" table:formula="of:=TEXT([.A127];&quot;mmm&quot;)" table:style-name="ce5">
            <text:p>May</text:p>
          </table:table-cell>
          <table:table-cell office:value-type="float" office:value="0" table:formula="of:=IF(INDEX([Tracker.$A$1:.$AG$120];6+9*(MONTH([.$A127])-1)+(COLUMN()-4);DAY([.$A127])+2)&lt;&gt;&quot;&quot;;1;0)" table:style-name="ce92"/>
          <table:table-cell office:value-type="float" office:value="0" table:formula="of:=IF(INDEX([Tracker.$A$1:.$AG$120];6+9*(MONTH([.$A127])-1)+(COLUMN()-4);DAY([.$A127])+2)&lt;&gt;&quot;&quot;;1;0)" table:style-name="ce92"/>
          <table:table-cell office:value-type="float" office:value="0" table:formula="of:=IF(INDEX([Tracker.$A$1:.$AG$120];6+9*(MONTH([.$A127])-1)+(COLUMN()-4);DAY([.$A127])+2)&lt;&gt;&quot;&quot;;1;0)" table:style-name="ce92"/>
          <table:table-cell office:value-type="float" office:value="0" table:formula="of:=IF(INDEX([Tracker.$A$1:.$AG$120];6+9*(MONTH([.$A127])-1)+(COLUMN()-4);DAY([.$A127])+2)&lt;&gt;&quot;&quot;;1;0)" table:style-name="ce92"/>
          <table:table-cell office:value-type="float" office:value="0" table:formula="of:=IF(INDEX([Tracker.$A$1:.$AG$120];6+9*(MONTH([.$A127])-1)+(COLUMN()-4);DAY([.$A127])+2)&lt;&gt;&quot;&quot;;1;0)" table:style-name="ce92"/>
          <table:table-cell office:value-type="float" office:value="0" table:formula="of:=IF(INDEX([Tracker.$A$1:.$AG$120];6+9*(MONTH([.$A127])-1)+(COLUMN()-4);DAY([.$A127])+2)&lt;&gt;&quot;&quot;;1;0)" table:style-name="ce92"/>
          <table:table-cell office:value-type="float" office:value="0" table:formula="of:=SUM([.D127:.I127])" table:style-name="ce6"/>
          <table:table-cell office:value-type="percentage" office:value="0" table:formula="of:=[.J127]/6" table:style-name="ce8">
            <text:p>0%</text:p>
          </table:table-cell>
          <table:table-cell table:style-name="ce1"/>
          <table:table-cell office:value-type="float" office:value="0" table:formula="of:=IF([.D127]=1;[.M126]+1;0)" table:style-name="ce1">
            <text:p>0</text:p>
          </table:table-cell>
          <table:table-cell office:value-type="float" office:value="0" table:formula="of:=IF([.E127]=1;[.N126]+1;0)" table:style-name="ce1">
            <text:p>0</text:p>
          </table:table-cell>
          <table:table-cell office:value-type="float" office:value="0" table:formula="of:=IF([.F127]=1;[.O126]+1;0)" table:style-name="ce1">
            <text:p>0</text:p>
          </table:table-cell>
          <table:table-cell office:value-type="float" office:value="0" table:formula="of:=IF([.G127]=1;[.P126]+1;0)" table:style-name="ce1">
            <text:p>0</text:p>
          </table:table-cell>
          <table:table-cell office:value-type="float" office:value="0" table:formula="of:=IF([.H127]=1;[.Q126]+1;0)" table:style-name="ce1">
            <text:p>0</text:p>
          </table:table-cell>
          <table:table-cell office:value-type="float" office:value="0" table:formula="of:=IF([.I127]=1;[.R12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5T00:00:00" table:formula="of:=[.A127]+1" table:style-name="ce10">
            <text:p>Tue, 05 May 2026</text:p>
          </table:table-cell>
          <table:table-cell office:value-type="string" office:string-value="Tue" table:formula="of:=TEXT([.A128];&quot;ddd&quot;)" table:style-name="ce5">
            <text:p>Tue</text:p>
          </table:table-cell>
          <table:table-cell office:value-type="string" office:string-value="May" table:formula="of:=TEXT([.A128];&quot;mmm&quot;)" table:style-name="ce5">
            <text:p>May</text:p>
          </table:table-cell>
          <table:table-cell office:value-type="float" office:value="0" table:formula="of:=IF(INDEX([Tracker.$A$1:.$AG$120];6+9*(MONTH([.$A128])-1)+(COLUMN()-4);DAY([.$A128])+2)&lt;&gt;&quot;&quot;;1;0)" table:style-name="ce92"/>
          <table:table-cell office:value-type="float" office:value="0" table:formula="of:=IF(INDEX([Tracker.$A$1:.$AG$120];6+9*(MONTH([.$A128])-1)+(COLUMN()-4);DAY([.$A128])+2)&lt;&gt;&quot;&quot;;1;0)" table:style-name="ce92"/>
          <table:table-cell office:value-type="float" office:value="0" table:formula="of:=IF(INDEX([Tracker.$A$1:.$AG$120];6+9*(MONTH([.$A128])-1)+(COLUMN()-4);DAY([.$A128])+2)&lt;&gt;&quot;&quot;;1;0)" table:style-name="ce92"/>
          <table:table-cell office:value-type="float" office:value="0" table:formula="of:=IF(INDEX([Tracker.$A$1:.$AG$120];6+9*(MONTH([.$A128])-1)+(COLUMN()-4);DAY([.$A128])+2)&lt;&gt;&quot;&quot;;1;0)" table:style-name="ce92"/>
          <table:table-cell office:value-type="float" office:value="0" table:formula="of:=IF(INDEX([Tracker.$A$1:.$AG$120];6+9*(MONTH([.$A128])-1)+(COLUMN()-4);DAY([.$A128])+2)&lt;&gt;&quot;&quot;;1;0)" table:style-name="ce92"/>
          <table:table-cell office:value-type="float" office:value="0" table:formula="of:=IF(INDEX([Tracker.$A$1:.$AG$120];6+9*(MONTH([.$A128])-1)+(COLUMN()-4);DAY([.$A128])+2)&lt;&gt;&quot;&quot;;1;0)" table:style-name="ce92"/>
          <table:table-cell office:value-type="float" office:value="0" table:formula="of:=SUM([.D128:.I128])" table:style-name="ce6"/>
          <table:table-cell office:value-type="percentage" office:value="0" table:formula="of:=[.J128]/6" table:style-name="ce8">
            <text:p>0%</text:p>
          </table:table-cell>
          <table:table-cell table:style-name="ce1"/>
          <table:table-cell office:value-type="float" office:value="0" table:formula="of:=IF([.D128]=1;[.M127]+1;0)" table:style-name="ce1">
            <text:p>0</text:p>
          </table:table-cell>
          <table:table-cell office:value-type="float" office:value="0" table:formula="of:=IF([.E128]=1;[.N127]+1;0)" table:style-name="ce1">
            <text:p>0</text:p>
          </table:table-cell>
          <table:table-cell office:value-type="float" office:value="0" table:formula="of:=IF([.F128]=1;[.O127]+1;0)" table:style-name="ce1">
            <text:p>0</text:p>
          </table:table-cell>
          <table:table-cell office:value-type="float" office:value="0" table:formula="of:=IF([.G128]=1;[.P127]+1;0)" table:style-name="ce1">
            <text:p>0</text:p>
          </table:table-cell>
          <table:table-cell office:value-type="float" office:value="0" table:formula="of:=IF([.H128]=1;[.Q127]+1;0)" table:style-name="ce1">
            <text:p>0</text:p>
          </table:table-cell>
          <table:table-cell office:value-type="float" office:value="0" table:formula="of:=IF([.I128]=1;[.R12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6T00:00:00" table:formula="of:=[.A128]+1" table:style-name="ce10">
            <text:p>Wed, 06 May 2026</text:p>
          </table:table-cell>
          <table:table-cell office:value-type="string" office:string-value="Wed" table:formula="of:=TEXT([.A129];&quot;ddd&quot;)" table:style-name="ce5">
            <text:p>Wed</text:p>
          </table:table-cell>
          <table:table-cell office:value-type="string" office:string-value="May" table:formula="of:=TEXT([.A129];&quot;mmm&quot;)" table:style-name="ce5">
            <text:p>May</text:p>
          </table:table-cell>
          <table:table-cell office:value-type="float" office:value="0" table:formula="of:=IF(INDEX([Tracker.$A$1:.$AG$120];6+9*(MONTH([.$A129])-1)+(COLUMN()-4);DAY([.$A129])+2)&lt;&gt;&quot;&quot;;1;0)" table:style-name="ce92"/>
          <table:table-cell office:value-type="float" office:value="0" table:formula="of:=IF(INDEX([Tracker.$A$1:.$AG$120];6+9*(MONTH([.$A129])-1)+(COLUMN()-4);DAY([.$A129])+2)&lt;&gt;&quot;&quot;;1;0)" table:style-name="ce92"/>
          <table:table-cell office:value-type="float" office:value="0" table:formula="of:=IF(INDEX([Tracker.$A$1:.$AG$120];6+9*(MONTH([.$A129])-1)+(COLUMN()-4);DAY([.$A129])+2)&lt;&gt;&quot;&quot;;1;0)" table:style-name="ce92"/>
          <table:table-cell office:value-type="float" office:value="0" table:formula="of:=IF(INDEX([Tracker.$A$1:.$AG$120];6+9*(MONTH([.$A129])-1)+(COLUMN()-4);DAY([.$A129])+2)&lt;&gt;&quot;&quot;;1;0)" table:style-name="ce92"/>
          <table:table-cell office:value-type="float" office:value="0" table:formula="of:=IF(INDEX([Tracker.$A$1:.$AG$120];6+9*(MONTH([.$A129])-1)+(COLUMN()-4);DAY([.$A129])+2)&lt;&gt;&quot;&quot;;1;0)" table:style-name="ce92"/>
          <table:table-cell office:value-type="float" office:value="0" table:formula="of:=IF(INDEX([Tracker.$A$1:.$AG$120];6+9*(MONTH([.$A129])-1)+(COLUMN()-4);DAY([.$A129])+2)&lt;&gt;&quot;&quot;;1;0)" table:style-name="ce92"/>
          <table:table-cell office:value-type="float" office:value="0" table:formula="of:=SUM([.D129:.I129])" table:style-name="ce6"/>
          <table:table-cell office:value-type="percentage" office:value="0" table:formula="of:=[.J129]/6" table:style-name="ce8">
            <text:p>0%</text:p>
          </table:table-cell>
          <table:table-cell table:style-name="ce1"/>
          <table:table-cell office:value-type="float" office:value="0" table:formula="of:=IF([.D129]=1;[.M128]+1;0)" table:style-name="ce1">
            <text:p>0</text:p>
          </table:table-cell>
          <table:table-cell office:value-type="float" office:value="0" table:formula="of:=IF([.E129]=1;[.N128]+1;0)" table:style-name="ce1">
            <text:p>0</text:p>
          </table:table-cell>
          <table:table-cell office:value-type="float" office:value="0" table:formula="of:=IF([.F129]=1;[.O128]+1;0)" table:style-name="ce1">
            <text:p>0</text:p>
          </table:table-cell>
          <table:table-cell office:value-type="float" office:value="0" table:formula="of:=IF([.G129]=1;[.P128]+1;0)" table:style-name="ce1">
            <text:p>0</text:p>
          </table:table-cell>
          <table:table-cell office:value-type="float" office:value="0" table:formula="of:=IF([.H129]=1;[.Q128]+1;0)" table:style-name="ce1">
            <text:p>0</text:p>
          </table:table-cell>
          <table:table-cell office:value-type="float" office:value="0" table:formula="of:=IF([.I129]=1;[.R12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7T00:00:00" table:formula="of:=[.A129]+1" table:style-name="ce10">
            <text:p>Thu, 07 May 2026</text:p>
          </table:table-cell>
          <table:table-cell office:value-type="string" office:string-value="Thu" table:formula="of:=TEXT([.A130];&quot;ddd&quot;)" table:style-name="ce5">
            <text:p>Thu</text:p>
          </table:table-cell>
          <table:table-cell office:value-type="string" office:string-value="May" table:formula="of:=TEXT([.A130];&quot;mmm&quot;)" table:style-name="ce5">
            <text:p>May</text:p>
          </table:table-cell>
          <table:table-cell office:value-type="float" office:value="0" table:formula="of:=IF(INDEX([Tracker.$A$1:.$AG$120];6+9*(MONTH([.$A130])-1)+(COLUMN()-4);DAY([.$A130])+2)&lt;&gt;&quot;&quot;;1;0)" table:style-name="ce92"/>
          <table:table-cell office:value-type="float" office:value="0" table:formula="of:=IF(INDEX([Tracker.$A$1:.$AG$120];6+9*(MONTH([.$A130])-1)+(COLUMN()-4);DAY([.$A130])+2)&lt;&gt;&quot;&quot;;1;0)" table:style-name="ce92"/>
          <table:table-cell office:value-type="float" office:value="0" table:formula="of:=IF(INDEX([Tracker.$A$1:.$AG$120];6+9*(MONTH([.$A130])-1)+(COLUMN()-4);DAY([.$A130])+2)&lt;&gt;&quot;&quot;;1;0)" table:style-name="ce92"/>
          <table:table-cell office:value-type="float" office:value="0" table:formula="of:=IF(INDEX([Tracker.$A$1:.$AG$120];6+9*(MONTH([.$A130])-1)+(COLUMN()-4);DAY([.$A130])+2)&lt;&gt;&quot;&quot;;1;0)" table:style-name="ce92"/>
          <table:table-cell office:value-type="float" office:value="0" table:formula="of:=IF(INDEX([Tracker.$A$1:.$AG$120];6+9*(MONTH([.$A130])-1)+(COLUMN()-4);DAY([.$A130])+2)&lt;&gt;&quot;&quot;;1;0)" table:style-name="ce92"/>
          <table:table-cell office:value-type="float" office:value="0" table:formula="of:=IF(INDEX([Tracker.$A$1:.$AG$120];6+9*(MONTH([.$A130])-1)+(COLUMN()-4);DAY([.$A130])+2)&lt;&gt;&quot;&quot;;1;0)" table:style-name="ce92"/>
          <table:table-cell office:value-type="float" office:value="0" table:formula="of:=SUM([.D130:.I130])" table:style-name="ce6"/>
          <table:table-cell office:value-type="percentage" office:value="0" table:formula="of:=[.J130]/6" table:style-name="ce8">
            <text:p>0%</text:p>
          </table:table-cell>
          <table:table-cell table:style-name="ce1"/>
          <table:table-cell office:value-type="float" office:value="0" table:formula="of:=IF([.D130]=1;[.M129]+1;0)" table:style-name="ce1">
            <text:p>0</text:p>
          </table:table-cell>
          <table:table-cell office:value-type="float" office:value="0" table:formula="of:=IF([.E130]=1;[.N129]+1;0)" table:style-name="ce1">
            <text:p>0</text:p>
          </table:table-cell>
          <table:table-cell office:value-type="float" office:value="0" table:formula="of:=IF([.F130]=1;[.O129]+1;0)" table:style-name="ce1">
            <text:p>0</text:p>
          </table:table-cell>
          <table:table-cell office:value-type="float" office:value="0" table:formula="of:=IF([.G130]=1;[.P129]+1;0)" table:style-name="ce1">
            <text:p>0</text:p>
          </table:table-cell>
          <table:table-cell office:value-type="float" office:value="0" table:formula="of:=IF([.H130]=1;[.Q129]+1;0)" table:style-name="ce1">
            <text:p>0</text:p>
          </table:table-cell>
          <table:table-cell office:value-type="float" office:value="0" table:formula="of:=IF([.I130]=1;[.R12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8T00:00:00" table:formula="of:=[.A130]+1" table:style-name="ce10">
            <text:p>Fri, 08 May 2026</text:p>
          </table:table-cell>
          <table:table-cell office:value-type="string" office:string-value="Fri" table:formula="of:=TEXT([.A131];&quot;ddd&quot;)" table:style-name="ce5">
            <text:p>Fri</text:p>
          </table:table-cell>
          <table:table-cell office:value-type="string" office:string-value="May" table:formula="of:=TEXT([.A131];&quot;mmm&quot;)" table:style-name="ce5">
            <text:p>May</text:p>
          </table:table-cell>
          <table:table-cell office:value-type="float" office:value="0" table:formula="of:=IF(INDEX([Tracker.$A$1:.$AG$120];6+9*(MONTH([.$A131])-1)+(COLUMN()-4);DAY([.$A131])+2)&lt;&gt;&quot;&quot;;1;0)" table:style-name="ce92"/>
          <table:table-cell office:value-type="float" office:value="0" table:formula="of:=IF(INDEX([Tracker.$A$1:.$AG$120];6+9*(MONTH([.$A131])-1)+(COLUMN()-4);DAY([.$A131])+2)&lt;&gt;&quot;&quot;;1;0)" table:style-name="ce92"/>
          <table:table-cell office:value-type="float" office:value="0" table:formula="of:=IF(INDEX([Tracker.$A$1:.$AG$120];6+9*(MONTH([.$A131])-1)+(COLUMN()-4);DAY([.$A131])+2)&lt;&gt;&quot;&quot;;1;0)" table:style-name="ce92"/>
          <table:table-cell office:value-type="float" office:value="0" table:formula="of:=IF(INDEX([Tracker.$A$1:.$AG$120];6+9*(MONTH([.$A131])-1)+(COLUMN()-4);DAY([.$A131])+2)&lt;&gt;&quot;&quot;;1;0)" table:style-name="ce92"/>
          <table:table-cell office:value-type="float" office:value="0" table:formula="of:=IF(INDEX([Tracker.$A$1:.$AG$120];6+9*(MONTH([.$A131])-1)+(COLUMN()-4);DAY([.$A131])+2)&lt;&gt;&quot;&quot;;1;0)" table:style-name="ce92"/>
          <table:table-cell office:value-type="float" office:value="0" table:formula="of:=IF(INDEX([Tracker.$A$1:.$AG$120];6+9*(MONTH([.$A131])-1)+(COLUMN()-4);DAY([.$A131])+2)&lt;&gt;&quot;&quot;;1;0)" table:style-name="ce92"/>
          <table:table-cell office:value-type="float" office:value="0" table:formula="of:=SUM([.D131:.I131])" table:style-name="ce6"/>
          <table:table-cell office:value-type="percentage" office:value="0" table:formula="of:=[.J131]/6" table:style-name="ce8">
            <text:p>0%</text:p>
          </table:table-cell>
          <table:table-cell table:style-name="ce1"/>
          <table:table-cell office:value-type="float" office:value="0" table:formula="of:=IF([.D131]=1;[.M130]+1;0)" table:style-name="ce1">
            <text:p>0</text:p>
          </table:table-cell>
          <table:table-cell office:value-type="float" office:value="0" table:formula="of:=IF([.E131]=1;[.N130]+1;0)" table:style-name="ce1">
            <text:p>0</text:p>
          </table:table-cell>
          <table:table-cell office:value-type="float" office:value="0" table:formula="of:=IF([.F131]=1;[.O130]+1;0)" table:style-name="ce1">
            <text:p>0</text:p>
          </table:table-cell>
          <table:table-cell office:value-type="float" office:value="0" table:formula="of:=IF([.G131]=1;[.P130]+1;0)" table:style-name="ce1">
            <text:p>0</text:p>
          </table:table-cell>
          <table:table-cell office:value-type="float" office:value="0" table:formula="of:=IF([.H131]=1;[.Q130]+1;0)" table:style-name="ce1">
            <text:p>0</text:p>
          </table:table-cell>
          <table:table-cell office:value-type="float" office:value="0" table:formula="of:=IF([.I131]=1;[.R13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09T00:00:00" table:formula="of:=[.A131]+1" table:style-name="ce10">
            <text:p>Sat, 09 May 2026</text:p>
          </table:table-cell>
          <table:table-cell office:value-type="string" office:string-value="Sat" table:formula="of:=TEXT([.A132];&quot;ddd&quot;)" table:style-name="ce5">
            <text:p>Sat</text:p>
          </table:table-cell>
          <table:table-cell office:value-type="string" office:string-value="May" table:formula="of:=TEXT([.A132];&quot;mmm&quot;)" table:style-name="ce5">
            <text:p>May</text:p>
          </table:table-cell>
          <table:table-cell office:value-type="float" office:value="0" table:formula="of:=IF(INDEX([Tracker.$A$1:.$AG$120];6+9*(MONTH([.$A132])-1)+(COLUMN()-4);DAY([.$A132])+2)&lt;&gt;&quot;&quot;;1;0)" table:style-name="ce92"/>
          <table:table-cell office:value-type="float" office:value="0" table:formula="of:=IF(INDEX([Tracker.$A$1:.$AG$120];6+9*(MONTH([.$A132])-1)+(COLUMN()-4);DAY([.$A132])+2)&lt;&gt;&quot;&quot;;1;0)" table:style-name="ce92"/>
          <table:table-cell office:value-type="float" office:value="0" table:formula="of:=IF(INDEX([Tracker.$A$1:.$AG$120];6+9*(MONTH([.$A132])-1)+(COLUMN()-4);DAY([.$A132])+2)&lt;&gt;&quot;&quot;;1;0)" table:style-name="ce92"/>
          <table:table-cell office:value-type="float" office:value="0" table:formula="of:=IF(INDEX([Tracker.$A$1:.$AG$120];6+9*(MONTH([.$A132])-1)+(COLUMN()-4);DAY([.$A132])+2)&lt;&gt;&quot;&quot;;1;0)" table:style-name="ce92"/>
          <table:table-cell office:value-type="float" office:value="0" table:formula="of:=IF(INDEX([Tracker.$A$1:.$AG$120];6+9*(MONTH([.$A132])-1)+(COLUMN()-4);DAY([.$A132])+2)&lt;&gt;&quot;&quot;;1;0)" table:style-name="ce92"/>
          <table:table-cell office:value-type="float" office:value="0" table:formula="of:=IF(INDEX([Tracker.$A$1:.$AG$120];6+9*(MONTH([.$A132])-1)+(COLUMN()-4);DAY([.$A132])+2)&lt;&gt;&quot;&quot;;1;0)" table:style-name="ce92"/>
          <table:table-cell office:value-type="float" office:value="0" table:formula="of:=SUM([.D132:.I132])" table:style-name="ce6"/>
          <table:table-cell office:value-type="percentage" office:value="0" table:formula="of:=[.J132]/6" table:style-name="ce8">
            <text:p>0%</text:p>
          </table:table-cell>
          <table:table-cell table:style-name="ce1"/>
          <table:table-cell office:value-type="float" office:value="0" table:formula="of:=IF([.D132]=1;[.M131]+1;0)" table:style-name="ce1">
            <text:p>0</text:p>
          </table:table-cell>
          <table:table-cell office:value-type="float" office:value="0" table:formula="of:=IF([.E132]=1;[.N131]+1;0)" table:style-name="ce1">
            <text:p>0</text:p>
          </table:table-cell>
          <table:table-cell office:value-type="float" office:value="0" table:formula="of:=IF([.F132]=1;[.O131]+1;0)" table:style-name="ce1">
            <text:p>0</text:p>
          </table:table-cell>
          <table:table-cell office:value-type="float" office:value="0" table:formula="of:=IF([.G132]=1;[.P131]+1;0)" table:style-name="ce1">
            <text:p>0</text:p>
          </table:table-cell>
          <table:table-cell office:value-type="float" office:value="0" table:formula="of:=IF([.H132]=1;[.Q131]+1;0)" table:style-name="ce1">
            <text:p>0</text:p>
          </table:table-cell>
          <table:table-cell office:value-type="float" office:value="0" table:formula="of:=IF([.I132]=1;[.R13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0T00:00:00" table:formula="of:=[.A132]+1" table:style-name="ce10">
            <text:p>Sun, 10 May 2026</text:p>
          </table:table-cell>
          <table:table-cell office:value-type="string" office:string-value="Sun" table:formula="of:=TEXT([.A133];&quot;ddd&quot;)" table:style-name="ce5">
            <text:p>Sun</text:p>
          </table:table-cell>
          <table:table-cell office:value-type="string" office:string-value="May" table:formula="of:=TEXT([.A133];&quot;mmm&quot;)" table:style-name="ce5">
            <text:p>May</text:p>
          </table:table-cell>
          <table:table-cell office:value-type="float" office:value="0" table:formula="of:=IF(INDEX([Tracker.$A$1:.$AG$120];6+9*(MONTH([.$A133])-1)+(COLUMN()-4);DAY([.$A133])+2)&lt;&gt;&quot;&quot;;1;0)" table:style-name="ce92"/>
          <table:table-cell office:value-type="float" office:value="0" table:formula="of:=IF(INDEX([Tracker.$A$1:.$AG$120];6+9*(MONTH([.$A133])-1)+(COLUMN()-4);DAY([.$A133])+2)&lt;&gt;&quot;&quot;;1;0)" table:style-name="ce92"/>
          <table:table-cell office:value-type="float" office:value="0" table:formula="of:=IF(INDEX([Tracker.$A$1:.$AG$120];6+9*(MONTH([.$A133])-1)+(COLUMN()-4);DAY([.$A133])+2)&lt;&gt;&quot;&quot;;1;0)" table:style-name="ce92"/>
          <table:table-cell office:value-type="float" office:value="0" table:formula="of:=IF(INDEX([Tracker.$A$1:.$AG$120];6+9*(MONTH([.$A133])-1)+(COLUMN()-4);DAY([.$A133])+2)&lt;&gt;&quot;&quot;;1;0)" table:style-name="ce92"/>
          <table:table-cell office:value-type="float" office:value="0" table:formula="of:=IF(INDEX([Tracker.$A$1:.$AG$120];6+9*(MONTH([.$A133])-1)+(COLUMN()-4);DAY([.$A133])+2)&lt;&gt;&quot;&quot;;1;0)" table:style-name="ce92"/>
          <table:table-cell office:value-type="float" office:value="0" table:formula="of:=IF(INDEX([Tracker.$A$1:.$AG$120];6+9*(MONTH([.$A133])-1)+(COLUMN()-4);DAY([.$A133])+2)&lt;&gt;&quot;&quot;;1;0)" table:style-name="ce92"/>
          <table:table-cell office:value-type="float" office:value="0" table:formula="of:=SUM([.D133:.I133])" table:style-name="ce6"/>
          <table:table-cell office:value-type="percentage" office:value="0" table:formula="of:=[.J133]/6" table:style-name="ce8">
            <text:p>0%</text:p>
          </table:table-cell>
          <table:table-cell table:style-name="ce1"/>
          <table:table-cell office:value-type="float" office:value="0" table:formula="of:=IF([.D133]=1;[.M132]+1;0)" table:style-name="ce1">
            <text:p>0</text:p>
          </table:table-cell>
          <table:table-cell office:value-type="float" office:value="0" table:formula="of:=IF([.E133]=1;[.N132]+1;0)" table:style-name="ce1">
            <text:p>0</text:p>
          </table:table-cell>
          <table:table-cell office:value-type="float" office:value="0" table:formula="of:=IF([.F133]=1;[.O132]+1;0)" table:style-name="ce1">
            <text:p>0</text:p>
          </table:table-cell>
          <table:table-cell office:value-type="float" office:value="0" table:formula="of:=IF([.G133]=1;[.P132]+1;0)" table:style-name="ce1">
            <text:p>0</text:p>
          </table:table-cell>
          <table:table-cell office:value-type="float" office:value="0" table:formula="of:=IF([.H133]=1;[.Q132]+1;0)" table:style-name="ce1">
            <text:p>0</text:p>
          </table:table-cell>
          <table:table-cell office:value-type="float" office:value="0" table:formula="of:=IF([.I133]=1;[.R13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1T00:00:00" table:formula="of:=[.A133]+1" table:style-name="ce10">
            <text:p>Mon, 11 May 2026</text:p>
          </table:table-cell>
          <table:table-cell office:value-type="string" office:string-value="Mon" table:formula="of:=TEXT([.A134];&quot;ddd&quot;)" table:style-name="ce5">
            <text:p>Mon</text:p>
          </table:table-cell>
          <table:table-cell office:value-type="string" office:string-value="May" table:formula="of:=TEXT([.A134];&quot;mmm&quot;)" table:style-name="ce5">
            <text:p>May</text:p>
          </table:table-cell>
          <table:table-cell office:value-type="float" office:value="0" table:formula="of:=IF(INDEX([Tracker.$A$1:.$AG$120];6+9*(MONTH([.$A134])-1)+(COLUMN()-4);DAY([.$A134])+2)&lt;&gt;&quot;&quot;;1;0)" table:style-name="ce92"/>
          <table:table-cell office:value-type="float" office:value="0" table:formula="of:=IF(INDEX([Tracker.$A$1:.$AG$120];6+9*(MONTH([.$A134])-1)+(COLUMN()-4);DAY([.$A134])+2)&lt;&gt;&quot;&quot;;1;0)" table:style-name="ce92"/>
          <table:table-cell office:value-type="float" office:value="0" table:formula="of:=IF(INDEX([Tracker.$A$1:.$AG$120];6+9*(MONTH([.$A134])-1)+(COLUMN()-4);DAY([.$A134])+2)&lt;&gt;&quot;&quot;;1;0)" table:style-name="ce92"/>
          <table:table-cell office:value-type="float" office:value="0" table:formula="of:=IF(INDEX([Tracker.$A$1:.$AG$120];6+9*(MONTH([.$A134])-1)+(COLUMN()-4);DAY([.$A134])+2)&lt;&gt;&quot;&quot;;1;0)" table:style-name="ce92"/>
          <table:table-cell office:value-type="float" office:value="0" table:formula="of:=IF(INDEX([Tracker.$A$1:.$AG$120];6+9*(MONTH([.$A134])-1)+(COLUMN()-4);DAY([.$A134])+2)&lt;&gt;&quot;&quot;;1;0)" table:style-name="ce92"/>
          <table:table-cell office:value-type="float" office:value="0" table:formula="of:=IF(INDEX([Tracker.$A$1:.$AG$120];6+9*(MONTH([.$A134])-1)+(COLUMN()-4);DAY([.$A134])+2)&lt;&gt;&quot;&quot;;1;0)" table:style-name="ce92"/>
          <table:table-cell office:value-type="float" office:value="0" table:formula="of:=SUM([.D134:.I134])" table:style-name="ce6"/>
          <table:table-cell office:value-type="percentage" office:value="0" table:formula="of:=[.J134]/6" table:style-name="ce8">
            <text:p>0%</text:p>
          </table:table-cell>
          <table:table-cell table:style-name="ce1"/>
          <table:table-cell office:value-type="float" office:value="0" table:formula="of:=IF([.D134]=1;[.M133]+1;0)" table:style-name="ce1">
            <text:p>0</text:p>
          </table:table-cell>
          <table:table-cell office:value-type="float" office:value="0" table:formula="of:=IF([.E134]=1;[.N133]+1;0)" table:style-name="ce1">
            <text:p>0</text:p>
          </table:table-cell>
          <table:table-cell office:value-type="float" office:value="0" table:formula="of:=IF([.F134]=1;[.O133]+1;0)" table:style-name="ce1">
            <text:p>0</text:p>
          </table:table-cell>
          <table:table-cell office:value-type="float" office:value="0" table:formula="of:=IF([.G134]=1;[.P133]+1;0)" table:style-name="ce1">
            <text:p>0</text:p>
          </table:table-cell>
          <table:table-cell office:value-type="float" office:value="0" table:formula="of:=IF([.H134]=1;[.Q133]+1;0)" table:style-name="ce1">
            <text:p>0</text:p>
          </table:table-cell>
          <table:table-cell office:value-type="float" office:value="0" table:formula="of:=IF([.I134]=1;[.R13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2T00:00:00" table:formula="of:=[.A134]+1" table:style-name="ce10">
            <text:p>Tue, 12 May 2026</text:p>
          </table:table-cell>
          <table:table-cell office:value-type="string" office:string-value="Tue" table:formula="of:=TEXT([.A135];&quot;ddd&quot;)" table:style-name="ce5">
            <text:p>Tue</text:p>
          </table:table-cell>
          <table:table-cell office:value-type="string" office:string-value="May" table:formula="of:=TEXT([.A135];&quot;mmm&quot;)" table:style-name="ce5">
            <text:p>May</text:p>
          </table:table-cell>
          <table:table-cell office:value-type="float" office:value="0" table:formula="of:=IF(INDEX([Tracker.$A$1:.$AG$120];6+9*(MONTH([.$A135])-1)+(COLUMN()-4);DAY([.$A135])+2)&lt;&gt;&quot;&quot;;1;0)" table:style-name="ce92"/>
          <table:table-cell office:value-type="float" office:value="0" table:formula="of:=IF(INDEX([Tracker.$A$1:.$AG$120];6+9*(MONTH([.$A135])-1)+(COLUMN()-4);DAY([.$A135])+2)&lt;&gt;&quot;&quot;;1;0)" table:style-name="ce92"/>
          <table:table-cell office:value-type="float" office:value="0" table:formula="of:=IF(INDEX([Tracker.$A$1:.$AG$120];6+9*(MONTH([.$A135])-1)+(COLUMN()-4);DAY([.$A135])+2)&lt;&gt;&quot;&quot;;1;0)" table:style-name="ce92"/>
          <table:table-cell office:value-type="float" office:value="0" table:formula="of:=IF(INDEX([Tracker.$A$1:.$AG$120];6+9*(MONTH([.$A135])-1)+(COLUMN()-4);DAY([.$A135])+2)&lt;&gt;&quot;&quot;;1;0)" table:style-name="ce92"/>
          <table:table-cell office:value-type="float" office:value="0" table:formula="of:=IF(INDEX([Tracker.$A$1:.$AG$120];6+9*(MONTH([.$A135])-1)+(COLUMN()-4);DAY([.$A135])+2)&lt;&gt;&quot;&quot;;1;0)" table:style-name="ce92"/>
          <table:table-cell office:value-type="float" office:value="0" table:formula="of:=IF(INDEX([Tracker.$A$1:.$AG$120];6+9*(MONTH([.$A135])-1)+(COLUMN()-4);DAY([.$A135])+2)&lt;&gt;&quot;&quot;;1;0)" table:style-name="ce92"/>
          <table:table-cell office:value-type="float" office:value="0" table:formula="of:=SUM([.D135:.I135])" table:style-name="ce6"/>
          <table:table-cell office:value-type="percentage" office:value="0" table:formula="of:=[.J135]/6" table:style-name="ce8">
            <text:p>0%</text:p>
          </table:table-cell>
          <table:table-cell table:style-name="ce1"/>
          <table:table-cell office:value-type="float" office:value="0" table:formula="of:=IF([.D135]=1;[.M134]+1;0)" table:style-name="ce1">
            <text:p>0</text:p>
          </table:table-cell>
          <table:table-cell office:value-type="float" office:value="0" table:formula="of:=IF([.E135]=1;[.N134]+1;0)" table:style-name="ce1">
            <text:p>0</text:p>
          </table:table-cell>
          <table:table-cell office:value-type="float" office:value="0" table:formula="of:=IF([.F135]=1;[.O134]+1;0)" table:style-name="ce1">
            <text:p>0</text:p>
          </table:table-cell>
          <table:table-cell office:value-type="float" office:value="0" table:formula="of:=IF([.G135]=1;[.P134]+1;0)" table:style-name="ce1">
            <text:p>0</text:p>
          </table:table-cell>
          <table:table-cell office:value-type="float" office:value="0" table:formula="of:=IF([.H135]=1;[.Q134]+1;0)" table:style-name="ce1">
            <text:p>0</text:p>
          </table:table-cell>
          <table:table-cell office:value-type="float" office:value="0" table:formula="of:=IF([.I135]=1;[.R13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3T00:00:00" table:formula="of:=[.A135]+1" table:style-name="ce10">
            <text:p>Wed, 13 May 2026</text:p>
          </table:table-cell>
          <table:table-cell office:value-type="string" office:string-value="Wed" table:formula="of:=TEXT([.A136];&quot;ddd&quot;)" table:style-name="ce5">
            <text:p>Wed</text:p>
          </table:table-cell>
          <table:table-cell office:value-type="string" office:string-value="May" table:formula="of:=TEXT([.A136];&quot;mmm&quot;)" table:style-name="ce5">
            <text:p>May</text:p>
          </table:table-cell>
          <table:table-cell office:value-type="float" office:value="0" table:formula="of:=IF(INDEX([Tracker.$A$1:.$AG$120];6+9*(MONTH([.$A136])-1)+(COLUMN()-4);DAY([.$A136])+2)&lt;&gt;&quot;&quot;;1;0)" table:style-name="ce92"/>
          <table:table-cell office:value-type="float" office:value="0" table:formula="of:=IF(INDEX([Tracker.$A$1:.$AG$120];6+9*(MONTH([.$A136])-1)+(COLUMN()-4);DAY([.$A136])+2)&lt;&gt;&quot;&quot;;1;0)" table:style-name="ce92"/>
          <table:table-cell office:value-type="float" office:value="0" table:formula="of:=IF(INDEX([Tracker.$A$1:.$AG$120];6+9*(MONTH([.$A136])-1)+(COLUMN()-4);DAY([.$A136])+2)&lt;&gt;&quot;&quot;;1;0)" table:style-name="ce92"/>
          <table:table-cell office:value-type="float" office:value="0" table:formula="of:=IF(INDEX([Tracker.$A$1:.$AG$120];6+9*(MONTH([.$A136])-1)+(COLUMN()-4);DAY([.$A136])+2)&lt;&gt;&quot;&quot;;1;0)" table:style-name="ce92"/>
          <table:table-cell office:value-type="float" office:value="0" table:formula="of:=IF(INDEX([Tracker.$A$1:.$AG$120];6+9*(MONTH([.$A136])-1)+(COLUMN()-4);DAY([.$A136])+2)&lt;&gt;&quot;&quot;;1;0)" table:style-name="ce92"/>
          <table:table-cell office:value-type="float" office:value="0" table:formula="of:=IF(INDEX([Tracker.$A$1:.$AG$120];6+9*(MONTH([.$A136])-1)+(COLUMN()-4);DAY([.$A136])+2)&lt;&gt;&quot;&quot;;1;0)" table:style-name="ce92"/>
          <table:table-cell office:value-type="float" office:value="0" table:formula="of:=SUM([.D136:.I136])" table:style-name="ce6"/>
          <table:table-cell office:value-type="percentage" office:value="0" table:formula="of:=[.J136]/6" table:style-name="ce8">
            <text:p>0%</text:p>
          </table:table-cell>
          <table:table-cell table:style-name="ce1"/>
          <table:table-cell office:value-type="float" office:value="0" table:formula="of:=IF([.D136]=1;[.M135]+1;0)" table:style-name="ce1">
            <text:p>0</text:p>
          </table:table-cell>
          <table:table-cell office:value-type="float" office:value="0" table:formula="of:=IF([.E136]=1;[.N135]+1;0)" table:style-name="ce1">
            <text:p>0</text:p>
          </table:table-cell>
          <table:table-cell office:value-type="float" office:value="0" table:formula="of:=IF([.F136]=1;[.O135]+1;0)" table:style-name="ce1">
            <text:p>0</text:p>
          </table:table-cell>
          <table:table-cell office:value-type="float" office:value="0" table:formula="of:=IF([.G136]=1;[.P135]+1;0)" table:style-name="ce1">
            <text:p>0</text:p>
          </table:table-cell>
          <table:table-cell office:value-type="float" office:value="0" table:formula="of:=IF([.H136]=1;[.Q135]+1;0)" table:style-name="ce1">
            <text:p>0</text:p>
          </table:table-cell>
          <table:table-cell office:value-type="float" office:value="0" table:formula="of:=IF([.I136]=1;[.R13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4T00:00:00" table:formula="of:=[.A136]+1" table:style-name="ce10">
            <text:p>Thu, 14 May 2026</text:p>
          </table:table-cell>
          <table:table-cell office:value-type="string" office:string-value="Thu" table:formula="of:=TEXT([.A137];&quot;ddd&quot;)" table:style-name="ce5">
            <text:p>Thu</text:p>
          </table:table-cell>
          <table:table-cell office:value-type="string" office:string-value="May" table:formula="of:=TEXT([.A137];&quot;mmm&quot;)" table:style-name="ce5">
            <text:p>May</text:p>
          </table:table-cell>
          <table:table-cell office:value-type="float" office:value="0" table:formula="of:=IF(INDEX([Tracker.$A$1:.$AG$120];6+9*(MONTH([.$A137])-1)+(COLUMN()-4);DAY([.$A137])+2)&lt;&gt;&quot;&quot;;1;0)" table:style-name="ce92"/>
          <table:table-cell office:value-type="float" office:value="0" table:formula="of:=IF(INDEX([Tracker.$A$1:.$AG$120];6+9*(MONTH([.$A137])-1)+(COLUMN()-4);DAY([.$A137])+2)&lt;&gt;&quot;&quot;;1;0)" table:style-name="ce92"/>
          <table:table-cell office:value-type="float" office:value="0" table:formula="of:=IF(INDEX([Tracker.$A$1:.$AG$120];6+9*(MONTH([.$A137])-1)+(COLUMN()-4);DAY([.$A137])+2)&lt;&gt;&quot;&quot;;1;0)" table:style-name="ce92"/>
          <table:table-cell office:value-type="float" office:value="0" table:formula="of:=IF(INDEX([Tracker.$A$1:.$AG$120];6+9*(MONTH([.$A137])-1)+(COLUMN()-4);DAY([.$A137])+2)&lt;&gt;&quot;&quot;;1;0)" table:style-name="ce92"/>
          <table:table-cell office:value-type="float" office:value="0" table:formula="of:=IF(INDEX([Tracker.$A$1:.$AG$120];6+9*(MONTH([.$A137])-1)+(COLUMN()-4);DAY([.$A137])+2)&lt;&gt;&quot;&quot;;1;0)" table:style-name="ce92"/>
          <table:table-cell office:value-type="float" office:value="0" table:formula="of:=IF(INDEX([Tracker.$A$1:.$AG$120];6+9*(MONTH([.$A137])-1)+(COLUMN()-4);DAY([.$A137])+2)&lt;&gt;&quot;&quot;;1;0)" table:style-name="ce92"/>
          <table:table-cell office:value-type="float" office:value="0" table:formula="of:=SUM([.D137:.I137])" table:style-name="ce6"/>
          <table:table-cell office:value-type="percentage" office:value="0" table:formula="of:=[.J137]/6" table:style-name="ce8">
            <text:p>0%</text:p>
          </table:table-cell>
          <table:table-cell table:style-name="ce1"/>
          <table:table-cell office:value-type="float" office:value="0" table:formula="of:=IF([.D137]=1;[.M136]+1;0)" table:style-name="ce1">
            <text:p>0</text:p>
          </table:table-cell>
          <table:table-cell office:value-type="float" office:value="0" table:formula="of:=IF([.E137]=1;[.N136]+1;0)" table:style-name="ce1">
            <text:p>0</text:p>
          </table:table-cell>
          <table:table-cell office:value-type="float" office:value="0" table:formula="of:=IF([.F137]=1;[.O136]+1;0)" table:style-name="ce1">
            <text:p>0</text:p>
          </table:table-cell>
          <table:table-cell office:value-type="float" office:value="0" table:formula="of:=IF([.G137]=1;[.P136]+1;0)" table:style-name="ce1">
            <text:p>0</text:p>
          </table:table-cell>
          <table:table-cell office:value-type="float" office:value="0" table:formula="of:=IF([.H137]=1;[.Q136]+1;0)" table:style-name="ce1">
            <text:p>0</text:p>
          </table:table-cell>
          <table:table-cell office:value-type="float" office:value="0" table:formula="of:=IF([.I137]=1;[.R13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5T00:00:00" table:formula="of:=[.A137]+1" table:style-name="ce10">
            <text:p>Fri, 15 May 2026</text:p>
          </table:table-cell>
          <table:table-cell office:value-type="string" office:string-value="Fri" table:formula="of:=TEXT([.A138];&quot;ddd&quot;)" table:style-name="ce5">
            <text:p>Fri</text:p>
          </table:table-cell>
          <table:table-cell office:value-type="string" office:string-value="May" table:formula="of:=TEXT([.A138];&quot;mmm&quot;)" table:style-name="ce5">
            <text:p>May</text:p>
          </table:table-cell>
          <table:table-cell office:value-type="float" office:value="0" table:formula="of:=IF(INDEX([Tracker.$A$1:.$AG$120];6+9*(MONTH([.$A138])-1)+(COLUMN()-4);DAY([.$A138])+2)&lt;&gt;&quot;&quot;;1;0)" table:style-name="ce92"/>
          <table:table-cell office:value-type="float" office:value="0" table:formula="of:=IF(INDEX([Tracker.$A$1:.$AG$120];6+9*(MONTH([.$A138])-1)+(COLUMN()-4);DAY([.$A138])+2)&lt;&gt;&quot;&quot;;1;0)" table:style-name="ce92"/>
          <table:table-cell office:value-type="float" office:value="0" table:formula="of:=IF(INDEX([Tracker.$A$1:.$AG$120];6+9*(MONTH([.$A138])-1)+(COLUMN()-4);DAY([.$A138])+2)&lt;&gt;&quot;&quot;;1;0)" table:style-name="ce92"/>
          <table:table-cell office:value-type="float" office:value="0" table:formula="of:=IF(INDEX([Tracker.$A$1:.$AG$120];6+9*(MONTH([.$A138])-1)+(COLUMN()-4);DAY([.$A138])+2)&lt;&gt;&quot;&quot;;1;0)" table:style-name="ce92"/>
          <table:table-cell office:value-type="float" office:value="0" table:formula="of:=IF(INDEX([Tracker.$A$1:.$AG$120];6+9*(MONTH([.$A138])-1)+(COLUMN()-4);DAY([.$A138])+2)&lt;&gt;&quot;&quot;;1;0)" table:style-name="ce92"/>
          <table:table-cell office:value-type="float" office:value="0" table:formula="of:=IF(INDEX([Tracker.$A$1:.$AG$120];6+9*(MONTH([.$A138])-1)+(COLUMN()-4);DAY([.$A138])+2)&lt;&gt;&quot;&quot;;1;0)" table:style-name="ce92"/>
          <table:table-cell office:value-type="float" office:value="0" table:formula="of:=SUM([.D138:.I138])" table:style-name="ce6"/>
          <table:table-cell office:value-type="percentage" office:value="0" table:formula="of:=[.J138]/6" table:style-name="ce8">
            <text:p>0%</text:p>
          </table:table-cell>
          <table:table-cell table:style-name="ce1"/>
          <table:table-cell office:value-type="float" office:value="0" table:formula="of:=IF([.D138]=1;[.M137]+1;0)" table:style-name="ce1">
            <text:p>0</text:p>
          </table:table-cell>
          <table:table-cell office:value-type="float" office:value="0" table:formula="of:=IF([.E138]=1;[.N137]+1;0)" table:style-name="ce1">
            <text:p>0</text:p>
          </table:table-cell>
          <table:table-cell office:value-type="float" office:value="0" table:formula="of:=IF([.F138]=1;[.O137]+1;0)" table:style-name="ce1">
            <text:p>0</text:p>
          </table:table-cell>
          <table:table-cell office:value-type="float" office:value="0" table:formula="of:=IF([.G138]=1;[.P137]+1;0)" table:style-name="ce1">
            <text:p>0</text:p>
          </table:table-cell>
          <table:table-cell office:value-type="float" office:value="0" table:formula="of:=IF([.H138]=1;[.Q137]+1;0)" table:style-name="ce1">
            <text:p>0</text:p>
          </table:table-cell>
          <table:table-cell office:value-type="float" office:value="0" table:formula="of:=IF([.I138]=1;[.R13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6T00:00:00" table:formula="of:=[.A138]+1" table:style-name="ce10">
            <text:p>Sat, 16 May 2026</text:p>
          </table:table-cell>
          <table:table-cell office:value-type="string" office:string-value="Sat" table:formula="of:=TEXT([.A139];&quot;ddd&quot;)" table:style-name="ce5">
            <text:p>Sat</text:p>
          </table:table-cell>
          <table:table-cell office:value-type="string" office:string-value="May" table:formula="of:=TEXT([.A139];&quot;mmm&quot;)" table:style-name="ce5">
            <text:p>May</text:p>
          </table:table-cell>
          <table:table-cell office:value-type="float" office:value="0" table:formula="of:=IF(INDEX([Tracker.$A$1:.$AG$120];6+9*(MONTH([.$A139])-1)+(COLUMN()-4);DAY([.$A139])+2)&lt;&gt;&quot;&quot;;1;0)" table:style-name="ce92"/>
          <table:table-cell office:value-type="float" office:value="0" table:formula="of:=IF(INDEX([Tracker.$A$1:.$AG$120];6+9*(MONTH([.$A139])-1)+(COLUMN()-4);DAY([.$A139])+2)&lt;&gt;&quot;&quot;;1;0)" table:style-name="ce92"/>
          <table:table-cell office:value-type="float" office:value="0" table:formula="of:=IF(INDEX([Tracker.$A$1:.$AG$120];6+9*(MONTH([.$A139])-1)+(COLUMN()-4);DAY([.$A139])+2)&lt;&gt;&quot;&quot;;1;0)" table:style-name="ce92"/>
          <table:table-cell office:value-type="float" office:value="0" table:formula="of:=IF(INDEX([Tracker.$A$1:.$AG$120];6+9*(MONTH([.$A139])-1)+(COLUMN()-4);DAY([.$A139])+2)&lt;&gt;&quot;&quot;;1;0)" table:style-name="ce92"/>
          <table:table-cell office:value-type="float" office:value="0" table:formula="of:=IF(INDEX([Tracker.$A$1:.$AG$120];6+9*(MONTH([.$A139])-1)+(COLUMN()-4);DAY([.$A139])+2)&lt;&gt;&quot;&quot;;1;0)" table:style-name="ce92"/>
          <table:table-cell office:value-type="float" office:value="0" table:formula="of:=IF(INDEX([Tracker.$A$1:.$AG$120];6+9*(MONTH([.$A139])-1)+(COLUMN()-4);DAY([.$A139])+2)&lt;&gt;&quot;&quot;;1;0)" table:style-name="ce92"/>
          <table:table-cell office:value-type="float" office:value="0" table:formula="of:=SUM([.D139:.I139])" table:style-name="ce6"/>
          <table:table-cell office:value-type="percentage" office:value="0" table:formula="of:=[.J139]/6" table:style-name="ce8">
            <text:p>0%</text:p>
          </table:table-cell>
          <table:table-cell table:style-name="ce1"/>
          <table:table-cell office:value-type="float" office:value="0" table:formula="of:=IF([.D139]=1;[.M138]+1;0)" table:style-name="ce1">
            <text:p>0</text:p>
          </table:table-cell>
          <table:table-cell office:value-type="float" office:value="0" table:formula="of:=IF([.E139]=1;[.N138]+1;0)" table:style-name="ce1">
            <text:p>0</text:p>
          </table:table-cell>
          <table:table-cell office:value-type="float" office:value="0" table:formula="of:=IF([.F139]=1;[.O138]+1;0)" table:style-name="ce1">
            <text:p>0</text:p>
          </table:table-cell>
          <table:table-cell office:value-type="float" office:value="0" table:formula="of:=IF([.G139]=1;[.P138]+1;0)" table:style-name="ce1">
            <text:p>0</text:p>
          </table:table-cell>
          <table:table-cell office:value-type="float" office:value="0" table:formula="of:=IF([.H139]=1;[.Q138]+1;0)" table:style-name="ce1">
            <text:p>0</text:p>
          </table:table-cell>
          <table:table-cell office:value-type="float" office:value="0" table:formula="of:=IF([.I139]=1;[.R13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7T00:00:00" table:formula="of:=[.A139]+1" table:style-name="ce10">
            <text:p>Sun, 17 May 2026</text:p>
          </table:table-cell>
          <table:table-cell office:value-type="string" office:string-value="Sun" table:formula="of:=TEXT([.A140];&quot;ddd&quot;)" table:style-name="ce5">
            <text:p>Sun</text:p>
          </table:table-cell>
          <table:table-cell office:value-type="string" office:string-value="May" table:formula="of:=TEXT([.A140];&quot;mmm&quot;)" table:style-name="ce5">
            <text:p>May</text:p>
          </table:table-cell>
          <table:table-cell office:value-type="float" office:value="0" table:formula="of:=IF(INDEX([Tracker.$A$1:.$AG$120];6+9*(MONTH([.$A140])-1)+(COLUMN()-4);DAY([.$A140])+2)&lt;&gt;&quot;&quot;;1;0)" table:style-name="ce92"/>
          <table:table-cell office:value-type="float" office:value="0" table:formula="of:=IF(INDEX([Tracker.$A$1:.$AG$120];6+9*(MONTH([.$A140])-1)+(COLUMN()-4);DAY([.$A140])+2)&lt;&gt;&quot;&quot;;1;0)" table:style-name="ce92"/>
          <table:table-cell office:value-type="float" office:value="0" table:formula="of:=IF(INDEX([Tracker.$A$1:.$AG$120];6+9*(MONTH([.$A140])-1)+(COLUMN()-4);DAY([.$A140])+2)&lt;&gt;&quot;&quot;;1;0)" table:style-name="ce92"/>
          <table:table-cell office:value-type="float" office:value="0" table:formula="of:=IF(INDEX([Tracker.$A$1:.$AG$120];6+9*(MONTH([.$A140])-1)+(COLUMN()-4);DAY([.$A140])+2)&lt;&gt;&quot;&quot;;1;0)" table:style-name="ce92"/>
          <table:table-cell office:value-type="float" office:value="0" table:formula="of:=IF(INDEX([Tracker.$A$1:.$AG$120];6+9*(MONTH([.$A140])-1)+(COLUMN()-4);DAY([.$A140])+2)&lt;&gt;&quot;&quot;;1;0)" table:style-name="ce92"/>
          <table:table-cell office:value-type="float" office:value="0" table:formula="of:=IF(INDEX([Tracker.$A$1:.$AG$120];6+9*(MONTH([.$A140])-1)+(COLUMN()-4);DAY([.$A140])+2)&lt;&gt;&quot;&quot;;1;0)" table:style-name="ce92"/>
          <table:table-cell office:value-type="float" office:value="0" table:formula="of:=SUM([.D140:.I140])" table:style-name="ce6"/>
          <table:table-cell office:value-type="percentage" office:value="0" table:formula="of:=[.J140]/6" table:style-name="ce8">
            <text:p>0%</text:p>
          </table:table-cell>
          <table:table-cell table:style-name="ce1"/>
          <table:table-cell office:value-type="float" office:value="0" table:formula="of:=IF([.D140]=1;[.M139]+1;0)" table:style-name="ce1">
            <text:p>0</text:p>
          </table:table-cell>
          <table:table-cell office:value-type="float" office:value="0" table:formula="of:=IF([.E140]=1;[.N139]+1;0)" table:style-name="ce1">
            <text:p>0</text:p>
          </table:table-cell>
          <table:table-cell office:value-type="float" office:value="0" table:formula="of:=IF([.F140]=1;[.O139]+1;0)" table:style-name="ce1">
            <text:p>0</text:p>
          </table:table-cell>
          <table:table-cell office:value-type="float" office:value="0" table:formula="of:=IF([.G140]=1;[.P139]+1;0)" table:style-name="ce1">
            <text:p>0</text:p>
          </table:table-cell>
          <table:table-cell office:value-type="float" office:value="0" table:formula="of:=IF([.H140]=1;[.Q139]+1;0)" table:style-name="ce1">
            <text:p>0</text:p>
          </table:table-cell>
          <table:table-cell office:value-type="float" office:value="0" table:formula="of:=IF([.I140]=1;[.R13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8T00:00:00" table:formula="of:=[.A140]+1" table:style-name="ce10">
            <text:p>Mon, 18 May 2026</text:p>
          </table:table-cell>
          <table:table-cell office:value-type="string" office:string-value="Mon" table:formula="of:=TEXT([.A141];&quot;ddd&quot;)" table:style-name="ce5">
            <text:p>Mon</text:p>
          </table:table-cell>
          <table:table-cell office:value-type="string" office:string-value="May" table:formula="of:=TEXT([.A141];&quot;mmm&quot;)" table:style-name="ce5">
            <text:p>May</text:p>
          </table:table-cell>
          <table:table-cell office:value-type="float" office:value="0" table:formula="of:=IF(INDEX([Tracker.$A$1:.$AG$120];6+9*(MONTH([.$A141])-1)+(COLUMN()-4);DAY([.$A141])+2)&lt;&gt;&quot;&quot;;1;0)" table:style-name="ce92"/>
          <table:table-cell office:value-type="float" office:value="0" table:formula="of:=IF(INDEX([Tracker.$A$1:.$AG$120];6+9*(MONTH([.$A141])-1)+(COLUMN()-4);DAY([.$A141])+2)&lt;&gt;&quot;&quot;;1;0)" table:style-name="ce92"/>
          <table:table-cell office:value-type="float" office:value="0" table:formula="of:=IF(INDEX([Tracker.$A$1:.$AG$120];6+9*(MONTH([.$A141])-1)+(COLUMN()-4);DAY([.$A141])+2)&lt;&gt;&quot;&quot;;1;0)" table:style-name="ce92"/>
          <table:table-cell office:value-type="float" office:value="0" table:formula="of:=IF(INDEX([Tracker.$A$1:.$AG$120];6+9*(MONTH([.$A141])-1)+(COLUMN()-4);DAY([.$A141])+2)&lt;&gt;&quot;&quot;;1;0)" table:style-name="ce92"/>
          <table:table-cell office:value-type="float" office:value="0" table:formula="of:=IF(INDEX([Tracker.$A$1:.$AG$120];6+9*(MONTH([.$A141])-1)+(COLUMN()-4);DAY([.$A141])+2)&lt;&gt;&quot;&quot;;1;0)" table:style-name="ce92"/>
          <table:table-cell office:value-type="float" office:value="0" table:formula="of:=IF(INDEX([Tracker.$A$1:.$AG$120];6+9*(MONTH([.$A141])-1)+(COLUMN()-4);DAY([.$A141])+2)&lt;&gt;&quot;&quot;;1;0)" table:style-name="ce92"/>
          <table:table-cell office:value-type="float" office:value="0" table:formula="of:=SUM([.D141:.I141])" table:style-name="ce6"/>
          <table:table-cell office:value-type="percentage" office:value="0" table:formula="of:=[.J141]/6" table:style-name="ce8">
            <text:p>0%</text:p>
          </table:table-cell>
          <table:table-cell table:style-name="ce1"/>
          <table:table-cell office:value-type="float" office:value="0" table:formula="of:=IF([.D141]=1;[.M140]+1;0)" table:style-name="ce1">
            <text:p>0</text:p>
          </table:table-cell>
          <table:table-cell office:value-type="float" office:value="0" table:formula="of:=IF([.E141]=1;[.N140]+1;0)" table:style-name="ce1">
            <text:p>0</text:p>
          </table:table-cell>
          <table:table-cell office:value-type="float" office:value="0" table:formula="of:=IF([.F141]=1;[.O140]+1;0)" table:style-name="ce1">
            <text:p>0</text:p>
          </table:table-cell>
          <table:table-cell office:value-type="float" office:value="0" table:formula="of:=IF([.G141]=1;[.P140]+1;0)" table:style-name="ce1">
            <text:p>0</text:p>
          </table:table-cell>
          <table:table-cell office:value-type="float" office:value="0" table:formula="of:=IF([.H141]=1;[.Q140]+1;0)" table:style-name="ce1">
            <text:p>0</text:p>
          </table:table-cell>
          <table:table-cell office:value-type="float" office:value="0" table:formula="of:=IF([.I141]=1;[.R14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19T00:00:00" table:formula="of:=[.A141]+1" table:style-name="ce10">
            <text:p>Tue, 19 May 2026</text:p>
          </table:table-cell>
          <table:table-cell office:value-type="string" office:string-value="Tue" table:formula="of:=TEXT([.A142];&quot;ddd&quot;)" table:style-name="ce5">
            <text:p>Tue</text:p>
          </table:table-cell>
          <table:table-cell office:value-type="string" office:string-value="May" table:formula="of:=TEXT([.A142];&quot;mmm&quot;)" table:style-name="ce5">
            <text:p>May</text:p>
          </table:table-cell>
          <table:table-cell office:value-type="float" office:value="0" table:formula="of:=IF(INDEX([Tracker.$A$1:.$AG$120];6+9*(MONTH([.$A142])-1)+(COLUMN()-4);DAY([.$A142])+2)&lt;&gt;&quot;&quot;;1;0)" table:style-name="ce92"/>
          <table:table-cell office:value-type="float" office:value="0" table:formula="of:=IF(INDEX([Tracker.$A$1:.$AG$120];6+9*(MONTH([.$A142])-1)+(COLUMN()-4);DAY([.$A142])+2)&lt;&gt;&quot;&quot;;1;0)" table:style-name="ce92"/>
          <table:table-cell office:value-type="float" office:value="0" table:formula="of:=IF(INDEX([Tracker.$A$1:.$AG$120];6+9*(MONTH([.$A142])-1)+(COLUMN()-4);DAY([.$A142])+2)&lt;&gt;&quot;&quot;;1;0)" table:style-name="ce92"/>
          <table:table-cell office:value-type="float" office:value="0" table:formula="of:=IF(INDEX([Tracker.$A$1:.$AG$120];6+9*(MONTH([.$A142])-1)+(COLUMN()-4);DAY([.$A142])+2)&lt;&gt;&quot;&quot;;1;0)" table:style-name="ce92"/>
          <table:table-cell office:value-type="float" office:value="0" table:formula="of:=IF(INDEX([Tracker.$A$1:.$AG$120];6+9*(MONTH([.$A142])-1)+(COLUMN()-4);DAY([.$A142])+2)&lt;&gt;&quot;&quot;;1;0)" table:style-name="ce92"/>
          <table:table-cell office:value-type="float" office:value="0" table:formula="of:=IF(INDEX([Tracker.$A$1:.$AG$120];6+9*(MONTH([.$A142])-1)+(COLUMN()-4);DAY([.$A142])+2)&lt;&gt;&quot;&quot;;1;0)" table:style-name="ce92"/>
          <table:table-cell office:value-type="float" office:value="0" table:formula="of:=SUM([.D142:.I142])" table:style-name="ce6"/>
          <table:table-cell office:value-type="percentage" office:value="0" table:formula="of:=[.J142]/6" table:style-name="ce8">
            <text:p>0%</text:p>
          </table:table-cell>
          <table:table-cell table:style-name="ce1"/>
          <table:table-cell office:value-type="float" office:value="0" table:formula="of:=IF([.D142]=1;[.M141]+1;0)" table:style-name="ce1">
            <text:p>0</text:p>
          </table:table-cell>
          <table:table-cell office:value-type="float" office:value="0" table:formula="of:=IF([.E142]=1;[.N141]+1;0)" table:style-name="ce1">
            <text:p>0</text:p>
          </table:table-cell>
          <table:table-cell office:value-type="float" office:value="0" table:formula="of:=IF([.F142]=1;[.O141]+1;0)" table:style-name="ce1">
            <text:p>0</text:p>
          </table:table-cell>
          <table:table-cell office:value-type="float" office:value="0" table:formula="of:=IF([.G142]=1;[.P141]+1;0)" table:style-name="ce1">
            <text:p>0</text:p>
          </table:table-cell>
          <table:table-cell office:value-type="float" office:value="0" table:formula="of:=IF([.H142]=1;[.Q141]+1;0)" table:style-name="ce1">
            <text:p>0</text:p>
          </table:table-cell>
          <table:table-cell office:value-type="float" office:value="0" table:formula="of:=IF([.I142]=1;[.R14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0T00:00:00" table:formula="of:=[.A142]+1" table:style-name="ce10">
            <text:p>Wed, 20 May 2026</text:p>
          </table:table-cell>
          <table:table-cell office:value-type="string" office:string-value="Wed" table:formula="of:=TEXT([.A143];&quot;ddd&quot;)" table:style-name="ce5">
            <text:p>Wed</text:p>
          </table:table-cell>
          <table:table-cell office:value-type="string" office:string-value="May" table:formula="of:=TEXT([.A143];&quot;mmm&quot;)" table:style-name="ce5">
            <text:p>May</text:p>
          </table:table-cell>
          <table:table-cell office:value-type="float" office:value="0" table:formula="of:=IF(INDEX([Tracker.$A$1:.$AG$120];6+9*(MONTH([.$A143])-1)+(COLUMN()-4);DAY([.$A143])+2)&lt;&gt;&quot;&quot;;1;0)" table:style-name="ce92"/>
          <table:table-cell office:value-type="float" office:value="0" table:formula="of:=IF(INDEX([Tracker.$A$1:.$AG$120];6+9*(MONTH([.$A143])-1)+(COLUMN()-4);DAY([.$A143])+2)&lt;&gt;&quot;&quot;;1;0)" table:style-name="ce92"/>
          <table:table-cell office:value-type="float" office:value="0" table:formula="of:=IF(INDEX([Tracker.$A$1:.$AG$120];6+9*(MONTH([.$A143])-1)+(COLUMN()-4);DAY([.$A143])+2)&lt;&gt;&quot;&quot;;1;0)" table:style-name="ce92"/>
          <table:table-cell office:value-type="float" office:value="0" table:formula="of:=IF(INDEX([Tracker.$A$1:.$AG$120];6+9*(MONTH([.$A143])-1)+(COLUMN()-4);DAY([.$A143])+2)&lt;&gt;&quot;&quot;;1;0)" table:style-name="ce92"/>
          <table:table-cell office:value-type="float" office:value="0" table:formula="of:=IF(INDEX([Tracker.$A$1:.$AG$120];6+9*(MONTH([.$A143])-1)+(COLUMN()-4);DAY([.$A143])+2)&lt;&gt;&quot;&quot;;1;0)" table:style-name="ce92"/>
          <table:table-cell office:value-type="float" office:value="0" table:formula="of:=IF(INDEX([Tracker.$A$1:.$AG$120];6+9*(MONTH([.$A143])-1)+(COLUMN()-4);DAY([.$A143])+2)&lt;&gt;&quot;&quot;;1;0)" table:style-name="ce92"/>
          <table:table-cell office:value-type="float" office:value="0" table:formula="of:=SUM([.D143:.I143])" table:style-name="ce6"/>
          <table:table-cell office:value-type="percentage" office:value="0" table:formula="of:=[.J143]/6" table:style-name="ce8">
            <text:p>0%</text:p>
          </table:table-cell>
          <table:table-cell table:style-name="ce1"/>
          <table:table-cell office:value-type="float" office:value="0" table:formula="of:=IF([.D143]=1;[.M142]+1;0)" table:style-name="ce1">
            <text:p>0</text:p>
          </table:table-cell>
          <table:table-cell office:value-type="float" office:value="0" table:formula="of:=IF([.E143]=1;[.N142]+1;0)" table:style-name="ce1">
            <text:p>0</text:p>
          </table:table-cell>
          <table:table-cell office:value-type="float" office:value="0" table:formula="of:=IF([.F143]=1;[.O142]+1;0)" table:style-name="ce1">
            <text:p>0</text:p>
          </table:table-cell>
          <table:table-cell office:value-type="float" office:value="0" table:formula="of:=IF([.G143]=1;[.P142]+1;0)" table:style-name="ce1">
            <text:p>0</text:p>
          </table:table-cell>
          <table:table-cell office:value-type="float" office:value="0" table:formula="of:=IF([.H143]=1;[.Q142]+1;0)" table:style-name="ce1">
            <text:p>0</text:p>
          </table:table-cell>
          <table:table-cell office:value-type="float" office:value="0" table:formula="of:=IF([.I143]=1;[.R14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1T00:00:00" table:formula="of:=[.A143]+1" table:style-name="ce10">
            <text:p>Thu, 21 May 2026</text:p>
          </table:table-cell>
          <table:table-cell office:value-type="string" office:string-value="Thu" table:formula="of:=TEXT([.A144];&quot;ddd&quot;)" table:style-name="ce5">
            <text:p>Thu</text:p>
          </table:table-cell>
          <table:table-cell office:value-type="string" office:string-value="May" table:formula="of:=TEXT([.A144];&quot;mmm&quot;)" table:style-name="ce5">
            <text:p>May</text:p>
          </table:table-cell>
          <table:table-cell office:value-type="float" office:value="0" table:formula="of:=IF(INDEX([Tracker.$A$1:.$AG$120];6+9*(MONTH([.$A144])-1)+(COLUMN()-4);DAY([.$A144])+2)&lt;&gt;&quot;&quot;;1;0)" table:style-name="ce92"/>
          <table:table-cell office:value-type="float" office:value="0" table:formula="of:=IF(INDEX([Tracker.$A$1:.$AG$120];6+9*(MONTH([.$A144])-1)+(COLUMN()-4);DAY([.$A144])+2)&lt;&gt;&quot;&quot;;1;0)" table:style-name="ce92"/>
          <table:table-cell office:value-type="float" office:value="0" table:formula="of:=IF(INDEX([Tracker.$A$1:.$AG$120];6+9*(MONTH([.$A144])-1)+(COLUMN()-4);DAY([.$A144])+2)&lt;&gt;&quot;&quot;;1;0)" table:style-name="ce92"/>
          <table:table-cell office:value-type="float" office:value="0" table:formula="of:=IF(INDEX([Tracker.$A$1:.$AG$120];6+9*(MONTH([.$A144])-1)+(COLUMN()-4);DAY([.$A144])+2)&lt;&gt;&quot;&quot;;1;0)" table:style-name="ce92"/>
          <table:table-cell office:value-type="float" office:value="0" table:formula="of:=IF(INDEX([Tracker.$A$1:.$AG$120];6+9*(MONTH([.$A144])-1)+(COLUMN()-4);DAY([.$A144])+2)&lt;&gt;&quot;&quot;;1;0)" table:style-name="ce92"/>
          <table:table-cell office:value-type="float" office:value="0" table:formula="of:=IF(INDEX([Tracker.$A$1:.$AG$120];6+9*(MONTH([.$A144])-1)+(COLUMN()-4);DAY([.$A144])+2)&lt;&gt;&quot;&quot;;1;0)" table:style-name="ce92"/>
          <table:table-cell office:value-type="float" office:value="0" table:formula="of:=SUM([.D144:.I144])" table:style-name="ce6"/>
          <table:table-cell office:value-type="percentage" office:value="0" table:formula="of:=[.J144]/6" table:style-name="ce8">
            <text:p>0%</text:p>
          </table:table-cell>
          <table:table-cell table:style-name="ce1"/>
          <table:table-cell office:value-type="float" office:value="0" table:formula="of:=IF([.D144]=1;[.M143]+1;0)" table:style-name="ce1">
            <text:p>0</text:p>
          </table:table-cell>
          <table:table-cell office:value-type="float" office:value="0" table:formula="of:=IF([.E144]=1;[.N143]+1;0)" table:style-name="ce1">
            <text:p>0</text:p>
          </table:table-cell>
          <table:table-cell office:value-type="float" office:value="0" table:formula="of:=IF([.F144]=1;[.O143]+1;0)" table:style-name="ce1">
            <text:p>0</text:p>
          </table:table-cell>
          <table:table-cell office:value-type="float" office:value="0" table:formula="of:=IF([.G144]=1;[.P143]+1;0)" table:style-name="ce1">
            <text:p>0</text:p>
          </table:table-cell>
          <table:table-cell office:value-type="float" office:value="0" table:formula="of:=IF([.H144]=1;[.Q143]+1;0)" table:style-name="ce1">
            <text:p>0</text:p>
          </table:table-cell>
          <table:table-cell office:value-type="float" office:value="0" table:formula="of:=IF([.I144]=1;[.R14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2T00:00:00" table:formula="of:=[.A144]+1" table:style-name="ce10">
            <text:p>Fri, 22 May 2026</text:p>
          </table:table-cell>
          <table:table-cell office:value-type="string" office:string-value="Fri" table:formula="of:=TEXT([.A145];&quot;ddd&quot;)" table:style-name="ce5">
            <text:p>Fri</text:p>
          </table:table-cell>
          <table:table-cell office:value-type="string" office:string-value="May" table:formula="of:=TEXT([.A145];&quot;mmm&quot;)" table:style-name="ce5">
            <text:p>May</text:p>
          </table:table-cell>
          <table:table-cell office:value-type="float" office:value="0" table:formula="of:=IF(INDEX([Tracker.$A$1:.$AG$120];6+9*(MONTH([.$A145])-1)+(COLUMN()-4);DAY([.$A145])+2)&lt;&gt;&quot;&quot;;1;0)" table:style-name="ce92"/>
          <table:table-cell office:value-type="float" office:value="0" table:formula="of:=IF(INDEX([Tracker.$A$1:.$AG$120];6+9*(MONTH([.$A145])-1)+(COLUMN()-4);DAY([.$A145])+2)&lt;&gt;&quot;&quot;;1;0)" table:style-name="ce92"/>
          <table:table-cell office:value-type="float" office:value="0" table:formula="of:=IF(INDEX([Tracker.$A$1:.$AG$120];6+9*(MONTH([.$A145])-1)+(COLUMN()-4);DAY([.$A145])+2)&lt;&gt;&quot;&quot;;1;0)" table:style-name="ce92"/>
          <table:table-cell office:value-type="float" office:value="0" table:formula="of:=IF(INDEX([Tracker.$A$1:.$AG$120];6+9*(MONTH([.$A145])-1)+(COLUMN()-4);DAY([.$A145])+2)&lt;&gt;&quot;&quot;;1;0)" table:style-name="ce92"/>
          <table:table-cell office:value-type="float" office:value="0" table:formula="of:=IF(INDEX([Tracker.$A$1:.$AG$120];6+9*(MONTH([.$A145])-1)+(COLUMN()-4);DAY([.$A145])+2)&lt;&gt;&quot;&quot;;1;0)" table:style-name="ce92"/>
          <table:table-cell office:value-type="float" office:value="0" table:formula="of:=IF(INDEX([Tracker.$A$1:.$AG$120];6+9*(MONTH([.$A145])-1)+(COLUMN()-4);DAY([.$A145])+2)&lt;&gt;&quot;&quot;;1;0)" table:style-name="ce92"/>
          <table:table-cell office:value-type="float" office:value="0" table:formula="of:=SUM([.D145:.I145])" table:style-name="ce6"/>
          <table:table-cell office:value-type="percentage" office:value="0" table:formula="of:=[.J145]/6" table:style-name="ce8">
            <text:p>0%</text:p>
          </table:table-cell>
          <table:table-cell table:style-name="ce1"/>
          <table:table-cell office:value-type="float" office:value="0" table:formula="of:=IF([.D145]=1;[.M144]+1;0)" table:style-name="ce1">
            <text:p>0</text:p>
          </table:table-cell>
          <table:table-cell office:value-type="float" office:value="0" table:formula="of:=IF([.E145]=1;[.N144]+1;0)" table:style-name="ce1">
            <text:p>0</text:p>
          </table:table-cell>
          <table:table-cell office:value-type="float" office:value="0" table:formula="of:=IF([.F145]=1;[.O144]+1;0)" table:style-name="ce1">
            <text:p>0</text:p>
          </table:table-cell>
          <table:table-cell office:value-type="float" office:value="0" table:formula="of:=IF([.G145]=1;[.P144]+1;0)" table:style-name="ce1">
            <text:p>0</text:p>
          </table:table-cell>
          <table:table-cell office:value-type="float" office:value="0" table:formula="of:=IF([.H145]=1;[.Q144]+1;0)" table:style-name="ce1">
            <text:p>0</text:p>
          </table:table-cell>
          <table:table-cell office:value-type="float" office:value="0" table:formula="of:=IF([.I145]=1;[.R14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3T00:00:00" table:formula="of:=[.A145]+1" table:style-name="ce10">
            <text:p>Sat, 23 May 2026</text:p>
          </table:table-cell>
          <table:table-cell office:value-type="string" office:string-value="Sat" table:formula="of:=TEXT([.A146];&quot;ddd&quot;)" table:style-name="ce5">
            <text:p>Sat</text:p>
          </table:table-cell>
          <table:table-cell office:value-type="string" office:string-value="May" table:formula="of:=TEXT([.A146];&quot;mmm&quot;)" table:style-name="ce5">
            <text:p>May</text:p>
          </table:table-cell>
          <table:table-cell office:value-type="float" office:value="0" table:formula="of:=IF(INDEX([Tracker.$A$1:.$AG$120];6+9*(MONTH([.$A146])-1)+(COLUMN()-4);DAY([.$A146])+2)&lt;&gt;&quot;&quot;;1;0)" table:style-name="ce92"/>
          <table:table-cell office:value-type="float" office:value="0" table:formula="of:=IF(INDEX([Tracker.$A$1:.$AG$120];6+9*(MONTH([.$A146])-1)+(COLUMN()-4);DAY([.$A146])+2)&lt;&gt;&quot;&quot;;1;0)" table:style-name="ce92"/>
          <table:table-cell office:value-type="float" office:value="0" table:formula="of:=IF(INDEX([Tracker.$A$1:.$AG$120];6+9*(MONTH([.$A146])-1)+(COLUMN()-4);DAY([.$A146])+2)&lt;&gt;&quot;&quot;;1;0)" table:style-name="ce92"/>
          <table:table-cell office:value-type="float" office:value="0" table:formula="of:=IF(INDEX([Tracker.$A$1:.$AG$120];6+9*(MONTH([.$A146])-1)+(COLUMN()-4);DAY([.$A146])+2)&lt;&gt;&quot;&quot;;1;0)" table:style-name="ce92"/>
          <table:table-cell office:value-type="float" office:value="0" table:formula="of:=IF(INDEX([Tracker.$A$1:.$AG$120];6+9*(MONTH([.$A146])-1)+(COLUMN()-4);DAY([.$A146])+2)&lt;&gt;&quot;&quot;;1;0)" table:style-name="ce92"/>
          <table:table-cell office:value-type="float" office:value="0" table:formula="of:=IF(INDEX([Tracker.$A$1:.$AG$120];6+9*(MONTH([.$A146])-1)+(COLUMN()-4);DAY([.$A146])+2)&lt;&gt;&quot;&quot;;1;0)" table:style-name="ce92"/>
          <table:table-cell office:value-type="float" office:value="0" table:formula="of:=SUM([.D146:.I146])" table:style-name="ce6"/>
          <table:table-cell office:value-type="percentage" office:value="0" table:formula="of:=[.J146]/6" table:style-name="ce8">
            <text:p>0%</text:p>
          </table:table-cell>
          <table:table-cell table:style-name="ce1"/>
          <table:table-cell office:value-type="float" office:value="0" table:formula="of:=IF([.D146]=1;[.M145]+1;0)" table:style-name="ce1">
            <text:p>0</text:p>
          </table:table-cell>
          <table:table-cell office:value-type="float" office:value="0" table:formula="of:=IF([.E146]=1;[.N145]+1;0)" table:style-name="ce1">
            <text:p>0</text:p>
          </table:table-cell>
          <table:table-cell office:value-type="float" office:value="0" table:formula="of:=IF([.F146]=1;[.O145]+1;0)" table:style-name="ce1">
            <text:p>0</text:p>
          </table:table-cell>
          <table:table-cell office:value-type="float" office:value="0" table:formula="of:=IF([.G146]=1;[.P145]+1;0)" table:style-name="ce1">
            <text:p>0</text:p>
          </table:table-cell>
          <table:table-cell office:value-type="float" office:value="0" table:formula="of:=IF([.H146]=1;[.Q145]+1;0)" table:style-name="ce1">
            <text:p>0</text:p>
          </table:table-cell>
          <table:table-cell office:value-type="float" office:value="0" table:formula="of:=IF([.I146]=1;[.R14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4T00:00:00" table:formula="of:=[.A146]+1" table:style-name="ce10">
            <text:p>Sun, 24 May 2026</text:p>
          </table:table-cell>
          <table:table-cell office:value-type="string" office:string-value="Sun" table:formula="of:=TEXT([.A147];&quot;ddd&quot;)" table:style-name="ce5">
            <text:p>Sun</text:p>
          </table:table-cell>
          <table:table-cell office:value-type="string" office:string-value="May" table:formula="of:=TEXT([.A147];&quot;mmm&quot;)" table:style-name="ce5">
            <text:p>May</text:p>
          </table:table-cell>
          <table:table-cell office:value-type="float" office:value="0" table:formula="of:=IF(INDEX([Tracker.$A$1:.$AG$120];6+9*(MONTH([.$A147])-1)+(COLUMN()-4);DAY([.$A147])+2)&lt;&gt;&quot;&quot;;1;0)" table:style-name="ce92"/>
          <table:table-cell office:value-type="float" office:value="0" table:formula="of:=IF(INDEX([Tracker.$A$1:.$AG$120];6+9*(MONTH([.$A147])-1)+(COLUMN()-4);DAY([.$A147])+2)&lt;&gt;&quot;&quot;;1;0)" table:style-name="ce92"/>
          <table:table-cell office:value-type="float" office:value="0" table:formula="of:=IF(INDEX([Tracker.$A$1:.$AG$120];6+9*(MONTH([.$A147])-1)+(COLUMN()-4);DAY([.$A147])+2)&lt;&gt;&quot;&quot;;1;0)" table:style-name="ce92"/>
          <table:table-cell office:value-type="float" office:value="0" table:formula="of:=IF(INDEX([Tracker.$A$1:.$AG$120];6+9*(MONTH([.$A147])-1)+(COLUMN()-4);DAY([.$A147])+2)&lt;&gt;&quot;&quot;;1;0)" table:style-name="ce92"/>
          <table:table-cell office:value-type="float" office:value="0" table:formula="of:=IF(INDEX([Tracker.$A$1:.$AG$120];6+9*(MONTH([.$A147])-1)+(COLUMN()-4);DAY([.$A147])+2)&lt;&gt;&quot;&quot;;1;0)" table:style-name="ce92"/>
          <table:table-cell office:value-type="float" office:value="0" table:formula="of:=IF(INDEX([Tracker.$A$1:.$AG$120];6+9*(MONTH([.$A147])-1)+(COLUMN()-4);DAY([.$A147])+2)&lt;&gt;&quot;&quot;;1;0)" table:style-name="ce92"/>
          <table:table-cell office:value-type="float" office:value="0" table:formula="of:=SUM([.D147:.I147])" table:style-name="ce6"/>
          <table:table-cell office:value-type="percentage" office:value="0" table:formula="of:=[.J147]/6" table:style-name="ce8">
            <text:p>0%</text:p>
          </table:table-cell>
          <table:table-cell table:style-name="ce1"/>
          <table:table-cell office:value-type="float" office:value="0" table:formula="of:=IF([.D147]=1;[.M146]+1;0)" table:style-name="ce1">
            <text:p>0</text:p>
          </table:table-cell>
          <table:table-cell office:value-type="float" office:value="0" table:formula="of:=IF([.E147]=1;[.N146]+1;0)" table:style-name="ce1">
            <text:p>0</text:p>
          </table:table-cell>
          <table:table-cell office:value-type="float" office:value="0" table:formula="of:=IF([.F147]=1;[.O146]+1;0)" table:style-name="ce1">
            <text:p>0</text:p>
          </table:table-cell>
          <table:table-cell office:value-type="float" office:value="0" table:formula="of:=IF([.G147]=1;[.P146]+1;0)" table:style-name="ce1">
            <text:p>0</text:p>
          </table:table-cell>
          <table:table-cell office:value-type="float" office:value="0" table:formula="of:=IF([.H147]=1;[.Q146]+1;0)" table:style-name="ce1">
            <text:p>0</text:p>
          </table:table-cell>
          <table:table-cell office:value-type="float" office:value="0" table:formula="of:=IF([.I147]=1;[.R14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5T00:00:00" table:formula="of:=[.A147]+1" table:style-name="ce10">
            <text:p>Mon, 25 May 2026</text:p>
          </table:table-cell>
          <table:table-cell office:value-type="string" office:string-value="Mon" table:formula="of:=TEXT([.A148];&quot;ddd&quot;)" table:style-name="ce5">
            <text:p>Mon</text:p>
          </table:table-cell>
          <table:table-cell office:value-type="string" office:string-value="May" table:formula="of:=TEXT([.A148];&quot;mmm&quot;)" table:style-name="ce5">
            <text:p>May</text:p>
          </table:table-cell>
          <table:table-cell office:value-type="float" office:value="0" table:formula="of:=IF(INDEX([Tracker.$A$1:.$AG$120];6+9*(MONTH([.$A148])-1)+(COLUMN()-4);DAY([.$A148])+2)&lt;&gt;&quot;&quot;;1;0)" table:style-name="ce92"/>
          <table:table-cell office:value-type="float" office:value="0" table:formula="of:=IF(INDEX([Tracker.$A$1:.$AG$120];6+9*(MONTH([.$A148])-1)+(COLUMN()-4);DAY([.$A148])+2)&lt;&gt;&quot;&quot;;1;0)" table:style-name="ce92"/>
          <table:table-cell office:value-type="float" office:value="0" table:formula="of:=IF(INDEX([Tracker.$A$1:.$AG$120];6+9*(MONTH([.$A148])-1)+(COLUMN()-4);DAY([.$A148])+2)&lt;&gt;&quot;&quot;;1;0)" table:style-name="ce92"/>
          <table:table-cell office:value-type="float" office:value="0" table:formula="of:=IF(INDEX([Tracker.$A$1:.$AG$120];6+9*(MONTH([.$A148])-1)+(COLUMN()-4);DAY([.$A148])+2)&lt;&gt;&quot;&quot;;1;0)" table:style-name="ce92"/>
          <table:table-cell office:value-type="float" office:value="0" table:formula="of:=IF(INDEX([Tracker.$A$1:.$AG$120];6+9*(MONTH([.$A148])-1)+(COLUMN()-4);DAY([.$A148])+2)&lt;&gt;&quot;&quot;;1;0)" table:style-name="ce92"/>
          <table:table-cell office:value-type="float" office:value="0" table:formula="of:=IF(INDEX([Tracker.$A$1:.$AG$120];6+9*(MONTH([.$A148])-1)+(COLUMN()-4);DAY([.$A148])+2)&lt;&gt;&quot;&quot;;1;0)" table:style-name="ce92"/>
          <table:table-cell office:value-type="float" office:value="0" table:formula="of:=SUM([.D148:.I148])" table:style-name="ce6"/>
          <table:table-cell office:value-type="percentage" office:value="0" table:formula="of:=[.J148]/6" table:style-name="ce8">
            <text:p>0%</text:p>
          </table:table-cell>
          <table:table-cell table:style-name="ce1"/>
          <table:table-cell office:value-type="float" office:value="0" table:formula="of:=IF([.D148]=1;[.M147]+1;0)" table:style-name="ce1">
            <text:p>0</text:p>
          </table:table-cell>
          <table:table-cell office:value-type="float" office:value="0" table:formula="of:=IF([.E148]=1;[.N147]+1;0)" table:style-name="ce1">
            <text:p>0</text:p>
          </table:table-cell>
          <table:table-cell office:value-type="float" office:value="0" table:formula="of:=IF([.F148]=1;[.O147]+1;0)" table:style-name="ce1">
            <text:p>0</text:p>
          </table:table-cell>
          <table:table-cell office:value-type="float" office:value="0" table:formula="of:=IF([.G148]=1;[.P147]+1;0)" table:style-name="ce1">
            <text:p>0</text:p>
          </table:table-cell>
          <table:table-cell office:value-type="float" office:value="0" table:formula="of:=IF([.H148]=1;[.Q147]+1;0)" table:style-name="ce1">
            <text:p>0</text:p>
          </table:table-cell>
          <table:table-cell office:value-type="float" office:value="0" table:formula="of:=IF([.I148]=1;[.R14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6T00:00:00" table:formula="of:=[.A148]+1" table:style-name="ce10">
            <text:p>Tue, 26 May 2026</text:p>
          </table:table-cell>
          <table:table-cell office:value-type="string" office:string-value="Tue" table:formula="of:=TEXT([.A149];&quot;ddd&quot;)" table:style-name="ce5">
            <text:p>Tue</text:p>
          </table:table-cell>
          <table:table-cell office:value-type="string" office:string-value="May" table:formula="of:=TEXT([.A149];&quot;mmm&quot;)" table:style-name="ce5">
            <text:p>May</text:p>
          </table:table-cell>
          <table:table-cell office:value-type="float" office:value="0" table:formula="of:=IF(INDEX([Tracker.$A$1:.$AG$120];6+9*(MONTH([.$A149])-1)+(COLUMN()-4);DAY([.$A149])+2)&lt;&gt;&quot;&quot;;1;0)" table:style-name="ce92"/>
          <table:table-cell office:value-type="float" office:value="0" table:formula="of:=IF(INDEX([Tracker.$A$1:.$AG$120];6+9*(MONTH([.$A149])-1)+(COLUMN()-4);DAY([.$A149])+2)&lt;&gt;&quot;&quot;;1;0)" table:style-name="ce92"/>
          <table:table-cell office:value-type="float" office:value="0" table:formula="of:=IF(INDEX([Tracker.$A$1:.$AG$120];6+9*(MONTH([.$A149])-1)+(COLUMN()-4);DAY([.$A149])+2)&lt;&gt;&quot;&quot;;1;0)" table:style-name="ce92"/>
          <table:table-cell office:value-type="float" office:value="0" table:formula="of:=IF(INDEX([Tracker.$A$1:.$AG$120];6+9*(MONTH([.$A149])-1)+(COLUMN()-4);DAY([.$A149])+2)&lt;&gt;&quot;&quot;;1;0)" table:style-name="ce92"/>
          <table:table-cell office:value-type="float" office:value="0" table:formula="of:=IF(INDEX([Tracker.$A$1:.$AG$120];6+9*(MONTH([.$A149])-1)+(COLUMN()-4);DAY([.$A149])+2)&lt;&gt;&quot;&quot;;1;0)" table:style-name="ce92"/>
          <table:table-cell office:value-type="float" office:value="0" table:formula="of:=IF(INDEX([Tracker.$A$1:.$AG$120];6+9*(MONTH([.$A149])-1)+(COLUMN()-4);DAY([.$A149])+2)&lt;&gt;&quot;&quot;;1;0)" table:style-name="ce92"/>
          <table:table-cell office:value-type="float" office:value="0" table:formula="of:=SUM([.D149:.I149])" table:style-name="ce6"/>
          <table:table-cell office:value-type="percentage" office:value="0" table:formula="of:=[.J149]/6" table:style-name="ce8">
            <text:p>0%</text:p>
          </table:table-cell>
          <table:table-cell table:style-name="ce1"/>
          <table:table-cell office:value-type="float" office:value="0" table:formula="of:=IF([.D149]=1;[.M148]+1;0)" table:style-name="ce1">
            <text:p>0</text:p>
          </table:table-cell>
          <table:table-cell office:value-type="float" office:value="0" table:formula="of:=IF([.E149]=1;[.N148]+1;0)" table:style-name="ce1">
            <text:p>0</text:p>
          </table:table-cell>
          <table:table-cell office:value-type="float" office:value="0" table:formula="of:=IF([.F149]=1;[.O148]+1;0)" table:style-name="ce1">
            <text:p>0</text:p>
          </table:table-cell>
          <table:table-cell office:value-type="float" office:value="0" table:formula="of:=IF([.G149]=1;[.P148]+1;0)" table:style-name="ce1">
            <text:p>0</text:p>
          </table:table-cell>
          <table:table-cell office:value-type="float" office:value="0" table:formula="of:=IF([.H149]=1;[.Q148]+1;0)" table:style-name="ce1">
            <text:p>0</text:p>
          </table:table-cell>
          <table:table-cell office:value-type="float" office:value="0" table:formula="of:=IF([.I149]=1;[.R14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7T00:00:00" table:formula="of:=[.A149]+1" table:style-name="ce10">
            <text:p>Wed, 27 May 2026</text:p>
          </table:table-cell>
          <table:table-cell office:value-type="string" office:string-value="Wed" table:formula="of:=TEXT([.A150];&quot;ddd&quot;)" table:style-name="ce5">
            <text:p>Wed</text:p>
          </table:table-cell>
          <table:table-cell office:value-type="string" office:string-value="May" table:formula="of:=TEXT([.A150];&quot;mmm&quot;)" table:style-name="ce5">
            <text:p>May</text:p>
          </table:table-cell>
          <table:table-cell office:value-type="float" office:value="0" table:formula="of:=IF(INDEX([Tracker.$A$1:.$AG$120];6+9*(MONTH([.$A150])-1)+(COLUMN()-4);DAY([.$A150])+2)&lt;&gt;&quot;&quot;;1;0)" table:style-name="ce92"/>
          <table:table-cell office:value-type="float" office:value="0" table:formula="of:=IF(INDEX([Tracker.$A$1:.$AG$120];6+9*(MONTH([.$A150])-1)+(COLUMN()-4);DAY([.$A150])+2)&lt;&gt;&quot;&quot;;1;0)" table:style-name="ce92"/>
          <table:table-cell office:value-type="float" office:value="0" table:formula="of:=IF(INDEX([Tracker.$A$1:.$AG$120];6+9*(MONTH([.$A150])-1)+(COLUMN()-4);DAY([.$A150])+2)&lt;&gt;&quot;&quot;;1;0)" table:style-name="ce92"/>
          <table:table-cell office:value-type="float" office:value="0" table:formula="of:=IF(INDEX([Tracker.$A$1:.$AG$120];6+9*(MONTH([.$A150])-1)+(COLUMN()-4);DAY([.$A150])+2)&lt;&gt;&quot;&quot;;1;0)" table:style-name="ce92"/>
          <table:table-cell office:value-type="float" office:value="0" table:formula="of:=IF(INDEX([Tracker.$A$1:.$AG$120];6+9*(MONTH([.$A150])-1)+(COLUMN()-4);DAY([.$A150])+2)&lt;&gt;&quot;&quot;;1;0)" table:style-name="ce92"/>
          <table:table-cell office:value-type="float" office:value="0" table:formula="of:=IF(INDEX([Tracker.$A$1:.$AG$120];6+9*(MONTH([.$A150])-1)+(COLUMN()-4);DAY([.$A150])+2)&lt;&gt;&quot;&quot;;1;0)" table:style-name="ce92"/>
          <table:table-cell office:value-type="float" office:value="0" table:formula="of:=SUM([.D150:.I150])" table:style-name="ce6"/>
          <table:table-cell office:value-type="percentage" office:value="0" table:formula="of:=[.J150]/6" table:style-name="ce8">
            <text:p>0%</text:p>
          </table:table-cell>
          <table:table-cell table:style-name="ce1"/>
          <table:table-cell office:value-type="float" office:value="0" table:formula="of:=IF([.D150]=1;[.M149]+1;0)" table:style-name="ce1">
            <text:p>0</text:p>
          </table:table-cell>
          <table:table-cell office:value-type="float" office:value="0" table:formula="of:=IF([.E150]=1;[.N149]+1;0)" table:style-name="ce1">
            <text:p>0</text:p>
          </table:table-cell>
          <table:table-cell office:value-type="float" office:value="0" table:formula="of:=IF([.F150]=1;[.O149]+1;0)" table:style-name="ce1">
            <text:p>0</text:p>
          </table:table-cell>
          <table:table-cell office:value-type="float" office:value="0" table:formula="of:=IF([.G150]=1;[.P149]+1;0)" table:style-name="ce1">
            <text:p>0</text:p>
          </table:table-cell>
          <table:table-cell office:value-type="float" office:value="0" table:formula="of:=IF([.H150]=1;[.Q149]+1;0)" table:style-name="ce1">
            <text:p>0</text:p>
          </table:table-cell>
          <table:table-cell office:value-type="float" office:value="0" table:formula="of:=IF([.I150]=1;[.R14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8T00:00:00" table:formula="of:=[.A150]+1" table:style-name="ce10">
            <text:p>Thu, 28 May 2026</text:p>
          </table:table-cell>
          <table:table-cell office:value-type="string" office:string-value="Thu" table:formula="of:=TEXT([.A151];&quot;ddd&quot;)" table:style-name="ce5">
            <text:p>Thu</text:p>
          </table:table-cell>
          <table:table-cell office:value-type="string" office:string-value="May" table:formula="of:=TEXT([.A151];&quot;mmm&quot;)" table:style-name="ce5">
            <text:p>May</text:p>
          </table:table-cell>
          <table:table-cell office:value-type="float" office:value="0" table:formula="of:=IF(INDEX([Tracker.$A$1:.$AG$120];6+9*(MONTH([.$A151])-1)+(COLUMN()-4);DAY([.$A151])+2)&lt;&gt;&quot;&quot;;1;0)" table:style-name="ce92"/>
          <table:table-cell office:value-type="float" office:value="0" table:formula="of:=IF(INDEX([Tracker.$A$1:.$AG$120];6+9*(MONTH([.$A151])-1)+(COLUMN()-4);DAY([.$A151])+2)&lt;&gt;&quot;&quot;;1;0)" table:style-name="ce92"/>
          <table:table-cell office:value-type="float" office:value="0" table:formula="of:=IF(INDEX([Tracker.$A$1:.$AG$120];6+9*(MONTH([.$A151])-1)+(COLUMN()-4);DAY([.$A151])+2)&lt;&gt;&quot;&quot;;1;0)" table:style-name="ce92"/>
          <table:table-cell office:value-type="float" office:value="0" table:formula="of:=IF(INDEX([Tracker.$A$1:.$AG$120];6+9*(MONTH([.$A151])-1)+(COLUMN()-4);DAY([.$A151])+2)&lt;&gt;&quot;&quot;;1;0)" table:style-name="ce92"/>
          <table:table-cell office:value-type="float" office:value="0" table:formula="of:=IF(INDEX([Tracker.$A$1:.$AG$120];6+9*(MONTH([.$A151])-1)+(COLUMN()-4);DAY([.$A151])+2)&lt;&gt;&quot;&quot;;1;0)" table:style-name="ce92"/>
          <table:table-cell office:value-type="float" office:value="0" table:formula="of:=IF(INDEX([Tracker.$A$1:.$AG$120];6+9*(MONTH([.$A151])-1)+(COLUMN()-4);DAY([.$A151])+2)&lt;&gt;&quot;&quot;;1;0)" table:style-name="ce92"/>
          <table:table-cell office:value-type="float" office:value="0" table:formula="of:=SUM([.D151:.I151])" table:style-name="ce6"/>
          <table:table-cell office:value-type="percentage" office:value="0" table:formula="of:=[.J151]/6" table:style-name="ce8">
            <text:p>0%</text:p>
          </table:table-cell>
          <table:table-cell table:style-name="ce1"/>
          <table:table-cell office:value-type="float" office:value="0" table:formula="of:=IF([.D151]=1;[.M150]+1;0)" table:style-name="ce1">
            <text:p>0</text:p>
          </table:table-cell>
          <table:table-cell office:value-type="float" office:value="0" table:formula="of:=IF([.E151]=1;[.N150]+1;0)" table:style-name="ce1">
            <text:p>0</text:p>
          </table:table-cell>
          <table:table-cell office:value-type="float" office:value="0" table:formula="of:=IF([.F151]=1;[.O150]+1;0)" table:style-name="ce1">
            <text:p>0</text:p>
          </table:table-cell>
          <table:table-cell office:value-type="float" office:value="0" table:formula="of:=IF([.G151]=1;[.P150]+1;0)" table:style-name="ce1">
            <text:p>0</text:p>
          </table:table-cell>
          <table:table-cell office:value-type="float" office:value="0" table:formula="of:=IF([.H151]=1;[.Q150]+1;0)" table:style-name="ce1">
            <text:p>0</text:p>
          </table:table-cell>
          <table:table-cell office:value-type="float" office:value="0" table:formula="of:=IF([.I151]=1;[.R15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29T00:00:00" table:formula="of:=[.A151]+1" table:style-name="ce10">
            <text:p>Fri, 29 May 2026</text:p>
          </table:table-cell>
          <table:table-cell office:value-type="string" office:string-value="Fri" table:formula="of:=TEXT([.A152];&quot;ddd&quot;)" table:style-name="ce5">
            <text:p>Fri</text:p>
          </table:table-cell>
          <table:table-cell office:value-type="string" office:string-value="May" table:formula="of:=TEXT([.A152];&quot;mmm&quot;)" table:style-name="ce5">
            <text:p>May</text:p>
          </table:table-cell>
          <table:table-cell office:value-type="float" office:value="0" table:formula="of:=IF(INDEX([Tracker.$A$1:.$AG$120];6+9*(MONTH([.$A152])-1)+(COLUMN()-4);DAY([.$A152])+2)&lt;&gt;&quot;&quot;;1;0)" table:style-name="ce92"/>
          <table:table-cell office:value-type="float" office:value="0" table:formula="of:=IF(INDEX([Tracker.$A$1:.$AG$120];6+9*(MONTH([.$A152])-1)+(COLUMN()-4);DAY([.$A152])+2)&lt;&gt;&quot;&quot;;1;0)" table:style-name="ce92"/>
          <table:table-cell office:value-type="float" office:value="0" table:formula="of:=IF(INDEX([Tracker.$A$1:.$AG$120];6+9*(MONTH([.$A152])-1)+(COLUMN()-4);DAY([.$A152])+2)&lt;&gt;&quot;&quot;;1;0)" table:style-name="ce92"/>
          <table:table-cell office:value-type="float" office:value="0" table:formula="of:=IF(INDEX([Tracker.$A$1:.$AG$120];6+9*(MONTH([.$A152])-1)+(COLUMN()-4);DAY([.$A152])+2)&lt;&gt;&quot;&quot;;1;0)" table:style-name="ce92"/>
          <table:table-cell office:value-type="float" office:value="0" table:formula="of:=IF(INDEX([Tracker.$A$1:.$AG$120];6+9*(MONTH([.$A152])-1)+(COLUMN()-4);DAY([.$A152])+2)&lt;&gt;&quot;&quot;;1;0)" table:style-name="ce92"/>
          <table:table-cell office:value-type="float" office:value="0" table:formula="of:=IF(INDEX([Tracker.$A$1:.$AG$120];6+9*(MONTH([.$A152])-1)+(COLUMN()-4);DAY([.$A152])+2)&lt;&gt;&quot;&quot;;1;0)" table:style-name="ce92"/>
          <table:table-cell office:value-type="float" office:value="0" table:formula="of:=SUM([.D152:.I152])" table:style-name="ce6"/>
          <table:table-cell office:value-type="percentage" office:value="0" table:formula="of:=[.J152]/6" table:style-name="ce8">
            <text:p>0%</text:p>
          </table:table-cell>
          <table:table-cell table:style-name="ce1"/>
          <table:table-cell office:value-type="float" office:value="0" table:formula="of:=IF([.D152]=1;[.M151]+1;0)" table:style-name="ce1">
            <text:p>0</text:p>
          </table:table-cell>
          <table:table-cell office:value-type="float" office:value="0" table:formula="of:=IF([.E152]=1;[.N151]+1;0)" table:style-name="ce1">
            <text:p>0</text:p>
          </table:table-cell>
          <table:table-cell office:value-type="float" office:value="0" table:formula="of:=IF([.F152]=1;[.O151]+1;0)" table:style-name="ce1">
            <text:p>0</text:p>
          </table:table-cell>
          <table:table-cell office:value-type="float" office:value="0" table:formula="of:=IF([.G152]=1;[.P151]+1;0)" table:style-name="ce1">
            <text:p>0</text:p>
          </table:table-cell>
          <table:table-cell office:value-type="float" office:value="0" table:formula="of:=IF([.H152]=1;[.Q151]+1;0)" table:style-name="ce1">
            <text:p>0</text:p>
          </table:table-cell>
          <table:table-cell office:value-type="float" office:value="0" table:formula="of:=IF([.I152]=1;[.R15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30T00:00:00" table:formula="of:=[.A152]+1" table:style-name="ce10">
            <text:p>Sat, 30 May 2026</text:p>
          </table:table-cell>
          <table:table-cell office:value-type="string" office:string-value="Sat" table:formula="of:=TEXT([.A153];&quot;ddd&quot;)" table:style-name="ce5">
            <text:p>Sat</text:p>
          </table:table-cell>
          <table:table-cell office:value-type="string" office:string-value="May" table:formula="of:=TEXT([.A153];&quot;mmm&quot;)" table:style-name="ce5">
            <text:p>May</text:p>
          </table:table-cell>
          <table:table-cell office:value-type="float" office:value="0" table:formula="of:=IF(INDEX([Tracker.$A$1:.$AG$120];6+9*(MONTH([.$A153])-1)+(COLUMN()-4);DAY([.$A153])+2)&lt;&gt;&quot;&quot;;1;0)" table:style-name="ce92"/>
          <table:table-cell office:value-type="float" office:value="0" table:formula="of:=IF(INDEX([Tracker.$A$1:.$AG$120];6+9*(MONTH([.$A153])-1)+(COLUMN()-4);DAY([.$A153])+2)&lt;&gt;&quot;&quot;;1;0)" table:style-name="ce92"/>
          <table:table-cell office:value-type="float" office:value="0" table:formula="of:=IF(INDEX([Tracker.$A$1:.$AG$120];6+9*(MONTH([.$A153])-1)+(COLUMN()-4);DAY([.$A153])+2)&lt;&gt;&quot;&quot;;1;0)" table:style-name="ce92"/>
          <table:table-cell office:value-type="float" office:value="0" table:formula="of:=IF(INDEX([Tracker.$A$1:.$AG$120];6+9*(MONTH([.$A153])-1)+(COLUMN()-4);DAY([.$A153])+2)&lt;&gt;&quot;&quot;;1;0)" table:style-name="ce92"/>
          <table:table-cell office:value-type="float" office:value="0" table:formula="of:=IF(INDEX([Tracker.$A$1:.$AG$120];6+9*(MONTH([.$A153])-1)+(COLUMN()-4);DAY([.$A153])+2)&lt;&gt;&quot;&quot;;1;0)" table:style-name="ce92"/>
          <table:table-cell office:value-type="float" office:value="0" table:formula="of:=IF(INDEX([Tracker.$A$1:.$AG$120];6+9*(MONTH([.$A153])-1)+(COLUMN()-4);DAY([.$A153])+2)&lt;&gt;&quot;&quot;;1;0)" table:style-name="ce92"/>
          <table:table-cell office:value-type="float" office:value="0" table:formula="of:=SUM([.D153:.I153])" table:style-name="ce6"/>
          <table:table-cell office:value-type="percentage" office:value="0" table:formula="of:=[.J153]/6" table:style-name="ce8">
            <text:p>0%</text:p>
          </table:table-cell>
          <table:table-cell table:style-name="ce1"/>
          <table:table-cell office:value-type="float" office:value="0" table:formula="of:=IF([.D153]=1;[.M152]+1;0)" table:style-name="ce1">
            <text:p>0</text:p>
          </table:table-cell>
          <table:table-cell office:value-type="float" office:value="0" table:formula="of:=IF([.E153]=1;[.N152]+1;0)" table:style-name="ce1">
            <text:p>0</text:p>
          </table:table-cell>
          <table:table-cell office:value-type="float" office:value="0" table:formula="of:=IF([.F153]=1;[.O152]+1;0)" table:style-name="ce1">
            <text:p>0</text:p>
          </table:table-cell>
          <table:table-cell office:value-type="float" office:value="0" table:formula="of:=IF([.G153]=1;[.P152]+1;0)" table:style-name="ce1">
            <text:p>0</text:p>
          </table:table-cell>
          <table:table-cell office:value-type="float" office:value="0" table:formula="of:=IF([.H153]=1;[.Q152]+1;0)" table:style-name="ce1">
            <text:p>0</text:p>
          </table:table-cell>
          <table:table-cell office:value-type="float" office:value="0" table:formula="of:=IF([.I153]=1;[.R15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5-31T00:00:00" table:formula="of:=[.A153]+1" table:style-name="ce10">
            <text:p>Sun, 31 May 2026</text:p>
          </table:table-cell>
          <table:table-cell office:value-type="string" office:string-value="Sun" table:formula="of:=TEXT([.A154];&quot;ddd&quot;)" table:style-name="ce5">
            <text:p>Sun</text:p>
          </table:table-cell>
          <table:table-cell office:value-type="string" office:string-value="May" table:formula="of:=TEXT([.A154];&quot;mmm&quot;)" table:style-name="ce5">
            <text:p>May</text:p>
          </table:table-cell>
          <table:table-cell office:value-type="float" office:value="0" table:formula="of:=IF(INDEX([Tracker.$A$1:.$AG$120];6+9*(MONTH([.$A154])-1)+(COLUMN()-4);DAY([.$A154])+2)&lt;&gt;&quot;&quot;;1;0)" table:style-name="ce92"/>
          <table:table-cell office:value-type="float" office:value="0" table:formula="of:=IF(INDEX([Tracker.$A$1:.$AG$120];6+9*(MONTH([.$A154])-1)+(COLUMN()-4);DAY([.$A154])+2)&lt;&gt;&quot;&quot;;1;0)" table:style-name="ce92"/>
          <table:table-cell office:value-type="float" office:value="0" table:formula="of:=IF(INDEX([Tracker.$A$1:.$AG$120];6+9*(MONTH([.$A154])-1)+(COLUMN()-4);DAY([.$A154])+2)&lt;&gt;&quot;&quot;;1;0)" table:style-name="ce92"/>
          <table:table-cell office:value-type="float" office:value="0" table:formula="of:=IF(INDEX([Tracker.$A$1:.$AG$120];6+9*(MONTH([.$A154])-1)+(COLUMN()-4);DAY([.$A154])+2)&lt;&gt;&quot;&quot;;1;0)" table:style-name="ce92"/>
          <table:table-cell office:value-type="float" office:value="0" table:formula="of:=IF(INDEX([Tracker.$A$1:.$AG$120];6+9*(MONTH([.$A154])-1)+(COLUMN()-4);DAY([.$A154])+2)&lt;&gt;&quot;&quot;;1;0)" table:style-name="ce92"/>
          <table:table-cell office:value-type="float" office:value="0" table:formula="of:=IF(INDEX([Tracker.$A$1:.$AG$120];6+9*(MONTH([.$A154])-1)+(COLUMN()-4);DAY([.$A154])+2)&lt;&gt;&quot;&quot;;1;0)" table:style-name="ce92"/>
          <table:table-cell office:value-type="float" office:value="0" table:formula="of:=SUM([.D154:.I154])" table:style-name="ce6"/>
          <table:table-cell office:value-type="percentage" office:value="0" table:formula="of:=[.J154]/6" table:style-name="ce8">
            <text:p>0%</text:p>
          </table:table-cell>
          <table:table-cell table:style-name="ce1"/>
          <table:table-cell office:value-type="float" office:value="0" table:formula="of:=IF([.D154]=1;[.M153]+1;0)" table:style-name="ce1">
            <text:p>0</text:p>
          </table:table-cell>
          <table:table-cell office:value-type="float" office:value="0" table:formula="of:=IF([.E154]=1;[.N153]+1;0)" table:style-name="ce1">
            <text:p>0</text:p>
          </table:table-cell>
          <table:table-cell office:value-type="float" office:value="0" table:formula="of:=IF([.F154]=1;[.O153]+1;0)" table:style-name="ce1">
            <text:p>0</text:p>
          </table:table-cell>
          <table:table-cell office:value-type="float" office:value="0" table:formula="of:=IF([.G154]=1;[.P153]+1;0)" table:style-name="ce1">
            <text:p>0</text:p>
          </table:table-cell>
          <table:table-cell office:value-type="float" office:value="0" table:formula="of:=IF([.H154]=1;[.Q153]+1;0)" table:style-name="ce1">
            <text:p>0</text:p>
          </table:table-cell>
          <table:table-cell office:value-type="float" office:value="0" table:formula="of:=IF([.I154]=1;[.R15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1T00:00:00" table:formula="of:=[.A154]+1" table:style-name="ce10">
            <text:p>Mon, 01 Jun 2026</text:p>
          </table:table-cell>
          <table:table-cell office:value-type="string" office:string-value="Mon" table:formula="of:=TEXT([.A155];&quot;ddd&quot;)" table:style-name="ce5">
            <text:p>Mon</text:p>
          </table:table-cell>
          <table:table-cell office:value-type="string" office:string-value="Jun" table:formula="of:=TEXT([.A155];&quot;mmm&quot;)" table:style-name="ce5">
            <text:p>Jun</text:p>
          </table:table-cell>
          <table:table-cell office:value-type="float" office:value="0" table:formula="of:=IF(INDEX([Tracker.$A$1:.$AG$120];6+9*(MONTH([.$A155])-1)+(COLUMN()-4);DAY([.$A155])+2)&lt;&gt;&quot;&quot;;1;0)" table:style-name="ce92"/>
          <table:table-cell office:value-type="float" office:value="0" table:formula="of:=IF(INDEX([Tracker.$A$1:.$AG$120];6+9*(MONTH([.$A155])-1)+(COLUMN()-4);DAY([.$A155])+2)&lt;&gt;&quot;&quot;;1;0)" table:style-name="ce92"/>
          <table:table-cell office:value-type="float" office:value="0" table:formula="of:=IF(INDEX([Tracker.$A$1:.$AG$120];6+9*(MONTH([.$A155])-1)+(COLUMN()-4);DAY([.$A155])+2)&lt;&gt;&quot;&quot;;1;0)" table:style-name="ce92"/>
          <table:table-cell office:value-type="float" office:value="0" table:formula="of:=IF(INDEX([Tracker.$A$1:.$AG$120];6+9*(MONTH([.$A155])-1)+(COLUMN()-4);DAY([.$A155])+2)&lt;&gt;&quot;&quot;;1;0)" table:style-name="ce92"/>
          <table:table-cell office:value-type="float" office:value="0" table:formula="of:=IF(INDEX([Tracker.$A$1:.$AG$120];6+9*(MONTH([.$A155])-1)+(COLUMN()-4);DAY([.$A155])+2)&lt;&gt;&quot;&quot;;1;0)" table:style-name="ce92"/>
          <table:table-cell office:value-type="float" office:value="0" table:formula="of:=IF(INDEX([Tracker.$A$1:.$AG$120];6+9*(MONTH([.$A155])-1)+(COLUMN()-4);DAY([.$A155])+2)&lt;&gt;&quot;&quot;;1;0)" table:style-name="ce92"/>
          <table:table-cell office:value-type="float" office:value="0" table:formula="of:=SUM([.D155:.I155])" table:style-name="ce6"/>
          <table:table-cell office:value-type="percentage" office:value="0" table:formula="of:=[.J155]/6" table:style-name="ce8">
            <text:p>0%</text:p>
          </table:table-cell>
          <table:table-cell table:style-name="ce1"/>
          <table:table-cell office:value-type="float" office:value="0" table:formula="of:=IF([.D155]=1;[.M154]+1;0)" table:style-name="ce1">
            <text:p>0</text:p>
          </table:table-cell>
          <table:table-cell office:value-type="float" office:value="0" table:formula="of:=IF([.E155]=1;[.N154]+1;0)" table:style-name="ce1">
            <text:p>0</text:p>
          </table:table-cell>
          <table:table-cell office:value-type="float" office:value="0" table:formula="of:=IF([.F155]=1;[.O154]+1;0)" table:style-name="ce1">
            <text:p>0</text:p>
          </table:table-cell>
          <table:table-cell office:value-type="float" office:value="0" table:formula="of:=IF([.G155]=1;[.P154]+1;0)" table:style-name="ce1">
            <text:p>0</text:p>
          </table:table-cell>
          <table:table-cell office:value-type="float" office:value="0" table:formula="of:=IF([.H155]=1;[.Q154]+1;0)" table:style-name="ce1">
            <text:p>0</text:p>
          </table:table-cell>
          <table:table-cell office:value-type="float" office:value="0" table:formula="of:=IF([.I155]=1;[.R15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2T00:00:00" table:formula="of:=[.A155]+1" table:style-name="ce10">
            <text:p>Tue, 02 Jun 2026</text:p>
          </table:table-cell>
          <table:table-cell office:value-type="string" office:string-value="Tue" table:formula="of:=TEXT([.A156];&quot;ddd&quot;)" table:style-name="ce5">
            <text:p>Tue</text:p>
          </table:table-cell>
          <table:table-cell office:value-type="string" office:string-value="Jun" table:formula="of:=TEXT([.A156];&quot;mmm&quot;)" table:style-name="ce5">
            <text:p>Jun</text:p>
          </table:table-cell>
          <table:table-cell office:value-type="float" office:value="0" table:formula="of:=IF(INDEX([Tracker.$A$1:.$AG$120];6+9*(MONTH([.$A156])-1)+(COLUMN()-4);DAY([.$A156])+2)&lt;&gt;&quot;&quot;;1;0)" table:style-name="ce92"/>
          <table:table-cell office:value-type="float" office:value="0" table:formula="of:=IF(INDEX([Tracker.$A$1:.$AG$120];6+9*(MONTH([.$A156])-1)+(COLUMN()-4);DAY([.$A156])+2)&lt;&gt;&quot;&quot;;1;0)" table:style-name="ce92"/>
          <table:table-cell office:value-type="float" office:value="0" table:formula="of:=IF(INDEX([Tracker.$A$1:.$AG$120];6+9*(MONTH([.$A156])-1)+(COLUMN()-4);DAY([.$A156])+2)&lt;&gt;&quot;&quot;;1;0)" table:style-name="ce92"/>
          <table:table-cell office:value-type="float" office:value="0" table:formula="of:=IF(INDEX([Tracker.$A$1:.$AG$120];6+9*(MONTH([.$A156])-1)+(COLUMN()-4);DAY([.$A156])+2)&lt;&gt;&quot;&quot;;1;0)" table:style-name="ce92"/>
          <table:table-cell office:value-type="float" office:value="0" table:formula="of:=IF(INDEX([Tracker.$A$1:.$AG$120];6+9*(MONTH([.$A156])-1)+(COLUMN()-4);DAY([.$A156])+2)&lt;&gt;&quot;&quot;;1;0)" table:style-name="ce92"/>
          <table:table-cell office:value-type="float" office:value="0" table:formula="of:=IF(INDEX([Tracker.$A$1:.$AG$120];6+9*(MONTH([.$A156])-1)+(COLUMN()-4);DAY([.$A156])+2)&lt;&gt;&quot;&quot;;1;0)" table:style-name="ce92"/>
          <table:table-cell office:value-type="float" office:value="0" table:formula="of:=SUM([.D156:.I156])" table:style-name="ce6"/>
          <table:table-cell office:value-type="percentage" office:value="0" table:formula="of:=[.J156]/6" table:style-name="ce8">
            <text:p>0%</text:p>
          </table:table-cell>
          <table:table-cell table:style-name="ce1"/>
          <table:table-cell office:value-type="float" office:value="0" table:formula="of:=IF([.D156]=1;[.M155]+1;0)" table:style-name="ce1">
            <text:p>0</text:p>
          </table:table-cell>
          <table:table-cell office:value-type="float" office:value="0" table:formula="of:=IF([.E156]=1;[.N155]+1;0)" table:style-name="ce1">
            <text:p>0</text:p>
          </table:table-cell>
          <table:table-cell office:value-type="float" office:value="0" table:formula="of:=IF([.F156]=1;[.O155]+1;0)" table:style-name="ce1">
            <text:p>0</text:p>
          </table:table-cell>
          <table:table-cell office:value-type="float" office:value="0" table:formula="of:=IF([.G156]=1;[.P155]+1;0)" table:style-name="ce1">
            <text:p>0</text:p>
          </table:table-cell>
          <table:table-cell office:value-type="float" office:value="0" table:formula="of:=IF([.H156]=1;[.Q155]+1;0)" table:style-name="ce1">
            <text:p>0</text:p>
          </table:table-cell>
          <table:table-cell office:value-type="float" office:value="0" table:formula="of:=IF([.I156]=1;[.R15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3T00:00:00" table:formula="of:=[.A156]+1" table:style-name="ce10">
            <text:p>Wed, 03 Jun 2026</text:p>
          </table:table-cell>
          <table:table-cell office:value-type="string" office:string-value="Wed" table:formula="of:=TEXT([.A157];&quot;ddd&quot;)" table:style-name="ce5">
            <text:p>Wed</text:p>
          </table:table-cell>
          <table:table-cell office:value-type="string" office:string-value="Jun" table:formula="of:=TEXT([.A157];&quot;mmm&quot;)" table:style-name="ce5">
            <text:p>Jun</text:p>
          </table:table-cell>
          <table:table-cell office:value-type="float" office:value="0" table:formula="of:=IF(INDEX([Tracker.$A$1:.$AG$120];6+9*(MONTH([.$A157])-1)+(COLUMN()-4);DAY([.$A157])+2)&lt;&gt;&quot;&quot;;1;0)" table:style-name="ce92"/>
          <table:table-cell office:value-type="float" office:value="0" table:formula="of:=IF(INDEX([Tracker.$A$1:.$AG$120];6+9*(MONTH([.$A157])-1)+(COLUMN()-4);DAY([.$A157])+2)&lt;&gt;&quot;&quot;;1;0)" table:style-name="ce92"/>
          <table:table-cell office:value-type="float" office:value="0" table:formula="of:=IF(INDEX([Tracker.$A$1:.$AG$120];6+9*(MONTH([.$A157])-1)+(COLUMN()-4);DAY([.$A157])+2)&lt;&gt;&quot;&quot;;1;0)" table:style-name="ce92"/>
          <table:table-cell office:value-type="float" office:value="0" table:formula="of:=IF(INDEX([Tracker.$A$1:.$AG$120];6+9*(MONTH([.$A157])-1)+(COLUMN()-4);DAY([.$A157])+2)&lt;&gt;&quot;&quot;;1;0)" table:style-name="ce92"/>
          <table:table-cell office:value-type="float" office:value="0" table:formula="of:=IF(INDEX([Tracker.$A$1:.$AG$120];6+9*(MONTH([.$A157])-1)+(COLUMN()-4);DAY([.$A157])+2)&lt;&gt;&quot;&quot;;1;0)" table:style-name="ce92"/>
          <table:table-cell office:value-type="float" office:value="0" table:formula="of:=IF(INDEX([Tracker.$A$1:.$AG$120];6+9*(MONTH([.$A157])-1)+(COLUMN()-4);DAY([.$A157])+2)&lt;&gt;&quot;&quot;;1;0)" table:style-name="ce92"/>
          <table:table-cell office:value-type="float" office:value="0" table:formula="of:=SUM([.D157:.I157])" table:style-name="ce6"/>
          <table:table-cell office:value-type="percentage" office:value="0" table:formula="of:=[.J157]/6" table:style-name="ce8">
            <text:p>0%</text:p>
          </table:table-cell>
          <table:table-cell table:style-name="ce1"/>
          <table:table-cell office:value-type="float" office:value="0" table:formula="of:=IF([.D157]=1;[.M156]+1;0)" table:style-name="ce1">
            <text:p>0</text:p>
          </table:table-cell>
          <table:table-cell office:value-type="float" office:value="0" table:formula="of:=IF([.E157]=1;[.N156]+1;0)" table:style-name="ce1">
            <text:p>0</text:p>
          </table:table-cell>
          <table:table-cell office:value-type="float" office:value="0" table:formula="of:=IF([.F157]=1;[.O156]+1;0)" table:style-name="ce1">
            <text:p>0</text:p>
          </table:table-cell>
          <table:table-cell office:value-type="float" office:value="0" table:formula="of:=IF([.G157]=1;[.P156]+1;0)" table:style-name="ce1">
            <text:p>0</text:p>
          </table:table-cell>
          <table:table-cell office:value-type="float" office:value="0" table:formula="of:=IF([.H157]=1;[.Q156]+1;0)" table:style-name="ce1">
            <text:p>0</text:p>
          </table:table-cell>
          <table:table-cell office:value-type="float" office:value="0" table:formula="of:=IF([.I157]=1;[.R15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4T00:00:00" table:formula="of:=[.A157]+1" table:style-name="ce10">
            <text:p>Thu, 04 Jun 2026</text:p>
          </table:table-cell>
          <table:table-cell office:value-type="string" office:string-value="Thu" table:formula="of:=TEXT([.A158];&quot;ddd&quot;)" table:style-name="ce5">
            <text:p>Thu</text:p>
          </table:table-cell>
          <table:table-cell office:value-type="string" office:string-value="Jun" table:formula="of:=TEXT([.A158];&quot;mmm&quot;)" table:style-name="ce5">
            <text:p>Jun</text:p>
          </table:table-cell>
          <table:table-cell office:value-type="float" office:value="0" table:formula="of:=IF(INDEX([Tracker.$A$1:.$AG$120];6+9*(MONTH([.$A158])-1)+(COLUMN()-4);DAY([.$A158])+2)&lt;&gt;&quot;&quot;;1;0)" table:style-name="ce92"/>
          <table:table-cell office:value-type="float" office:value="0" table:formula="of:=IF(INDEX([Tracker.$A$1:.$AG$120];6+9*(MONTH([.$A158])-1)+(COLUMN()-4);DAY([.$A158])+2)&lt;&gt;&quot;&quot;;1;0)" table:style-name="ce92"/>
          <table:table-cell office:value-type="float" office:value="0" table:formula="of:=IF(INDEX([Tracker.$A$1:.$AG$120];6+9*(MONTH([.$A158])-1)+(COLUMN()-4);DAY([.$A158])+2)&lt;&gt;&quot;&quot;;1;0)" table:style-name="ce92"/>
          <table:table-cell office:value-type="float" office:value="0" table:formula="of:=IF(INDEX([Tracker.$A$1:.$AG$120];6+9*(MONTH([.$A158])-1)+(COLUMN()-4);DAY([.$A158])+2)&lt;&gt;&quot;&quot;;1;0)" table:style-name="ce92"/>
          <table:table-cell office:value-type="float" office:value="0" table:formula="of:=IF(INDEX([Tracker.$A$1:.$AG$120];6+9*(MONTH([.$A158])-1)+(COLUMN()-4);DAY([.$A158])+2)&lt;&gt;&quot;&quot;;1;0)" table:style-name="ce92"/>
          <table:table-cell office:value-type="float" office:value="0" table:formula="of:=IF(INDEX([Tracker.$A$1:.$AG$120];6+9*(MONTH([.$A158])-1)+(COLUMN()-4);DAY([.$A158])+2)&lt;&gt;&quot;&quot;;1;0)" table:style-name="ce92"/>
          <table:table-cell office:value-type="float" office:value="0" table:formula="of:=SUM([.D158:.I158])" table:style-name="ce6"/>
          <table:table-cell office:value-type="percentage" office:value="0" table:formula="of:=[.J158]/6" table:style-name="ce8">
            <text:p>0%</text:p>
          </table:table-cell>
          <table:table-cell table:style-name="ce1"/>
          <table:table-cell office:value-type="float" office:value="0" table:formula="of:=IF([.D158]=1;[.M157]+1;0)" table:style-name="ce1">
            <text:p>0</text:p>
          </table:table-cell>
          <table:table-cell office:value-type="float" office:value="0" table:formula="of:=IF([.E158]=1;[.N157]+1;0)" table:style-name="ce1">
            <text:p>0</text:p>
          </table:table-cell>
          <table:table-cell office:value-type="float" office:value="0" table:formula="of:=IF([.F158]=1;[.O157]+1;0)" table:style-name="ce1">
            <text:p>0</text:p>
          </table:table-cell>
          <table:table-cell office:value-type="float" office:value="0" table:formula="of:=IF([.G158]=1;[.P157]+1;0)" table:style-name="ce1">
            <text:p>0</text:p>
          </table:table-cell>
          <table:table-cell office:value-type="float" office:value="0" table:formula="of:=IF([.H158]=1;[.Q157]+1;0)" table:style-name="ce1">
            <text:p>0</text:p>
          </table:table-cell>
          <table:table-cell office:value-type="float" office:value="0" table:formula="of:=IF([.I158]=1;[.R15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5T00:00:00" table:formula="of:=[.A158]+1" table:style-name="ce10">
            <text:p>Fri, 05 Jun 2026</text:p>
          </table:table-cell>
          <table:table-cell office:value-type="string" office:string-value="Fri" table:formula="of:=TEXT([.A159];&quot;ddd&quot;)" table:style-name="ce5">
            <text:p>Fri</text:p>
          </table:table-cell>
          <table:table-cell office:value-type="string" office:string-value="Jun" table:formula="of:=TEXT([.A159];&quot;mmm&quot;)" table:style-name="ce5">
            <text:p>Jun</text:p>
          </table:table-cell>
          <table:table-cell office:value-type="float" office:value="0" table:formula="of:=IF(INDEX([Tracker.$A$1:.$AG$120];6+9*(MONTH([.$A159])-1)+(COLUMN()-4);DAY([.$A159])+2)&lt;&gt;&quot;&quot;;1;0)" table:style-name="ce92"/>
          <table:table-cell office:value-type="float" office:value="0" table:formula="of:=IF(INDEX([Tracker.$A$1:.$AG$120];6+9*(MONTH([.$A159])-1)+(COLUMN()-4);DAY([.$A159])+2)&lt;&gt;&quot;&quot;;1;0)" table:style-name="ce92"/>
          <table:table-cell office:value-type="float" office:value="0" table:formula="of:=IF(INDEX([Tracker.$A$1:.$AG$120];6+9*(MONTH([.$A159])-1)+(COLUMN()-4);DAY([.$A159])+2)&lt;&gt;&quot;&quot;;1;0)" table:style-name="ce92"/>
          <table:table-cell office:value-type="float" office:value="0" table:formula="of:=IF(INDEX([Tracker.$A$1:.$AG$120];6+9*(MONTH([.$A159])-1)+(COLUMN()-4);DAY([.$A159])+2)&lt;&gt;&quot;&quot;;1;0)" table:style-name="ce92"/>
          <table:table-cell office:value-type="float" office:value="0" table:formula="of:=IF(INDEX([Tracker.$A$1:.$AG$120];6+9*(MONTH([.$A159])-1)+(COLUMN()-4);DAY([.$A159])+2)&lt;&gt;&quot;&quot;;1;0)" table:style-name="ce92"/>
          <table:table-cell office:value-type="float" office:value="0" table:formula="of:=IF(INDEX([Tracker.$A$1:.$AG$120];6+9*(MONTH([.$A159])-1)+(COLUMN()-4);DAY([.$A159])+2)&lt;&gt;&quot;&quot;;1;0)" table:style-name="ce92"/>
          <table:table-cell office:value-type="float" office:value="0" table:formula="of:=SUM([.D159:.I159])" table:style-name="ce6"/>
          <table:table-cell office:value-type="percentage" office:value="0" table:formula="of:=[.J159]/6" table:style-name="ce8">
            <text:p>0%</text:p>
          </table:table-cell>
          <table:table-cell table:style-name="ce1"/>
          <table:table-cell office:value-type="float" office:value="0" table:formula="of:=IF([.D159]=1;[.M158]+1;0)" table:style-name="ce1">
            <text:p>0</text:p>
          </table:table-cell>
          <table:table-cell office:value-type="float" office:value="0" table:formula="of:=IF([.E159]=1;[.N158]+1;0)" table:style-name="ce1">
            <text:p>0</text:p>
          </table:table-cell>
          <table:table-cell office:value-type="float" office:value="0" table:formula="of:=IF([.F159]=1;[.O158]+1;0)" table:style-name="ce1">
            <text:p>0</text:p>
          </table:table-cell>
          <table:table-cell office:value-type="float" office:value="0" table:formula="of:=IF([.G159]=1;[.P158]+1;0)" table:style-name="ce1">
            <text:p>0</text:p>
          </table:table-cell>
          <table:table-cell office:value-type="float" office:value="0" table:formula="of:=IF([.H159]=1;[.Q158]+1;0)" table:style-name="ce1">
            <text:p>0</text:p>
          </table:table-cell>
          <table:table-cell office:value-type="float" office:value="0" table:formula="of:=IF([.I159]=1;[.R15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6T00:00:00" table:formula="of:=[.A159]+1" table:style-name="ce10">
            <text:p>Sat, 06 Jun 2026</text:p>
          </table:table-cell>
          <table:table-cell office:value-type="string" office:string-value="Sat" table:formula="of:=TEXT([.A160];&quot;ddd&quot;)" table:style-name="ce5">
            <text:p>Sat</text:p>
          </table:table-cell>
          <table:table-cell office:value-type="string" office:string-value="Jun" table:formula="of:=TEXT([.A160];&quot;mmm&quot;)" table:style-name="ce5">
            <text:p>Jun</text:p>
          </table:table-cell>
          <table:table-cell office:value-type="float" office:value="0" table:formula="of:=IF(INDEX([Tracker.$A$1:.$AG$120];6+9*(MONTH([.$A160])-1)+(COLUMN()-4);DAY([.$A160])+2)&lt;&gt;&quot;&quot;;1;0)" table:style-name="ce92"/>
          <table:table-cell office:value-type="float" office:value="0" table:formula="of:=IF(INDEX([Tracker.$A$1:.$AG$120];6+9*(MONTH([.$A160])-1)+(COLUMN()-4);DAY([.$A160])+2)&lt;&gt;&quot;&quot;;1;0)" table:style-name="ce92"/>
          <table:table-cell office:value-type="float" office:value="0" table:formula="of:=IF(INDEX([Tracker.$A$1:.$AG$120];6+9*(MONTH([.$A160])-1)+(COLUMN()-4);DAY([.$A160])+2)&lt;&gt;&quot;&quot;;1;0)" table:style-name="ce92"/>
          <table:table-cell office:value-type="float" office:value="0" table:formula="of:=IF(INDEX([Tracker.$A$1:.$AG$120];6+9*(MONTH([.$A160])-1)+(COLUMN()-4);DAY([.$A160])+2)&lt;&gt;&quot;&quot;;1;0)" table:style-name="ce92"/>
          <table:table-cell office:value-type="float" office:value="0" table:formula="of:=IF(INDEX([Tracker.$A$1:.$AG$120];6+9*(MONTH([.$A160])-1)+(COLUMN()-4);DAY([.$A160])+2)&lt;&gt;&quot;&quot;;1;0)" table:style-name="ce92"/>
          <table:table-cell office:value-type="float" office:value="0" table:formula="of:=IF(INDEX([Tracker.$A$1:.$AG$120];6+9*(MONTH([.$A160])-1)+(COLUMN()-4);DAY([.$A160])+2)&lt;&gt;&quot;&quot;;1;0)" table:style-name="ce92"/>
          <table:table-cell office:value-type="float" office:value="0" table:formula="of:=SUM([.D160:.I160])" table:style-name="ce6"/>
          <table:table-cell office:value-type="percentage" office:value="0" table:formula="of:=[.J160]/6" table:style-name="ce8">
            <text:p>0%</text:p>
          </table:table-cell>
          <table:table-cell table:style-name="ce1"/>
          <table:table-cell office:value-type="float" office:value="0" table:formula="of:=IF([.D160]=1;[.M159]+1;0)" table:style-name="ce1">
            <text:p>0</text:p>
          </table:table-cell>
          <table:table-cell office:value-type="float" office:value="0" table:formula="of:=IF([.E160]=1;[.N159]+1;0)" table:style-name="ce1">
            <text:p>0</text:p>
          </table:table-cell>
          <table:table-cell office:value-type="float" office:value="0" table:formula="of:=IF([.F160]=1;[.O159]+1;0)" table:style-name="ce1">
            <text:p>0</text:p>
          </table:table-cell>
          <table:table-cell office:value-type="float" office:value="0" table:formula="of:=IF([.G160]=1;[.P159]+1;0)" table:style-name="ce1">
            <text:p>0</text:p>
          </table:table-cell>
          <table:table-cell office:value-type="float" office:value="0" table:formula="of:=IF([.H160]=1;[.Q159]+1;0)" table:style-name="ce1">
            <text:p>0</text:p>
          </table:table-cell>
          <table:table-cell office:value-type="float" office:value="0" table:formula="of:=IF([.I160]=1;[.R15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7T00:00:00" table:formula="of:=[.A160]+1" table:style-name="ce10">
            <text:p>Sun, 07 Jun 2026</text:p>
          </table:table-cell>
          <table:table-cell office:value-type="string" office:string-value="Sun" table:formula="of:=TEXT([.A161];&quot;ddd&quot;)" table:style-name="ce5">
            <text:p>Sun</text:p>
          </table:table-cell>
          <table:table-cell office:value-type="string" office:string-value="Jun" table:formula="of:=TEXT([.A161];&quot;mmm&quot;)" table:style-name="ce5">
            <text:p>Jun</text:p>
          </table:table-cell>
          <table:table-cell office:value-type="float" office:value="0" table:formula="of:=IF(INDEX([Tracker.$A$1:.$AG$120];6+9*(MONTH([.$A161])-1)+(COLUMN()-4);DAY([.$A161])+2)&lt;&gt;&quot;&quot;;1;0)" table:style-name="ce92"/>
          <table:table-cell office:value-type="float" office:value="0" table:formula="of:=IF(INDEX([Tracker.$A$1:.$AG$120];6+9*(MONTH([.$A161])-1)+(COLUMN()-4);DAY([.$A161])+2)&lt;&gt;&quot;&quot;;1;0)" table:style-name="ce92"/>
          <table:table-cell office:value-type="float" office:value="0" table:formula="of:=IF(INDEX([Tracker.$A$1:.$AG$120];6+9*(MONTH([.$A161])-1)+(COLUMN()-4);DAY([.$A161])+2)&lt;&gt;&quot;&quot;;1;0)" table:style-name="ce92"/>
          <table:table-cell office:value-type="float" office:value="0" table:formula="of:=IF(INDEX([Tracker.$A$1:.$AG$120];6+9*(MONTH([.$A161])-1)+(COLUMN()-4);DAY([.$A161])+2)&lt;&gt;&quot;&quot;;1;0)" table:style-name="ce92"/>
          <table:table-cell office:value-type="float" office:value="0" table:formula="of:=IF(INDEX([Tracker.$A$1:.$AG$120];6+9*(MONTH([.$A161])-1)+(COLUMN()-4);DAY([.$A161])+2)&lt;&gt;&quot;&quot;;1;0)" table:style-name="ce92"/>
          <table:table-cell office:value-type="float" office:value="0" table:formula="of:=IF(INDEX([Tracker.$A$1:.$AG$120];6+9*(MONTH([.$A161])-1)+(COLUMN()-4);DAY([.$A161])+2)&lt;&gt;&quot;&quot;;1;0)" table:style-name="ce92"/>
          <table:table-cell office:value-type="float" office:value="0" table:formula="of:=SUM([.D161:.I161])" table:style-name="ce6"/>
          <table:table-cell office:value-type="percentage" office:value="0" table:formula="of:=[.J161]/6" table:style-name="ce8">
            <text:p>0%</text:p>
          </table:table-cell>
          <table:table-cell table:style-name="ce1"/>
          <table:table-cell office:value-type="float" office:value="0" table:formula="of:=IF([.D161]=1;[.M160]+1;0)" table:style-name="ce1">
            <text:p>0</text:p>
          </table:table-cell>
          <table:table-cell office:value-type="float" office:value="0" table:formula="of:=IF([.E161]=1;[.N160]+1;0)" table:style-name="ce1">
            <text:p>0</text:p>
          </table:table-cell>
          <table:table-cell office:value-type="float" office:value="0" table:formula="of:=IF([.F161]=1;[.O160]+1;0)" table:style-name="ce1">
            <text:p>0</text:p>
          </table:table-cell>
          <table:table-cell office:value-type="float" office:value="0" table:formula="of:=IF([.G161]=1;[.P160]+1;0)" table:style-name="ce1">
            <text:p>0</text:p>
          </table:table-cell>
          <table:table-cell office:value-type="float" office:value="0" table:formula="of:=IF([.H161]=1;[.Q160]+1;0)" table:style-name="ce1">
            <text:p>0</text:p>
          </table:table-cell>
          <table:table-cell office:value-type="float" office:value="0" table:formula="of:=IF([.I161]=1;[.R16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8T00:00:00" table:formula="of:=[.A161]+1" table:style-name="ce10">
            <text:p>Mon, 08 Jun 2026</text:p>
          </table:table-cell>
          <table:table-cell office:value-type="string" office:string-value="Mon" table:formula="of:=TEXT([.A162];&quot;ddd&quot;)" table:style-name="ce5">
            <text:p>Mon</text:p>
          </table:table-cell>
          <table:table-cell office:value-type="string" office:string-value="Jun" table:formula="of:=TEXT([.A162];&quot;mmm&quot;)" table:style-name="ce5">
            <text:p>Jun</text:p>
          </table:table-cell>
          <table:table-cell office:value-type="float" office:value="0" table:formula="of:=IF(INDEX([Tracker.$A$1:.$AG$120];6+9*(MONTH([.$A162])-1)+(COLUMN()-4);DAY([.$A162])+2)&lt;&gt;&quot;&quot;;1;0)" table:style-name="ce92"/>
          <table:table-cell office:value-type="float" office:value="0" table:formula="of:=IF(INDEX([Tracker.$A$1:.$AG$120];6+9*(MONTH([.$A162])-1)+(COLUMN()-4);DAY([.$A162])+2)&lt;&gt;&quot;&quot;;1;0)" table:style-name="ce92"/>
          <table:table-cell office:value-type="float" office:value="0" table:formula="of:=IF(INDEX([Tracker.$A$1:.$AG$120];6+9*(MONTH([.$A162])-1)+(COLUMN()-4);DAY([.$A162])+2)&lt;&gt;&quot;&quot;;1;0)" table:style-name="ce92"/>
          <table:table-cell office:value-type="float" office:value="0" table:formula="of:=IF(INDEX([Tracker.$A$1:.$AG$120];6+9*(MONTH([.$A162])-1)+(COLUMN()-4);DAY([.$A162])+2)&lt;&gt;&quot;&quot;;1;0)" table:style-name="ce92"/>
          <table:table-cell office:value-type="float" office:value="0" table:formula="of:=IF(INDEX([Tracker.$A$1:.$AG$120];6+9*(MONTH([.$A162])-1)+(COLUMN()-4);DAY([.$A162])+2)&lt;&gt;&quot;&quot;;1;0)" table:style-name="ce92"/>
          <table:table-cell office:value-type="float" office:value="0" table:formula="of:=IF(INDEX([Tracker.$A$1:.$AG$120];6+9*(MONTH([.$A162])-1)+(COLUMN()-4);DAY([.$A162])+2)&lt;&gt;&quot;&quot;;1;0)" table:style-name="ce92"/>
          <table:table-cell office:value-type="float" office:value="0" table:formula="of:=SUM([.D162:.I162])" table:style-name="ce6"/>
          <table:table-cell office:value-type="percentage" office:value="0" table:formula="of:=[.J162]/6" table:style-name="ce8">
            <text:p>0%</text:p>
          </table:table-cell>
          <table:table-cell table:style-name="ce1"/>
          <table:table-cell office:value-type="float" office:value="0" table:formula="of:=IF([.D162]=1;[.M161]+1;0)" table:style-name="ce1">
            <text:p>0</text:p>
          </table:table-cell>
          <table:table-cell office:value-type="float" office:value="0" table:formula="of:=IF([.E162]=1;[.N161]+1;0)" table:style-name="ce1">
            <text:p>0</text:p>
          </table:table-cell>
          <table:table-cell office:value-type="float" office:value="0" table:formula="of:=IF([.F162]=1;[.O161]+1;0)" table:style-name="ce1">
            <text:p>0</text:p>
          </table:table-cell>
          <table:table-cell office:value-type="float" office:value="0" table:formula="of:=IF([.G162]=1;[.P161]+1;0)" table:style-name="ce1">
            <text:p>0</text:p>
          </table:table-cell>
          <table:table-cell office:value-type="float" office:value="0" table:formula="of:=IF([.H162]=1;[.Q161]+1;0)" table:style-name="ce1">
            <text:p>0</text:p>
          </table:table-cell>
          <table:table-cell office:value-type="float" office:value="0" table:formula="of:=IF([.I162]=1;[.R16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09T00:00:00" table:formula="of:=[.A162]+1" table:style-name="ce10">
            <text:p>Tue, 09 Jun 2026</text:p>
          </table:table-cell>
          <table:table-cell office:value-type="string" office:string-value="Tue" table:formula="of:=TEXT([.A163];&quot;ddd&quot;)" table:style-name="ce5">
            <text:p>Tue</text:p>
          </table:table-cell>
          <table:table-cell office:value-type="string" office:string-value="Jun" table:formula="of:=TEXT([.A163];&quot;mmm&quot;)" table:style-name="ce5">
            <text:p>Jun</text:p>
          </table:table-cell>
          <table:table-cell office:value-type="float" office:value="0" table:formula="of:=IF(INDEX([Tracker.$A$1:.$AG$120];6+9*(MONTH([.$A163])-1)+(COLUMN()-4);DAY([.$A163])+2)&lt;&gt;&quot;&quot;;1;0)" table:style-name="ce92"/>
          <table:table-cell office:value-type="float" office:value="0" table:formula="of:=IF(INDEX([Tracker.$A$1:.$AG$120];6+9*(MONTH([.$A163])-1)+(COLUMN()-4);DAY([.$A163])+2)&lt;&gt;&quot;&quot;;1;0)" table:style-name="ce92"/>
          <table:table-cell office:value-type="float" office:value="0" table:formula="of:=IF(INDEX([Tracker.$A$1:.$AG$120];6+9*(MONTH([.$A163])-1)+(COLUMN()-4);DAY([.$A163])+2)&lt;&gt;&quot;&quot;;1;0)" table:style-name="ce92"/>
          <table:table-cell office:value-type="float" office:value="0" table:formula="of:=IF(INDEX([Tracker.$A$1:.$AG$120];6+9*(MONTH([.$A163])-1)+(COLUMN()-4);DAY([.$A163])+2)&lt;&gt;&quot;&quot;;1;0)" table:style-name="ce92"/>
          <table:table-cell office:value-type="float" office:value="0" table:formula="of:=IF(INDEX([Tracker.$A$1:.$AG$120];6+9*(MONTH([.$A163])-1)+(COLUMN()-4);DAY([.$A163])+2)&lt;&gt;&quot;&quot;;1;0)" table:style-name="ce92"/>
          <table:table-cell office:value-type="float" office:value="0" table:formula="of:=IF(INDEX([Tracker.$A$1:.$AG$120];6+9*(MONTH([.$A163])-1)+(COLUMN()-4);DAY([.$A163])+2)&lt;&gt;&quot;&quot;;1;0)" table:style-name="ce92"/>
          <table:table-cell office:value-type="float" office:value="0" table:formula="of:=SUM([.D163:.I163])" table:style-name="ce6"/>
          <table:table-cell office:value-type="percentage" office:value="0" table:formula="of:=[.J163]/6" table:style-name="ce8">
            <text:p>0%</text:p>
          </table:table-cell>
          <table:table-cell table:style-name="ce1"/>
          <table:table-cell office:value-type="float" office:value="0" table:formula="of:=IF([.D163]=1;[.M162]+1;0)" table:style-name="ce1">
            <text:p>0</text:p>
          </table:table-cell>
          <table:table-cell office:value-type="float" office:value="0" table:formula="of:=IF([.E163]=1;[.N162]+1;0)" table:style-name="ce1">
            <text:p>0</text:p>
          </table:table-cell>
          <table:table-cell office:value-type="float" office:value="0" table:formula="of:=IF([.F163]=1;[.O162]+1;0)" table:style-name="ce1">
            <text:p>0</text:p>
          </table:table-cell>
          <table:table-cell office:value-type="float" office:value="0" table:formula="of:=IF([.G163]=1;[.P162]+1;0)" table:style-name="ce1">
            <text:p>0</text:p>
          </table:table-cell>
          <table:table-cell office:value-type="float" office:value="0" table:formula="of:=IF([.H163]=1;[.Q162]+1;0)" table:style-name="ce1">
            <text:p>0</text:p>
          </table:table-cell>
          <table:table-cell office:value-type="float" office:value="0" table:formula="of:=IF([.I163]=1;[.R16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0T00:00:00" table:formula="of:=[.A163]+1" table:style-name="ce10">
            <text:p>Wed, 10 Jun 2026</text:p>
          </table:table-cell>
          <table:table-cell office:value-type="string" office:string-value="Wed" table:formula="of:=TEXT([.A164];&quot;ddd&quot;)" table:style-name="ce5">
            <text:p>Wed</text:p>
          </table:table-cell>
          <table:table-cell office:value-type="string" office:string-value="Jun" table:formula="of:=TEXT([.A164];&quot;mmm&quot;)" table:style-name="ce5">
            <text:p>Jun</text:p>
          </table:table-cell>
          <table:table-cell office:value-type="float" office:value="0" table:formula="of:=IF(INDEX([Tracker.$A$1:.$AG$120];6+9*(MONTH([.$A164])-1)+(COLUMN()-4);DAY([.$A164])+2)&lt;&gt;&quot;&quot;;1;0)" table:style-name="ce92"/>
          <table:table-cell office:value-type="float" office:value="0" table:formula="of:=IF(INDEX([Tracker.$A$1:.$AG$120];6+9*(MONTH([.$A164])-1)+(COLUMN()-4);DAY([.$A164])+2)&lt;&gt;&quot;&quot;;1;0)" table:style-name="ce92"/>
          <table:table-cell office:value-type="float" office:value="0" table:formula="of:=IF(INDEX([Tracker.$A$1:.$AG$120];6+9*(MONTH([.$A164])-1)+(COLUMN()-4);DAY([.$A164])+2)&lt;&gt;&quot;&quot;;1;0)" table:style-name="ce92"/>
          <table:table-cell office:value-type="float" office:value="0" table:formula="of:=IF(INDEX([Tracker.$A$1:.$AG$120];6+9*(MONTH([.$A164])-1)+(COLUMN()-4);DAY([.$A164])+2)&lt;&gt;&quot;&quot;;1;0)" table:style-name="ce92"/>
          <table:table-cell office:value-type="float" office:value="0" table:formula="of:=IF(INDEX([Tracker.$A$1:.$AG$120];6+9*(MONTH([.$A164])-1)+(COLUMN()-4);DAY([.$A164])+2)&lt;&gt;&quot;&quot;;1;0)" table:style-name="ce92"/>
          <table:table-cell office:value-type="float" office:value="0" table:formula="of:=IF(INDEX([Tracker.$A$1:.$AG$120];6+9*(MONTH([.$A164])-1)+(COLUMN()-4);DAY([.$A164])+2)&lt;&gt;&quot;&quot;;1;0)" table:style-name="ce92"/>
          <table:table-cell office:value-type="float" office:value="0" table:formula="of:=SUM([.D164:.I164])" table:style-name="ce6"/>
          <table:table-cell office:value-type="percentage" office:value="0" table:formula="of:=[.J164]/6" table:style-name="ce8">
            <text:p>0%</text:p>
          </table:table-cell>
          <table:table-cell table:style-name="ce1"/>
          <table:table-cell office:value-type="float" office:value="0" table:formula="of:=IF([.D164]=1;[.M163]+1;0)" table:style-name="ce1">
            <text:p>0</text:p>
          </table:table-cell>
          <table:table-cell office:value-type="float" office:value="0" table:formula="of:=IF([.E164]=1;[.N163]+1;0)" table:style-name="ce1">
            <text:p>0</text:p>
          </table:table-cell>
          <table:table-cell office:value-type="float" office:value="0" table:formula="of:=IF([.F164]=1;[.O163]+1;0)" table:style-name="ce1">
            <text:p>0</text:p>
          </table:table-cell>
          <table:table-cell office:value-type="float" office:value="0" table:formula="of:=IF([.G164]=1;[.P163]+1;0)" table:style-name="ce1">
            <text:p>0</text:p>
          </table:table-cell>
          <table:table-cell office:value-type="float" office:value="0" table:formula="of:=IF([.H164]=1;[.Q163]+1;0)" table:style-name="ce1">
            <text:p>0</text:p>
          </table:table-cell>
          <table:table-cell office:value-type="float" office:value="0" table:formula="of:=IF([.I164]=1;[.R16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1T00:00:00" table:formula="of:=[.A164]+1" table:style-name="ce10">
            <text:p>Thu, 11 Jun 2026</text:p>
          </table:table-cell>
          <table:table-cell office:value-type="string" office:string-value="Thu" table:formula="of:=TEXT([.A165];&quot;ddd&quot;)" table:style-name="ce5">
            <text:p>Thu</text:p>
          </table:table-cell>
          <table:table-cell office:value-type="string" office:string-value="Jun" table:formula="of:=TEXT([.A165];&quot;mmm&quot;)" table:style-name="ce5">
            <text:p>Jun</text:p>
          </table:table-cell>
          <table:table-cell office:value-type="float" office:value="0" table:formula="of:=IF(INDEX([Tracker.$A$1:.$AG$120];6+9*(MONTH([.$A165])-1)+(COLUMN()-4);DAY([.$A165])+2)&lt;&gt;&quot;&quot;;1;0)" table:style-name="ce92"/>
          <table:table-cell office:value-type="float" office:value="0" table:formula="of:=IF(INDEX([Tracker.$A$1:.$AG$120];6+9*(MONTH([.$A165])-1)+(COLUMN()-4);DAY([.$A165])+2)&lt;&gt;&quot;&quot;;1;0)" table:style-name="ce92"/>
          <table:table-cell office:value-type="float" office:value="0" table:formula="of:=IF(INDEX([Tracker.$A$1:.$AG$120];6+9*(MONTH([.$A165])-1)+(COLUMN()-4);DAY([.$A165])+2)&lt;&gt;&quot;&quot;;1;0)" table:style-name="ce92"/>
          <table:table-cell office:value-type="float" office:value="0" table:formula="of:=IF(INDEX([Tracker.$A$1:.$AG$120];6+9*(MONTH([.$A165])-1)+(COLUMN()-4);DAY([.$A165])+2)&lt;&gt;&quot;&quot;;1;0)" table:style-name="ce92"/>
          <table:table-cell office:value-type="float" office:value="0" table:formula="of:=IF(INDEX([Tracker.$A$1:.$AG$120];6+9*(MONTH([.$A165])-1)+(COLUMN()-4);DAY([.$A165])+2)&lt;&gt;&quot;&quot;;1;0)" table:style-name="ce92"/>
          <table:table-cell office:value-type="float" office:value="0" table:formula="of:=IF(INDEX([Tracker.$A$1:.$AG$120];6+9*(MONTH([.$A165])-1)+(COLUMN()-4);DAY([.$A165])+2)&lt;&gt;&quot;&quot;;1;0)" table:style-name="ce92"/>
          <table:table-cell office:value-type="float" office:value="0" table:formula="of:=SUM([.D165:.I165])" table:style-name="ce6"/>
          <table:table-cell office:value-type="percentage" office:value="0" table:formula="of:=[.J165]/6" table:style-name="ce8">
            <text:p>0%</text:p>
          </table:table-cell>
          <table:table-cell table:style-name="ce1"/>
          <table:table-cell office:value-type="float" office:value="0" table:formula="of:=IF([.D165]=1;[.M164]+1;0)" table:style-name="ce1">
            <text:p>0</text:p>
          </table:table-cell>
          <table:table-cell office:value-type="float" office:value="0" table:formula="of:=IF([.E165]=1;[.N164]+1;0)" table:style-name="ce1">
            <text:p>0</text:p>
          </table:table-cell>
          <table:table-cell office:value-type="float" office:value="0" table:formula="of:=IF([.F165]=1;[.O164]+1;0)" table:style-name="ce1">
            <text:p>0</text:p>
          </table:table-cell>
          <table:table-cell office:value-type="float" office:value="0" table:formula="of:=IF([.G165]=1;[.P164]+1;0)" table:style-name="ce1">
            <text:p>0</text:p>
          </table:table-cell>
          <table:table-cell office:value-type="float" office:value="0" table:formula="of:=IF([.H165]=1;[.Q164]+1;0)" table:style-name="ce1">
            <text:p>0</text:p>
          </table:table-cell>
          <table:table-cell office:value-type="float" office:value="0" table:formula="of:=IF([.I165]=1;[.R16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2T00:00:00" table:formula="of:=[.A165]+1" table:style-name="ce10">
            <text:p>Fri, 12 Jun 2026</text:p>
          </table:table-cell>
          <table:table-cell office:value-type="string" office:string-value="Fri" table:formula="of:=TEXT([.A166];&quot;ddd&quot;)" table:style-name="ce5">
            <text:p>Fri</text:p>
          </table:table-cell>
          <table:table-cell office:value-type="string" office:string-value="Jun" table:formula="of:=TEXT([.A166];&quot;mmm&quot;)" table:style-name="ce5">
            <text:p>Jun</text:p>
          </table:table-cell>
          <table:table-cell office:value-type="float" office:value="0" table:formula="of:=IF(INDEX([Tracker.$A$1:.$AG$120];6+9*(MONTH([.$A166])-1)+(COLUMN()-4);DAY([.$A166])+2)&lt;&gt;&quot;&quot;;1;0)" table:style-name="ce92"/>
          <table:table-cell office:value-type="float" office:value="0" table:formula="of:=IF(INDEX([Tracker.$A$1:.$AG$120];6+9*(MONTH([.$A166])-1)+(COLUMN()-4);DAY([.$A166])+2)&lt;&gt;&quot;&quot;;1;0)" table:style-name="ce92"/>
          <table:table-cell office:value-type="float" office:value="0" table:formula="of:=IF(INDEX([Tracker.$A$1:.$AG$120];6+9*(MONTH([.$A166])-1)+(COLUMN()-4);DAY([.$A166])+2)&lt;&gt;&quot;&quot;;1;0)" table:style-name="ce92"/>
          <table:table-cell office:value-type="float" office:value="0" table:formula="of:=IF(INDEX([Tracker.$A$1:.$AG$120];6+9*(MONTH([.$A166])-1)+(COLUMN()-4);DAY([.$A166])+2)&lt;&gt;&quot;&quot;;1;0)" table:style-name="ce92"/>
          <table:table-cell office:value-type="float" office:value="0" table:formula="of:=IF(INDEX([Tracker.$A$1:.$AG$120];6+9*(MONTH([.$A166])-1)+(COLUMN()-4);DAY([.$A166])+2)&lt;&gt;&quot;&quot;;1;0)" table:style-name="ce92"/>
          <table:table-cell office:value-type="float" office:value="0" table:formula="of:=IF(INDEX([Tracker.$A$1:.$AG$120];6+9*(MONTH([.$A166])-1)+(COLUMN()-4);DAY([.$A166])+2)&lt;&gt;&quot;&quot;;1;0)" table:style-name="ce92"/>
          <table:table-cell office:value-type="float" office:value="0" table:formula="of:=SUM([.D166:.I166])" table:style-name="ce6"/>
          <table:table-cell office:value-type="percentage" office:value="0" table:formula="of:=[.J166]/6" table:style-name="ce8">
            <text:p>0%</text:p>
          </table:table-cell>
          <table:table-cell table:style-name="ce1"/>
          <table:table-cell office:value-type="float" office:value="0" table:formula="of:=IF([.D166]=1;[.M165]+1;0)" table:style-name="ce1">
            <text:p>0</text:p>
          </table:table-cell>
          <table:table-cell office:value-type="float" office:value="0" table:formula="of:=IF([.E166]=1;[.N165]+1;0)" table:style-name="ce1">
            <text:p>0</text:p>
          </table:table-cell>
          <table:table-cell office:value-type="float" office:value="0" table:formula="of:=IF([.F166]=1;[.O165]+1;0)" table:style-name="ce1">
            <text:p>0</text:p>
          </table:table-cell>
          <table:table-cell office:value-type="float" office:value="0" table:formula="of:=IF([.G166]=1;[.P165]+1;0)" table:style-name="ce1">
            <text:p>0</text:p>
          </table:table-cell>
          <table:table-cell office:value-type="float" office:value="0" table:formula="of:=IF([.H166]=1;[.Q165]+1;0)" table:style-name="ce1">
            <text:p>0</text:p>
          </table:table-cell>
          <table:table-cell office:value-type="float" office:value="0" table:formula="of:=IF([.I166]=1;[.R16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3T00:00:00" table:formula="of:=[.A166]+1" table:style-name="ce10">
            <text:p>Sat, 13 Jun 2026</text:p>
          </table:table-cell>
          <table:table-cell office:value-type="string" office:string-value="Sat" table:formula="of:=TEXT([.A167];&quot;ddd&quot;)" table:style-name="ce5">
            <text:p>Sat</text:p>
          </table:table-cell>
          <table:table-cell office:value-type="string" office:string-value="Jun" table:formula="of:=TEXT([.A167];&quot;mmm&quot;)" table:style-name="ce5">
            <text:p>Jun</text:p>
          </table:table-cell>
          <table:table-cell office:value-type="float" office:value="0" table:formula="of:=IF(INDEX([Tracker.$A$1:.$AG$120];6+9*(MONTH([.$A167])-1)+(COLUMN()-4);DAY([.$A167])+2)&lt;&gt;&quot;&quot;;1;0)" table:style-name="ce92"/>
          <table:table-cell office:value-type="float" office:value="0" table:formula="of:=IF(INDEX([Tracker.$A$1:.$AG$120];6+9*(MONTH([.$A167])-1)+(COLUMN()-4);DAY([.$A167])+2)&lt;&gt;&quot;&quot;;1;0)" table:style-name="ce92"/>
          <table:table-cell office:value-type="float" office:value="0" table:formula="of:=IF(INDEX([Tracker.$A$1:.$AG$120];6+9*(MONTH([.$A167])-1)+(COLUMN()-4);DAY([.$A167])+2)&lt;&gt;&quot;&quot;;1;0)" table:style-name="ce92"/>
          <table:table-cell office:value-type="float" office:value="0" table:formula="of:=IF(INDEX([Tracker.$A$1:.$AG$120];6+9*(MONTH([.$A167])-1)+(COLUMN()-4);DAY([.$A167])+2)&lt;&gt;&quot;&quot;;1;0)" table:style-name="ce92"/>
          <table:table-cell office:value-type="float" office:value="0" table:formula="of:=IF(INDEX([Tracker.$A$1:.$AG$120];6+9*(MONTH([.$A167])-1)+(COLUMN()-4);DAY([.$A167])+2)&lt;&gt;&quot;&quot;;1;0)" table:style-name="ce92"/>
          <table:table-cell office:value-type="float" office:value="0" table:formula="of:=IF(INDEX([Tracker.$A$1:.$AG$120];6+9*(MONTH([.$A167])-1)+(COLUMN()-4);DAY([.$A167])+2)&lt;&gt;&quot;&quot;;1;0)" table:style-name="ce92"/>
          <table:table-cell office:value-type="float" office:value="0" table:formula="of:=SUM([.D167:.I167])" table:style-name="ce6"/>
          <table:table-cell office:value-type="percentage" office:value="0" table:formula="of:=[.J167]/6" table:style-name="ce8">
            <text:p>0%</text:p>
          </table:table-cell>
          <table:table-cell table:style-name="ce1"/>
          <table:table-cell office:value-type="float" office:value="0" table:formula="of:=IF([.D167]=1;[.M166]+1;0)" table:style-name="ce1">
            <text:p>0</text:p>
          </table:table-cell>
          <table:table-cell office:value-type="float" office:value="0" table:formula="of:=IF([.E167]=1;[.N166]+1;0)" table:style-name="ce1">
            <text:p>0</text:p>
          </table:table-cell>
          <table:table-cell office:value-type="float" office:value="0" table:formula="of:=IF([.F167]=1;[.O166]+1;0)" table:style-name="ce1">
            <text:p>0</text:p>
          </table:table-cell>
          <table:table-cell office:value-type="float" office:value="0" table:formula="of:=IF([.G167]=1;[.P166]+1;0)" table:style-name="ce1">
            <text:p>0</text:p>
          </table:table-cell>
          <table:table-cell office:value-type="float" office:value="0" table:formula="of:=IF([.H167]=1;[.Q166]+1;0)" table:style-name="ce1">
            <text:p>0</text:p>
          </table:table-cell>
          <table:table-cell office:value-type="float" office:value="0" table:formula="of:=IF([.I167]=1;[.R16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4T00:00:00" table:formula="of:=[.A167]+1" table:style-name="ce10">
            <text:p>Sun, 14 Jun 2026</text:p>
          </table:table-cell>
          <table:table-cell office:value-type="string" office:string-value="Sun" table:formula="of:=TEXT([.A168];&quot;ddd&quot;)" table:style-name="ce5">
            <text:p>Sun</text:p>
          </table:table-cell>
          <table:table-cell office:value-type="string" office:string-value="Jun" table:formula="of:=TEXT([.A168];&quot;mmm&quot;)" table:style-name="ce5">
            <text:p>Jun</text:p>
          </table:table-cell>
          <table:table-cell office:value-type="float" office:value="0" table:formula="of:=IF(INDEX([Tracker.$A$1:.$AG$120];6+9*(MONTH([.$A168])-1)+(COLUMN()-4);DAY([.$A168])+2)&lt;&gt;&quot;&quot;;1;0)" table:style-name="ce92"/>
          <table:table-cell office:value-type="float" office:value="0" table:formula="of:=IF(INDEX([Tracker.$A$1:.$AG$120];6+9*(MONTH([.$A168])-1)+(COLUMN()-4);DAY([.$A168])+2)&lt;&gt;&quot;&quot;;1;0)" table:style-name="ce92"/>
          <table:table-cell office:value-type="float" office:value="0" table:formula="of:=IF(INDEX([Tracker.$A$1:.$AG$120];6+9*(MONTH([.$A168])-1)+(COLUMN()-4);DAY([.$A168])+2)&lt;&gt;&quot;&quot;;1;0)" table:style-name="ce92"/>
          <table:table-cell office:value-type="float" office:value="0" table:formula="of:=IF(INDEX([Tracker.$A$1:.$AG$120];6+9*(MONTH([.$A168])-1)+(COLUMN()-4);DAY([.$A168])+2)&lt;&gt;&quot;&quot;;1;0)" table:style-name="ce92"/>
          <table:table-cell office:value-type="float" office:value="0" table:formula="of:=IF(INDEX([Tracker.$A$1:.$AG$120];6+9*(MONTH([.$A168])-1)+(COLUMN()-4);DAY([.$A168])+2)&lt;&gt;&quot;&quot;;1;0)" table:style-name="ce92"/>
          <table:table-cell office:value-type="float" office:value="0" table:formula="of:=IF(INDEX([Tracker.$A$1:.$AG$120];6+9*(MONTH([.$A168])-1)+(COLUMN()-4);DAY([.$A168])+2)&lt;&gt;&quot;&quot;;1;0)" table:style-name="ce92"/>
          <table:table-cell office:value-type="float" office:value="0" table:formula="of:=SUM([.D168:.I168])" table:style-name="ce6"/>
          <table:table-cell office:value-type="percentage" office:value="0" table:formula="of:=[.J168]/6" table:style-name="ce8">
            <text:p>0%</text:p>
          </table:table-cell>
          <table:table-cell table:style-name="ce1"/>
          <table:table-cell office:value-type="float" office:value="0" table:formula="of:=IF([.D168]=1;[.M167]+1;0)" table:style-name="ce1">
            <text:p>0</text:p>
          </table:table-cell>
          <table:table-cell office:value-type="float" office:value="0" table:formula="of:=IF([.E168]=1;[.N167]+1;0)" table:style-name="ce1">
            <text:p>0</text:p>
          </table:table-cell>
          <table:table-cell office:value-type="float" office:value="0" table:formula="of:=IF([.F168]=1;[.O167]+1;0)" table:style-name="ce1">
            <text:p>0</text:p>
          </table:table-cell>
          <table:table-cell office:value-type="float" office:value="0" table:formula="of:=IF([.G168]=1;[.P167]+1;0)" table:style-name="ce1">
            <text:p>0</text:p>
          </table:table-cell>
          <table:table-cell office:value-type="float" office:value="0" table:formula="of:=IF([.H168]=1;[.Q167]+1;0)" table:style-name="ce1">
            <text:p>0</text:p>
          </table:table-cell>
          <table:table-cell office:value-type="float" office:value="0" table:formula="of:=IF([.I168]=1;[.R16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5T00:00:00" table:formula="of:=[.A168]+1" table:style-name="ce10">
            <text:p>Mon, 15 Jun 2026</text:p>
          </table:table-cell>
          <table:table-cell office:value-type="string" office:string-value="Mon" table:formula="of:=TEXT([.A169];&quot;ddd&quot;)" table:style-name="ce5">
            <text:p>Mon</text:p>
          </table:table-cell>
          <table:table-cell office:value-type="string" office:string-value="Jun" table:formula="of:=TEXT([.A169];&quot;mmm&quot;)" table:style-name="ce5">
            <text:p>Jun</text:p>
          </table:table-cell>
          <table:table-cell office:value-type="float" office:value="0" table:formula="of:=IF(INDEX([Tracker.$A$1:.$AG$120];6+9*(MONTH([.$A169])-1)+(COLUMN()-4);DAY([.$A169])+2)&lt;&gt;&quot;&quot;;1;0)" table:style-name="ce92"/>
          <table:table-cell office:value-type="float" office:value="0" table:formula="of:=IF(INDEX([Tracker.$A$1:.$AG$120];6+9*(MONTH([.$A169])-1)+(COLUMN()-4);DAY([.$A169])+2)&lt;&gt;&quot;&quot;;1;0)" table:style-name="ce92"/>
          <table:table-cell office:value-type="float" office:value="0" table:formula="of:=IF(INDEX([Tracker.$A$1:.$AG$120];6+9*(MONTH([.$A169])-1)+(COLUMN()-4);DAY([.$A169])+2)&lt;&gt;&quot;&quot;;1;0)" table:style-name="ce92"/>
          <table:table-cell office:value-type="float" office:value="0" table:formula="of:=IF(INDEX([Tracker.$A$1:.$AG$120];6+9*(MONTH([.$A169])-1)+(COLUMN()-4);DAY([.$A169])+2)&lt;&gt;&quot;&quot;;1;0)" table:style-name="ce92"/>
          <table:table-cell office:value-type="float" office:value="0" table:formula="of:=IF(INDEX([Tracker.$A$1:.$AG$120];6+9*(MONTH([.$A169])-1)+(COLUMN()-4);DAY([.$A169])+2)&lt;&gt;&quot;&quot;;1;0)" table:style-name="ce92"/>
          <table:table-cell office:value-type="float" office:value="0" table:formula="of:=IF(INDEX([Tracker.$A$1:.$AG$120];6+9*(MONTH([.$A169])-1)+(COLUMN()-4);DAY([.$A169])+2)&lt;&gt;&quot;&quot;;1;0)" table:style-name="ce92"/>
          <table:table-cell office:value-type="float" office:value="0" table:formula="of:=SUM([.D169:.I169])" table:style-name="ce6"/>
          <table:table-cell office:value-type="percentage" office:value="0" table:formula="of:=[.J169]/6" table:style-name="ce8">
            <text:p>0%</text:p>
          </table:table-cell>
          <table:table-cell table:style-name="ce1"/>
          <table:table-cell office:value-type="float" office:value="0" table:formula="of:=IF([.D169]=1;[.M168]+1;0)" table:style-name="ce1">
            <text:p>0</text:p>
          </table:table-cell>
          <table:table-cell office:value-type="float" office:value="0" table:formula="of:=IF([.E169]=1;[.N168]+1;0)" table:style-name="ce1">
            <text:p>0</text:p>
          </table:table-cell>
          <table:table-cell office:value-type="float" office:value="0" table:formula="of:=IF([.F169]=1;[.O168]+1;0)" table:style-name="ce1">
            <text:p>0</text:p>
          </table:table-cell>
          <table:table-cell office:value-type="float" office:value="0" table:formula="of:=IF([.G169]=1;[.P168]+1;0)" table:style-name="ce1">
            <text:p>0</text:p>
          </table:table-cell>
          <table:table-cell office:value-type="float" office:value="0" table:formula="of:=IF([.H169]=1;[.Q168]+1;0)" table:style-name="ce1">
            <text:p>0</text:p>
          </table:table-cell>
          <table:table-cell office:value-type="float" office:value="0" table:formula="of:=IF([.I169]=1;[.R16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6T00:00:00" table:formula="of:=[.A169]+1" table:style-name="ce10">
            <text:p>Tue, 16 Jun 2026</text:p>
          </table:table-cell>
          <table:table-cell office:value-type="string" office:string-value="Tue" table:formula="of:=TEXT([.A170];&quot;ddd&quot;)" table:style-name="ce5">
            <text:p>Tue</text:p>
          </table:table-cell>
          <table:table-cell office:value-type="string" office:string-value="Jun" table:formula="of:=TEXT([.A170];&quot;mmm&quot;)" table:style-name="ce5">
            <text:p>Jun</text:p>
          </table:table-cell>
          <table:table-cell office:value-type="float" office:value="0" table:formula="of:=IF(INDEX([Tracker.$A$1:.$AG$120];6+9*(MONTH([.$A170])-1)+(COLUMN()-4);DAY([.$A170])+2)&lt;&gt;&quot;&quot;;1;0)" table:style-name="ce92"/>
          <table:table-cell office:value-type="float" office:value="0" table:formula="of:=IF(INDEX([Tracker.$A$1:.$AG$120];6+9*(MONTH([.$A170])-1)+(COLUMN()-4);DAY([.$A170])+2)&lt;&gt;&quot;&quot;;1;0)" table:style-name="ce92"/>
          <table:table-cell office:value-type="float" office:value="0" table:formula="of:=IF(INDEX([Tracker.$A$1:.$AG$120];6+9*(MONTH([.$A170])-1)+(COLUMN()-4);DAY([.$A170])+2)&lt;&gt;&quot;&quot;;1;0)" table:style-name="ce92"/>
          <table:table-cell office:value-type="float" office:value="0" table:formula="of:=IF(INDEX([Tracker.$A$1:.$AG$120];6+9*(MONTH([.$A170])-1)+(COLUMN()-4);DAY([.$A170])+2)&lt;&gt;&quot;&quot;;1;0)" table:style-name="ce92"/>
          <table:table-cell office:value-type="float" office:value="0" table:formula="of:=IF(INDEX([Tracker.$A$1:.$AG$120];6+9*(MONTH([.$A170])-1)+(COLUMN()-4);DAY([.$A170])+2)&lt;&gt;&quot;&quot;;1;0)" table:style-name="ce92"/>
          <table:table-cell office:value-type="float" office:value="0" table:formula="of:=IF(INDEX([Tracker.$A$1:.$AG$120];6+9*(MONTH([.$A170])-1)+(COLUMN()-4);DAY([.$A170])+2)&lt;&gt;&quot;&quot;;1;0)" table:style-name="ce92"/>
          <table:table-cell office:value-type="float" office:value="0" table:formula="of:=SUM([.D170:.I170])" table:style-name="ce6"/>
          <table:table-cell office:value-type="percentage" office:value="0" table:formula="of:=[.J170]/6" table:style-name="ce8">
            <text:p>0%</text:p>
          </table:table-cell>
          <table:table-cell table:style-name="ce1"/>
          <table:table-cell office:value-type="float" office:value="0" table:formula="of:=IF([.D170]=1;[.M169]+1;0)" table:style-name="ce1">
            <text:p>0</text:p>
          </table:table-cell>
          <table:table-cell office:value-type="float" office:value="0" table:formula="of:=IF([.E170]=1;[.N169]+1;0)" table:style-name="ce1">
            <text:p>0</text:p>
          </table:table-cell>
          <table:table-cell office:value-type="float" office:value="0" table:formula="of:=IF([.F170]=1;[.O169]+1;0)" table:style-name="ce1">
            <text:p>0</text:p>
          </table:table-cell>
          <table:table-cell office:value-type="float" office:value="0" table:formula="of:=IF([.G170]=1;[.P169]+1;0)" table:style-name="ce1">
            <text:p>0</text:p>
          </table:table-cell>
          <table:table-cell office:value-type="float" office:value="0" table:formula="of:=IF([.H170]=1;[.Q169]+1;0)" table:style-name="ce1">
            <text:p>0</text:p>
          </table:table-cell>
          <table:table-cell office:value-type="float" office:value="0" table:formula="of:=IF([.I170]=1;[.R16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7T00:00:00" table:formula="of:=[.A170]+1" table:style-name="ce10">
            <text:p>Wed, 17 Jun 2026</text:p>
          </table:table-cell>
          <table:table-cell office:value-type="string" office:string-value="Wed" table:formula="of:=TEXT([.A171];&quot;ddd&quot;)" table:style-name="ce5">
            <text:p>Wed</text:p>
          </table:table-cell>
          <table:table-cell office:value-type="string" office:string-value="Jun" table:formula="of:=TEXT([.A171];&quot;mmm&quot;)" table:style-name="ce5">
            <text:p>Jun</text:p>
          </table:table-cell>
          <table:table-cell office:value-type="float" office:value="0" table:formula="of:=IF(INDEX([Tracker.$A$1:.$AG$120];6+9*(MONTH([.$A171])-1)+(COLUMN()-4);DAY([.$A171])+2)&lt;&gt;&quot;&quot;;1;0)" table:style-name="ce92"/>
          <table:table-cell office:value-type="float" office:value="0" table:formula="of:=IF(INDEX([Tracker.$A$1:.$AG$120];6+9*(MONTH([.$A171])-1)+(COLUMN()-4);DAY([.$A171])+2)&lt;&gt;&quot;&quot;;1;0)" table:style-name="ce92"/>
          <table:table-cell office:value-type="float" office:value="0" table:formula="of:=IF(INDEX([Tracker.$A$1:.$AG$120];6+9*(MONTH([.$A171])-1)+(COLUMN()-4);DAY([.$A171])+2)&lt;&gt;&quot;&quot;;1;0)" table:style-name="ce92"/>
          <table:table-cell office:value-type="float" office:value="0" table:formula="of:=IF(INDEX([Tracker.$A$1:.$AG$120];6+9*(MONTH([.$A171])-1)+(COLUMN()-4);DAY([.$A171])+2)&lt;&gt;&quot;&quot;;1;0)" table:style-name="ce92"/>
          <table:table-cell office:value-type="float" office:value="0" table:formula="of:=IF(INDEX([Tracker.$A$1:.$AG$120];6+9*(MONTH([.$A171])-1)+(COLUMN()-4);DAY([.$A171])+2)&lt;&gt;&quot;&quot;;1;0)" table:style-name="ce92"/>
          <table:table-cell office:value-type="float" office:value="0" table:formula="of:=IF(INDEX([Tracker.$A$1:.$AG$120];6+9*(MONTH([.$A171])-1)+(COLUMN()-4);DAY([.$A171])+2)&lt;&gt;&quot;&quot;;1;0)" table:style-name="ce92"/>
          <table:table-cell office:value-type="float" office:value="0" table:formula="of:=SUM([.D171:.I171])" table:style-name="ce6"/>
          <table:table-cell office:value-type="percentage" office:value="0" table:formula="of:=[.J171]/6" table:style-name="ce8">
            <text:p>0%</text:p>
          </table:table-cell>
          <table:table-cell table:style-name="ce1"/>
          <table:table-cell office:value-type="float" office:value="0" table:formula="of:=IF([.D171]=1;[.M170]+1;0)" table:style-name="ce1">
            <text:p>0</text:p>
          </table:table-cell>
          <table:table-cell office:value-type="float" office:value="0" table:formula="of:=IF([.E171]=1;[.N170]+1;0)" table:style-name="ce1">
            <text:p>0</text:p>
          </table:table-cell>
          <table:table-cell office:value-type="float" office:value="0" table:formula="of:=IF([.F171]=1;[.O170]+1;0)" table:style-name="ce1">
            <text:p>0</text:p>
          </table:table-cell>
          <table:table-cell office:value-type="float" office:value="0" table:formula="of:=IF([.G171]=1;[.P170]+1;0)" table:style-name="ce1">
            <text:p>0</text:p>
          </table:table-cell>
          <table:table-cell office:value-type="float" office:value="0" table:formula="of:=IF([.H171]=1;[.Q170]+1;0)" table:style-name="ce1">
            <text:p>0</text:p>
          </table:table-cell>
          <table:table-cell office:value-type="float" office:value="0" table:formula="of:=IF([.I171]=1;[.R17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8T00:00:00" table:formula="of:=[.A171]+1" table:style-name="ce10">
            <text:p>Thu, 18 Jun 2026</text:p>
          </table:table-cell>
          <table:table-cell office:value-type="string" office:string-value="Thu" table:formula="of:=TEXT([.A172];&quot;ddd&quot;)" table:style-name="ce5">
            <text:p>Thu</text:p>
          </table:table-cell>
          <table:table-cell office:value-type="string" office:string-value="Jun" table:formula="of:=TEXT([.A172];&quot;mmm&quot;)" table:style-name="ce5">
            <text:p>Jun</text:p>
          </table:table-cell>
          <table:table-cell office:value-type="float" office:value="0" table:formula="of:=IF(INDEX([Tracker.$A$1:.$AG$120];6+9*(MONTH([.$A172])-1)+(COLUMN()-4);DAY([.$A172])+2)&lt;&gt;&quot;&quot;;1;0)" table:style-name="ce92"/>
          <table:table-cell office:value-type="float" office:value="0" table:formula="of:=IF(INDEX([Tracker.$A$1:.$AG$120];6+9*(MONTH([.$A172])-1)+(COLUMN()-4);DAY([.$A172])+2)&lt;&gt;&quot;&quot;;1;0)" table:style-name="ce92"/>
          <table:table-cell office:value-type="float" office:value="0" table:formula="of:=IF(INDEX([Tracker.$A$1:.$AG$120];6+9*(MONTH([.$A172])-1)+(COLUMN()-4);DAY([.$A172])+2)&lt;&gt;&quot;&quot;;1;0)" table:style-name="ce92"/>
          <table:table-cell office:value-type="float" office:value="0" table:formula="of:=IF(INDEX([Tracker.$A$1:.$AG$120];6+9*(MONTH([.$A172])-1)+(COLUMN()-4);DAY([.$A172])+2)&lt;&gt;&quot;&quot;;1;0)" table:style-name="ce92"/>
          <table:table-cell office:value-type="float" office:value="0" table:formula="of:=IF(INDEX([Tracker.$A$1:.$AG$120];6+9*(MONTH([.$A172])-1)+(COLUMN()-4);DAY([.$A172])+2)&lt;&gt;&quot;&quot;;1;0)" table:style-name="ce92"/>
          <table:table-cell office:value-type="float" office:value="0" table:formula="of:=IF(INDEX([Tracker.$A$1:.$AG$120];6+9*(MONTH([.$A172])-1)+(COLUMN()-4);DAY([.$A172])+2)&lt;&gt;&quot;&quot;;1;0)" table:style-name="ce92"/>
          <table:table-cell office:value-type="float" office:value="0" table:formula="of:=SUM([.D172:.I172])" table:style-name="ce6"/>
          <table:table-cell office:value-type="percentage" office:value="0" table:formula="of:=[.J172]/6" table:style-name="ce8">
            <text:p>0%</text:p>
          </table:table-cell>
          <table:table-cell table:style-name="ce1"/>
          <table:table-cell office:value-type="float" office:value="0" table:formula="of:=IF([.D172]=1;[.M171]+1;0)" table:style-name="ce1">
            <text:p>0</text:p>
          </table:table-cell>
          <table:table-cell office:value-type="float" office:value="0" table:formula="of:=IF([.E172]=1;[.N171]+1;0)" table:style-name="ce1">
            <text:p>0</text:p>
          </table:table-cell>
          <table:table-cell office:value-type="float" office:value="0" table:formula="of:=IF([.F172]=1;[.O171]+1;0)" table:style-name="ce1">
            <text:p>0</text:p>
          </table:table-cell>
          <table:table-cell office:value-type="float" office:value="0" table:formula="of:=IF([.G172]=1;[.P171]+1;0)" table:style-name="ce1">
            <text:p>0</text:p>
          </table:table-cell>
          <table:table-cell office:value-type="float" office:value="0" table:formula="of:=IF([.H172]=1;[.Q171]+1;0)" table:style-name="ce1">
            <text:p>0</text:p>
          </table:table-cell>
          <table:table-cell office:value-type="float" office:value="0" table:formula="of:=IF([.I172]=1;[.R17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19T00:00:00" table:formula="of:=[.A172]+1" table:style-name="ce10">
            <text:p>Fri, 19 Jun 2026</text:p>
          </table:table-cell>
          <table:table-cell office:value-type="string" office:string-value="Fri" table:formula="of:=TEXT([.A173];&quot;ddd&quot;)" table:style-name="ce5">
            <text:p>Fri</text:p>
          </table:table-cell>
          <table:table-cell office:value-type="string" office:string-value="Jun" table:formula="of:=TEXT([.A173];&quot;mmm&quot;)" table:style-name="ce5">
            <text:p>Jun</text:p>
          </table:table-cell>
          <table:table-cell office:value-type="float" office:value="0" table:formula="of:=IF(INDEX([Tracker.$A$1:.$AG$120];6+9*(MONTH([.$A173])-1)+(COLUMN()-4);DAY([.$A173])+2)&lt;&gt;&quot;&quot;;1;0)" table:style-name="ce92"/>
          <table:table-cell office:value-type="float" office:value="0" table:formula="of:=IF(INDEX([Tracker.$A$1:.$AG$120];6+9*(MONTH([.$A173])-1)+(COLUMN()-4);DAY([.$A173])+2)&lt;&gt;&quot;&quot;;1;0)" table:style-name="ce92"/>
          <table:table-cell office:value-type="float" office:value="0" table:formula="of:=IF(INDEX([Tracker.$A$1:.$AG$120];6+9*(MONTH([.$A173])-1)+(COLUMN()-4);DAY([.$A173])+2)&lt;&gt;&quot;&quot;;1;0)" table:style-name="ce92"/>
          <table:table-cell office:value-type="float" office:value="0" table:formula="of:=IF(INDEX([Tracker.$A$1:.$AG$120];6+9*(MONTH([.$A173])-1)+(COLUMN()-4);DAY([.$A173])+2)&lt;&gt;&quot;&quot;;1;0)" table:style-name="ce92"/>
          <table:table-cell office:value-type="float" office:value="0" table:formula="of:=IF(INDEX([Tracker.$A$1:.$AG$120];6+9*(MONTH([.$A173])-1)+(COLUMN()-4);DAY([.$A173])+2)&lt;&gt;&quot;&quot;;1;0)" table:style-name="ce92"/>
          <table:table-cell office:value-type="float" office:value="0" table:formula="of:=IF(INDEX([Tracker.$A$1:.$AG$120];6+9*(MONTH([.$A173])-1)+(COLUMN()-4);DAY([.$A173])+2)&lt;&gt;&quot;&quot;;1;0)" table:style-name="ce92"/>
          <table:table-cell office:value-type="float" office:value="0" table:formula="of:=SUM([.D173:.I173])" table:style-name="ce6"/>
          <table:table-cell office:value-type="percentage" office:value="0" table:formula="of:=[.J173]/6" table:style-name="ce8">
            <text:p>0%</text:p>
          </table:table-cell>
          <table:table-cell table:style-name="ce1"/>
          <table:table-cell office:value-type="float" office:value="0" table:formula="of:=IF([.D173]=1;[.M172]+1;0)" table:style-name="ce1">
            <text:p>0</text:p>
          </table:table-cell>
          <table:table-cell office:value-type="float" office:value="0" table:formula="of:=IF([.E173]=1;[.N172]+1;0)" table:style-name="ce1">
            <text:p>0</text:p>
          </table:table-cell>
          <table:table-cell office:value-type="float" office:value="0" table:formula="of:=IF([.F173]=1;[.O172]+1;0)" table:style-name="ce1">
            <text:p>0</text:p>
          </table:table-cell>
          <table:table-cell office:value-type="float" office:value="0" table:formula="of:=IF([.G173]=1;[.P172]+1;0)" table:style-name="ce1">
            <text:p>0</text:p>
          </table:table-cell>
          <table:table-cell office:value-type="float" office:value="0" table:formula="of:=IF([.H173]=1;[.Q172]+1;0)" table:style-name="ce1">
            <text:p>0</text:p>
          </table:table-cell>
          <table:table-cell office:value-type="float" office:value="0" table:formula="of:=IF([.I173]=1;[.R17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0T00:00:00" table:formula="of:=[.A173]+1" table:style-name="ce10">
            <text:p>Sat, 20 Jun 2026</text:p>
          </table:table-cell>
          <table:table-cell office:value-type="string" office:string-value="Sat" table:formula="of:=TEXT([.A174];&quot;ddd&quot;)" table:style-name="ce5">
            <text:p>Sat</text:p>
          </table:table-cell>
          <table:table-cell office:value-type="string" office:string-value="Jun" table:formula="of:=TEXT([.A174];&quot;mmm&quot;)" table:style-name="ce5">
            <text:p>Jun</text:p>
          </table:table-cell>
          <table:table-cell office:value-type="float" office:value="0" table:formula="of:=IF(INDEX([Tracker.$A$1:.$AG$120];6+9*(MONTH([.$A174])-1)+(COLUMN()-4);DAY([.$A174])+2)&lt;&gt;&quot;&quot;;1;0)" table:style-name="ce92"/>
          <table:table-cell office:value-type="float" office:value="0" table:formula="of:=IF(INDEX([Tracker.$A$1:.$AG$120];6+9*(MONTH([.$A174])-1)+(COLUMN()-4);DAY([.$A174])+2)&lt;&gt;&quot;&quot;;1;0)" table:style-name="ce92"/>
          <table:table-cell office:value-type="float" office:value="0" table:formula="of:=IF(INDEX([Tracker.$A$1:.$AG$120];6+9*(MONTH([.$A174])-1)+(COLUMN()-4);DAY([.$A174])+2)&lt;&gt;&quot;&quot;;1;0)" table:style-name="ce92"/>
          <table:table-cell office:value-type="float" office:value="0" table:formula="of:=IF(INDEX([Tracker.$A$1:.$AG$120];6+9*(MONTH([.$A174])-1)+(COLUMN()-4);DAY([.$A174])+2)&lt;&gt;&quot;&quot;;1;0)" table:style-name="ce92"/>
          <table:table-cell office:value-type="float" office:value="0" table:formula="of:=IF(INDEX([Tracker.$A$1:.$AG$120];6+9*(MONTH([.$A174])-1)+(COLUMN()-4);DAY([.$A174])+2)&lt;&gt;&quot;&quot;;1;0)" table:style-name="ce92"/>
          <table:table-cell office:value-type="float" office:value="0" table:formula="of:=IF(INDEX([Tracker.$A$1:.$AG$120];6+9*(MONTH([.$A174])-1)+(COLUMN()-4);DAY([.$A174])+2)&lt;&gt;&quot;&quot;;1;0)" table:style-name="ce92"/>
          <table:table-cell office:value-type="float" office:value="0" table:formula="of:=SUM([.D174:.I174])" table:style-name="ce6"/>
          <table:table-cell office:value-type="percentage" office:value="0" table:formula="of:=[.J174]/6" table:style-name="ce8">
            <text:p>0%</text:p>
          </table:table-cell>
          <table:table-cell table:style-name="ce1"/>
          <table:table-cell office:value-type="float" office:value="0" table:formula="of:=IF([.D174]=1;[.M173]+1;0)" table:style-name="ce1">
            <text:p>0</text:p>
          </table:table-cell>
          <table:table-cell office:value-type="float" office:value="0" table:formula="of:=IF([.E174]=1;[.N173]+1;0)" table:style-name="ce1">
            <text:p>0</text:p>
          </table:table-cell>
          <table:table-cell office:value-type="float" office:value="0" table:formula="of:=IF([.F174]=1;[.O173]+1;0)" table:style-name="ce1">
            <text:p>0</text:p>
          </table:table-cell>
          <table:table-cell office:value-type="float" office:value="0" table:formula="of:=IF([.G174]=1;[.P173]+1;0)" table:style-name="ce1">
            <text:p>0</text:p>
          </table:table-cell>
          <table:table-cell office:value-type="float" office:value="0" table:formula="of:=IF([.H174]=1;[.Q173]+1;0)" table:style-name="ce1">
            <text:p>0</text:p>
          </table:table-cell>
          <table:table-cell office:value-type="float" office:value="0" table:formula="of:=IF([.I174]=1;[.R17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1T00:00:00" table:formula="of:=[.A174]+1" table:style-name="ce10">
            <text:p>Sun, 21 Jun 2026</text:p>
          </table:table-cell>
          <table:table-cell office:value-type="string" office:string-value="Sun" table:formula="of:=TEXT([.A175];&quot;ddd&quot;)" table:style-name="ce5">
            <text:p>Sun</text:p>
          </table:table-cell>
          <table:table-cell office:value-type="string" office:string-value="Jun" table:formula="of:=TEXT([.A175];&quot;mmm&quot;)" table:style-name="ce5">
            <text:p>Jun</text:p>
          </table:table-cell>
          <table:table-cell office:value-type="float" office:value="0" table:formula="of:=IF(INDEX([Tracker.$A$1:.$AG$120];6+9*(MONTH([.$A175])-1)+(COLUMN()-4);DAY([.$A175])+2)&lt;&gt;&quot;&quot;;1;0)" table:style-name="ce92"/>
          <table:table-cell office:value-type="float" office:value="0" table:formula="of:=IF(INDEX([Tracker.$A$1:.$AG$120];6+9*(MONTH([.$A175])-1)+(COLUMN()-4);DAY([.$A175])+2)&lt;&gt;&quot;&quot;;1;0)" table:style-name="ce92"/>
          <table:table-cell office:value-type="float" office:value="0" table:formula="of:=IF(INDEX([Tracker.$A$1:.$AG$120];6+9*(MONTH([.$A175])-1)+(COLUMN()-4);DAY([.$A175])+2)&lt;&gt;&quot;&quot;;1;0)" table:style-name="ce92"/>
          <table:table-cell office:value-type="float" office:value="0" table:formula="of:=IF(INDEX([Tracker.$A$1:.$AG$120];6+9*(MONTH([.$A175])-1)+(COLUMN()-4);DAY([.$A175])+2)&lt;&gt;&quot;&quot;;1;0)" table:style-name="ce92"/>
          <table:table-cell office:value-type="float" office:value="0" table:formula="of:=IF(INDEX([Tracker.$A$1:.$AG$120];6+9*(MONTH([.$A175])-1)+(COLUMN()-4);DAY([.$A175])+2)&lt;&gt;&quot;&quot;;1;0)" table:style-name="ce92"/>
          <table:table-cell office:value-type="float" office:value="0" table:formula="of:=IF(INDEX([Tracker.$A$1:.$AG$120];6+9*(MONTH([.$A175])-1)+(COLUMN()-4);DAY([.$A175])+2)&lt;&gt;&quot;&quot;;1;0)" table:style-name="ce92"/>
          <table:table-cell office:value-type="float" office:value="0" table:formula="of:=SUM([.D175:.I175])" table:style-name="ce6"/>
          <table:table-cell office:value-type="percentage" office:value="0" table:formula="of:=[.J175]/6" table:style-name="ce8">
            <text:p>0%</text:p>
          </table:table-cell>
          <table:table-cell table:style-name="ce1"/>
          <table:table-cell office:value-type="float" office:value="0" table:formula="of:=IF([.D175]=1;[.M174]+1;0)" table:style-name="ce1">
            <text:p>0</text:p>
          </table:table-cell>
          <table:table-cell office:value-type="float" office:value="0" table:formula="of:=IF([.E175]=1;[.N174]+1;0)" table:style-name="ce1">
            <text:p>0</text:p>
          </table:table-cell>
          <table:table-cell office:value-type="float" office:value="0" table:formula="of:=IF([.F175]=1;[.O174]+1;0)" table:style-name="ce1">
            <text:p>0</text:p>
          </table:table-cell>
          <table:table-cell office:value-type="float" office:value="0" table:formula="of:=IF([.G175]=1;[.P174]+1;0)" table:style-name="ce1">
            <text:p>0</text:p>
          </table:table-cell>
          <table:table-cell office:value-type="float" office:value="0" table:formula="of:=IF([.H175]=1;[.Q174]+1;0)" table:style-name="ce1">
            <text:p>0</text:p>
          </table:table-cell>
          <table:table-cell office:value-type="float" office:value="0" table:formula="of:=IF([.I175]=1;[.R17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2T00:00:00" table:formula="of:=[.A175]+1" table:style-name="ce10">
            <text:p>Mon, 22 Jun 2026</text:p>
          </table:table-cell>
          <table:table-cell office:value-type="string" office:string-value="Mon" table:formula="of:=TEXT([.A176];&quot;ddd&quot;)" table:style-name="ce5">
            <text:p>Mon</text:p>
          </table:table-cell>
          <table:table-cell office:value-type="string" office:string-value="Jun" table:formula="of:=TEXT([.A176];&quot;mmm&quot;)" table:style-name="ce5">
            <text:p>Jun</text:p>
          </table:table-cell>
          <table:table-cell office:value-type="float" office:value="0" table:formula="of:=IF(INDEX([Tracker.$A$1:.$AG$120];6+9*(MONTH([.$A176])-1)+(COLUMN()-4);DAY([.$A176])+2)&lt;&gt;&quot;&quot;;1;0)" table:style-name="ce92"/>
          <table:table-cell office:value-type="float" office:value="0" table:formula="of:=IF(INDEX([Tracker.$A$1:.$AG$120];6+9*(MONTH([.$A176])-1)+(COLUMN()-4);DAY([.$A176])+2)&lt;&gt;&quot;&quot;;1;0)" table:style-name="ce92"/>
          <table:table-cell office:value-type="float" office:value="0" table:formula="of:=IF(INDEX([Tracker.$A$1:.$AG$120];6+9*(MONTH([.$A176])-1)+(COLUMN()-4);DAY([.$A176])+2)&lt;&gt;&quot;&quot;;1;0)" table:style-name="ce92"/>
          <table:table-cell office:value-type="float" office:value="0" table:formula="of:=IF(INDEX([Tracker.$A$1:.$AG$120];6+9*(MONTH([.$A176])-1)+(COLUMN()-4);DAY([.$A176])+2)&lt;&gt;&quot;&quot;;1;0)" table:style-name="ce92"/>
          <table:table-cell office:value-type="float" office:value="0" table:formula="of:=IF(INDEX([Tracker.$A$1:.$AG$120];6+9*(MONTH([.$A176])-1)+(COLUMN()-4);DAY([.$A176])+2)&lt;&gt;&quot;&quot;;1;0)" table:style-name="ce92"/>
          <table:table-cell office:value-type="float" office:value="0" table:formula="of:=IF(INDEX([Tracker.$A$1:.$AG$120];6+9*(MONTH([.$A176])-1)+(COLUMN()-4);DAY([.$A176])+2)&lt;&gt;&quot;&quot;;1;0)" table:style-name="ce92"/>
          <table:table-cell office:value-type="float" office:value="0" table:formula="of:=SUM([.D176:.I176])" table:style-name="ce6"/>
          <table:table-cell office:value-type="percentage" office:value="0" table:formula="of:=[.J176]/6" table:style-name="ce8">
            <text:p>0%</text:p>
          </table:table-cell>
          <table:table-cell table:style-name="ce1"/>
          <table:table-cell office:value-type="float" office:value="0" table:formula="of:=IF([.D176]=1;[.M175]+1;0)" table:style-name="ce1">
            <text:p>0</text:p>
          </table:table-cell>
          <table:table-cell office:value-type="float" office:value="0" table:formula="of:=IF([.E176]=1;[.N175]+1;0)" table:style-name="ce1">
            <text:p>0</text:p>
          </table:table-cell>
          <table:table-cell office:value-type="float" office:value="0" table:formula="of:=IF([.F176]=1;[.O175]+1;0)" table:style-name="ce1">
            <text:p>0</text:p>
          </table:table-cell>
          <table:table-cell office:value-type="float" office:value="0" table:formula="of:=IF([.G176]=1;[.P175]+1;0)" table:style-name="ce1">
            <text:p>0</text:p>
          </table:table-cell>
          <table:table-cell office:value-type="float" office:value="0" table:formula="of:=IF([.H176]=1;[.Q175]+1;0)" table:style-name="ce1">
            <text:p>0</text:p>
          </table:table-cell>
          <table:table-cell office:value-type="float" office:value="0" table:formula="of:=IF([.I176]=1;[.R17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3T00:00:00" table:formula="of:=[.A176]+1" table:style-name="ce10">
            <text:p>Tue, 23 Jun 2026</text:p>
          </table:table-cell>
          <table:table-cell office:value-type="string" office:string-value="Tue" table:formula="of:=TEXT([.A177];&quot;ddd&quot;)" table:style-name="ce5">
            <text:p>Tue</text:p>
          </table:table-cell>
          <table:table-cell office:value-type="string" office:string-value="Jun" table:formula="of:=TEXT([.A177];&quot;mmm&quot;)" table:style-name="ce5">
            <text:p>Jun</text:p>
          </table:table-cell>
          <table:table-cell office:value-type="float" office:value="0" table:formula="of:=IF(INDEX([Tracker.$A$1:.$AG$120];6+9*(MONTH([.$A177])-1)+(COLUMN()-4);DAY([.$A177])+2)&lt;&gt;&quot;&quot;;1;0)" table:style-name="ce92"/>
          <table:table-cell office:value-type="float" office:value="0" table:formula="of:=IF(INDEX([Tracker.$A$1:.$AG$120];6+9*(MONTH([.$A177])-1)+(COLUMN()-4);DAY([.$A177])+2)&lt;&gt;&quot;&quot;;1;0)" table:style-name="ce92"/>
          <table:table-cell office:value-type="float" office:value="0" table:formula="of:=IF(INDEX([Tracker.$A$1:.$AG$120];6+9*(MONTH([.$A177])-1)+(COLUMN()-4);DAY([.$A177])+2)&lt;&gt;&quot;&quot;;1;0)" table:style-name="ce92"/>
          <table:table-cell office:value-type="float" office:value="0" table:formula="of:=IF(INDEX([Tracker.$A$1:.$AG$120];6+9*(MONTH([.$A177])-1)+(COLUMN()-4);DAY([.$A177])+2)&lt;&gt;&quot;&quot;;1;0)" table:style-name="ce92"/>
          <table:table-cell office:value-type="float" office:value="0" table:formula="of:=IF(INDEX([Tracker.$A$1:.$AG$120];6+9*(MONTH([.$A177])-1)+(COLUMN()-4);DAY([.$A177])+2)&lt;&gt;&quot;&quot;;1;0)" table:style-name="ce92"/>
          <table:table-cell office:value-type="float" office:value="0" table:formula="of:=IF(INDEX([Tracker.$A$1:.$AG$120];6+9*(MONTH([.$A177])-1)+(COLUMN()-4);DAY([.$A177])+2)&lt;&gt;&quot;&quot;;1;0)" table:style-name="ce92"/>
          <table:table-cell office:value-type="float" office:value="0" table:formula="of:=SUM([.D177:.I177])" table:style-name="ce6"/>
          <table:table-cell office:value-type="percentage" office:value="0" table:formula="of:=[.J177]/6" table:style-name="ce8">
            <text:p>0%</text:p>
          </table:table-cell>
          <table:table-cell table:style-name="ce1"/>
          <table:table-cell office:value-type="float" office:value="0" table:formula="of:=IF([.D177]=1;[.M176]+1;0)" table:style-name="ce1">
            <text:p>0</text:p>
          </table:table-cell>
          <table:table-cell office:value-type="float" office:value="0" table:formula="of:=IF([.E177]=1;[.N176]+1;0)" table:style-name="ce1">
            <text:p>0</text:p>
          </table:table-cell>
          <table:table-cell office:value-type="float" office:value="0" table:formula="of:=IF([.F177]=1;[.O176]+1;0)" table:style-name="ce1">
            <text:p>0</text:p>
          </table:table-cell>
          <table:table-cell office:value-type="float" office:value="0" table:formula="of:=IF([.G177]=1;[.P176]+1;0)" table:style-name="ce1">
            <text:p>0</text:p>
          </table:table-cell>
          <table:table-cell office:value-type="float" office:value="0" table:formula="of:=IF([.H177]=1;[.Q176]+1;0)" table:style-name="ce1">
            <text:p>0</text:p>
          </table:table-cell>
          <table:table-cell office:value-type="float" office:value="0" table:formula="of:=IF([.I177]=1;[.R17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4T00:00:00" table:formula="of:=[.A177]+1" table:style-name="ce10">
            <text:p>Wed, 24 Jun 2026</text:p>
          </table:table-cell>
          <table:table-cell office:value-type="string" office:string-value="Wed" table:formula="of:=TEXT([.A178];&quot;ddd&quot;)" table:style-name="ce5">
            <text:p>Wed</text:p>
          </table:table-cell>
          <table:table-cell office:value-type="string" office:string-value="Jun" table:formula="of:=TEXT([.A178];&quot;mmm&quot;)" table:style-name="ce5">
            <text:p>Jun</text:p>
          </table:table-cell>
          <table:table-cell office:value-type="float" office:value="0" table:formula="of:=IF(INDEX([Tracker.$A$1:.$AG$120];6+9*(MONTH([.$A178])-1)+(COLUMN()-4);DAY([.$A178])+2)&lt;&gt;&quot;&quot;;1;0)" table:style-name="ce92"/>
          <table:table-cell office:value-type="float" office:value="0" table:formula="of:=IF(INDEX([Tracker.$A$1:.$AG$120];6+9*(MONTH([.$A178])-1)+(COLUMN()-4);DAY([.$A178])+2)&lt;&gt;&quot;&quot;;1;0)" table:style-name="ce92"/>
          <table:table-cell office:value-type="float" office:value="0" table:formula="of:=IF(INDEX([Tracker.$A$1:.$AG$120];6+9*(MONTH([.$A178])-1)+(COLUMN()-4);DAY([.$A178])+2)&lt;&gt;&quot;&quot;;1;0)" table:style-name="ce92"/>
          <table:table-cell office:value-type="float" office:value="0" table:formula="of:=IF(INDEX([Tracker.$A$1:.$AG$120];6+9*(MONTH([.$A178])-1)+(COLUMN()-4);DAY([.$A178])+2)&lt;&gt;&quot;&quot;;1;0)" table:style-name="ce92"/>
          <table:table-cell office:value-type="float" office:value="0" table:formula="of:=IF(INDEX([Tracker.$A$1:.$AG$120];6+9*(MONTH([.$A178])-1)+(COLUMN()-4);DAY([.$A178])+2)&lt;&gt;&quot;&quot;;1;0)" table:style-name="ce92"/>
          <table:table-cell office:value-type="float" office:value="0" table:formula="of:=IF(INDEX([Tracker.$A$1:.$AG$120];6+9*(MONTH([.$A178])-1)+(COLUMN()-4);DAY([.$A178])+2)&lt;&gt;&quot;&quot;;1;0)" table:style-name="ce92"/>
          <table:table-cell office:value-type="float" office:value="0" table:formula="of:=SUM([.D178:.I178])" table:style-name="ce6"/>
          <table:table-cell office:value-type="percentage" office:value="0" table:formula="of:=[.J178]/6" table:style-name="ce8">
            <text:p>0%</text:p>
          </table:table-cell>
          <table:table-cell table:style-name="ce1"/>
          <table:table-cell office:value-type="float" office:value="0" table:formula="of:=IF([.D178]=1;[.M177]+1;0)" table:style-name="ce1">
            <text:p>0</text:p>
          </table:table-cell>
          <table:table-cell office:value-type="float" office:value="0" table:formula="of:=IF([.E178]=1;[.N177]+1;0)" table:style-name="ce1">
            <text:p>0</text:p>
          </table:table-cell>
          <table:table-cell office:value-type="float" office:value="0" table:formula="of:=IF([.F178]=1;[.O177]+1;0)" table:style-name="ce1">
            <text:p>0</text:p>
          </table:table-cell>
          <table:table-cell office:value-type="float" office:value="0" table:formula="of:=IF([.G178]=1;[.P177]+1;0)" table:style-name="ce1">
            <text:p>0</text:p>
          </table:table-cell>
          <table:table-cell office:value-type="float" office:value="0" table:formula="of:=IF([.H178]=1;[.Q177]+1;0)" table:style-name="ce1">
            <text:p>0</text:p>
          </table:table-cell>
          <table:table-cell office:value-type="float" office:value="0" table:formula="of:=IF([.I178]=1;[.R17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5T00:00:00" table:formula="of:=[.A178]+1" table:style-name="ce10">
            <text:p>Thu, 25 Jun 2026</text:p>
          </table:table-cell>
          <table:table-cell office:value-type="string" office:string-value="Thu" table:formula="of:=TEXT([.A179];&quot;ddd&quot;)" table:style-name="ce5">
            <text:p>Thu</text:p>
          </table:table-cell>
          <table:table-cell office:value-type="string" office:string-value="Jun" table:formula="of:=TEXT([.A179];&quot;mmm&quot;)" table:style-name="ce5">
            <text:p>Jun</text:p>
          </table:table-cell>
          <table:table-cell office:value-type="float" office:value="0" table:formula="of:=IF(INDEX([Tracker.$A$1:.$AG$120];6+9*(MONTH([.$A179])-1)+(COLUMN()-4);DAY([.$A179])+2)&lt;&gt;&quot;&quot;;1;0)" table:style-name="ce92"/>
          <table:table-cell office:value-type="float" office:value="0" table:formula="of:=IF(INDEX([Tracker.$A$1:.$AG$120];6+9*(MONTH([.$A179])-1)+(COLUMN()-4);DAY([.$A179])+2)&lt;&gt;&quot;&quot;;1;0)" table:style-name="ce92"/>
          <table:table-cell office:value-type="float" office:value="0" table:formula="of:=IF(INDEX([Tracker.$A$1:.$AG$120];6+9*(MONTH([.$A179])-1)+(COLUMN()-4);DAY([.$A179])+2)&lt;&gt;&quot;&quot;;1;0)" table:style-name="ce92"/>
          <table:table-cell office:value-type="float" office:value="0" table:formula="of:=IF(INDEX([Tracker.$A$1:.$AG$120];6+9*(MONTH([.$A179])-1)+(COLUMN()-4);DAY([.$A179])+2)&lt;&gt;&quot;&quot;;1;0)" table:style-name="ce92"/>
          <table:table-cell office:value-type="float" office:value="0" table:formula="of:=IF(INDEX([Tracker.$A$1:.$AG$120];6+9*(MONTH([.$A179])-1)+(COLUMN()-4);DAY([.$A179])+2)&lt;&gt;&quot;&quot;;1;0)" table:style-name="ce92"/>
          <table:table-cell office:value-type="float" office:value="0" table:formula="of:=IF(INDEX([Tracker.$A$1:.$AG$120];6+9*(MONTH([.$A179])-1)+(COLUMN()-4);DAY([.$A179])+2)&lt;&gt;&quot;&quot;;1;0)" table:style-name="ce92"/>
          <table:table-cell office:value-type="float" office:value="0" table:formula="of:=SUM([.D179:.I179])" table:style-name="ce6"/>
          <table:table-cell office:value-type="percentage" office:value="0" table:formula="of:=[.J179]/6" table:style-name="ce8">
            <text:p>0%</text:p>
          </table:table-cell>
          <table:table-cell table:style-name="ce1"/>
          <table:table-cell office:value-type="float" office:value="0" table:formula="of:=IF([.D179]=1;[.M178]+1;0)" table:style-name="ce1">
            <text:p>0</text:p>
          </table:table-cell>
          <table:table-cell office:value-type="float" office:value="0" table:formula="of:=IF([.E179]=1;[.N178]+1;0)" table:style-name="ce1">
            <text:p>0</text:p>
          </table:table-cell>
          <table:table-cell office:value-type="float" office:value="0" table:formula="of:=IF([.F179]=1;[.O178]+1;0)" table:style-name="ce1">
            <text:p>0</text:p>
          </table:table-cell>
          <table:table-cell office:value-type="float" office:value="0" table:formula="of:=IF([.G179]=1;[.P178]+1;0)" table:style-name="ce1">
            <text:p>0</text:p>
          </table:table-cell>
          <table:table-cell office:value-type="float" office:value="0" table:formula="of:=IF([.H179]=1;[.Q178]+1;0)" table:style-name="ce1">
            <text:p>0</text:p>
          </table:table-cell>
          <table:table-cell office:value-type="float" office:value="0" table:formula="of:=IF([.I179]=1;[.R17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6T00:00:00" table:formula="of:=[.A179]+1" table:style-name="ce10">
            <text:p>Fri, 26 Jun 2026</text:p>
          </table:table-cell>
          <table:table-cell office:value-type="string" office:string-value="Fri" table:formula="of:=TEXT([.A180];&quot;ddd&quot;)" table:style-name="ce5">
            <text:p>Fri</text:p>
          </table:table-cell>
          <table:table-cell office:value-type="string" office:string-value="Jun" table:formula="of:=TEXT([.A180];&quot;mmm&quot;)" table:style-name="ce5">
            <text:p>Jun</text:p>
          </table:table-cell>
          <table:table-cell office:value-type="float" office:value="0" table:formula="of:=IF(INDEX([Tracker.$A$1:.$AG$120];6+9*(MONTH([.$A180])-1)+(COLUMN()-4);DAY([.$A180])+2)&lt;&gt;&quot;&quot;;1;0)" table:style-name="ce92"/>
          <table:table-cell office:value-type="float" office:value="0" table:formula="of:=IF(INDEX([Tracker.$A$1:.$AG$120];6+9*(MONTH([.$A180])-1)+(COLUMN()-4);DAY([.$A180])+2)&lt;&gt;&quot;&quot;;1;0)" table:style-name="ce92"/>
          <table:table-cell office:value-type="float" office:value="0" table:formula="of:=IF(INDEX([Tracker.$A$1:.$AG$120];6+9*(MONTH([.$A180])-1)+(COLUMN()-4);DAY([.$A180])+2)&lt;&gt;&quot;&quot;;1;0)" table:style-name="ce92"/>
          <table:table-cell office:value-type="float" office:value="0" table:formula="of:=IF(INDEX([Tracker.$A$1:.$AG$120];6+9*(MONTH([.$A180])-1)+(COLUMN()-4);DAY([.$A180])+2)&lt;&gt;&quot;&quot;;1;0)" table:style-name="ce92"/>
          <table:table-cell office:value-type="float" office:value="0" table:formula="of:=IF(INDEX([Tracker.$A$1:.$AG$120];6+9*(MONTH([.$A180])-1)+(COLUMN()-4);DAY([.$A180])+2)&lt;&gt;&quot;&quot;;1;0)" table:style-name="ce92"/>
          <table:table-cell office:value-type="float" office:value="0" table:formula="of:=IF(INDEX([Tracker.$A$1:.$AG$120];6+9*(MONTH([.$A180])-1)+(COLUMN()-4);DAY([.$A180])+2)&lt;&gt;&quot;&quot;;1;0)" table:style-name="ce92"/>
          <table:table-cell office:value-type="float" office:value="0" table:formula="of:=SUM([.D180:.I180])" table:style-name="ce6"/>
          <table:table-cell office:value-type="percentage" office:value="0" table:formula="of:=[.J180]/6" table:style-name="ce8">
            <text:p>0%</text:p>
          </table:table-cell>
          <table:table-cell table:style-name="ce1"/>
          <table:table-cell office:value-type="float" office:value="0" table:formula="of:=IF([.D180]=1;[.M179]+1;0)" table:style-name="ce1">
            <text:p>0</text:p>
          </table:table-cell>
          <table:table-cell office:value-type="float" office:value="0" table:formula="of:=IF([.E180]=1;[.N179]+1;0)" table:style-name="ce1">
            <text:p>0</text:p>
          </table:table-cell>
          <table:table-cell office:value-type="float" office:value="0" table:formula="of:=IF([.F180]=1;[.O179]+1;0)" table:style-name="ce1">
            <text:p>0</text:p>
          </table:table-cell>
          <table:table-cell office:value-type="float" office:value="0" table:formula="of:=IF([.G180]=1;[.P179]+1;0)" table:style-name="ce1">
            <text:p>0</text:p>
          </table:table-cell>
          <table:table-cell office:value-type="float" office:value="0" table:formula="of:=IF([.H180]=1;[.Q179]+1;0)" table:style-name="ce1">
            <text:p>0</text:p>
          </table:table-cell>
          <table:table-cell office:value-type="float" office:value="0" table:formula="of:=IF([.I180]=1;[.R17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7T00:00:00" table:formula="of:=[.A180]+1" table:style-name="ce10">
            <text:p>Sat, 27 Jun 2026</text:p>
          </table:table-cell>
          <table:table-cell office:value-type="string" office:string-value="Sat" table:formula="of:=TEXT([.A181];&quot;ddd&quot;)" table:style-name="ce5">
            <text:p>Sat</text:p>
          </table:table-cell>
          <table:table-cell office:value-type="string" office:string-value="Jun" table:formula="of:=TEXT([.A181];&quot;mmm&quot;)" table:style-name="ce5">
            <text:p>Jun</text:p>
          </table:table-cell>
          <table:table-cell office:value-type="float" office:value="0" table:formula="of:=IF(INDEX([Tracker.$A$1:.$AG$120];6+9*(MONTH([.$A181])-1)+(COLUMN()-4);DAY([.$A181])+2)&lt;&gt;&quot;&quot;;1;0)" table:style-name="ce92"/>
          <table:table-cell office:value-type="float" office:value="0" table:formula="of:=IF(INDEX([Tracker.$A$1:.$AG$120];6+9*(MONTH([.$A181])-1)+(COLUMN()-4);DAY([.$A181])+2)&lt;&gt;&quot;&quot;;1;0)" table:style-name="ce92"/>
          <table:table-cell office:value-type="float" office:value="0" table:formula="of:=IF(INDEX([Tracker.$A$1:.$AG$120];6+9*(MONTH([.$A181])-1)+(COLUMN()-4);DAY([.$A181])+2)&lt;&gt;&quot;&quot;;1;0)" table:style-name="ce92"/>
          <table:table-cell office:value-type="float" office:value="0" table:formula="of:=IF(INDEX([Tracker.$A$1:.$AG$120];6+9*(MONTH([.$A181])-1)+(COLUMN()-4);DAY([.$A181])+2)&lt;&gt;&quot;&quot;;1;0)" table:style-name="ce92"/>
          <table:table-cell office:value-type="float" office:value="0" table:formula="of:=IF(INDEX([Tracker.$A$1:.$AG$120];6+9*(MONTH([.$A181])-1)+(COLUMN()-4);DAY([.$A181])+2)&lt;&gt;&quot;&quot;;1;0)" table:style-name="ce92"/>
          <table:table-cell office:value-type="float" office:value="0" table:formula="of:=IF(INDEX([Tracker.$A$1:.$AG$120];6+9*(MONTH([.$A181])-1)+(COLUMN()-4);DAY([.$A181])+2)&lt;&gt;&quot;&quot;;1;0)" table:style-name="ce92"/>
          <table:table-cell office:value-type="float" office:value="0" table:formula="of:=SUM([.D181:.I181])" table:style-name="ce6"/>
          <table:table-cell office:value-type="percentage" office:value="0" table:formula="of:=[.J181]/6" table:style-name="ce8">
            <text:p>0%</text:p>
          </table:table-cell>
          <table:table-cell table:style-name="ce1"/>
          <table:table-cell office:value-type="float" office:value="0" table:formula="of:=IF([.D181]=1;[.M180]+1;0)" table:style-name="ce1">
            <text:p>0</text:p>
          </table:table-cell>
          <table:table-cell office:value-type="float" office:value="0" table:formula="of:=IF([.E181]=1;[.N180]+1;0)" table:style-name="ce1">
            <text:p>0</text:p>
          </table:table-cell>
          <table:table-cell office:value-type="float" office:value="0" table:formula="of:=IF([.F181]=1;[.O180]+1;0)" table:style-name="ce1">
            <text:p>0</text:p>
          </table:table-cell>
          <table:table-cell office:value-type="float" office:value="0" table:formula="of:=IF([.G181]=1;[.P180]+1;0)" table:style-name="ce1">
            <text:p>0</text:p>
          </table:table-cell>
          <table:table-cell office:value-type="float" office:value="0" table:formula="of:=IF([.H181]=1;[.Q180]+1;0)" table:style-name="ce1">
            <text:p>0</text:p>
          </table:table-cell>
          <table:table-cell office:value-type="float" office:value="0" table:formula="of:=IF([.I181]=1;[.R18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8T00:00:00" table:formula="of:=[.A181]+1" table:style-name="ce10">
            <text:p>Sun, 28 Jun 2026</text:p>
          </table:table-cell>
          <table:table-cell office:value-type="string" office:string-value="Sun" table:formula="of:=TEXT([.A182];&quot;ddd&quot;)" table:style-name="ce5">
            <text:p>Sun</text:p>
          </table:table-cell>
          <table:table-cell office:value-type="string" office:string-value="Jun" table:formula="of:=TEXT([.A182];&quot;mmm&quot;)" table:style-name="ce5">
            <text:p>Jun</text:p>
          </table:table-cell>
          <table:table-cell office:value-type="float" office:value="0" table:formula="of:=IF(INDEX([Tracker.$A$1:.$AG$120];6+9*(MONTH([.$A182])-1)+(COLUMN()-4);DAY([.$A182])+2)&lt;&gt;&quot;&quot;;1;0)" table:style-name="ce92"/>
          <table:table-cell office:value-type="float" office:value="0" table:formula="of:=IF(INDEX([Tracker.$A$1:.$AG$120];6+9*(MONTH([.$A182])-1)+(COLUMN()-4);DAY([.$A182])+2)&lt;&gt;&quot;&quot;;1;0)" table:style-name="ce92"/>
          <table:table-cell office:value-type="float" office:value="0" table:formula="of:=IF(INDEX([Tracker.$A$1:.$AG$120];6+9*(MONTH([.$A182])-1)+(COLUMN()-4);DAY([.$A182])+2)&lt;&gt;&quot;&quot;;1;0)" table:style-name="ce92"/>
          <table:table-cell office:value-type="float" office:value="0" table:formula="of:=IF(INDEX([Tracker.$A$1:.$AG$120];6+9*(MONTH([.$A182])-1)+(COLUMN()-4);DAY([.$A182])+2)&lt;&gt;&quot;&quot;;1;0)" table:style-name="ce92"/>
          <table:table-cell office:value-type="float" office:value="0" table:formula="of:=IF(INDEX([Tracker.$A$1:.$AG$120];6+9*(MONTH([.$A182])-1)+(COLUMN()-4);DAY([.$A182])+2)&lt;&gt;&quot;&quot;;1;0)" table:style-name="ce92"/>
          <table:table-cell office:value-type="float" office:value="0" table:formula="of:=IF(INDEX([Tracker.$A$1:.$AG$120];6+9*(MONTH([.$A182])-1)+(COLUMN()-4);DAY([.$A182])+2)&lt;&gt;&quot;&quot;;1;0)" table:style-name="ce92"/>
          <table:table-cell office:value-type="float" office:value="0" table:formula="of:=SUM([.D182:.I182])" table:style-name="ce6"/>
          <table:table-cell office:value-type="percentage" office:value="0" table:formula="of:=[.J182]/6" table:style-name="ce8">
            <text:p>0%</text:p>
          </table:table-cell>
          <table:table-cell table:style-name="ce1"/>
          <table:table-cell office:value-type="float" office:value="0" table:formula="of:=IF([.D182]=1;[.M181]+1;0)" table:style-name="ce1">
            <text:p>0</text:p>
          </table:table-cell>
          <table:table-cell office:value-type="float" office:value="0" table:formula="of:=IF([.E182]=1;[.N181]+1;0)" table:style-name="ce1">
            <text:p>0</text:p>
          </table:table-cell>
          <table:table-cell office:value-type="float" office:value="0" table:formula="of:=IF([.F182]=1;[.O181]+1;0)" table:style-name="ce1">
            <text:p>0</text:p>
          </table:table-cell>
          <table:table-cell office:value-type="float" office:value="0" table:formula="of:=IF([.G182]=1;[.P181]+1;0)" table:style-name="ce1">
            <text:p>0</text:p>
          </table:table-cell>
          <table:table-cell office:value-type="float" office:value="0" table:formula="of:=IF([.H182]=1;[.Q181]+1;0)" table:style-name="ce1">
            <text:p>0</text:p>
          </table:table-cell>
          <table:table-cell office:value-type="float" office:value="0" table:formula="of:=IF([.I182]=1;[.R18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29T00:00:00" table:formula="of:=[.A182]+1" table:style-name="ce10">
            <text:p>Mon, 29 Jun 2026</text:p>
          </table:table-cell>
          <table:table-cell office:value-type="string" office:string-value="Mon" table:formula="of:=TEXT([.A183];&quot;ddd&quot;)" table:style-name="ce5">
            <text:p>Mon</text:p>
          </table:table-cell>
          <table:table-cell office:value-type="string" office:string-value="Jun" table:formula="of:=TEXT([.A183];&quot;mmm&quot;)" table:style-name="ce5">
            <text:p>Jun</text:p>
          </table:table-cell>
          <table:table-cell office:value-type="float" office:value="0" table:formula="of:=IF(INDEX([Tracker.$A$1:.$AG$120];6+9*(MONTH([.$A183])-1)+(COLUMN()-4);DAY([.$A183])+2)&lt;&gt;&quot;&quot;;1;0)" table:style-name="ce92"/>
          <table:table-cell office:value-type="float" office:value="0" table:formula="of:=IF(INDEX([Tracker.$A$1:.$AG$120];6+9*(MONTH([.$A183])-1)+(COLUMN()-4);DAY([.$A183])+2)&lt;&gt;&quot;&quot;;1;0)" table:style-name="ce92"/>
          <table:table-cell office:value-type="float" office:value="0" table:formula="of:=IF(INDEX([Tracker.$A$1:.$AG$120];6+9*(MONTH([.$A183])-1)+(COLUMN()-4);DAY([.$A183])+2)&lt;&gt;&quot;&quot;;1;0)" table:style-name="ce92"/>
          <table:table-cell office:value-type="float" office:value="0" table:formula="of:=IF(INDEX([Tracker.$A$1:.$AG$120];6+9*(MONTH([.$A183])-1)+(COLUMN()-4);DAY([.$A183])+2)&lt;&gt;&quot;&quot;;1;0)" table:style-name="ce92"/>
          <table:table-cell office:value-type="float" office:value="0" table:formula="of:=IF(INDEX([Tracker.$A$1:.$AG$120];6+9*(MONTH([.$A183])-1)+(COLUMN()-4);DAY([.$A183])+2)&lt;&gt;&quot;&quot;;1;0)" table:style-name="ce92"/>
          <table:table-cell office:value-type="float" office:value="0" table:formula="of:=IF(INDEX([Tracker.$A$1:.$AG$120];6+9*(MONTH([.$A183])-1)+(COLUMN()-4);DAY([.$A183])+2)&lt;&gt;&quot;&quot;;1;0)" table:style-name="ce92"/>
          <table:table-cell office:value-type="float" office:value="0" table:formula="of:=SUM([.D183:.I183])" table:style-name="ce6"/>
          <table:table-cell office:value-type="percentage" office:value="0" table:formula="of:=[.J183]/6" table:style-name="ce8">
            <text:p>0%</text:p>
          </table:table-cell>
          <table:table-cell table:style-name="ce1"/>
          <table:table-cell office:value-type="float" office:value="0" table:formula="of:=IF([.D183]=1;[.M182]+1;0)" table:style-name="ce1">
            <text:p>0</text:p>
          </table:table-cell>
          <table:table-cell office:value-type="float" office:value="0" table:formula="of:=IF([.E183]=1;[.N182]+1;0)" table:style-name="ce1">
            <text:p>0</text:p>
          </table:table-cell>
          <table:table-cell office:value-type="float" office:value="0" table:formula="of:=IF([.F183]=1;[.O182]+1;0)" table:style-name="ce1">
            <text:p>0</text:p>
          </table:table-cell>
          <table:table-cell office:value-type="float" office:value="0" table:formula="of:=IF([.G183]=1;[.P182]+1;0)" table:style-name="ce1">
            <text:p>0</text:p>
          </table:table-cell>
          <table:table-cell office:value-type="float" office:value="0" table:formula="of:=IF([.H183]=1;[.Q182]+1;0)" table:style-name="ce1">
            <text:p>0</text:p>
          </table:table-cell>
          <table:table-cell office:value-type="float" office:value="0" table:formula="of:=IF([.I183]=1;[.R18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6-30T00:00:00" table:formula="of:=[.A183]+1" table:style-name="ce10">
            <text:p>Tue, 30 Jun 2026</text:p>
          </table:table-cell>
          <table:table-cell office:value-type="string" office:string-value="Tue" table:formula="of:=TEXT([.A184];&quot;ddd&quot;)" table:style-name="ce5">
            <text:p>Tue</text:p>
          </table:table-cell>
          <table:table-cell office:value-type="string" office:string-value="Jun" table:formula="of:=TEXT([.A184];&quot;mmm&quot;)" table:style-name="ce5">
            <text:p>Jun</text:p>
          </table:table-cell>
          <table:table-cell office:value-type="float" office:value="0" table:formula="of:=IF(INDEX([Tracker.$A$1:.$AG$120];6+9*(MONTH([.$A184])-1)+(COLUMN()-4);DAY([.$A184])+2)&lt;&gt;&quot;&quot;;1;0)" table:style-name="ce92"/>
          <table:table-cell office:value-type="float" office:value="0" table:formula="of:=IF(INDEX([Tracker.$A$1:.$AG$120];6+9*(MONTH([.$A184])-1)+(COLUMN()-4);DAY([.$A184])+2)&lt;&gt;&quot;&quot;;1;0)" table:style-name="ce92"/>
          <table:table-cell office:value-type="float" office:value="0" table:formula="of:=IF(INDEX([Tracker.$A$1:.$AG$120];6+9*(MONTH([.$A184])-1)+(COLUMN()-4);DAY([.$A184])+2)&lt;&gt;&quot;&quot;;1;0)" table:style-name="ce92"/>
          <table:table-cell office:value-type="float" office:value="0" table:formula="of:=IF(INDEX([Tracker.$A$1:.$AG$120];6+9*(MONTH([.$A184])-1)+(COLUMN()-4);DAY([.$A184])+2)&lt;&gt;&quot;&quot;;1;0)" table:style-name="ce92"/>
          <table:table-cell office:value-type="float" office:value="0" table:formula="of:=IF(INDEX([Tracker.$A$1:.$AG$120];6+9*(MONTH([.$A184])-1)+(COLUMN()-4);DAY([.$A184])+2)&lt;&gt;&quot;&quot;;1;0)" table:style-name="ce92"/>
          <table:table-cell office:value-type="float" office:value="0" table:formula="of:=IF(INDEX([Tracker.$A$1:.$AG$120];6+9*(MONTH([.$A184])-1)+(COLUMN()-4);DAY([.$A184])+2)&lt;&gt;&quot;&quot;;1;0)" table:style-name="ce92"/>
          <table:table-cell office:value-type="float" office:value="0" table:formula="of:=SUM([.D184:.I184])" table:style-name="ce6"/>
          <table:table-cell office:value-type="percentage" office:value="0" table:formula="of:=[.J184]/6" table:style-name="ce8">
            <text:p>0%</text:p>
          </table:table-cell>
          <table:table-cell table:style-name="ce1"/>
          <table:table-cell office:value-type="float" office:value="0" table:formula="of:=IF([.D184]=1;[.M183]+1;0)" table:style-name="ce1">
            <text:p>0</text:p>
          </table:table-cell>
          <table:table-cell office:value-type="float" office:value="0" table:formula="of:=IF([.E184]=1;[.N183]+1;0)" table:style-name="ce1">
            <text:p>0</text:p>
          </table:table-cell>
          <table:table-cell office:value-type="float" office:value="0" table:formula="of:=IF([.F184]=1;[.O183]+1;0)" table:style-name="ce1">
            <text:p>0</text:p>
          </table:table-cell>
          <table:table-cell office:value-type="float" office:value="0" table:formula="of:=IF([.G184]=1;[.P183]+1;0)" table:style-name="ce1">
            <text:p>0</text:p>
          </table:table-cell>
          <table:table-cell office:value-type="float" office:value="0" table:formula="of:=IF([.H184]=1;[.Q183]+1;0)" table:style-name="ce1">
            <text:p>0</text:p>
          </table:table-cell>
          <table:table-cell office:value-type="float" office:value="0" table:formula="of:=IF([.I184]=1;[.R18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1T00:00:00" table:formula="of:=[.A184]+1" table:style-name="ce10">
            <text:p>Wed, 01 Jul 2026</text:p>
          </table:table-cell>
          <table:table-cell office:value-type="string" office:string-value="Wed" table:formula="of:=TEXT([.A185];&quot;ddd&quot;)" table:style-name="ce5">
            <text:p>Wed</text:p>
          </table:table-cell>
          <table:table-cell office:value-type="string" office:string-value="Jul" table:formula="of:=TEXT([.A185];&quot;mmm&quot;)" table:style-name="ce5">
            <text:p>Jul</text:p>
          </table:table-cell>
          <table:table-cell office:value-type="float" office:value="0" table:formula="of:=IF(INDEX([Tracker.$A$1:.$AG$120];6+9*(MONTH([.$A185])-1)+(COLUMN()-4);DAY([.$A185])+2)&lt;&gt;&quot;&quot;;1;0)" table:style-name="ce92"/>
          <table:table-cell office:value-type="float" office:value="0" table:formula="of:=IF(INDEX([Tracker.$A$1:.$AG$120];6+9*(MONTH([.$A185])-1)+(COLUMN()-4);DAY([.$A185])+2)&lt;&gt;&quot;&quot;;1;0)" table:style-name="ce92"/>
          <table:table-cell office:value-type="float" office:value="0" table:formula="of:=IF(INDEX([Tracker.$A$1:.$AG$120];6+9*(MONTH([.$A185])-1)+(COLUMN()-4);DAY([.$A185])+2)&lt;&gt;&quot;&quot;;1;0)" table:style-name="ce92"/>
          <table:table-cell office:value-type="float" office:value="0" table:formula="of:=IF(INDEX([Tracker.$A$1:.$AG$120];6+9*(MONTH([.$A185])-1)+(COLUMN()-4);DAY([.$A185])+2)&lt;&gt;&quot;&quot;;1;0)" table:style-name="ce92"/>
          <table:table-cell office:value-type="float" office:value="0" table:formula="of:=IF(INDEX([Tracker.$A$1:.$AG$120];6+9*(MONTH([.$A185])-1)+(COLUMN()-4);DAY([.$A185])+2)&lt;&gt;&quot;&quot;;1;0)" table:style-name="ce92"/>
          <table:table-cell office:value-type="float" office:value="0" table:formula="of:=IF(INDEX([Tracker.$A$1:.$AG$120];6+9*(MONTH([.$A185])-1)+(COLUMN()-4);DAY([.$A185])+2)&lt;&gt;&quot;&quot;;1;0)" table:style-name="ce92"/>
          <table:table-cell office:value-type="float" office:value="0" table:formula="of:=SUM([.D185:.I185])" table:style-name="ce6"/>
          <table:table-cell office:value-type="percentage" office:value="0" table:formula="of:=[.J185]/6" table:style-name="ce8">
            <text:p>0%</text:p>
          </table:table-cell>
          <table:table-cell table:style-name="ce1"/>
          <table:table-cell office:value-type="float" office:value="0" table:formula="of:=IF([.D185]=1;[.M184]+1;0)" table:style-name="ce1">
            <text:p>0</text:p>
          </table:table-cell>
          <table:table-cell office:value-type="float" office:value="0" table:formula="of:=IF([.E185]=1;[.N184]+1;0)" table:style-name="ce1">
            <text:p>0</text:p>
          </table:table-cell>
          <table:table-cell office:value-type="float" office:value="0" table:formula="of:=IF([.F185]=1;[.O184]+1;0)" table:style-name="ce1">
            <text:p>0</text:p>
          </table:table-cell>
          <table:table-cell office:value-type="float" office:value="0" table:formula="of:=IF([.G185]=1;[.P184]+1;0)" table:style-name="ce1">
            <text:p>0</text:p>
          </table:table-cell>
          <table:table-cell office:value-type="float" office:value="0" table:formula="of:=IF([.H185]=1;[.Q184]+1;0)" table:style-name="ce1">
            <text:p>0</text:p>
          </table:table-cell>
          <table:table-cell office:value-type="float" office:value="0" table:formula="of:=IF([.I185]=1;[.R18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2T00:00:00" table:formula="of:=[.A185]+1" table:style-name="ce10">
            <text:p>Thu, 02 Jul 2026</text:p>
          </table:table-cell>
          <table:table-cell office:value-type="string" office:string-value="Thu" table:formula="of:=TEXT([.A186];&quot;ddd&quot;)" table:style-name="ce5">
            <text:p>Thu</text:p>
          </table:table-cell>
          <table:table-cell office:value-type="string" office:string-value="Jul" table:formula="of:=TEXT([.A186];&quot;mmm&quot;)" table:style-name="ce5">
            <text:p>Jul</text:p>
          </table:table-cell>
          <table:table-cell office:value-type="float" office:value="0" table:formula="of:=IF(INDEX([Tracker.$A$1:.$AG$120];6+9*(MONTH([.$A186])-1)+(COLUMN()-4);DAY([.$A186])+2)&lt;&gt;&quot;&quot;;1;0)" table:style-name="ce92"/>
          <table:table-cell office:value-type="float" office:value="0" table:formula="of:=IF(INDEX([Tracker.$A$1:.$AG$120];6+9*(MONTH([.$A186])-1)+(COLUMN()-4);DAY([.$A186])+2)&lt;&gt;&quot;&quot;;1;0)" table:style-name="ce92"/>
          <table:table-cell office:value-type="float" office:value="0" table:formula="of:=IF(INDEX([Tracker.$A$1:.$AG$120];6+9*(MONTH([.$A186])-1)+(COLUMN()-4);DAY([.$A186])+2)&lt;&gt;&quot;&quot;;1;0)" table:style-name="ce92"/>
          <table:table-cell office:value-type="float" office:value="0" table:formula="of:=IF(INDEX([Tracker.$A$1:.$AG$120];6+9*(MONTH([.$A186])-1)+(COLUMN()-4);DAY([.$A186])+2)&lt;&gt;&quot;&quot;;1;0)" table:style-name="ce92"/>
          <table:table-cell office:value-type="float" office:value="0" table:formula="of:=IF(INDEX([Tracker.$A$1:.$AG$120];6+9*(MONTH([.$A186])-1)+(COLUMN()-4);DAY([.$A186])+2)&lt;&gt;&quot;&quot;;1;0)" table:style-name="ce92"/>
          <table:table-cell office:value-type="float" office:value="0" table:formula="of:=IF(INDEX([Tracker.$A$1:.$AG$120];6+9*(MONTH([.$A186])-1)+(COLUMN()-4);DAY([.$A186])+2)&lt;&gt;&quot;&quot;;1;0)" table:style-name="ce92"/>
          <table:table-cell office:value-type="float" office:value="0" table:formula="of:=SUM([.D186:.I186])" table:style-name="ce6"/>
          <table:table-cell office:value-type="percentage" office:value="0" table:formula="of:=[.J186]/6" table:style-name="ce8">
            <text:p>0%</text:p>
          </table:table-cell>
          <table:table-cell table:style-name="ce1"/>
          <table:table-cell office:value-type="float" office:value="0" table:formula="of:=IF([.D186]=1;[.M185]+1;0)" table:style-name="ce1">
            <text:p>0</text:p>
          </table:table-cell>
          <table:table-cell office:value-type="float" office:value="0" table:formula="of:=IF([.E186]=1;[.N185]+1;0)" table:style-name="ce1">
            <text:p>0</text:p>
          </table:table-cell>
          <table:table-cell office:value-type="float" office:value="0" table:formula="of:=IF([.F186]=1;[.O185]+1;0)" table:style-name="ce1">
            <text:p>0</text:p>
          </table:table-cell>
          <table:table-cell office:value-type="float" office:value="0" table:formula="of:=IF([.G186]=1;[.P185]+1;0)" table:style-name="ce1">
            <text:p>0</text:p>
          </table:table-cell>
          <table:table-cell office:value-type="float" office:value="0" table:formula="of:=IF([.H186]=1;[.Q185]+1;0)" table:style-name="ce1">
            <text:p>0</text:p>
          </table:table-cell>
          <table:table-cell office:value-type="float" office:value="0" table:formula="of:=IF([.I186]=1;[.R18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3T00:00:00" table:formula="of:=[.A186]+1" table:style-name="ce10">
            <text:p>Fri, 03 Jul 2026</text:p>
          </table:table-cell>
          <table:table-cell office:value-type="string" office:string-value="Fri" table:formula="of:=TEXT([.A187];&quot;ddd&quot;)" table:style-name="ce5">
            <text:p>Fri</text:p>
          </table:table-cell>
          <table:table-cell office:value-type="string" office:string-value="Jul" table:formula="of:=TEXT([.A187];&quot;mmm&quot;)" table:style-name="ce5">
            <text:p>Jul</text:p>
          </table:table-cell>
          <table:table-cell office:value-type="float" office:value="0" table:formula="of:=IF(INDEX([Tracker.$A$1:.$AG$120];6+9*(MONTH([.$A187])-1)+(COLUMN()-4);DAY([.$A187])+2)&lt;&gt;&quot;&quot;;1;0)" table:style-name="ce92"/>
          <table:table-cell office:value-type="float" office:value="0" table:formula="of:=IF(INDEX([Tracker.$A$1:.$AG$120];6+9*(MONTH([.$A187])-1)+(COLUMN()-4);DAY([.$A187])+2)&lt;&gt;&quot;&quot;;1;0)" table:style-name="ce92"/>
          <table:table-cell office:value-type="float" office:value="0" table:formula="of:=IF(INDEX([Tracker.$A$1:.$AG$120];6+9*(MONTH([.$A187])-1)+(COLUMN()-4);DAY([.$A187])+2)&lt;&gt;&quot;&quot;;1;0)" table:style-name="ce92"/>
          <table:table-cell office:value-type="float" office:value="0" table:formula="of:=IF(INDEX([Tracker.$A$1:.$AG$120];6+9*(MONTH([.$A187])-1)+(COLUMN()-4);DAY([.$A187])+2)&lt;&gt;&quot;&quot;;1;0)" table:style-name="ce92"/>
          <table:table-cell office:value-type="float" office:value="0" table:formula="of:=IF(INDEX([Tracker.$A$1:.$AG$120];6+9*(MONTH([.$A187])-1)+(COLUMN()-4);DAY([.$A187])+2)&lt;&gt;&quot;&quot;;1;0)" table:style-name="ce92"/>
          <table:table-cell office:value-type="float" office:value="0" table:formula="of:=IF(INDEX([Tracker.$A$1:.$AG$120];6+9*(MONTH([.$A187])-1)+(COLUMN()-4);DAY([.$A187])+2)&lt;&gt;&quot;&quot;;1;0)" table:style-name="ce92"/>
          <table:table-cell office:value-type="float" office:value="0" table:formula="of:=SUM([.D187:.I187])" table:style-name="ce6"/>
          <table:table-cell office:value-type="percentage" office:value="0" table:formula="of:=[.J187]/6" table:style-name="ce8">
            <text:p>0%</text:p>
          </table:table-cell>
          <table:table-cell table:style-name="ce1"/>
          <table:table-cell office:value-type="float" office:value="0" table:formula="of:=IF([.D187]=1;[.M186]+1;0)" table:style-name="ce1">
            <text:p>0</text:p>
          </table:table-cell>
          <table:table-cell office:value-type="float" office:value="0" table:formula="of:=IF([.E187]=1;[.N186]+1;0)" table:style-name="ce1">
            <text:p>0</text:p>
          </table:table-cell>
          <table:table-cell office:value-type="float" office:value="0" table:formula="of:=IF([.F187]=1;[.O186]+1;0)" table:style-name="ce1">
            <text:p>0</text:p>
          </table:table-cell>
          <table:table-cell office:value-type="float" office:value="0" table:formula="of:=IF([.G187]=1;[.P186]+1;0)" table:style-name="ce1">
            <text:p>0</text:p>
          </table:table-cell>
          <table:table-cell office:value-type="float" office:value="0" table:formula="of:=IF([.H187]=1;[.Q186]+1;0)" table:style-name="ce1">
            <text:p>0</text:p>
          </table:table-cell>
          <table:table-cell office:value-type="float" office:value="0" table:formula="of:=IF([.I187]=1;[.R18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4T00:00:00" table:formula="of:=[.A187]+1" table:style-name="ce10">
            <text:p>Sat, 04 Jul 2026</text:p>
          </table:table-cell>
          <table:table-cell office:value-type="string" office:string-value="Sat" table:formula="of:=TEXT([.A188];&quot;ddd&quot;)" table:style-name="ce5">
            <text:p>Sat</text:p>
          </table:table-cell>
          <table:table-cell office:value-type="string" office:string-value="Jul" table:formula="of:=TEXT([.A188];&quot;mmm&quot;)" table:style-name="ce5">
            <text:p>Jul</text:p>
          </table:table-cell>
          <table:table-cell office:value-type="float" office:value="0" table:formula="of:=IF(INDEX([Tracker.$A$1:.$AG$120];6+9*(MONTH([.$A188])-1)+(COLUMN()-4);DAY([.$A188])+2)&lt;&gt;&quot;&quot;;1;0)" table:style-name="ce92"/>
          <table:table-cell office:value-type="float" office:value="0" table:formula="of:=IF(INDEX([Tracker.$A$1:.$AG$120];6+9*(MONTH([.$A188])-1)+(COLUMN()-4);DAY([.$A188])+2)&lt;&gt;&quot;&quot;;1;0)" table:style-name="ce92"/>
          <table:table-cell office:value-type="float" office:value="0" table:formula="of:=IF(INDEX([Tracker.$A$1:.$AG$120];6+9*(MONTH([.$A188])-1)+(COLUMN()-4);DAY([.$A188])+2)&lt;&gt;&quot;&quot;;1;0)" table:style-name="ce92"/>
          <table:table-cell office:value-type="float" office:value="0" table:formula="of:=IF(INDEX([Tracker.$A$1:.$AG$120];6+9*(MONTH([.$A188])-1)+(COLUMN()-4);DAY([.$A188])+2)&lt;&gt;&quot;&quot;;1;0)" table:style-name="ce92"/>
          <table:table-cell office:value-type="float" office:value="0" table:formula="of:=IF(INDEX([Tracker.$A$1:.$AG$120];6+9*(MONTH([.$A188])-1)+(COLUMN()-4);DAY([.$A188])+2)&lt;&gt;&quot;&quot;;1;0)" table:style-name="ce92"/>
          <table:table-cell office:value-type="float" office:value="0" table:formula="of:=IF(INDEX([Tracker.$A$1:.$AG$120];6+9*(MONTH([.$A188])-1)+(COLUMN()-4);DAY([.$A188])+2)&lt;&gt;&quot;&quot;;1;0)" table:style-name="ce92"/>
          <table:table-cell office:value-type="float" office:value="0" table:formula="of:=SUM([.D188:.I188])" table:style-name="ce6"/>
          <table:table-cell office:value-type="percentage" office:value="0" table:formula="of:=[.J188]/6" table:style-name="ce8">
            <text:p>0%</text:p>
          </table:table-cell>
          <table:table-cell table:style-name="ce1"/>
          <table:table-cell office:value-type="float" office:value="0" table:formula="of:=IF([.D188]=1;[.M187]+1;0)" table:style-name="ce1">
            <text:p>0</text:p>
          </table:table-cell>
          <table:table-cell office:value-type="float" office:value="0" table:formula="of:=IF([.E188]=1;[.N187]+1;0)" table:style-name="ce1">
            <text:p>0</text:p>
          </table:table-cell>
          <table:table-cell office:value-type="float" office:value="0" table:formula="of:=IF([.F188]=1;[.O187]+1;0)" table:style-name="ce1">
            <text:p>0</text:p>
          </table:table-cell>
          <table:table-cell office:value-type="float" office:value="0" table:formula="of:=IF([.G188]=1;[.P187]+1;0)" table:style-name="ce1">
            <text:p>0</text:p>
          </table:table-cell>
          <table:table-cell office:value-type="float" office:value="0" table:formula="of:=IF([.H188]=1;[.Q187]+1;0)" table:style-name="ce1">
            <text:p>0</text:p>
          </table:table-cell>
          <table:table-cell office:value-type="float" office:value="0" table:formula="of:=IF([.I188]=1;[.R18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5T00:00:00" table:formula="of:=[.A188]+1" table:style-name="ce10">
            <text:p>Sun, 05 Jul 2026</text:p>
          </table:table-cell>
          <table:table-cell office:value-type="string" office:string-value="Sun" table:formula="of:=TEXT([.A189];&quot;ddd&quot;)" table:style-name="ce5">
            <text:p>Sun</text:p>
          </table:table-cell>
          <table:table-cell office:value-type="string" office:string-value="Jul" table:formula="of:=TEXT([.A189];&quot;mmm&quot;)" table:style-name="ce5">
            <text:p>Jul</text:p>
          </table:table-cell>
          <table:table-cell office:value-type="float" office:value="0" table:formula="of:=IF(INDEX([Tracker.$A$1:.$AG$120];6+9*(MONTH([.$A189])-1)+(COLUMN()-4);DAY([.$A189])+2)&lt;&gt;&quot;&quot;;1;0)" table:style-name="ce92"/>
          <table:table-cell office:value-type="float" office:value="0" table:formula="of:=IF(INDEX([Tracker.$A$1:.$AG$120];6+9*(MONTH([.$A189])-1)+(COLUMN()-4);DAY([.$A189])+2)&lt;&gt;&quot;&quot;;1;0)" table:style-name="ce92"/>
          <table:table-cell office:value-type="float" office:value="0" table:formula="of:=IF(INDEX([Tracker.$A$1:.$AG$120];6+9*(MONTH([.$A189])-1)+(COLUMN()-4);DAY([.$A189])+2)&lt;&gt;&quot;&quot;;1;0)" table:style-name="ce92"/>
          <table:table-cell office:value-type="float" office:value="0" table:formula="of:=IF(INDEX([Tracker.$A$1:.$AG$120];6+9*(MONTH([.$A189])-1)+(COLUMN()-4);DAY([.$A189])+2)&lt;&gt;&quot;&quot;;1;0)" table:style-name="ce92"/>
          <table:table-cell office:value-type="float" office:value="0" table:formula="of:=IF(INDEX([Tracker.$A$1:.$AG$120];6+9*(MONTH([.$A189])-1)+(COLUMN()-4);DAY([.$A189])+2)&lt;&gt;&quot;&quot;;1;0)" table:style-name="ce92"/>
          <table:table-cell office:value-type="float" office:value="0" table:formula="of:=IF(INDEX([Tracker.$A$1:.$AG$120];6+9*(MONTH([.$A189])-1)+(COLUMN()-4);DAY([.$A189])+2)&lt;&gt;&quot;&quot;;1;0)" table:style-name="ce92"/>
          <table:table-cell office:value-type="float" office:value="0" table:formula="of:=SUM([.D189:.I189])" table:style-name="ce6"/>
          <table:table-cell office:value-type="percentage" office:value="0" table:formula="of:=[.J189]/6" table:style-name="ce8">
            <text:p>0%</text:p>
          </table:table-cell>
          <table:table-cell table:style-name="ce1"/>
          <table:table-cell office:value-type="float" office:value="0" table:formula="of:=IF([.D189]=1;[.M188]+1;0)" table:style-name="ce1">
            <text:p>0</text:p>
          </table:table-cell>
          <table:table-cell office:value-type="float" office:value="0" table:formula="of:=IF([.E189]=1;[.N188]+1;0)" table:style-name="ce1">
            <text:p>0</text:p>
          </table:table-cell>
          <table:table-cell office:value-type="float" office:value="0" table:formula="of:=IF([.F189]=1;[.O188]+1;0)" table:style-name="ce1">
            <text:p>0</text:p>
          </table:table-cell>
          <table:table-cell office:value-type="float" office:value="0" table:formula="of:=IF([.G189]=1;[.P188]+1;0)" table:style-name="ce1">
            <text:p>0</text:p>
          </table:table-cell>
          <table:table-cell office:value-type="float" office:value="0" table:formula="of:=IF([.H189]=1;[.Q188]+1;0)" table:style-name="ce1">
            <text:p>0</text:p>
          </table:table-cell>
          <table:table-cell office:value-type="float" office:value="0" table:formula="of:=IF([.I189]=1;[.R18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6T00:00:00" table:formula="of:=[.A189]+1" table:style-name="ce10">
            <text:p>Mon, 06 Jul 2026</text:p>
          </table:table-cell>
          <table:table-cell office:value-type="string" office:string-value="Mon" table:formula="of:=TEXT([.A190];&quot;ddd&quot;)" table:style-name="ce5">
            <text:p>Mon</text:p>
          </table:table-cell>
          <table:table-cell office:value-type="string" office:string-value="Jul" table:formula="of:=TEXT([.A190];&quot;mmm&quot;)" table:style-name="ce5">
            <text:p>Jul</text:p>
          </table:table-cell>
          <table:table-cell office:value-type="float" office:value="0" table:formula="of:=IF(INDEX([Tracker.$A$1:.$AG$120];6+9*(MONTH([.$A190])-1)+(COLUMN()-4);DAY([.$A190])+2)&lt;&gt;&quot;&quot;;1;0)" table:style-name="ce92"/>
          <table:table-cell office:value-type="float" office:value="0" table:formula="of:=IF(INDEX([Tracker.$A$1:.$AG$120];6+9*(MONTH([.$A190])-1)+(COLUMN()-4);DAY([.$A190])+2)&lt;&gt;&quot;&quot;;1;0)" table:style-name="ce92"/>
          <table:table-cell office:value-type="float" office:value="0" table:formula="of:=IF(INDEX([Tracker.$A$1:.$AG$120];6+9*(MONTH([.$A190])-1)+(COLUMN()-4);DAY([.$A190])+2)&lt;&gt;&quot;&quot;;1;0)" table:style-name="ce92"/>
          <table:table-cell office:value-type="float" office:value="0" table:formula="of:=IF(INDEX([Tracker.$A$1:.$AG$120];6+9*(MONTH([.$A190])-1)+(COLUMN()-4);DAY([.$A190])+2)&lt;&gt;&quot;&quot;;1;0)" table:style-name="ce92"/>
          <table:table-cell office:value-type="float" office:value="0" table:formula="of:=IF(INDEX([Tracker.$A$1:.$AG$120];6+9*(MONTH([.$A190])-1)+(COLUMN()-4);DAY([.$A190])+2)&lt;&gt;&quot;&quot;;1;0)" table:style-name="ce92"/>
          <table:table-cell office:value-type="float" office:value="0" table:formula="of:=IF(INDEX([Tracker.$A$1:.$AG$120];6+9*(MONTH([.$A190])-1)+(COLUMN()-4);DAY([.$A190])+2)&lt;&gt;&quot;&quot;;1;0)" table:style-name="ce92"/>
          <table:table-cell office:value-type="float" office:value="0" table:formula="of:=SUM([.D190:.I190])" table:style-name="ce6"/>
          <table:table-cell office:value-type="percentage" office:value="0" table:formula="of:=[.J190]/6" table:style-name="ce8">
            <text:p>0%</text:p>
          </table:table-cell>
          <table:table-cell table:style-name="ce1"/>
          <table:table-cell office:value-type="float" office:value="0" table:formula="of:=IF([.D190]=1;[.M189]+1;0)" table:style-name="ce1">
            <text:p>0</text:p>
          </table:table-cell>
          <table:table-cell office:value-type="float" office:value="0" table:formula="of:=IF([.E190]=1;[.N189]+1;0)" table:style-name="ce1">
            <text:p>0</text:p>
          </table:table-cell>
          <table:table-cell office:value-type="float" office:value="0" table:formula="of:=IF([.F190]=1;[.O189]+1;0)" table:style-name="ce1">
            <text:p>0</text:p>
          </table:table-cell>
          <table:table-cell office:value-type="float" office:value="0" table:formula="of:=IF([.G190]=1;[.P189]+1;0)" table:style-name="ce1">
            <text:p>0</text:p>
          </table:table-cell>
          <table:table-cell office:value-type="float" office:value="0" table:formula="of:=IF([.H190]=1;[.Q189]+1;0)" table:style-name="ce1">
            <text:p>0</text:p>
          </table:table-cell>
          <table:table-cell office:value-type="float" office:value="0" table:formula="of:=IF([.I190]=1;[.R18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7T00:00:00" table:formula="of:=[.A190]+1" table:style-name="ce10">
            <text:p>Tue, 07 Jul 2026</text:p>
          </table:table-cell>
          <table:table-cell office:value-type="string" office:string-value="Tue" table:formula="of:=TEXT([.A191];&quot;ddd&quot;)" table:style-name="ce5">
            <text:p>Tue</text:p>
          </table:table-cell>
          <table:table-cell office:value-type="string" office:string-value="Jul" table:formula="of:=TEXT([.A191];&quot;mmm&quot;)" table:style-name="ce5">
            <text:p>Jul</text:p>
          </table:table-cell>
          <table:table-cell office:value-type="float" office:value="0" table:formula="of:=IF(INDEX([Tracker.$A$1:.$AG$120];6+9*(MONTH([.$A191])-1)+(COLUMN()-4);DAY([.$A191])+2)&lt;&gt;&quot;&quot;;1;0)" table:style-name="ce92"/>
          <table:table-cell office:value-type="float" office:value="0" table:formula="of:=IF(INDEX([Tracker.$A$1:.$AG$120];6+9*(MONTH([.$A191])-1)+(COLUMN()-4);DAY([.$A191])+2)&lt;&gt;&quot;&quot;;1;0)" table:style-name="ce92"/>
          <table:table-cell office:value-type="float" office:value="0" table:formula="of:=IF(INDEX([Tracker.$A$1:.$AG$120];6+9*(MONTH([.$A191])-1)+(COLUMN()-4);DAY([.$A191])+2)&lt;&gt;&quot;&quot;;1;0)" table:style-name="ce92"/>
          <table:table-cell office:value-type="float" office:value="0" table:formula="of:=IF(INDEX([Tracker.$A$1:.$AG$120];6+9*(MONTH([.$A191])-1)+(COLUMN()-4);DAY([.$A191])+2)&lt;&gt;&quot;&quot;;1;0)" table:style-name="ce92"/>
          <table:table-cell office:value-type="float" office:value="0" table:formula="of:=IF(INDEX([Tracker.$A$1:.$AG$120];6+9*(MONTH([.$A191])-1)+(COLUMN()-4);DAY([.$A191])+2)&lt;&gt;&quot;&quot;;1;0)" table:style-name="ce92"/>
          <table:table-cell office:value-type="float" office:value="0" table:formula="of:=IF(INDEX([Tracker.$A$1:.$AG$120];6+9*(MONTH([.$A191])-1)+(COLUMN()-4);DAY([.$A191])+2)&lt;&gt;&quot;&quot;;1;0)" table:style-name="ce92"/>
          <table:table-cell office:value-type="float" office:value="0" table:formula="of:=SUM([.D191:.I191])" table:style-name="ce6"/>
          <table:table-cell office:value-type="percentage" office:value="0" table:formula="of:=[.J191]/6" table:style-name="ce8">
            <text:p>0%</text:p>
          </table:table-cell>
          <table:table-cell table:style-name="ce1"/>
          <table:table-cell office:value-type="float" office:value="0" table:formula="of:=IF([.D191]=1;[.M190]+1;0)" table:style-name="ce1">
            <text:p>0</text:p>
          </table:table-cell>
          <table:table-cell office:value-type="float" office:value="0" table:formula="of:=IF([.E191]=1;[.N190]+1;0)" table:style-name="ce1">
            <text:p>0</text:p>
          </table:table-cell>
          <table:table-cell office:value-type="float" office:value="0" table:formula="of:=IF([.F191]=1;[.O190]+1;0)" table:style-name="ce1">
            <text:p>0</text:p>
          </table:table-cell>
          <table:table-cell office:value-type="float" office:value="0" table:formula="of:=IF([.G191]=1;[.P190]+1;0)" table:style-name="ce1">
            <text:p>0</text:p>
          </table:table-cell>
          <table:table-cell office:value-type="float" office:value="0" table:formula="of:=IF([.H191]=1;[.Q190]+1;0)" table:style-name="ce1">
            <text:p>0</text:p>
          </table:table-cell>
          <table:table-cell office:value-type="float" office:value="0" table:formula="of:=IF([.I191]=1;[.R19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8T00:00:00" table:formula="of:=[.A191]+1" table:style-name="ce10">
            <text:p>Wed, 08 Jul 2026</text:p>
          </table:table-cell>
          <table:table-cell office:value-type="string" office:string-value="Wed" table:formula="of:=TEXT([.A192];&quot;ddd&quot;)" table:style-name="ce5">
            <text:p>Wed</text:p>
          </table:table-cell>
          <table:table-cell office:value-type="string" office:string-value="Jul" table:formula="of:=TEXT([.A192];&quot;mmm&quot;)" table:style-name="ce5">
            <text:p>Jul</text:p>
          </table:table-cell>
          <table:table-cell office:value-type="float" office:value="0" table:formula="of:=IF(INDEX([Tracker.$A$1:.$AG$120];6+9*(MONTH([.$A192])-1)+(COLUMN()-4);DAY([.$A192])+2)&lt;&gt;&quot;&quot;;1;0)" table:style-name="ce92"/>
          <table:table-cell office:value-type="float" office:value="0" table:formula="of:=IF(INDEX([Tracker.$A$1:.$AG$120];6+9*(MONTH([.$A192])-1)+(COLUMN()-4);DAY([.$A192])+2)&lt;&gt;&quot;&quot;;1;0)" table:style-name="ce92"/>
          <table:table-cell office:value-type="float" office:value="0" table:formula="of:=IF(INDEX([Tracker.$A$1:.$AG$120];6+9*(MONTH([.$A192])-1)+(COLUMN()-4);DAY([.$A192])+2)&lt;&gt;&quot;&quot;;1;0)" table:style-name="ce92"/>
          <table:table-cell office:value-type="float" office:value="0" table:formula="of:=IF(INDEX([Tracker.$A$1:.$AG$120];6+9*(MONTH([.$A192])-1)+(COLUMN()-4);DAY([.$A192])+2)&lt;&gt;&quot;&quot;;1;0)" table:style-name="ce92"/>
          <table:table-cell office:value-type="float" office:value="0" table:formula="of:=IF(INDEX([Tracker.$A$1:.$AG$120];6+9*(MONTH([.$A192])-1)+(COLUMN()-4);DAY([.$A192])+2)&lt;&gt;&quot;&quot;;1;0)" table:style-name="ce92"/>
          <table:table-cell office:value-type="float" office:value="0" table:formula="of:=IF(INDEX([Tracker.$A$1:.$AG$120];6+9*(MONTH([.$A192])-1)+(COLUMN()-4);DAY([.$A192])+2)&lt;&gt;&quot;&quot;;1;0)" table:style-name="ce92"/>
          <table:table-cell office:value-type="float" office:value="0" table:formula="of:=SUM([.D192:.I192])" table:style-name="ce6"/>
          <table:table-cell office:value-type="percentage" office:value="0" table:formula="of:=[.J192]/6" table:style-name="ce8">
            <text:p>0%</text:p>
          </table:table-cell>
          <table:table-cell table:style-name="ce1"/>
          <table:table-cell office:value-type="float" office:value="0" table:formula="of:=IF([.D192]=1;[.M191]+1;0)" table:style-name="ce1">
            <text:p>0</text:p>
          </table:table-cell>
          <table:table-cell office:value-type="float" office:value="0" table:formula="of:=IF([.E192]=1;[.N191]+1;0)" table:style-name="ce1">
            <text:p>0</text:p>
          </table:table-cell>
          <table:table-cell office:value-type="float" office:value="0" table:formula="of:=IF([.F192]=1;[.O191]+1;0)" table:style-name="ce1">
            <text:p>0</text:p>
          </table:table-cell>
          <table:table-cell office:value-type="float" office:value="0" table:formula="of:=IF([.G192]=1;[.P191]+1;0)" table:style-name="ce1">
            <text:p>0</text:p>
          </table:table-cell>
          <table:table-cell office:value-type="float" office:value="0" table:formula="of:=IF([.H192]=1;[.Q191]+1;0)" table:style-name="ce1">
            <text:p>0</text:p>
          </table:table-cell>
          <table:table-cell office:value-type="float" office:value="0" table:formula="of:=IF([.I192]=1;[.R19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09T00:00:00" table:formula="of:=[.A192]+1" table:style-name="ce10">
            <text:p>Thu, 09 Jul 2026</text:p>
          </table:table-cell>
          <table:table-cell office:value-type="string" office:string-value="Thu" table:formula="of:=TEXT([.A193];&quot;ddd&quot;)" table:style-name="ce5">
            <text:p>Thu</text:p>
          </table:table-cell>
          <table:table-cell office:value-type="string" office:string-value="Jul" table:formula="of:=TEXT([.A193];&quot;mmm&quot;)" table:style-name="ce5">
            <text:p>Jul</text:p>
          </table:table-cell>
          <table:table-cell office:value-type="float" office:value="0" table:formula="of:=IF(INDEX([Tracker.$A$1:.$AG$120];6+9*(MONTH([.$A193])-1)+(COLUMN()-4);DAY([.$A193])+2)&lt;&gt;&quot;&quot;;1;0)" table:style-name="ce92"/>
          <table:table-cell office:value-type="float" office:value="0" table:formula="of:=IF(INDEX([Tracker.$A$1:.$AG$120];6+9*(MONTH([.$A193])-1)+(COLUMN()-4);DAY([.$A193])+2)&lt;&gt;&quot;&quot;;1;0)" table:style-name="ce92"/>
          <table:table-cell office:value-type="float" office:value="0" table:formula="of:=IF(INDEX([Tracker.$A$1:.$AG$120];6+9*(MONTH([.$A193])-1)+(COLUMN()-4);DAY([.$A193])+2)&lt;&gt;&quot;&quot;;1;0)" table:style-name="ce92"/>
          <table:table-cell office:value-type="float" office:value="0" table:formula="of:=IF(INDEX([Tracker.$A$1:.$AG$120];6+9*(MONTH([.$A193])-1)+(COLUMN()-4);DAY([.$A193])+2)&lt;&gt;&quot;&quot;;1;0)" table:style-name="ce92"/>
          <table:table-cell office:value-type="float" office:value="0" table:formula="of:=IF(INDEX([Tracker.$A$1:.$AG$120];6+9*(MONTH([.$A193])-1)+(COLUMN()-4);DAY([.$A193])+2)&lt;&gt;&quot;&quot;;1;0)" table:style-name="ce92"/>
          <table:table-cell office:value-type="float" office:value="0" table:formula="of:=IF(INDEX([Tracker.$A$1:.$AG$120];6+9*(MONTH([.$A193])-1)+(COLUMN()-4);DAY([.$A193])+2)&lt;&gt;&quot;&quot;;1;0)" table:style-name="ce92"/>
          <table:table-cell office:value-type="float" office:value="0" table:formula="of:=SUM([.D193:.I193])" table:style-name="ce6"/>
          <table:table-cell office:value-type="percentage" office:value="0" table:formula="of:=[.J193]/6" table:style-name="ce8">
            <text:p>0%</text:p>
          </table:table-cell>
          <table:table-cell table:style-name="ce1"/>
          <table:table-cell office:value-type="float" office:value="0" table:formula="of:=IF([.D193]=1;[.M192]+1;0)" table:style-name="ce1">
            <text:p>0</text:p>
          </table:table-cell>
          <table:table-cell office:value-type="float" office:value="0" table:formula="of:=IF([.E193]=1;[.N192]+1;0)" table:style-name="ce1">
            <text:p>0</text:p>
          </table:table-cell>
          <table:table-cell office:value-type="float" office:value="0" table:formula="of:=IF([.F193]=1;[.O192]+1;0)" table:style-name="ce1">
            <text:p>0</text:p>
          </table:table-cell>
          <table:table-cell office:value-type="float" office:value="0" table:formula="of:=IF([.G193]=1;[.P192]+1;0)" table:style-name="ce1">
            <text:p>0</text:p>
          </table:table-cell>
          <table:table-cell office:value-type="float" office:value="0" table:formula="of:=IF([.H193]=1;[.Q192]+1;0)" table:style-name="ce1">
            <text:p>0</text:p>
          </table:table-cell>
          <table:table-cell office:value-type="float" office:value="0" table:formula="of:=IF([.I193]=1;[.R19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0T00:00:00" table:formula="of:=[.A193]+1" table:style-name="ce10">
            <text:p>Fri, 10 Jul 2026</text:p>
          </table:table-cell>
          <table:table-cell office:value-type="string" office:string-value="Fri" table:formula="of:=TEXT([.A194];&quot;ddd&quot;)" table:style-name="ce5">
            <text:p>Fri</text:p>
          </table:table-cell>
          <table:table-cell office:value-type="string" office:string-value="Jul" table:formula="of:=TEXT([.A194];&quot;mmm&quot;)" table:style-name="ce5">
            <text:p>Jul</text:p>
          </table:table-cell>
          <table:table-cell office:value-type="float" office:value="0" table:formula="of:=IF(INDEX([Tracker.$A$1:.$AG$120];6+9*(MONTH([.$A194])-1)+(COLUMN()-4);DAY([.$A194])+2)&lt;&gt;&quot;&quot;;1;0)" table:style-name="ce92"/>
          <table:table-cell office:value-type="float" office:value="0" table:formula="of:=IF(INDEX([Tracker.$A$1:.$AG$120];6+9*(MONTH([.$A194])-1)+(COLUMN()-4);DAY([.$A194])+2)&lt;&gt;&quot;&quot;;1;0)" table:style-name="ce92"/>
          <table:table-cell office:value-type="float" office:value="0" table:formula="of:=IF(INDEX([Tracker.$A$1:.$AG$120];6+9*(MONTH([.$A194])-1)+(COLUMN()-4);DAY([.$A194])+2)&lt;&gt;&quot;&quot;;1;0)" table:style-name="ce92"/>
          <table:table-cell office:value-type="float" office:value="0" table:formula="of:=IF(INDEX([Tracker.$A$1:.$AG$120];6+9*(MONTH([.$A194])-1)+(COLUMN()-4);DAY([.$A194])+2)&lt;&gt;&quot;&quot;;1;0)" table:style-name="ce92"/>
          <table:table-cell office:value-type="float" office:value="0" table:formula="of:=IF(INDEX([Tracker.$A$1:.$AG$120];6+9*(MONTH([.$A194])-1)+(COLUMN()-4);DAY([.$A194])+2)&lt;&gt;&quot;&quot;;1;0)" table:style-name="ce92"/>
          <table:table-cell office:value-type="float" office:value="0" table:formula="of:=IF(INDEX([Tracker.$A$1:.$AG$120];6+9*(MONTH([.$A194])-1)+(COLUMN()-4);DAY([.$A194])+2)&lt;&gt;&quot;&quot;;1;0)" table:style-name="ce92"/>
          <table:table-cell office:value-type="float" office:value="0" table:formula="of:=SUM([.D194:.I194])" table:style-name="ce6"/>
          <table:table-cell office:value-type="percentage" office:value="0" table:formula="of:=[.J194]/6" table:style-name="ce8">
            <text:p>0%</text:p>
          </table:table-cell>
          <table:table-cell table:style-name="ce1"/>
          <table:table-cell office:value-type="float" office:value="0" table:formula="of:=IF([.D194]=1;[.M193]+1;0)" table:style-name="ce1">
            <text:p>0</text:p>
          </table:table-cell>
          <table:table-cell office:value-type="float" office:value="0" table:formula="of:=IF([.E194]=1;[.N193]+1;0)" table:style-name="ce1">
            <text:p>0</text:p>
          </table:table-cell>
          <table:table-cell office:value-type="float" office:value="0" table:formula="of:=IF([.F194]=1;[.O193]+1;0)" table:style-name="ce1">
            <text:p>0</text:p>
          </table:table-cell>
          <table:table-cell office:value-type="float" office:value="0" table:formula="of:=IF([.G194]=1;[.P193]+1;0)" table:style-name="ce1">
            <text:p>0</text:p>
          </table:table-cell>
          <table:table-cell office:value-type="float" office:value="0" table:formula="of:=IF([.H194]=1;[.Q193]+1;0)" table:style-name="ce1">
            <text:p>0</text:p>
          </table:table-cell>
          <table:table-cell office:value-type="float" office:value="0" table:formula="of:=IF([.I194]=1;[.R19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1T00:00:00" table:formula="of:=[.A194]+1" table:style-name="ce10">
            <text:p>Sat, 11 Jul 2026</text:p>
          </table:table-cell>
          <table:table-cell office:value-type="string" office:string-value="Sat" table:formula="of:=TEXT([.A195];&quot;ddd&quot;)" table:style-name="ce5">
            <text:p>Sat</text:p>
          </table:table-cell>
          <table:table-cell office:value-type="string" office:string-value="Jul" table:formula="of:=TEXT([.A195];&quot;mmm&quot;)" table:style-name="ce5">
            <text:p>Jul</text:p>
          </table:table-cell>
          <table:table-cell office:value-type="float" office:value="0" table:formula="of:=IF(INDEX([Tracker.$A$1:.$AG$120];6+9*(MONTH([.$A195])-1)+(COLUMN()-4);DAY([.$A195])+2)&lt;&gt;&quot;&quot;;1;0)" table:style-name="ce92"/>
          <table:table-cell office:value-type="float" office:value="0" table:formula="of:=IF(INDEX([Tracker.$A$1:.$AG$120];6+9*(MONTH([.$A195])-1)+(COLUMN()-4);DAY([.$A195])+2)&lt;&gt;&quot;&quot;;1;0)" table:style-name="ce92"/>
          <table:table-cell office:value-type="float" office:value="0" table:formula="of:=IF(INDEX([Tracker.$A$1:.$AG$120];6+9*(MONTH([.$A195])-1)+(COLUMN()-4);DAY([.$A195])+2)&lt;&gt;&quot;&quot;;1;0)" table:style-name="ce92"/>
          <table:table-cell office:value-type="float" office:value="0" table:formula="of:=IF(INDEX([Tracker.$A$1:.$AG$120];6+9*(MONTH([.$A195])-1)+(COLUMN()-4);DAY([.$A195])+2)&lt;&gt;&quot;&quot;;1;0)" table:style-name="ce92"/>
          <table:table-cell office:value-type="float" office:value="0" table:formula="of:=IF(INDEX([Tracker.$A$1:.$AG$120];6+9*(MONTH([.$A195])-1)+(COLUMN()-4);DAY([.$A195])+2)&lt;&gt;&quot;&quot;;1;0)" table:style-name="ce92"/>
          <table:table-cell office:value-type="float" office:value="0" table:formula="of:=IF(INDEX([Tracker.$A$1:.$AG$120];6+9*(MONTH([.$A195])-1)+(COLUMN()-4);DAY([.$A195])+2)&lt;&gt;&quot;&quot;;1;0)" table:style-name="ce92"/>
          <table:table-cell office:value-type="float" office:value="0" table:formula="of:=SUM([.D195:.I195])" table:style-name="ce6"/>
          <table:table-cell office:value-type="percentage" office:value="0" table:formula="of:=[.J195]/6" table:style-name="ce8">
            <text:p>0%</text:p>
          </table:table-cell>
          <table:table-cell table:style-name="ce1"/>
          <table:table-cell office:value-type="float" office:value="0" table:formula="of:=IF([.D195]=1;[.M194]+1;0)" table:style-name="ce1">
            <text:p>0</text:p>
          </table:table-cell>
          <table:table-cell office:value-type="float" office:value="0" table:formula="of:=IF([.E195]=1;[.N194]+1;0)" table:style-name="ce1">
            <text:p>0</text:p>
          </table:table-cell>
          <table:table-cell office:value-type="float" office:value="0" table:formula="of:=IF([.F195]=1;[.O194]+1;0)" table:style-name="ce1">
            <text:p>0</text:p>
          </table:table-cell>
          <table:table-cell office:value-type="float" office:value="0" table:formula="of:=IF([.G195]=1;[.P194]+1;0)" table:style-name="ce1">
            <text:p>0</text:p>
          </table:table-cell>
          <table:table-cell office:value-type="float" office:value="0" table:formula="of:=IF([.H195]=1;[.Q194]+1;0)" table:style-name="ce1">
            <text:p>0</text:p>
          </table:table-cell>
          <table:table-cell office:value-type="float" office:value="0" table:formula="of:=IF([.I195]=1;[.R19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2T00:00:00" table:formula="of:=[.A195]+1" table:style-name="ce10">
            <text:p>Sun, 12 Jul 2026</text:p>
          </table:table-cell>
          <table:table-cell office:value-type="string" office:string-value="Sun" table:formula="of:=TEXT([.A196];&quot;ddd&quot;)" table:style-name="ce5">
            <text:p>Sun</text:p>
          </table:table-cell>
          <table:table-cell office:value-type="string" office:string-value="Jul" table:formula="of:=TEXT([.A196];&quot;mmm&quot;)" table:style-name="ce5">
            <text:p>Jul</text:p>
          </table:table-cell>
          <table:table-cell office:value-type="float" office:value="0" table:formula="of:=IF(INDEX([Tracker.$A$1:.$AG$120];6+9*(MONTH([.$A196])-1)+(COLUMN()-4);DAY([.$A196])+2)&lt;&gt;&quot;&quot;;1;0)" table:style-name="ce92"/>
          <table:table-cell office:value-type="float" office:value="0" table:formula="of:=IF(INDEX([Tracker.$A$1:.$AG$120];6+9*(MONTH([.$A196])-1)+(COLUMN()-4);DAY([.$A196])+2)&lt;&gt;&quot;&quot;;1;0)" table:style-name="ce92"/>
          <table:table-cell office:value-type="float" office:value="0" table:formula="of:=IF(INDEX([Tracker.$A$1:.$AG$120];6+9*(MONTH([.$A196])-1)+(COLUMN()-4);DAY([.$A196])+2)&lt;&gt;&quot;&quot;;1;0)" table:style-name="ce92"/>
          <table:table-cell office:value-type="float" office:value="0" table:formula="of:=IF(INDEX([Tracker.$A$1:.$AG$120];6+9*(MONTH([.$A196])-1)+(COLUMN()-4);DAY([.$A196])+2)&lt;&gt;&quot;&quot;;1;0)" table:style-name="ce92"/>
          <table:table-cell office:value-type="float" office:value="0" table:formula="of:=IF(INDEX([Tracker.$A$1:.$AG$120];6+9*(MONTH([.$A196])-1)+(COLUMN()-4);DAY([.$A196])+2)&lt;&gt;&quot;&quot;;1;0)" table:style-name="ce92"/>
          <table:table-cell office:value-type="float" office:value="0" table:formula="of:=IF(INDEX([Tracker.$A$1:.$AG$120];6+9*(MONTH([.$A196])-1)+(COLUMN()-4);DAY([.$A196])+2)&lt;&gt;&quot;&quot;;1;0)" table:style-name="ce92"/>
          <table:table-cell office:value-type="float" office:value="0" table:formula="of:=SUM([.D196:.I196])" table:style-name="ce6"/>
          <table:table-cell office:value-type="percentage" office:value="0" table:formula="of:=[.J196]/6" table:style-name="ce8">
            <text:p>0%</text:p>
          </table:table-cell>
          <table:table-cell table:style-name="ce1"/>
          <table:table-cell office:value-type="float" office:value="0" table:formula="of:=IF([.D196]=1;[.M195]+1;0)" table:style-name="ce1">
            <text:p>0</text:p>
          </table:table-cell>
          <table:table-cell office:value-type="float" office:value="0" table:formula="of:=IF([.E196]=1;[.N195]+1;0)" table:style-name="ce1">
            <text:p>0</text:p>
          </table:table-cell>
          <table:table-cell office:value-type="float" office:value="0" table:formula="of:=IF([.F196]=1;[.O195]+1;0)" table:style-name="ce1">
            <text:p>0</text:p>
          </table:table-cell>
          <table:table-cell office:value-type="float" office:value="0" table:formula="of:=IF([.G196]=1;[.P195]+1;0)" table:style-name="ce1">
            <text:p>0</text:p>
          </table:table-cell>
          <table:table-cell office:value-type="float" office:value="0" table:formula="of:=IF([.H196]=1;[.Q195]+1;0)" table:style-name="ce1">
            <text:p>0</text:p>
          </table:table-cell>
          <table:table-cell office:value-type="float" office:value="0" table:formula="of:=IF([.I196]=1;[.R19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3T00:00:00" table:formula="of:=[.A196]+1" table:style-name="ce10">
            <text:p>Mon, 13 Jul 2026</text:p>
          </table:table-cell>
          <table:table-cell office:value-type="string" office:string-value="Mon" table:formula="of:=TEXT([.A197];&quot;ddd&quot;)" table:style-name="ce5">
            <text:p>Mon</text:p>
          </table:table-cell>
          <table:table-cell office:value-type="string" office:string-value="Jul" table:formula="of:=TEXT([.A197];&quot;mmm&quot;)" table:style-name="ce5">
            <text:p>Jul</text:p>
          </table:table-cell>
          <table:table-cell office:value-type="float" office:value="0" table:formula="of:=IF(INDEX([Tracker.$A$1:.$AG$120];6+9*(MONTH([.$A197])-1)+(COLUMN()-4);DAY([.$A197])+2)&lt;&gt;&quot;&quot;;1;0)" table:style-name="ce92"/>
          <table:table-cell office:value-type="float" office:value="0" table:formula="of:=IF(INDEX([Tracker.$A$1:.$AG$120];6+9*(MONTH([.$A197])-1)+(COLUMN()-4);DAY([.$A197])+2)&lt;&gt;&quot;&quot;;1;0)" table:style-name="ce92"/>
          <table:table-cell office:value-type="float" office:value="0" table:formula="of:=IF(INDEX([Tracker.$A$1:.$AG$120];6+9*(MONTH([.$A197])-1)+(COLUMN()-4);DAY([.$A197])+2)&lt;&gt;&quot;&quot;;1;0)" table:style-name="ce92"/>
          <table:table-cell office:value-type="float" office:value="0" table:formula="of:=IF(INDEX([Tracker.$A$1:.$AG$120];6+9*(MONTH([.$A197])-1)+(COLUMN()-4);DAY([.$A197])+2)&lt;&gt;&quot;&quot;;1;0)" table:style-name="ce92"/>
          <table:table-cell office:value-type="float" office:value="0" table:formula="of:=IF(INDEX([Tracker.$A$1:.$AG$120];6+9*(MONTH([.$A197])-1)+(COLUMN()-4);DAY([.$A197])+2)&lt;&gt;&quot;&quot;;1;0)" table:style-name="ce92"/>
          <table:table-cell office:value-type="float" office:value="0" table:formula="of:=IF(INDEX([Tracker.$A$1:.$AG$120];6+9*(MONTH([.$A197])-1)+(COLUMN()-4);DAY([.$A197])+2)&lt;&gt;&quot;&quot;;1;0)" table:style-name="ce92"/>
          <table:table-cell office:value-type="float" office:value="0" table:formula="of:=SUM([.D197:.I197])" table:style-name="ce6"/>
          <table:table-cell office:value-type="percentage" office:value="0" table:formula="of:=[.J197]/6" table:style-name="ce8">
            <text:p>0%</text:p>
          </table:table-cell>
          <table:table-cell table:style-name="ce1"/>
          <table:table-cell office:value-type="float" office:value="0" table:formula="of:=IF([.D197]=1;[.M196]+1;0)" table:style-name="ce1">
            <text:p>0</text:p>
          </table:table-cell>
          <table:table-cell office:value-type="float" office:value="0" table:formula="of:=IF([.E197]=1;[.N196]+1;0)" table:style-name="ce1">
            <text:p>0</text:p>
          </table:table-cell>
          <table:table-cell office:value-type="float" office:value="0" table:formula="of:=IF([.F197]=1;[.O196]+1;0)" table:style-name="ce1">
            <text:p>0</text:p>
          </table:table-cell>
          <table:table-cell office:value-type="float" office:value="0" table:formula="of:=IF([.G197]=1;[.P196]+1;0)" table:style-name="ce1">
            <text:p>0</text:p>
          </table:table-cell>
          <table:table-cell office:value-type="float" office:value="0" table:formula="of:=IF([.H197]=1;[.Q196]+1;0)" table:style-name="ce1">
            <text:p>0</text:p>
          </table:table-cell>
          <table:table-cell office:value-type="float" office:value="0" table:formula="of:=IF([.I197]=1;[.R19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4T00:00:00" table:formula="of:=[.A197]+1" table:style-name="ce10">
            <text:p>Tue, 14 Jul 2026</text:p>
          </table:table-cell>
          <table:table-cell office:value-type="string" office:string-value="Tue" table:formula="of:=TEXT([.A198];&quot;ddd&quot;)" table:style-name="ce5">
            <text:p>Tue</text:p>
          </table:table-cell>
          <table:table-cell office:value-type="string" office:string-value="Jul" table:formula="of:=TEXT([.A198];&quot;mmm&quot;)" table:style-name="ce5">
            <text:p>Jul</text:p>
          </table:table-cell>
          <table:table-cell office:value-type="float" office:value="0" table:formula="of:=IF(INDEX([Tracker.$A$1:.$AG$120];6+9*(MONTH([.$A198])-1)+(COLUMN()-4);DAY([.$A198])+2)&lt;&gt;&quot;&quot;;1;0)" table:style-name="ce92"/>
          <table:table-cell office:value-type="float" office:value="0" table:formula="of:=IF(INDEX([Tracker.$A$1:.$AG$120];6+9*(MONTH([.$A198])-1)+(COLUMN()-4);DAY([.$A198])+2)&lt;&gt;&quot;&quot;;1;0)" table:style-name="ce92"/>
          <table:table-cell office:value-type="float" office:value="0" table:formula="of:=IF(INDEX([Tracker.$A$1:.$AG$120];6+9*(MONTH([.$A198])-1)+(COLUMN()-4);DAY([.$A198])+2)&lt;&gt;&quot;&quot;;1;0)" table:style-name="ce92"/>
          <table:table-cell office:value-type="float" office:value="0" table:formula="of:=IF(INDEX([Tracker.$A$1:.$AG$120];6+9*(MONTH([.$A198])-1)+(COLUMN()-4);DAY([.$A198])+2)&lt;&gt;&quot;&quot;;1;0)" table:style-name="ce92"/>
          <table:table-cell office:value-type="float" office:value="0" table:formula="of:=IF(INDEX([Tracker.$A$1:.$AG$120];6+9*(MONTH([.$A198])-1)+(COLUMN()-4);DAY([.$A198])+2)&lt;&gt;&quot;&quot;;1;0)" table:style-name="ce92"/>
          <table:table-cell office:value-type="float" office:value="0" table:formula="of:=IF(INDEX([Tracker.$A$1:.$AG$120];6+9*(MONTH([.$A198])-1)+(COLUMN()-4);DAY([.$A198])+2)&lt;&gt;&quot;&quot;;1;0)" table:style-name="ce92"/>
          <table:table-cell office:value-type="float" office:value="0" table:formula="of:=SUM([.D198:.I198])" table:style-name="ce6"/>
          <table:table-cell office:value-type="percentage" office:value="0" table:formula="of:=[.J198]/6" table:style-name="ce8">
            <text:p>0%</text:p>
          </table:table-cell>
          <table:table-cell table:style-name="ce1"/>
          <table:table-cell office:value-type="float" office:value="0" table:formula="of:=IF([.D198]=1;[.M197]+1;0)" table:style-name="ce1">
            <text:p>0</text:p>
          </table:table-cell>
          <table:table-cell office:value-type="float" office:value="0" table:formula="of:=IF([.E198]=1;[.N197]+1;0)" table:style-name="ce1">
            <text:p>0</text:p>
          </table:table-cell>
          <table:table-cell office:value-type="float" office:value="0" table:formula="of:=IF([.F198]=1;[.O197]+1;0)" table:style-name="ce1">
            <text:p>0</text:p>
          </table:table-cell>
          <table:table-cell office:value-type="float" office:value="0" table:formula="of:=IF([.G198]=1;[.P197]+1;0)" table:style-name="ce1">
            <text:p>0</text:p>
          </table:table-cell>
          <table:table-cell office:value-type="float" office:value="0" table:formula="of:=IF([.H198]=1;[.Q197]+1;0)" table:style-name="ce1">
            <text:p>0</text:p>
          </table:table-cell>
          <table:table-cell office:value-type="float" office:value="0" table:formula="of:=IF([.I198]=1;[.R19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5T00:00:00" table:formula="of:=[.A198]+1" table:style-name="ce10">
            <text:p>Wed, 15 Jul 2026</text:p>
          </table:table-cell>
          <table:table-cell office:value-type="string" office:string-value="Wed" table:formula="of:=TEXT([.A199];&quot;ddd&quot;)" table:style-name="ce5">
            <text:p>Wed</text:p>
          </table:table-cell>
          <table:table-cell office:value-type="string" office:string-value="Jul" table:formula="of:=TEXT([.A199];&quot;mmm&quot;)" table:style-name="ce5">
            <text:p>Jul</text:p>
          </table:table-cell>
          <table:table-cell office:value-type="float" office:value="0" table:formula="of:=IF(INDEX([Tracker.$A$1:.$AG$120];6+9*(MONTH([.$A199])-1)+(COLUMN()-4);DAY([.$A199])+2)&lt;&gt;&quot;&quot;;1;0)" table:style-name="ce92"/>
          <table:table-cell office:value-type="float" office:value="0" table:formula="of:=IF(INDEX([Tracker.$A$1:.$AG$120];6+9*(MONTH([.$A199])-1)+(COLUMN()-4);DAY([.$A199])+2)&lt;&gt;&quot;&quot;;1;0)" table:style-name="ce92"/>
          <table:table-cell office:value-type="float" office:value="0" table:formula="of:=IF(INDEX([Tracker.$A$1:.$AG$120];6+9*(MONTH([.$A199])-1)+(COLUMN()-4);DAY([.$A199])+2)&lt;&gt;&quot;&quot;;1;0)" table:style-name="ce92"/>
          <table:table-cell office:value-type="float" office:value="0" table:formula="of:=IF(INDEX([Tracker.$A$1:.$AG$120];6+9*(MONTH([.$A199])-1)+(COLUMN()-4);DAY([.$A199])+2)&lt;&gt;&quot;&quot;;1;0)" table:style-name="ce92"/>
          <table:table-cell office:value-type="float" office:value="0" table:formula="of:=IF(INDEX([Tracker.$A$1:.$AG$120];6+9*(MONTH([.$A199])-1)+(COLUMN()-4);DAY([.$A199])+2)&lt;&gt;&quot;&quot;;1;0)" table:style-name="ce92"/>
          <table:table-cell office:value-type="float" office:value="0" table:formula="of:=IF(INDEX([Tracker.$A$1:.$AG$120];6+9*(MONTH([.$A199])-1)+(COLUMN()-4);DAY([.$A199])+2)&lt;&gt;&quot;&quot;;1;0)" table:style-name="ce92"/>
          <table:table-cell office:value-type="float" office:value="0" table:formula="of:=SUM([.D199:.I199])" table:style-name="ce6"/>
          <table:table-cell office:value-type="percentage" office:value="0" table:formula="of:=[.J199]/6" table:style-name="ce8">
            <text:p>0%</text:p>
          </table:table-cell>
          <table:table-cell table:style-name="ce1"/>
          <table:table-cell office:value-type="float" office:value="0" table:formula="of:=IF([.D199]=1;[.M198]+1;0)" table:style-name="ce1">
            <text:p>0</text:p>
          </table:table-cell>
          <table:table-cell office:value-type="float" office:value="0" table:formula="of:=IF([.E199]=1;[.N198]+1;0)" table:style-name="ce1">
            <text:p>0</text:p>
          </table:table-cell>
          <table:table-cell office:value-type="float" office:value="0" table:formula="of:=IF([.F199]=1;[.O198]+1;0)" table:style-name="ce1">
            <text:p>0</text:p>
          </table:table-cell>
          <table:table-cell office:value-type="float" office:value="0" table:formula="of:=IF([.G199]=1;[.P198]+1;0)" table:style-name="ce1">
            <text:p>0</text:p>
          </table:table-cell>
          <table:table-cell office:value-type="float" office:value="0" table:formula="of:=IF([.H199]=1;[.Q198]+1;0)" table:style-name="ce1">
            <text:p>0</text:p>
          </table:table-cell>
          <table:table-cell office:value-type="float" office:value="0" table:formula="of:=IF([.I199]=1;[.R19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6T00:00:00" table:formula="of:=[.A199]+1" table:style-name="ce10">
            <text:p>Thu, 16 Jul 2026</text:p>
          </table:table-cell>
          <table:table-cell office:value-type="string" office:string-value="Thu" table:formula="of:=TEXT([.A200];&quot;ddd&quot;)" table:style-name="ce5">
            <text:p>Thu</text:p>
          </table:table-cell>
          <table:table-cell office:value-type="string" office:string-value="Jul" table:formula="of:=TEXT([.A200];&quot;mmm&quot;)" table:style-name="ce5">
            <text:p>Jul</text:p>
          </table:table-cell>
          <table:table-cell office:value-type="float" office:value="0" table:formula="of:=IF(INDEX([Tracker.$A$1:.$AG$120];6+9*(MONTH([.$A200])-1)+(COLUMN()-4);DAY([.$A200])+2)&lt;&gt;&quot;&quot;;1;0)" table:style-name="ce92"/>
          <table:table-cell office:value-type="float" office:value="0" table:formula="of:=IF(INDEX([Tracker.$A$1:.$AG$120];6+9*(MONTH([.$A200])-1)+(COLUMN()-4);DAY([.$A200])+2)&lt;&gt;&quot;&quot;;1;0)" table:style-name="ce92"/>
          <table:table-cell office:value-type="float" office:value="0" table:formula="of:=IF(INDEX([Tracker.$A$1:.$AG$120];6+9*(MONTH([.$A200])-1)+(COLUMN()-4);DAY([.$A200])+2)&lt;&gt;&quot;&quot;;1;0)" table:style-name="ce92"/>
          <table:table-cell office:value-type="float" office:value="0" table:formula="of:=IF(INDEX([Tracker.$A$1:.$AG$120];6+9*(MONTH([.$A200])-1)+(COLUMN()-4);DAY([.$A200])+2)&lt;&gt;&quot;&quot;;1;0)" table:style-name="ce92"/>
          <table:table-cell office:value-type="float" office:value="0" table:formula="of:=IF(INDEX([Tracker.$A$1:.$AG$120];6+9*(MONTH([.$A200])-1)+(COLUMN()-4);DAY([.$A200])+2)&lt;&gt;&quot;&quot;;1;0)" table:style-name="ce92"/>
          <table:table-cell office:value-type="float" office:value="0" table:formula="of:=IF(INDEX([Tracker.$A$1:.$AG$120];6+9*(MONTH([.$A200])-1)+(COLUMN()-4);DAY([.$A200])+2)&lt;&gt;&quot;&quot;;1;0)" table:style-name="ce92"/>
          <table:table-cell office:value-type="float" office:value="0" table:formula="of:=SUM([.D200:.I200])" table:style-name="ce6"/>
          <table:table-cell office:value-type="percentage" office:value="0" table:formula="of:=[.J200]/6" table:style-name="ce8">
            <text:p>0%</text:p>
          </table:table-cell>
          <table:table-cell table:style-name="ce1"/>
          <table:table-cell office:value-type="float" office:value="0" table:formula="of:=IF([.D200]=1;[.M199]+1;0)" table:style-name="ce1">
            <text:p>0</text:p>
          </table:table-cell>
          <table:table-cell office:value-type="float" office:value="0" table:formula="of:=IF([.E200]=1;[.N199]+1;0)" table:style-name="ce1">
            <text:p>0</text:p>
          </table:table-cell>
          <table:table-cell office:value-type="float" office:value="0" table:formula="of:=IF([.F200]=1;[.O199]+1;0)" table:style-name="ce1">
            <text:p>0</text:p>
          </table:table-cell>
          <table:table-cell office:value-type="float" office:value="0" table:formula="of:=IF([.G200]=1;[.P199]+1;0)" table:style-name="ce1">
            <text:p>0</text:p>
          </table:table-cell>
          <table:table-cell office:value-type="float" office:value="0" table:formula="of:=IF([.H200]=1;[.Q199]+1;0)" table:style-name="ce1">
            <text:p>0</text:p>
          </table:table-cell>
          <table:table-cell office:value-type="float" office:value="0" table:formula="of:=IF([.I200]=1;[.R19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7T00:00:00" table:formula="of:=[.A200]+1" table:style-name="ce10">
            <text:p>Fri, 17 Jul 2026</text:p>
          </table:table-cell>
          <table:table-cell office:value-type="string" office:string-value="Fri" table:formula="of:=TEXT([.A201];&quot;ddd&quot;)" table:style-name="ce5">
            <text:p>Fri</text:p>
          </table:table-cell>
          <table:table-cell office:value-type="string" office:string-value="Jul" table:formula="of:=TEXT([.A201];&quot;mmm&quot;)" table:style-name="ce5">
            <text:p>Jul</text:p>
          </table:table-cell>
          <table:table-cell office:value-type="float" office:value="0" table:formula="of:=IF(INDEX([Tracker.$A$1:.$AG$120];6+9*(MONTH([.$A201])-1)+(COLUMN()-4);DAY([.$A201])+2)&lt;&gt;&quot;&quot;;1;0)" table:style-name="ce92"/>
          <table:table-cell office:value-type="float" office:value="0" table:formula="of:=IF(INDEX([Tracker.$A$1:.$AG$120];6+9*(MONTH([.$A201])-1)+(COLUMN()-4);DAY([.$A201])+2)&lt;&gt;&quot;&quot;;1;0)" table:style-name="ce92"/>
          <table:table-cell office:value-type="float" office:value="0" table:formula="of:=IF(INDEX([Tracker.$A$1:.$AG$120];6+9*(MONTH([.$A201])-1)+(COLUMN()-4);DAY([.$A201])+2)&lt;&gt;&quot;&quot;;1;0)" table:style-name="ce92"/>
          <table:table-cell office:value-type="float" office:value="0" table:formula="of:=IF(INDEX([Tracker.$A$1:.$AG$120];6+9*(MONTH([.$A201])-1)+(COLUMN()-4);DAY([.$A201])+2)&lt;&gt;&quot;&quot;;1;0)" table:style-name="ce92"/>
          <table:table-cell office:value-type="float" office:value="0" table:formula="of:=IF(INDEX([Tracker.$A$1:.$AG$120];6+9*(MONTH([.$A201])-1)+(COLUMN()-4);DAY([.$A201])+2)&lt;&gt;&quot;&quot;;1;0)" table:style-name="ce92"/>
          <table:table-cell office:value-type="float" office:value="0" table:formula="of:=IF(INDEX([Tracker.$A$1:.$AG$120];6+9*(MONTH([.$A201])-1)+(COLUMN()-4);DAY([.$A201])+2)&lt;&gt;&quot;&quot;;1;0)" table:style-name="ce92"/>
          <table:table-cell office:value-type="float" office:value="0" table:formula="of:=SUM([.D201:.I201])" table:style-name="ce6"/>
          <table:table-cell office:value-type="percentage" office:value="0" table:formula="of:=[.J201]/6" table:style-name="ce8">
            <text:p>0%</text:p>
          </table:table-cell>
          <table:table-cell table:style-name="ce1"/>
          <table:table-cell office:value-type="float" office:value="0" table:formula="of:=IF([.D201]=1;[.M200]+1;0)" table:style-name="ce1">
            <text:p>0</text:p>
          </table:table-cell>
          <table:table-cell office:value-type="float" office:value="0" table:formula="of:=IF([.E201]=1;[.N200]+1;0)" table:style-name="ce1">
            <text:p>0</text:p>
          </table:table-cell>
          <table:table-cell office:value-type="float" office:value="0" table:formula="of:=IF([.F201]=1;[.O200]+1;0)" table:style-name="ce1">
            <text:p>0</text:p>
          </table:table-cell>
          <table:table-cell office:value-type="float" office:value="0" table:formula="of:=IF([.G201]=1;[.P200]+1;0)" table:style-name="ce1">
            <text:p>0</text:p>
          </table:table-cell>
          <table:table-cell office:value-type="float" office:value="0" table:formula="of:=IF([.H201]=1;[.Q200]+1;0)" table:style-name="ce1">
            <text:p>0</text:p>
          </table:table-cell>
          <table:table-cell office:value-type="float" office:value="0" table:formula="of:=IF([.I201]=1;[.R20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8T00:00:00" table:formula="of:=[.A201]+1" table:style-name="ce10">
            <text:p>Sat, 18 Jul 2026</text:p>
          </table:table-cell>
          <table:table-cell office:value-type="string" office:string-value="Sat" table:formula="of:=TEXT([.A202];&quot;ddd&quot;)" table:style-name="ce5">
            <text:p>Sat</text:p>
          </table:table-cell>
          <table:table-cell office:value-type="string" office:string-value="Jul" table:formula="of:=TEXT([.A202];&quot;mmm&quot;)" table:style-name="ce5">
            <text:p>Jul</text:p>
          </table:table-cell>
          <table:table-cell office:value-type="float" office:value="0" table:formula="of:=IF(INDEX([Tracker.$A$1:.$AG$120];6+9*(MONTH([.$A202])-1)+(COLUMN()-4);DAY([.$A202])+2)&lt;&gt;&quot;&quot;;1;0)" table:style-name="ce92"/>
          <table:table-cell office:value-type="float" office:value="0" table:formula="of:=IF(INDEX([Tracker.$A$1:.$AG$120];6+9*(MONTH([.$A202])-1)+(COLUMN()-4);DAY([.$A202])+2)&lt;&gt;&quot;&quot;;1;0)" table:style-name="ce92"/>
          <table:table-cell office:value-type="float" office:value="0" table:formula="of:=IF(INDEX([Tracker.$A$1:.$AG$120];6+9*(MONTH([.$A202])-1)+(COLUMN()-4);DAY([.$A202])+2)&lt;&gt;&quot;&quot;;1;0)" table:style-name="ce92"/>
          <table:table-cell office:value-type="float" office:value="0" table:formula="of:=IF(INDEX([Tracker.$A$1:.$AG$120];6+9*(MONTH([.$A202])-1)+(COLUMN()-4);DAY([.$A202])+2)&lt;&gt;&quot;&quot;;1;0)" table:style-name="ce92"/>
          <table:table-cell office:value-type="float" office:value="0" table:formula="of:=IF(INDEX([Tracker.$A$1:.$AG$120];6+9*(MONTH([.$A202])-1)+(COLUMN()-4);DAY([.$A202])+2)&lt;&gt;&quot;&quot;;1;0)" table:style-name="ce92"/>
          <table:table-cell office:value-type="float" office:value="0" table:formula="of:=IF(INDEX([Tracker.$A$1:.$AG$120];6+9*(MONTH([.$A202])-1)+(COLUMN()-4);DAY([.$A202])+2)&lt;&gt;&quot;&quot;;1;0)" table:style-name="ce92"/>
          <table:table-cell office:value-type="float" office:value="0" table:formula="of:=SUM([.D202:.I202])" table:style-name="ce6"/>
          <table:table-cell office:value-type="percentage" office:value="0" table:formula="of:=[.J202]/6" table:style-name="ce8">
            <text:p>0%</text:p>
          </table:table-cell>
          <table:table-cell table:style-name="ce1"/>
          <table:table-cell office:value-type="float" office:value="0" table:formula="of:=IF([.D202]=1;[.M201]+1;0)" table:style-name="ce1">
            <text:p>0</text:p>
          </table:table-cell>
          <table:table-cell office:value-type="float" office:value="0" table:formula="of:=IF([.E202]=1;[.N201]+1;0)" table:style-name="ce1">
            <text:p>0</text:p>
          </table:table-cell>
          <table:table-cell office:value-type="float" office:value="0" table:formula="of:=IF([.F202]=1;[.O201]+1;0)" table:style-name="ce1">
            <text:p>0</text:p>
          </table:table-cell>
          <table:table-cell office:value-type="float" office:value="0" table:formula="of:=IF([.G202]=1;[.P201]+1;0)" table:style-name="ce1">
            <text:p>0</text:p>
          </table:table-cell>
          <table:table-cell office:value-type="float" office:value="0" table:formula="of:=IF([.H202]=1;[.Q201]+1;0)" table:style-name="ce1">
            <text:p>0</text:p>
          </table:table-cell>
          <table:table-cell office:value-type="float" office:value="0" table:formula="of:=IF([.I202]=1;[.R20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19T00:00:00" table:formula="of:=[.A202]+1" table:style-name="ce10">
            <text:p>Sun, 19 Jul 2026</text:p>
          </table:table-cell>
          <table:table-cell office:value-type="string" office:string-value="Sun" table:formula="of:=TEXT([.A203];&quot;ddd&quot;)" table:style-name="ce5">
            <text:p>Sun</text:p>
          </table:table-cell>
          <table:table-cell office:value-type="string" office:string-value="Jul" table:formula="of:=TEXT([.A203];&quot;mmm&quot;)" table:style-name="ce5">
            <text:p>Jul</text:p>
          </table:table-cell>
          <table:table-cell office:value-type="float" office:value="0" table:formula="of:=IF(INDEX([Tracker.$A$1:.$AG$120];6+9*(MONTH([.$A203])-1)+(COLUMN()-4);DAY([.$A203])+2)&lt;&gt;&quot;&quot;;1;0)" table:style-name="ce92"/>
          <table:table-cell office:value-type="float" office:value="0" table:formula="of:=IF(INDEX([Tracker.$A$1:.$AG$120];6+9*(MONTH([.$A203])-1)+(COLUMN()-4);DAY([.$A203])+2)&lt;&gt;&quot;&quot;;1;0)" table:style-name="ce92"/>
          <table:table-cell office:value-type="float" office:value="0" table:formula="of:=IF(INDEX([Tracker.$A$1:.$AG$120];6+9*(MONTH([.$A203])-1)+(COLUMN()-4);DAY([.$A203])+2)&lt;&gt;&quot;&quot;;1;0)" table:style-name="ce92"/>
          <table:table-cell office:value-type="float" office:value="0" table:formula="of:=IF(INDEX([Tracker.$A$1:.$AG$120];6+9*(MONTH([.$A203])-1)+(COLUMN()-4);DAY([.$A203])+2)&lt;&gt;&quot;&quot;;1;0)" table:style-name="ce92"/>
          <table:table-cell office:value-type="float" office:value="0" table:formula="of:=IF(INDEX([Tracker.$A$1:.$AG$120];6+9*(MONTH([.$A203])-1)+(COLUMN()-4);DAY([.$A203])+2)&lt;&gt;&quot;&quot;;1;0)" table:style-name="ce92"/>
          <table:table-cell office:value-type="float" office:value="0" table:formula="of:=IF(INDEX([Tracker.$A$1:.$AG$120];6+9*(MONTH([.$A203])-1)+(COLUMN()-4);DAY([.$A203])+2)&lt;&gt;&quot;&quot;;1;0)" table:style-name="ce92"/>
          <table:table-cell office:value-type="float" office:value="0" table:formula="of:=SUM([.D203:.I203])" table:style-name="ce6"/>
          <table:table-cell office:value-type="percentage" office:value="0" table:formula="of:=[.J203]/6" table:style-name="ce8">
            <text:p>0%</text:p>
          </table:table-cell>
          <table:table-cell table:style-name="ce1"/>
          <table:table-cell office:value-type="float" office:value="0" table:formula="of:=IF([.D203]=1;[.M202]+1;0)" table:style-name="ce1">
            <text:p>0</text:p>
          </table:table-cell>
          <table:table-cell office:value-type="float" office:value="0" table:formula="of:=IF([.E203]=1;[.N202]+1;0)" table:style-name="ce1">
            <text:p>0</text:p>
          </table:table-cell>
          <table:table-cell office:value-type="float" office:value="0" table:formula="of:=IF([.F203]=1;[.O202]+1;0)" table:style-name="ce1">
            <text:p>0</text:p>
          </table:table-cell>
          <table:table-cell office:value-type="float" office:value="0" table:formula="of:=IF([.G203]=1;[.P202]+1;0)" table:style-name="ce1">
            <text:p>0</text:p>
          </table:table-cell>
          <table:table-cell office:value-type="float" office:value="0" table:formula="of:=IF([.H203]=1;[.Q202]+1;0)" table:style-name="ce1">
            <text:p>0</text:p>
          </table:table-cell>
          <table:table-cell office:value-type="float" office:value="0" table:formula="of:=IF([.I203]=1;[.R20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0T00:00:00" table:formula="of:=[.A203]+1" table:style-name="ce10">
            <text:p>Mon, 20 Jul 2026</text:p>
          </table:table-cell>
          <table:table-cell office:value-type="string" office:string-value="Mon" table:formula="of:=TEXT([.A204];&quot;ddd&quot;)" table:style-name="ce5">
            <text:p>Mon</text:p>
          </table:table-cell>
          <table:table-cell office:value-type="string" office:string-value="Jul" table:formula="of:=TEXT([.A204];&quot;mmm&quot;)" table:style-name="ce5">
            <text:p>Jul</text:p>
          </table:table-cell>
          <table:table-cell office:value-type="float" office:value="0" table:formula="of:=IF(INDEX([Tracker.$A$1:.$AG$120];6+9*(MONTH([.$A204])-1)+(COLUMN()-4);DAY([.$A204])+2)&lt;&gt;&quot;&quot;;1;0)" table:style-name="ce92"/>
          <table:table-cell office:value-type="float" office:value="0" table:formula="of:=IF(INDEX([Tracker.$A$1:.$AG$120];6+9*(MONTH([.$A204])-1)+(COLUMN()-4);DAY([.$A204])+2)&lt;&gt;&quot;&quot;;1;0)" table:style-name="ce92"/>
          <table:table-cell office:value-type="float" office:value="0" table:formula="of:=IF(INDEX([Tracker.$A$1:.$AG$120];6+9*(MONTH([.$A204])-1)+(COLUMN()-4);DAY([.$A204])+2)&lt;&gt;&quot;&quot;;1;0)" table:style-name="ce92"/>
          <table:table-cell office:value-type="float" office:value="0" table:formula="of:=IF(INDEX([Tracker.$A$1:.$AG$120];6+9*(MONTH([.$A204])-1)+(COLUMN()-4);DAY([.$A204])+2)&lt;&gt;&quot;&quot;;1;0)" table:style-name="ce92"/>
          <table:table-cell office:value-type="float" office:value="0" table:formula="of:=IF(INDEX([Tracker.$A$1:.$AG$120];6+9*(MONTH([.$A204])-1)+(COLUMN()-4);DAY([.$A204])+2)&lt;&gt;&quot;&quot;;1;0)" table:style-name="ce92"/>
          <table:table-cell office:value-type="float" office:value="0" table:formula="of:=IF(INDEX([Tracker.$A$1:.$AG$120];6+9*(MONTH([.$A204])-1)+(COLUMN()-4);DAY([.$A204])+2)&lt;&gt;&quot;&quot;;1;0)" table:style-name="ce92"/>
          <table:table-cell office:value-type="float" office:value="0" table:formula="of:=SUM([.D204:.I204])" table:style-name="ce6"/>
          <table:table-cell office:value-type="percentage" office:value="0" table:formula="of:=[.J204]/6" table:style-name="ce8">
            <text:p>0%</text:p>
          </table:table-cell>
          <table:table-cell table:style-name="ce1"/>
          <table:table-cell office:value-type="float" office:value="0" table:formula="of:=IF([.D204]=1;[.M203]+1;0)" table:style-name="ce1">
            <text:p>0</text:p>
          </table:table-cell>
          <table:table-cell office:value-type="float" office:value="0" table:formula="of:=IF([.E204]=1;[.N203]+1;0)" table:style-name="ce1">
            <text:p>0</text:p>
          </table:table-cell>
          <table:table-cell office:value-type="float" office:value="0" table:formula="of:=IF([.F204]=1;[.O203]+1;0)" table:style-name="ce1">
            <text:p>0</text:p>
          </table:table-cell>
          <table:table-cell office:value-type="float" office:value="0" table:formula="of:=IF([.G204]=1;[.P203]+1;0)" table:style-name="ce1">
            <text:p>0</text:p>
          </table:table-cell>
          <table:table-cell office:value-type="float" office:value="0" table:formula="of:=IF([.H204]=1;[.Q203]+1;0)" table:style-name="ce1">
            <text:p>0</text:p>
          </table:table-cell>
          <table:table-cell office:value-type="float" office:value="0" table:formula="of:=IF([.I204]=1;[.R20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1T00:00:00" table:formula="of:=[.A204]+1" table:style-name="ce10">
            <text:p>Tue, 21 Jul 2026</text:p>
          </table:table-cell>
          <table:table-cell office:value-type="string" office:string-value="Tue" table:formula="of:=TEXT([.A205];&quot;ddd&quot;)" table:style-name="ce5">
            <text:p>Tue</text:p>
          </table:table-cell>
          <table:table-cell office:value-type="string" office:string-value="Jul" table:formula="of:=TEXT([.A205];&quot;mmm&quot;)" table:style-name="ce5">
            <text:p>Jul</text:p>
          </table:table-cell>
          <table:table-cell office:value-type="float" office:value="0" table:formula="of:=IF(INDEX([Tracker.$A$1:.$AG$120];6+9*(MONTH([.$A205])-1)+(COLUMN()-4);DAY([.$A205])+2)&lt;&gt;&quot;&quot;;1;0)" table:style-name="ce92"/>
          <table:table-cell office:value-type="float" office:value="0" table:formula="of:=IF(INDEX([Tracker.$A$1:.$AG$120];6+9*(MONTH([.$A205])-1)+(COLUMN()-4);DAY([.$A205])+2)&lt;&gt;&quot;&quot;;1;0)" table:style-name="ce92"/>
          <table:table-cell office:value-type="float" office:value="0" table:formula="of:=IF(INDEX([Tracker.$A$1:.$AG$120];6+9*(MONTH([.$A205])-1)+(COLUMN()-4);DAY([.$A205])+2)&lt;&gt;&quot;&quot;;1;0)" table:style-name="ce92"/>
          <table:table-cell office:value-type="float" office:value="0" table:formula="of:=IF(INDEX([Tracker.$A$1:.$AG$120];6+9*(MONTH([.$A205])-1)+(COLUMN()-4);DAY([.$A205])+2)&lt;&gt;&quot;&quot;;1;0)" table:style-name="ce92"/>
          <table:table-cell office:value-type="float" office:value="0" table:formula="of:=IF(INDEX([Tracker.$A$1:.$AG$120];6+9*(MONTH([.$A205])-1)+(COLUMN()-4);DAY([.$A205])+2)&lt;&gt;&quot;&quot;;1;0)" table:style-name="ce92"/>
          <table:table-cell office:value-type="float" office:value="0" table:formula="of:=IF(INDEX([Tracker.$A$1:.$AG$120];6+9*(MONTH([.$A205])-1)+(COLUMN()-4);DAY([.$A205])+2)&lt;&gt;&quot;&quot;;1;0)" table:style-name="ce92"/>
          <table:table-cell office:value-type="float" office:value="0" table:formula="of:=SUM([.D205:.I205])" table:style-name="ce6"/>
          <table:table-cell office:value-type="percentage" office:value="0" table:formula="of:=[.J205]/6" table:style-name="ce8">
            <text:p>0%</text:p>
          </table:table-cell>
          <table:table-cell table:style-name="ce1"/>
          <table:table-cell office:value-type="float" office:value="0" table:formula="of:=IF([.D205]=1;[.M204]+1;0)" table:style-name="ce1">
            <text:p>0</text:p>
          </table:table-cell>
          <table:table-cell office:value-type="float" office:value="0" table:formula="of:=IF([.E205]=1;[.N204]+1;0)" table:style-name="ce1">
            <text:p>0</text:p>
          </table:table-cell>
          <table:table-cell office:value-type="float" office:value="0" table:formula="of:=IF([.F205]=1;[.O204]+1;0)" table:style-name="ce1">
            <text:p>0</text:p>
          </table:table-cell>
          <table:table-cell office:value-type="float" office:value="0" table:formula="of:=IF([.G205]=1;[.P204]+1;0)" table:style-name="ce1">
            <text:p>0</text:p>
          </table:table-cell>
          <table:table-cell office:value-type="float" office:value="0" table:formula="of:=IF([.H205]=1;[.Q204]+1;0)" table:style-name="ce1">
            <text:p>0</text:p>
          </table:table-cell>
          <table:table-cell office:value-type="float" office:value="0" table:formula="of:=IF([.I205]=1;[.R20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2T00:00:00" table:formula="of:=[.A205]+1" table:style-name="ce10">
            <text:p>Wed, 22 Jul 2026</text:p>
          </table:table-cell>
          <table:table-cell office:value-type="string" office:string-value="Wed" table:formula="of:=TEXT([.A206];&quot;ddd&quot;)" table:style-name="ce5">
            <text:p>Wed</text:p>
          </table:table-cell>
          <table:table-cell office:value-type="string" office:string-value="Jul" table:formula="of:=TEXT([.A206];&quot;mmm&quot;)" table:style-name="ce5">
            <text:p>Jul</text:p>
          </table:table-cell>
          <table:table-cell office:value-type="float" office:value="0" table:formula="of:=IF(INDEX([Tracker.$A$1:.$AG$120];6+9*(MONTH([.$A206])-1)+(COLUMN()-4);DAY([.$A206])+2)&lt;&gt;&quot;&quot;;1;0)" table:style-name="ce92"/>
          <table:table-cell office:value-type="float" office:value="0" table:formula="of:=IF(INDEX([Tracker.$A$1:.$AG$120];6+9*(MONTH([.$A206])-1)+(COLUMN()-4);DAY([.$A206])+2)&lt;&gt;&quot;&quot;;1;0)" table:style-name="ce92"/>
          <table:table-cell office:value-type="float" office:value="0" table:formula="of:=IF(INDEX([Tracker.$A$1:.$AG$120];6+9*(MONTH([.$A206])-1)+(COLUMN()-4);DAY([.$A206])+2)&lt;&gt;&quot;&quot;;1;0)" table:style-name="ce92"/>
          <table:table-cell office:value-type="float" office:value="0" table:formula="of:=IF(INDEX([Tracker.$A$1:.$AG$120];6+9*(MONTH([.$A206])-1)+(COLUMN()-4);DAY([.$A206])+2)&lt;&gt;&quot;&quot;;1;0)" table:style-name="ce92"/>
          <table:table-cell office:value-type="float" office:value="0" table:formula="of:=IF(INDEX([Tracker.$A$1:.$AG$120];6+9*(MONTH([.$A206])-1)+(COLUMN()-4);DAY([.$A206])+2)&lt;&gt;&quot;&quot;;1;0)" table:style-name="ce92"/>
          <table:table-cell office:value-type="float" office:value="0" table:formula="of:=IF(INDEX([Tracker.$A$1:.$AG$120];6+9*(MONTH([.$A206])-1)+(COLUMN()-4);DAY([.$A206])+2)&lt;&gt;&quot;&quot;;1;0)" table:style-name="ce92"/>
          <table:table-cell office:value-type="float" office:value="0" table:formula="of:=SUM([.D206:.I206])" table:style-name="ce6"/>
          <table:table-cell office:value-type="percentage" office:value="0" table:formula="of:=[.J206]/6" table:style-name="ce8">
            <text:p>0%</text:p>
          </table:table-cell>
          <table:table-cell table:style-name="ce1"/>
          <table:table-cell office:value-type="float" office:value="0" table:formula="of:=IF([.D206]=1;[.M205]+1;0)" table:style-name="ce1">
            <text:p>0</text:p>
          </table:table-cell>
          <table:table-cell office:value-type="float" office:value="0" table:formula="of:=IF([.E206]=1;[.N205]+1;0)" table:style-name="ce1">
            <text:p>0</text:p>
          </table:table-cell>
          <table:table-cell office:value-type="float" office:value="0" table:formula="of:=IF([.F206]=1;[.O205]+1;0)" table:style-name="ce1">
            <text:p>0</text:p>
          </table:table-cell>
          <table:table-cell office:value-type="float" office:value="0" table:formula="of:=IF([.G206]=1;[.P205]+1;0)" table:style-name="ce1">
            <text:p>0</text:p>
          </table:table-cell>
          <table:table-cell office:value-type="float" office:value="0" table:formula="of:=IF([.H206]=1;[.Q205]+1;0)" table:style-name="ce1">
            <text:p>0</text:p>
          </table:table-cell>
          <table:table-cell office:value-type="float" office:value="0" table:formula="of:=IF([.I206]=1;[.R20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3T00:00:00" table:formula="of:=[.A206]+1" table:style-name="ce10">
            <text:p>Thu, 23 Jul 2026</text:p>
          </table:table-cell>
          <table:table-cell office:value-type="string" office:string-value="Thu" table:formula="of:=TEXT([.A207];&quot;ddd&quot;)" table:style-name="ce5">
            <text:p>Thu</text:p>
          </table:table-cell>
          <table:table-cell office:value-type="string" office:string-value="Jul" table:formula="of:=TEXT([.A207];&quot;mmm&quot;)" table:style-name="ce5">
            <text:p>Jul</text:p>
          </table:table-cell>
          <table:table-cell office:value-type="float" office:value="0" table:formula="of:=IF(INDEX([Tracker.$A$1:.$AG$120];6+9*(MONTH([.$A207])-1)+(COLUMN()-4);DAY([.$A207])+2)&lt;&gt;&quot;&quot;;1;0)" table:style-name="ce92"/>
          <table:table-cell office:value-type="float" office:value="0" table:formula="of:=IF(INDEX([Tracker.$A$1:.$AG$120];6+9*(MONTH([.$A207])-1)+(COLUMN()-4);DAY([.$A207])+2)&lt;&gt;&quot;&quot;;1;0)" table:style-name="ce92"/>
          <table:table-cell office:value-type="float" office:value="0" table:formula="of:=IF(INDEX([Tracker.$A$1:.$AG$120];6+9*(MONTH([.$A207])-1)+(COLUMN()-4);DAY([.$A207])+2)&lt;&gt;&quot;&quot;;1;0)" table:style-name="ce92"/>
          <table:table-cell office:value-type="float" office:value="0" table:formula="of:=IF(INDEX([Tracker.$A$1:.$AG$120];6+9*(MONTH([.$A207])-1)+(COLUMN()-4);DAY([.$A207])+2)&lt;&gt;&quot;&quot;;1;0)" table:style-name="ce92"/>
          <table:table-cell office:value-type="float" office:value="0" table:formula="of:=IF(INDEX([Tracker.$A$1:.$AG$120];6+9*(MONTH([.$A207])-1)+(COLUMN()-4);DAY([.$A207])+2)&lt;&gt;&quot;&quot;;1;0)" table:style-name="ce92"/>
          <table:table-cell office:value-type="float" office:value="0" table:formula="of:=IF(INDEX([Tracker.$A$1:.$AG$120];6+9*(MONTH([.$A207])-1)+(COLUMN()-4);DAY([.$A207])+2)&lt;&gt;&quot;&quot;;1;0)" table:style-name="ce92"/>
          <table:table-cell office:value-type="float" office:value="0" table:formula="of:=SUM([.D207:.I207])" table:style-name="ce6"/>
          <table:table-cell office:value-type="percentage" office:value="0" table:formula="of:=[.J207]/6" table:style-name="ce8">
            <text:p>0%</text:p>
          </table:table-cell>
          <table:table-cell table:style-name="ce1"/>
          <table:table-cell office:value-type="float" office:value="0" table:formula="of:=IF([.D207]=1;[.M206]+1;0)" table:style-name="ce1">
            <text:p>0</text:p>
          </table:table-cell>
          <table:table-cell office:value-type="float" office:value="0" table:formula="of:=IF([.E207]=1;[.N206]+1;0)" table:style-name="ce1">
            <text:p>0</text:p>
          </table:table-cell>
          <table:table-cell office:value-type="float" office:value="0" table:formula="of:=IF([.F207]=1;[.O206]+1;0)" table:style-name="ce1">
            <text:p>0</text:p>
          </table:table-cell>
          <table:table-cell office:value-type="float" office:value="0" table:formula="of:=IF([.G207]=1;[.P206]+1;0)" table:style-name="ce1">
            <text:p>0</text:p>
          </table:table-cell>
          <table:table-cell office:value-type="float" office:value="0" table:formula="of:=IF([.H207]=1;[.Q206]+1;0)" table:style-name="ce1">
            <text:p>0</text:p>
          </table:table-cell>
          <table:table-cell office:value-type="float" office:value="0" table:formula="of:=IF([.I207]=1;[.R20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4T00:00:00" table:formula="of:=[.A207]+1" table:style-name="ce10">
            <text:p>Fri, 24 Jul 2026</text:p>
          </table:table-cell>
          <table:table-cell office:value-type="string" office:string-value="Fri" table:formula="of:=TEXT([.A208];&quot;ddd&quot;)" table:style-name="ce5">
            <text:p>Fri</text:p>
          </table:table-cell>
          <table:table-cell office:value-type="string" office:string-value="Jul" table:formula="of:=TEXT([.A208];&quot;mmm&quot;)" table:style-name="ce5">
            <text:p>Jul</text:p>
          </table:table-cell>
          <table:table-cell office:value-type="float" office:value="0" table:formula="of:=IF(INDEX([Tracker.$A$1:.$AG$120];6+9*(MONTH([.$A208])-1)+(COLUMN()-4);DAY([.$A208])+2)&lt;&gt;&quot;&quot;;1;0)" table:style-name="ce92"/>
          <table:table-cell office:value-type="float" office:value="0" table:formula="of:=IF(INDEX([Tracker.$A$1:.$AG$120];6+9*(MONTH([.$A208])-1)+(COLUMN()-4);DAY([.$A208])+2)&lt;&gt;&quot;&quot;;1;0)" table:style-name="ce92"/>
          <table:table-cell office:value-type="float" office:value="0" table:formula="of:=IF(INDEX([Tracker.$A$1:.$AG$120];6+9*(MONTH([.$A208])-1)+(COLUMN()-4);DAY([.$A208])+2)&lt;&gt;&quot;&quot;;1;0)" table:style-name="ce92"/>
          <table:table-cell office:value-type="float" office:value="0" table:formula="of:=IF(INDEX([Tracker.$A$1:.$AG$120];6+9*(MONTH([.$A208])-1)+(COLUMN()-4);DAY([.$A208])+2)&lt;&gt;&quot;&quot;;1;0)" table:style-name="ce92"/>
          <table:table-cell office:value-type="float" office:value="0" table:formula="of:=IF(INDEX([Tracker.$A$1:.$AG$120];6+9*(MONTH([.$A208])-1)+(COLUMN()-4);DAY([.$A208])+2)&lt;&gt;&quot;&quot;;1;0)" table:style-name="ce92"/>
          <table:table-cell office:value-type="float" office:value="0" table:formula="of:=IF(INDEX([Tracker.$A$1:.$AG$120];6+9*(MONTH([.$A208])-1)+(COLUMN()-4);DAY([.$A208])+2)&lt;&gt;&quot;&quot;;1;0)" table:style-name="ce92"/>
          <table:table-cell office:value-type="float" office:value="0" table:formula="of:=SUM([.D208:.I208])" table:style-name="ce6"/>
          <table:table-cell office:value-type="percentage" office:value="0" table:formula="of:=[.J208]/6" table:style-name="ce8">
            <text:p>0%</text:p>
          </table:table-cell>
          <table:table-cell table:style-name="ce1"/>
          <table:table-cell office:value-type="float" office:value="0" table:formula="of:=IF([.D208]=1;[.M207]+1;0)" table:style-name="ce1">
            <text:p>0</text:p>
          </table:table-cell>
          <table:table-cell office:value-type="float" office:value="0" table:formula="of:=IF([.E208]=1;[.N207]+1;0)" table:style-name="ce1">
            <text:p>0</text:p>
          </table:table-cell>
          <table:table-cell office:value-type="float" office:value="0" table:formula="of:=IF([.F208]=1;[.O207]+1;0)" table:style-name="ce1">
            <text:p>0</text:p>
          </table:table-cell>
          <table:table-cell office:value-type="float" office:value="0" table:formula="of:=IF([.G208]=1;[.P207]+1;0)" table:style-name="ce1">
            <text:p>0</text:p>
          </table:table-cell>
          <table:table-cell office:value-type="float" office:value="0" table:formula="of:=IF([.H208]=1;[.Q207]+1;0)" table:style-name="ce1">
            <text:p>0</text:p>
          </table:table-cell>
          <table:table-cell office:value-type="float" office:value="0" table:formula="of:=IF([.I208]=1;[.R20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5T00:00:00" table:formula="of:=[.A208]+1" table:style-name="ce10">
            <text:p>Sat, 25 Jul 2026</text:p>
          </table:table-cell>
          <table:table-cell office:value-type="string" office:string-value="Sat" table:formula="of:=TEXT([.A209];&quot;ddd&quot;)" table:style-name="ce5">
            <text:p>Sat</text:p>
          </table:table-cell>
          <table:table-cell office:value-type="string" office:string-value="Jul" table:formula="of:=TEXT([.A209];&quot;mmm&quot;)" table:style-name="ce5">
            <text:p>Jul</text:p>
          </table:table-cell>
          <table:table-cell office:value-type="float" office:value="0" table:formula="of:=IF(INDEX([Tracker.$A$1:.$AG$120];6+9*(MONTH([.$A209])-1)+(COLUMN()-4);DAY([.$A209])+2)&lt;&gt;&quot;&quot;;1;0)" table:style-name="ce92"/>
          <table:table-cell office:value-type="float" office:value="0" table:formula="of:=IF(INDEX([Tracker.$A$1:.$AG$120];6+9*(MONTH([.$A209])-1)+(COLUMN()-4);DAY([.$A209])+2)&lt;&gt;&quot;&quot;;1;0)" table:style-name="ce92"/>
          <table:table-cell office:value-type="float" office:value="0" table:formula="of:=IF(INDEX([Tracker.$A$1:.$AG$120];6+9*(MONTH([.$A209])-1)+(COLUMN()-4);DAY([.$A209])+2)&lt;&gt;&quot;&quot;;1;0)" table:style-name="ce92"/>
          <table:table-cell office:value-type="float" office:value="0" table:formula="of:=IF(INDEX([Tracker.$A$1:.$AG$120];6+9*(MONTH([.$A209])-1)+(COLUMN()-4);DAY([.$A209])+2)&lt;&gt;&quot;&quot;;1;0)" table:style-name="ce92"/>
          <table:table-cell office:value-type="float" office:value="0" table:formula="of:=IF(INDEX([Tracker.$A$1:.$AG$120];6+9*(MONTH([.$A209])-1)+(COLUMN()-4);DAY([.$A209])+2)&lt;&gt;&quot;&quot;;1;0)" table:style-name="ce92"/>
          <table:table-cell office:value-type="float" office:value="0" table:formula="of:=IF(INDEX([Tracker.$A$1:.$AG$120];6+9*(MONTH([.$A209])-1)+(COLUMN()-4);DAY([.$A209])+2)&lt;&gt;&quot;&quot;;1;0)" table:style-name="ce92"/>
          <table:table-cell office:value-type="float" office:value="0" table:formula="of:=SUM([.D209:.I209])" table:style-name="ce6"/>
          <table:table-cell office:value-type="percentage" office:value="0" table:formula="of:=[.J209]/6" table:style-name="ce8">
            <text:p>0%</text:p>
          </table:table-cell>
          <table:table-cell table:style-name="ce1"/>
          <table:table-cell office:value-type="float" office:value="0" table:formula="of:=IF([.D209]=1;[.M208]+1;0)" table:style-name="ce1">
            <text:p>0</text:p>
          </table:table-cell>
          <table:table-cell office:value-type="float" office:value="0" table:formula="of:=IF([.E209]=1;[.N208]+1;0)" table:style-name="ce1">
            <text:p>0</text:p>
          </table:table-cell>
          <table:table-cell office:value-type="float" office:value="0" table:formula="of:=IF([.F209]=1;[.O208]+1;0)" table:style-name="ce1">
            <text:p>0</text:p>
          </table:table-cell>
          <table:table-cell office:value-type="float" office:value="0" table:formula="of:=IF([.G209]=1;[.P208]+1;0)" table:style-name="ce1">
            <text:p>0</text:p>
          </table:table-cell>
          <table:table-cell office:value-type="float" office:value="0" table:formula="of:=IF([.H209]=1;[.Q208]+1;0)" table:style-name="ce1">
            <text:p>0</text:p>
          </table:table-cell>
          <table:table-cell office:value-type="float" office:value="0" table:formula="of:=IF([.I209]=1;[.R20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6T00:00:00" table:formula="of:=[.A209]+1" table:style-name="ce10">
            <text:p>Sun, 26 Jul 2026</text:p>
          </table:table-cell>
          <table:table-cell office:value-type="string" office:string-value="Sun" table:formula="of:=TEXT([.A210];&quot;ddd&quot;)" table:style-name="ce5">
            <text:p>Sun</text:p>
          </table:table-cell>
          <table:table-cell office:value-type="string" office:string-value="Jul" table:formula="of:=TEXT([.A210];&quot;mmm&quot;)" table:style-name="ce5">
            <text:p>Jul</text:p>
          </table:table-cell>
          <table:table-cell office:value-type="float" office:value="0" table:formula="of:=IF(INDEX([Tracker.$A$1:.$AG$120];6+9*(MONTH([.$A210])-1)+(COLUMN()-4);DAY([.$A210])+2)&lt;&gt;&quot;&quot;;1;0)" table:style-name="ce92"/>
          <table:table-cell office:value-type="float" office:value="0" table:formula="of:=IF(INDEX([Tracker.$A$1:.$AG$120];6+9*(MONTH([.$A210])-1)+(COLUMN()-4);DAY([.$A210])+2)&lt;&gt;&quot;&quot;;1;0)" table:style-name="ce92"/>
          <table:table-cell office:value-type="float" office:value="0" table:formula="of:=IF(INDEX([Tracker.$A$1:.$AG$120];6+9*(MONTH([.$A210])-1)+(COLUMN()-4);DAY([.$A210])+2)&lt;&gt;&quot;&quot;;1;0)" table:style-name="ce92"/>
          <table:table-cell office:value-type="float" office:value="0" table:formula="of:=IF(INDEX([Tracker.$A$1:.$AG$120];6+9*(MONTH([.$A210])-1)+(COLUMN()-4);DAY([.$A210])+2)&lt;&gt;&quot;&quot;;1;0)" table:style-name="ce92"/>
          <table:table-cell office:value-type="float" office:value="0" table:formula="of:=IF(INDEX([Tracker.$A$1:.$AG$120];6+9*(MONTH([.$A210])-1)+(COLUMN()-4);DAY([.$A210])+2)&lt;&gt;&quot;&quot;;1;0)" table:style-name="ce92"/>
          <table:table-cell office:value-type="float" office:value="0" table:formula="of:=IF(INDEX([Tracker.$A$1:.$AG$120];6+9*(MONTH([.$A210])-1)+(COLUMN()-4);DAY([.$A210])+2)&lt;&gt;&quot;&quot;;1;0)" table:style-name="ce92"/>
          <table:table-cell office:value-type="float" office:value="0" table:formula="of:=SUM([.D210:.I210])" table:style-name="ce6"/>
          <table:table-cell office:value-type="percentage" office:value="0" table:formula="of:=[.J210]/6" table:style-name="ce8">
            <text:p>0%</text:p>
          </table:table-cell>
          <table:table-cell table:style-name="ce1"/>
          <table:table-cell office:value-type="float" office:value="0" table:formula="of:=IF([.D210]=1;[.M209]+1;0)" table:style-name="ce1">
            <text:p>0</text:p>
          </table:table-cell>
          <table:table-cell office:value-type="float" office:value="0" table:formula="of:=IF([.E210]=1;[.N209]+1;0)" table:style-name="ce1">
            <text:p>0</text:p>
          </table:table-cell>
          <table:table-cell office:value-type="float" office:value="0" table:formula="of:=IF([.F210]=1;[.O209]+1;0)" table:style-name="ce1">
            <text:p>0</text:p>
          </table:table-cell>
          <table:table-cell office:value-type="float" office:value="0" table:formula="of:=IF([.G210]=1;[.P209]+1;0)" table:style-name="ce1">
            <text:p>0</text:p>
          </table:table-cell>
          <table:table-cell office:value-type="float" office:value="0" table:formula="of:=IF([.H210]=1;[.Q209]+1;0)" table:style-name="ce1">
            <text:p>0</text:p>
          </table:table-cell>
          <table:table-cell office:value-type="float" office:value="0" table:formula="of:=IF([.I210]=1;[.R20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7T00:00:00" table:formula="of:=[.A210]+1" table:style-name="ce10">
            <text:p>Mon, 27 Jul 2026</text:p>
          </table:table-cell>
          <table:table-cell office:value-type="string" office:string-value="Mon" table:formula="of:=TEXT([.A211];&quot;ddd&quot;)" table:style-name="ce5">
            <text:p>Mon</text:p>
          </table:table-cell>
          <table:table-cell office:value-type="string" office:string-value="Jul" table:formula="of:=TEXT([.A211];&quot;mmm&quot;)" table:style-name="ce5">
            <text:p>Jul</text:p>
          </table:table-cell>
          <table:table-cell office:value-type="float" office:value="0" table:formula="of:=IF(INDEX([Tracker.$A$1:.$AG$120];6+9*(MONTH([.$A211])-1)+(COLUMN()-4);DAY([.$A211])+2)&lt;&gt;&quot;&quot;;1;0)" table:style-name="ce92"/>
          <table:table-cell office:value-type="float" office:value="0" table:formula="of:=IF(INDEX([Tracker.$A$1:.$AG$120];6+9*(MONTH([.$A211])-1)+(COLUMN()-4);DAY([.$A211])+2)&lt;&gt;&quot;&quot;;1;0)" table:style-name="ce92"/>
          <table:table-cell office:value-type="float" office:value="0" table:formula="of:=IF(INDEX([Tracker.$A$1:.$AG$120];6+9*(MONTH([.$A211])-1)+(COLUMN()-4);DAY([.$A211])+2)&lt;&gt;&quot;&quot;;1;0)" table:style-name="ce92"/>
          <table:table-cell office:value-type="float" office:value="0" table:formula="of:=IF(INDEX([Tracker.$A$1:.$AG$120];6+9*(MONTH([.$A211])-1)+(COLUMN()-4);DAY([.$A211])+2)&lt;&gt;&quot;&quot;;1;0)" table:style-name="ce92"/>
          <table:table-cell office:value-type="float" office:value="0" table:formula="of:=IF(INDEX([Tracker.$A$1:.$AG$120];6+9*(MONTH([.$A211])-1)+(COLUMN()-4);DAY([.$A211])+2)&lt;&gt;&quot;&quot;;1;0)" table:style-name="ce92"/>
          <table:table-cell office:value-type="float" office:value="0" table:formula="of:=IF(INDEX([Tracker.$A$1:.$AG$120];6+9*(MONTH([.$A211])-1)+(COLUMN()-4);DAY([.$A211])+2)&lt;&gt;&quot;&quot;;1;0)" table:style-name="ce92"/>
          <table:table-cell office:value-type="float" office:value="0" table:formula="of:=SUM([.D211:.I211])" table:style-name="ce6"/>
          <table:table-cell office:value-type="percentage" office:value="0" table:formula="of:=[.J211]/6" table:style-name="ce8">
            <text:p>0%</text:p>
          </table:table-cell>
          <table:table-cell table:style-name="ce1"/>
          <table:table-cell office:value-type="float" office:value="0" table:formula="of:=IF([.D211]=1;[.M210]+1;0)" table:style-name="ce1">
            <text:p>0</text:p>
          </table:table-cell>
          <table:table-cell office:value-type="float" office:value="0" table:formula="of:=IF([.E211]=1;[.N210]+1;0)" table:style-name="ce1">
            <text:p>0</text:p>
          </table:table-cell>
          <table:table-cell office:value-type="float" office:value="0" table:formula="of:=IF([.F211]=1;[.O210]+1;0)" table:style-name="ce1">
            <text:p>0</text:p>
          </table:table-cell>
          <table:table-cell office:value-type="float" office:value="0" table:formula="of:=IF([.G211]=1;[.P210]+1;0)" table:style-name="ce1">
            <text:p>0</text:p>
          </table:table-cell>
          <table:table-cell office:value-type="float" office:value="0" table:formula="of:=IF([.H211]=1;[.Q210]+1;0)" table:style-name="ce1">
            <text:p>0</text:p>
          </table:table-cell>
          <table:table-cell office:value-type="float" office:value="0" table:formula="of:=IF([.I211]=1;[.R21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8T00:00:00" table:formula="of:=[.A211]+1" table:style-name="ce10">
            <text:p>Tue, 28 Jul 2026</text:p>
          </table:table-cell>
          <table:table-cell office:value-type="string" office:string-value="Tue" table:formula="of:=TEXT([.A212];&quot;ddd&quot;)" table:style-name="ce5">
            <text:p>Tue</text:p>
          </table:table-cell>
          <table:table-cell office:value-type="string" office:string-value="Jul" table:formula="of:=TEXT([.A212];&quot;mmm&quot;)" table:style-name="ce5">
            <text:p>Jul</text:p>
          </table:table-cell>
          <table:table-cell office:value-type="float" office:value="0" table:formula="of:=IF(INDEX([Tracker.$A$1:.$AG$120];6+9*(MONTH([.$A212])-1)+(COLUMN()-4);DAY([.$A212])+2)&lt;&gt;&quot;&quot;;1;0)" table:style-name="ce92"/>
          <table:table-cell office:value-type="float" office:value="0" table:formula="of:=IF(INDEX([Tracker.$A$1:.$AG$120];6+9*(MONTH([.$A212])-1)+(COLUMN()-4);DAY([.$A212])+2)&lt;&gt;&quot;&quot;;1;0)" table:style-name="ce92"/>
          <table:table-cell office:value-type="float" office:value="0" table:formula="of:=IF(INDEX([Tracker.$A$1:.$AG$120];6+9*(MONTH([.$A212])-1)+(COLUMN()-4);DAY([.$A212])+2)&lt;&gt;&quot;&quot;;1;0)" table:style-name="ce92"/>
          <table:table-cell office:value-type="float" office:value="0" table:formula="of:=IF(INDEX([Tracker.$A$1:.$AG$120];6+9*(MONTH([.$A212])-1)+(COLUMN()-4);DAY([.$A212])+2)&lt;&gt;&quot;&quot;;1;0)" table:style-name="ce92"/>
          <table:table-cell office:value-type="float" office:value="0" table:formula="of:=IF(INDEX([Tracker.$A$1:.$AG$120];6+9*(MONTH([.$A212])-1)+(COLUMN()-4);DAY([.$A212])+2)&lt;&gt;&quot;&quot;;1;0)" table:style-name="ce92"/>
          <table:table-cell office:value-type="float" office:value="0" table:formula="of:=IF(INDEX([Tracker.$A$1:.$AG$120];6+9*(MONTH([.$A212])-1)+(COLUMN()-4);DAY([.$A212])+2)&lt;&gt;&quot;&quot;;1;0)" table:style-name="ce92"/>
          <table:table-cell office:value-type="float" office:value="0" table:formula="of:=SUM([.D212:.I212])" table:style-name="ce6"/>
          <table:table-cell office:value-type="percentage" office:value="0" table:formula="of:=[.J212]/6" table:style-name="ce8">
            <text:p>0%</text:p>
          </table:table-cell>
          <table:table-cell table:style-name="ce1"/>
          <table:table-cell office:value-type="float" office:value="0" table:formula="of:=IF([.D212]=1;[.M211]+1;0)" table:style-name="ce1">
            <text:p>0</text:p>
          </table:table-cell>
          <table:table-cell office:value-type="float" office:value="0" table:formula="of:=IF([.E212]=1;[.N211]+1;0)" table:style-name="ce1">
            <text:p>0</text:p>
          </table:table-cell>
          <table:table-cell office:value-type="float" office:value="0" table:formula="of:=IF([.F212]=1;[.O211]+1;0)" table:style-name="ce1">
            <text:p>0</text:p>
          </table:table-cell>
          <table:table-cell office:value-type="float" office:value="0" table:formula="of:=IF([.G212]=1;[.P211]+1;0)" table:style-name="ce1">
            <text:p>0</text:p>
          </table:table-cell>
          <table:table-cell office:value-type="float" office:value="0" table:formula="of:=IF([.H212]=1;[.Q211]+1;0)" table:style-name="ce1">
            <text:p>0</text:p>
          </table:table-cell>
          <table:table-cell office:value-type="float" office:value="0" table:formula="of:=IF([.I212]=1;[.R21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29T00:00:00" table:formula="of:=[.A212]+1" table:style-name="ce10">
            <text:p>Wed, 29 Jul 2026</text:p>
          </table:table-cell>
          <table:table-cell office:value-type="string" office:string-value="Wed" table:formula="of:=TEXT([.A213];&quot;ddd&quot;)" table:style-name="ce5">
            <text:p>Wed</text:p>
          </table:table-cell>
          <table:table-cell office:value-type="string" office:string-value="Jul" table:formula="of:=TEXT([.A213];&quot;mmm&quot;)" table:style-name="ce5">
            <text:p>Jul</text:p>
          </table:table-cell>
          <table:table-cell office:value-type="float" office:value="0" table:formula="of:=IF(INDEX([Tracker.$A$1:.$AG$120];6+9*(MONTH([.$A213])-1)+(COLUMN()-4);DAY([.$A213])+2)&lt;&gt;&quot;&quot;;1;0)" table:style-name="ce92"/>
          <table:table-cell office:value-type="float" office:value="0" table:formula="of:=IF(INDEX([Tracker.$A$1:.$AG$120];6+9*(MONTH([.$A213])-1)+(COLUMN()-4);DAY([.$A213])+2)&lt;&gt;&quot;&quot;;1;0)" table:style-name="ce92"/>
          <table:table-cell office:value-type="float" office:value="0" table:formula="of:=IF(INDEX([Tracker.$A$1:.$AG$120];6+9*(MONTH([.$A213])-1)+(COLUMN()-4);DAY([.$A213])+2)&lt;&gt;&quot;&quot;;1;0)" table:style-name="ce92"/>
          <table:table-cell office:value-type="float" office:value="0" table:formula="of:=IF(INDEX([Tracker.$A$1:.$AG$120];6+9*(MONTH([.$A213])-1)+(COLUMN()-4);DAY([.$A213])+2)&lt;&gt;&quot;&quot;;1;0)" table:style-name="ce92"/>
          <table:table-cell office:value-type="float" office:value="0" table:formula="of:=IF(INDEX([Tracker.$A$1:.$AG$120];6+9*(MONTH([.$A213])-1)+(COLUMN()-4);DAY([.$A213])+2)&lt;&gt;&quot;&quot;;1;0)" table:style-name="ce92"/>
          <table:table-cell office:value-type="float" office:value="0" table:formula="of:=IF(INDEX([Tracker.$A$1:.$AG$120];6+9*(MONTH([.$A213])-1)+(COLUMN()-4);DAY([.$A213])+2)&lt;&gt;&quot;&quot;;1;0)" table:style-name="ce92"/>
          <table:table-cell office:value-type="float" office:value="0" table:formula="of:=SUM([.D213:.I213])" table:style-name="ce6"/>
          <table:table-cell office:value-type="percentage" office:value="0" table:formula="of:=[.J213]/6" table:style-name="ce8">
            <text:p>0%</text:p>
          </table:table-cell>
          <table:table-cell table:style-name="ce1"/>
          <table:table-cell office:value-type="float" office:value="0" table:formula="of:=IF([.D213]=1;[.M212]+1;0)" table:style-name="ce1">
            <text:p>0</text:p>
          </table:table-cell>
          <table:table-cell office:value-type="float" office:value="0" table:formula="of:=IF([.E213]=1;[.N212]+1;0)" table:style-name="ce1">
            <text:p>0</text:p>
          </table:table-cell>
          <table:table-cell office:value-type="float" office:value="0" table:formula="of:=IF([.F213]=1;[.O212]+1;0)" table:style-name="ce1">
            <text:p>0</text:p>
          </table:table-cell>
          <table:table-cell office:value-type="float" office:value="0" table:formula="of:=IF([.G213]=1;[.P212]+1;0)" table:style-name="ce1">
            <text:p>0</text:p>
          </table:table-cell>
          <table:table-cell office:value-type="float" office:value="0" table:formula="of:=IF([.H213]=1;[.Q212]+1;0)" table:style-name="ce1">
            <text:p>0</text:p>
          </table:table-cell>
          <table:table-cell office:value-type="float" office:value="0" table:formula="of:=IF([.I213]=1;[.R21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30T00:00:00" table:formula="of:=[.A213]+1" table:style-name="ce10">
            <text:p>Thu, 30 Jul 2026</text:p>
          </table:table-cell>
          <table:table-cell office:value-type="string" office:string-value="Thu" table:formula="of:=TEXT([.A214];&quot;ddd&quot;)" table:style-name="ce5">
            <text:p>Thu</text:p>
          </table:table-cell>
          <table:table-cell office:value-type="string" office:string-value="Jul" table:formula="of:=TEXT([.A214];&quot;mmm&quot;)" table:style-name="ce5">
            <text:p>Jul</text:p>
          </table:table-cell>
          <table:table-cell office:value-type="float" office:value="0" table:formula="of:=IF(INDEX([Tracker.$A$1:.$AG$120];6+9*(MONTH([.$A214])-1)+(COLUMN()-4);DAY([.$A214])+2)&lt;&gt;&quot;&quot;;1;0)" table:style-name="ce92"/>
          <table:table-cell office:value-type="float" office:value="0" table:formula="of:=IF(INDEX([Tracker.$A$1:.$AG$120];6+9*(MONTH([.$A214])-1)+(COLUMN()-4);DAY([.$A214])+2)&lt;&gt;&quot;&quot;;1;0)" table:style-name="ce92"/>
          <table:table-cell office:value-type="float" office:value="0" table:formula="of:=IF(INDEX([Tracker.$A$1:.$AG$120];6+9*(MONTH([.$A214])-1)+(COLUMN()-4);DAY([.$A214])+2)&lt;&gt;&quot;&quot;;1;0)" table:style-name="ce92"/>
          <table:table-cell office:value-type="float" office:value="0" table:formula="of:=IF(INDEX([Tracker.$A$1:.$AG$120];6+9*(MONTH([.$A214])-1)+(COLUMN()-4);DAY([.$A214])+2)&lt;&gt;&quot;&quot;;1;0)" table:style-name="ce92"/>
          <table:table-cell office:value-type="float" office:value="0" table:formula="of:=IF(INDEX([Tracker.$A$1:.$AG$120];6+9*(MONTH([.$A214])-1)+(COLUMN()-4);DAY([.$A214])+2)&lt;&gt;&quot;&quot;;1;0)" table:style-name="ce92"/>
          <table:table-cell office:value-type="float" office:value="0" table:formula="of:=IF(INDEX([Tracker.$A$1:.$AG$120];6+9*(MONTH([.$A214])-1)+(COLUMN()-4);DAY([.$A214])+2)&lt;&gt;&quot;&quot;;1;0)" table:style-name="ce92"/>
          <table:table-cell office:value-type="float" office:value="0" table:formula="of:=SUM([.D214:.I214])" table:style-name="ce6"/>
          <table:table-cell office:value-type="percentage" office:value="0" table:formula="of:=[.J214]/6" table:style-name="ce8">
            <text:p>0%</text:p>
          </table:table-cell>
          <table:table-cell table:style-name="ce1"/>
          <table:table-cell office:value-type="float" office:value="0" table:formula="of:=IF([.D214]=1;[.M213]+1;0)" table:style-name="ce1">
            <text:p>0</text:p>
          </table:table-cell>
          <table:table-cell office:value-type="float" office:value="0" table:formula="of:=IF([.E214]=1;[.N213]+1;0)" table:style-name="ce1">
            <text:p>0</text:p>
          </table:table-cell>
          <table:table-cell office:value-type="float" office:value="0" table:formula="of:=IF([.F214]=1;[.O213]+1;0)" table:style-name="ce1">
            <text:p>0</text:p>
          </table:table-cell>
          <table:table-cell office:value-type="float" office:value="0" table:formula="of:=IF([.G214]=1;[.P213]+1;0)" table:style-name="ce1">
            <text:p>0</text:p>
          </table:table-cell>
          <table:table-cell office:value-type="float" office:value="0" table:formula="of:=IF([.H214]=1;[.Q213]+1;0)" table:style-name="ce1">
            <text:p>0</text:p>
          </table:table-cell>
          <table:table-cell office:value-type="float" office:value="0" table:formula="of:=IF([.I214]=1;[.R21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7-31T00:00:00" table:formula="of:=[.A214]+1" table:style-name="ce10">
            <text:p>Fri, 31 Jul 2026</text:p>
          </table:table-cell>
          <table:table-cell office:value-type="string" office:string-value="Fri" table:formula="of:=TEXT([.A215];&quot;ddd&quot;)" table:style-name="ce5">
            <text:p>Fri</text:p>
          </table:table-cell>
          <table:table-cell office:value-type="string" office:string-value="Jul" table:formula="of:=TEXT([.A215];&quot;mmm&quot;)" table:style-name="ce5">
            <text:p>Jul</text:p>
          </table:table-cell>
          <table:table-cell office:value-type="float" office:value="0" table:formula="of:=IF(INDEX([Tracker.$A$1:.$AG$120];6+9*(MONTH([.$A215])-1)+(COLUMN()-4);DAY([.$A215])+2)&lt;&gt;&quot;&quot;;1;0)" table:style-name="ce92"/>
          <table:table-cell office:value-type="float" office:value="0" table:formula="of:=IF(INDEX([Tracker.$A$1:.$AG$120];6+9*(MONTH([.$A215])-1)+(COLUMN()-4);DAY([.$A215])+2)&lt;&gt;&quot;&quot;;1;0)" table:style-name="ce92"/>
          <table:table-cell office:value-type="float" office:value="0" table:formula="of:=IF(INDEX([Tracker.$A$1:.$AG$120];6+9*(MONTH([.$A215])-1)+(COLUMN()-4);DAY([.$A215])+2)&lt;&gt;&quot;&quot;;1;0)" table:style-name="ce92"/>
          <table:table-cell office:value-type="float" office:value="0" table:formula="of:=IF(INDEX([Tracker.$A$1:.$AG$120];6+9*(MONTH([.$A215])-1)+(COLUMN()-4);DAY([.$A215])+2)&lt;&gt;&quot;&quot;;1;0)" table:style-name="ce92"/>
          <table:table-cell office:value-type="float" office:value="0" table:formula="of:=IF(INDEX([Tracker.$A$1:.$AG$120];6+9*(MONTH([.$A215])-1)+(COLUMN()-4);DAY([.$A215])+2)&lt;&gt;&quot;&quot;;1;0)" table:style-name="ce92"/>
          <table:table-cell office:value-type="float" office:value="0" table:formula="of:=IF(INDEX([Tracker.$A$1:.$AG$120];6+9*(MONTH([.$A215])-1)+(COLUMN()-4);DAY([.$A215])+2)&lt;&gt;&quot;&quot;;1;0)" table:style-name="ce92"/>
          <table:table-cell office:value-type="float" office:value="0" table:formula="of:=SUM([.D215:.I215])" table:style-name="ce6"/>
          <table:table-cell office:value-type="percentage" office:value="0" table:formula="of:=[.J215]/6" table:style-name="ce8">
            <text:p>0%</text:p>
          </table:table-cell>
          <table:table-cell table:style-name="ce1"/>
          <table:table-cell office:value-type="float" office:value="0" table:formula="of:=IF([.D215]=1;[.M214]+1;0)" table:style-name="ce1">
            <text:p>0</text:p>
          </table:table-cell>
          <table:table-cell office:value-type="float" office:value="0" table:formula="of:=IF([.E215]=1;[.N214]+1;0)" table:style-name="ce1">
            <text:p>0</text:p>
          </table:table-cell>
          <table:table-cell office:value-type="float" office:value="0" table:formula="of:=IF([.F215]=1;[.O214]+1;0)" table:style-name="ce1">
            <text:p>0</text:p>
          </table:table-cell>
          <table:table-cell office:value-type="float" office:value="0" table:formula="of:=IF([.G215]=1;[.P214]+1;0)" table:style-name="ce1">
            <text:p>0</text:p>
          </table:table-cell>
          <table:table-cell office:value-type="float" office:value="0" table:formula="of:=IF([.H215]=1;[.Q214]+1;0)" table:style-name="ce1">
            <text:p>0</text:p>
          </table:table-cell>
          <table:table-cell office:value-type="float" office:value="0" table:formula="of:=IF([.I215]=1;[.R21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1T00:00:00" table:formula="of:=[.A215]+1" table:style-name="ce10">
            <text:p>Sat, 01 Aug 2026</text:p>
          </table:table-cell>
          <table:table-cell office:value-type="string" office:string-value="Sat" table:formula="of:=TEXT([.A216];&quot;ddd&quot;)" table:style-name="ce5">
            <text:p>Sat</text:p>
          </table:table-cell>
          <table:table-cell office:value-type="string" office:string-value="Aug" table:formula="of:=TEXT([.A216];&quot;mmm&quot;)" table:style-name="ce5">
            <text:p>Aug</text:p>
          </table:table-cell>
          <table:table-cell office:value-type="float" office:value="0" table:formula="of:=IF(INDEX([Tracker.$A$1:.$AG$120];6+9*(MONTH([.$A216])-1)+(COLUMN()-4);DAY([.$A216])+2)&lt;&gt;&quot;&quot;;1;0)" table:style-name="ce92"/>
          <table:table-cell office:value-type="float" office:value="0" table:formula="of:=IF(INDEX([Tracker.$A$1:.$AG$120];6+9*(MONTH([.$A216])-1)+(COLUMN()-4);DAY([.$A216])+2)&lt;&gt;&quot;&quot;;1;0)" table:style-name="ce92"/>
          <table:table-cell office:value-type="float" office:value="0" table:formula="of:=IF(INDEX([Tracker.$A$1:.$AG$120];6+9*(MONTH([.$A216])-1)+(COLUMN()-4);DAY([.$A216])+2)&lt;&gt;&quot;&quot;;1;0)" table:style-name="ce92"/>
          <table:table-cell office:value-type="float" office:value="0" table:formula="of:=IF(INDEX([Tracker.$A$1:.$AG$120];6+9*(MONTH([.$A216])-1)+(COLUMN()-4);DAY([.$A216])+2)&lt;&gt;&quot;&quot;;1;0)" table:style-name="ce92"/>
          <table:table-cell office:value-type="float" office:value="0" table:formula="of:=IF(INDEX([Tracker.$A$1:.$AG$120];6+9*(MONTH([.$A216])-1)+(COLUMN()-4);DAY([.$A216])+2)&lt;&gt;&quot;&quot;;1;0)" table:style-name="ce92"/>
          <table:table-cell office:value-type="float" office:value="0" table:formula="of:=IF(INDEX([Tracker.$A$1:.$AG$120];6+9*(MONTH([.$A216])-1)+(COLUMN()-4);DAY([.$A216])+2)&lt;&gt;&quot;&quot;;1;0)" table:style-name="ce92"/>
          <table:table-cell office:value-type="float" office:value="0" table:formula="of:=SUM([.D216:.I216])" table:style-name="ce6"/>
          <table:table-cell office:value-type="percentage" office:value="0" table:formula="of:=[.J216]/6" table:style-name="ce8">
            <text:p>0%</text:p>
          </table:table-cell>
          <table:table-cell table:style-name="ce1"/>
          <table:table-cell office:value-type="float" office:value="0" table:formula="of:=IF([.D216]=1;[.M215]+1;0)" table:style-name="ce1">
            <text:p>0</text:p>
          </table:table-cell>
          <table:table-cell office:value-type="float" office:value="0" table:formula="of:=IF([.E216]=1;[.N215]+1;0)" table:style-name="ce1">
            <text:p>0</text:p>
          </table:table-cell>
          <table:table-cell office:value-type="float" office:value="0" table:formula="of:=IF([.F216]=1;[.O215]+1;0)" table:style-name="ce1">
            <text:p>0</text:p>
          </table:table-cell>
          <table:table-cell office:value-type="float" office:value="0" table:formula="of:=IF([.G216]=1;[.P215]+1;0)" table:style-name="ce1">
            <text:p>0</text:p>
          </table:table-cell>
          <table:table-cell office:value-type="float" office:value="0" table:formula="of:=IF([.H216]=1;[.Q215]+1;0)" table:style-name="ce1">
            <text:p>0</text:p>
          </table:table-cell>
          <table:table-cell office:value-type="float" office:value="0" table:formula="of:=IF([.I216]=1;[.R21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2T00:00:00" table:formula="of:=[.A216]+1" table:style-name="ce10">
            <text:p>Sun, 02 Aug 2026</text:p>
          </table:table-cell>
          <table:table-cell office:value-type="string" office:string-value="Sun" table:formula="of:=TEXT([.A217];&quot;ddd&quot;)" table:style-name="ce5">
            <text:p>Sun</text:p>
          </table:table-cell>
          <table:table-cell office:value-type="string" office:string-value="Aug" table:formula="of:=TEXT([.A217];&quot;mmm&quot;)" table:style-name="ce5">
            <text:p>Aug</text:p>
          </table:table-cell>
          <table:table-cell office:value-type="float" office:value="0" table:formula="of:=IF(INDEX([Tracker.$A$1:.$AG$120];6+9*(MONTH([.$A217])-1)+(COLUMN()-4);DAY([.$A217])+2)&lt;&gt;&quot;&quot;;1;0)" table:style-name="ce92"/>
          <table:table-cell office:value-type="float" office:value="0" table:formula="of:=IF(INDEX([Tracker.$A$1:.$AG$120];6+9*(MONTH([.$A217])-1)+(COLUMN()-4);DAY([.$A217])+2)&lt;&gt;&quot;&quot;;1;0)" table:style-name="ce92"/>
          <table:table-cell office:value-type="float" office:value="0" table:formula="of:=IF(INDEX([Tracker.$A$1:.$AG$120];6+9*(MONTH([.$A217])-1)+(COLUMN()-4);DAY([.$A217])+2)&lt;&gt;&quot;&quot;;1;0)" table:style-name="ce92"/>
          <table:table-cell office:value-type="float" office:value="0" table:formula="of:=IF(INDEX([Tracker.$A$1:.$AG$120];6+9*(MONTH([.$A217])-1)+(COLUMN()-4);DAY([.$A217])+2)&lt;&gt;&quot;&quot;;1;0)" table:style-name="ce92"/>
          <table:table-cell office:value-type="float" office:value="0" table:formula="of:=IF(INDEX([Tracker.$A$1:.$AG$120];6+9*(MONTH([.$A217])-1)+(COLUMN()-4);DAY([.$A217])+2)&lt;&gt;&quot;&quot;;1;0)" table:style-name="ce92"/>
          <table:table-cell office:value-type="float" office:value="0" table:formula="of:=IF(INDEX([Tracker.$A$1:.$AG$120];6+9*(MONTH([.$A217])-1)+(COLUMN()-4);DAY([.$A217])+2)&lt;&gt;&quot;&quot;;1;0)" table:style-name="ce92"/>
          <table:table-cell office:value-type="float" office:value="0" table:formula="of:=SUM([.D217:.I217])" table:style-name="ce6"/>
          <table:table-cell office:value-type="percentage" office:value="0" table:formula="of:=[.J217]/6" table:style-name="ce8">
            <text:p>0%</text:p>
          </table:table-cell>
          <table:table-cell table:style-name="ce1"/>
          <table:table-cell office:value-type="float" office:value="0" table:formula="of:=IF([.D217]=1;[.M216]+1;0)" table:style-name="ce1">
            <text:p>0</text:p>
          </table:table-cell>
          <table:table-cell office:value-type="float" office:value="0" table:formula="of:=IF([.E217]=1;[.N216]+1;0)" table:style-name="ce1">
            <text:p>0</text:p>
          </table:table-cell>
          <table:table-cell office:value-type="float" office:value="0" table:formula="of:=IF([.F217]=1;[.O216]+1;0)" table:style-name="ce1">
            <text:p>0</text:p>
          </table:table-cell>
          <table:table-cell office:value-type="float" office:value="0" table:formula="of:=IF([.G217]=1;[.P216]+1;0)" table:style-name="ce1">
            <text:p>0</text:p>
          </table:table-cell>
          <table:table-cell office:value-type="float" office:value="0" table:formula="of:=IF([.H217]=1;[.Q216]+1;0)" table:style-name="ce1">
            <text:p>0</text:p>
          </table:table-cell>
          <table:table-cell office:value-type="float" office:value="0" table:formula="of:=IF([.I217]=1;[.R21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3T00:00:00" table:formula="of:=[.A217]+1" table:style-name="ce10">
            <text:p>Mon, 03 Aug 2026</text:p>
          </table:table-cell>
          <table:table-cell office:value-type="string" office:string-value="Mon" table:formula="of:=TEXT([.A218];&quot;ddd&quot;)" table:style-name="ce5">
            <text:p>Mon</text:p>
          </table:table-cell>
          <table:table-cell office:value-type="string" office:string-value="Aug" table:formula="of:=TEXT([.A218];&quot;mmm&quot;)" table:style-name="ce5">
            <text:p>Aug</text:p>
          </table:table-cell>
          <table:table-cell office:value-type="float" office:value="0" table:formula="of:=IF(INDEX([Tracker.$A$1:.$AG$120];6+9*(MONTH([.$A218])-1)+(COLUMN()-4);DAY([.$A218])+2)&lt;&gt;&quot;&quot;;1;0)" table:style-name="ce92"/>
          <table:table-cell office:value-type="float" office:value="0" table:formula="of:=IF(INDEX([Tracker.$A$1:.$AG$120];6+9*(MONTH([.$A218])-1)+(COLUMN()-4);DAY([.$A218])+2)&lt;&gt;&quot;&quot;;1;0)" table:style-name="ce92"/>
          <table:table-cell office:value-type="float" office:value="0" table:formula="of:=IF(INDEX([Tracker.$A$1:.$AG$120];6+9*(MONTH([.$A218])-1)+(COLUMN()-4);DAY([.$A218])+2)&lt;&gt;&quot;&quot;;1;0)" table:style-name="ce92"/>
          <table:table-cell office:value-type="float" office:value="0" table:formula="of:=IF(INDEX([Tracker.$A$1:.$AG$120];6+9*(MONTH([.$A218])-1)+(COLUMN()-4);DAY([.$A218])+2)&lt;&gt;&quot;&quot;;1;0)" table:style-name="ce92"/>
          <table:table-cell office:value-type="float" office:value="0" table:formula="of:=IF(INDEX([Tracker.$A$1:.$AG$120];6+9*(MONTH([.$A218])-1)+(COLUMN()-4);DAY([.$A218])+2)&lt;&gt;&quot;&quot;;1;0)" table:style-name="ce92"/>
          <table:table-cell office:value-type="float" office:value="0" table:formula="of:=IF(INDEX([Tracker.$A$1:.$AG$120];6+9*(MONTH([.$A218])-1)+(COLUMN()-4);DAY([.$A218])+2)&lt;&gt;&quot;&quot;;1;0)" table:style-name="ce92"/>
          <table:table-cell office:value-type="float" office:value="0" table:formula="of:=SUM([.D218:.I218])" table:style-name="ce6"/>
          <table:table-cell office:value-type="percentage" office:value="0" table:formula="of:=[.J218]/6" table:style-name="ce8">
            <text:p>0%</text:p>
          </table:table-cell>
          <table:table-cell table:style-name="ce1"/>
          <table:table-cell office:value-type="float" office:value="0" table:formula="of:=IF([.D218]=1;[.M217]+1;0)" table:style-name="ce1">
            <text:p>0</text:p>
          </table:table-cell>
          <table:table-cell office:value-type="float" office:value="0" table:formula="of:=IF([.E218]=1;[.N217]+1;0)" table:style-name="ce1">
            <text:p>0</text:p>
          </table:table-cell>
          <table:table-cell office:value-type="float" office:value="0" table:formula="of:=IF([.F218]=1;[.O217]+1;0)" table:style-name="ce1">
            <text:p>0</text:p>
          </table:table-cell>
          <table:table-cell office:value-type="float" office:value="0" table:formula="of:=IF([.G218]=1;[.P217]+1;0)" table:style-name="ce1">
            <text:p>0</text:p>
          </table:table-cell>
          <table:table-cell office:value-type="float" office:value="0" table:formula="of:=IF([.H218]=1;[.Q217]+1;0)" table:style-name="ce1">
            <text:p>0</text:p>
          </table:table-cell>
          <table:table-cell office:value-type="float" office:value="0" table:formula="of:=IF([.I218]=1;[.R21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4T00:00:00" table:formula="of:=[.A218]+1" table:style-name="ce10">
            <text:p>Tue, 04 Aug 2026</text:p>
          </table:table-cell>
          <table:table-cell office:value-type="string" office:string-value="Tue" table:formula="of:=TEXT([.A219];&quot;ddd&quot;)" table:style-name="ce5">
            <text:p>Tue</text:p>
          </table:table-cell>
          <table:table-cell office:value-type="string" office:string-value="Aug" table:formula="of:=TEXT([.A219];&quot;mmm&quot;)" table:style-name="ce5">
            <text:p>Aug</text:p>
          </table:table-cell>
          <table:table-cell office:value-type="float" office:value="0" table:formula="of:=IF(INDEX([Tracker.$A$1:.$AG$120];6+9*(MONTH([.$A219])-1)+(COLUMN()-4);DAY([.$A219])+2)&lt;&gt;&quot;&quot;;1;0)" table:style-name="ce92"/>
          <table:table-cell office:value-type="float" office:value="0" table:formula="of:=IF(INDEX([Tracker.$A$1:.$AG$120];6+9*(MONTH([.$A219])-1)+(COLUMN()-4);DAY([.$A219])+2)&lt;&gt;&quot;&quot;;1;0)" table:style-name="ce92"/>
          <table:table-cell office:value-type="float" office:value="0" table:formula="of:=IF(INDEX([Tracker.$A$1:.$AG$120];6+9*(MONTH([.$A219])-1)+(COLUMN()-4);DAY([.$A219])+2)&lt;&gt;&quot;&quot;;1;0)" table:style-name="ce92"/>
          <table:table-cell office:value-type="float" office:value="0" table:formula="of:=IF(INDEX([Tracker.$A$1:.$AG$120];6+9*(MONTH([.$A219])-1)+(COLUMN()-4);DAY([.$A219])+2)&lt;&gt;&quot;&quot;;1;0)" table:style-name="ce92"/>
          <table:table-cell office:value-type="float" office:value="0" table:formula="of:=IF(INDEX([Tracker.$A$1:.$AG$120];6+9*(MONTH([.$A219])-1)+(COLUMN()-4);DAY([.$A219])+2)&lt;&gt;&quot;&quot;;1;0)" table:style-name="ce92"/>
          <table:table-cell office:value-type="float" office:value="0" table:formula="of:=IF(INDEX([Tracker.$A$1:.$AG$120];6+9*(MONTH([.$A219])-1)+(COLUMN()-4);DAY([.$A219])+2)&lt;&gt;&quot;&quot;;1;0)" table:style-name="ce92"/>
          <table:table-cell office:value-type="float" office:value="0" table:formula="of:=SUM([.D219:.I219])" table:style-name="ce6"/>
          <table:table-cell office:value-type="percentage" office:value="0" table:formula="of:=[.J219]/6" table:style-name="ce8">
            <text:p>0%</text:p>
          </table:table-cell>
          <table:table-cell table:style-name="ce1"/>
          <table:table-cell office:value-type="float" office:value="0" table:formula="of:=IF([.D219]=1;[.M218]+1;0)" table:style-name="ce1">
            <text:p>0</text:p>
          </table:table-cell>
          <table:table-cell office:value-type="float" office:value="0" table:formula="of:=IF([.E219]=1;[.N218]+1;0)" table:style-name="ce1">
            <text:p>0</text:p>
          </table:table-cell>
          <table:table-cell office:value-type="float" office:value="0" table:formula="of:=IF([.F219]=1;[.O218]+1;0)" table:style-name="ce1">
            <text:p>0</text:p>
          </table:table-cell>
          <table:table-cell office:value-type="float" office:value="0" table:formula="of:=IF([.G219]=1;[.P218]+1;0)" table:style-name="ce1">
            <text:p>0</text:p>
          </table:table-cell>
          <table:table-cell office:value-type="float" office:value="0" table:formula="of:=IF([.H219]=1;[.Q218]+1;0)" table:style-name="ce1">
            <text:p>0</text:p>
          </table:table-cell>
          <table:table-cell office:value-type="float" office:value="0" table:formula="of:=IF([.I219]=1;[.R21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5T00:00:00" table:formula="of:=[.A219]+1" table:style-name="ce10">
            <text:p>Wed, 05 Aug 2026</text:p>
          </table:table-cell>
          <table:table-cell office:value-type="string" office:string-value="Wed" table:formula="of:=TEXT([.A220];&quot;ddd&quot;)" table:style-name="ce5">
            <text:p>Wed</text:p>
          </table:table-cell>
          <table:table-cell office:value-type="string" office:string-value="Aug" table:formula="of:=TEXT([.A220];&quot;mmm&quot;)" table:style-name="ce5">
            <text:p>Aug</text:p>
          </table:table-cell>
          <table:table-cell office:value-type="float" office:value="0" table:formula="of:=IF(INDEX([Tracker.$A$1:.$AG$120];6+9*(MONTH([.$A220])-1)+(COLUMN()-4);DAY([.$A220])+2)&lt;&gt;&quot;&quot;;1;0)" table:style-name="ce92"/>
          <table:table-cell office:value-type="float" office:value="0" table:formula="of:=IF(INDEX([Tracker.$A$1:.$AG$120];6+9*(MONTH([.$A220])-1)+(COLUMN()-4);DAY([.$A220])+2)&lt;&gt;&quot;&quot;;1;0)" table:style-name="ce92"/>
          <table:table-cell office:value-type="float" office:value="0" table:formula="of:=IF(INDEX([Tracker.$A$1:.$AG$120];6+9*(MONTH([.$A220])-1)+(COLUMN()-4);DAY([.$A220])+2)&lt;&gt;&quot;&quot;;1;0)" table:style-name="ce92"/>
          <table:table-cell office:value-type="float" office:value="0" table:formula="of:=IF(INDEX([Tracker.$A$1:.$AG$120];6+9*(MONTH([.$A220])-1)+(COLUMN()-4);DAY([.$A220])+2)&lt;&gt;&quot;&quot;;1;0)" table:style-name="ce92"/>
          <table:table-cell office:value-type="float" office:value="0" table:formula="of:=IF(INDEX([Tracker.$A$1:.$AG$120];6+9*(MONTH([.$A220])-1)+(COLUMN()-4);DAY([.$A220])+2)&lt;&gt;&quot;&quot;;1;0)" table:style-name="ce92"/>
          <table:table-cell office:value-type="float" office:value="0" table:formula="of:=IF(INDEX([Tracker.$A$1:.$AG$120];6+9*(MONTH([.$A220])-1)+(COLUMN()-4);DAY([.$A220])+2)&lt;&gt;&quot;&quot;;1;0)" table:style-name="ce92"/>
          <table:table-cell office:value-type="float" office:value="0" table:formula="of:=SUM([.D220:.I220])" table:style-name="ce6"/>
          <table:table-cell office:value-type="percentage" office:value="0" table:formula="of:=[.J220]/6" table:style-name="ce8">
            <text:p>0%</text:p>
          </table:table-cell>
          <table:table-cell table:style-name="ce1"/>
          <table:table-cell office:value-type="float" office:value="0" table:formula="of:=IF([.D220]=1;[.M219]+1;0)" table:style-name="ce1">
            <text:p>0</text:p>
          </table:table-cell>
          <table:table-cell office:value-type="float" office:value="0" table:formula="of:=IF([.E220]=1;[.N219]+1;0)" table:style-name="ce1">
            <text:p>0</text:p>
          </table:table-cell>
          <table:table-cell office:value-type="float" office:value="0" table:formula="of:=IF([.F220]=1;[.O219]+1;0)" table:style-name="ce1">
            <text:p>0</text:p>
          </table:table-cell>
          <table:table-cell office:value-type="float" office:value="0" table:formula="of:=IF([.G220]=1;[.P219]+1;0)" table:style-name="ce1">
            <text:p>0</text:p>
          </table:table-cell>
          <table:table-cell office:value-type="float" office:value="0" table:formula="of:=IF([.H220]=1;[.Q219]+1;0)" table:style-name="ce1">
            <text:p>0</text:p>
          </table:table-cell>
          <table:table-cell office:value-type="float" office:value="0" table:formula="of:=IF([.I220]=1;[.R21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6T00:00:00" table:formula="of:=[.A220]+1" table:style-name="ce10">
            <text:p>Thu, 06 Aug 2026</text:p>
          </table:table-cell>
          <table:table-cell office:value-type="string" office:string-value="Thu" table:formula="of:=TEXT([.A221];&quot;ddd&quot;)" table:style-name="ce5">
            <text:p>Thu</text:p>
          </table:table-cell>
          <table:table-cell office:value-type="string" office:string-value="Aug" table:formula="of:=TEXT([.A221];&quot;mmm&quot;)" table:style-name="ce5">
            <text:p>Aug</text:p>
          </table:table-cell>
          <table:table-cell office:value-type="float" office:value="0" table:formula="of:=IF(INDEX([Tracker.$A$1:.$AG$120];6+9*(MONTH([.$A221])-1)+(COLUMN()-4);DAY([.$A221])+2)&lt;&gt;&quot;&quot;;1;0)" table:style-name="ce92"/>
          <table:table-cell office:value-type="float" office:value="0" table:formula="of:=IF(INDEX([Tracker.$A$1:.$AG$120];6+9*(MONTH([.$A221])-1)+(COLUMN()-4);DAY([.$A221])+2)&lt;&gt;&quot;&quot;;1;0)" table:style-name="ce92"/>
          <table:table-cell office:value-type="float" office:value="0" table:formula="of:=IF(INDEX([Tracker.$A$1:.$AG$120];6+9*(MONTH([.$A221])-1)+(COLUMN()-4);DAY([.$A221])+2)&lt;&gt;&quot;&quot;;1;0)" table:style-name="ce92"/>
          <table:table-cell office:value-type="float" office:value="0" table:formula="of:=IF(INDEX([Tracker.$A$1:.$AG$120];6+9*(MONTH([.$A221])-1)+(COLUMN()-4);DAY([.$A221])+2)&lt;&gt;&quot;&quot;;1;0)" table:style-name="ce92"/>
          <table:table-cell office:value-type="float" office:value="0" table:formula="of:=IF(INDEX([Tracker.$A$1:.$AG$120];6+9*(MONTH([.$A221])-1)+(COLUMN()-4);DAY([.$A221])+2)&lt;&gt;&quot;&quot;;1;0)" table:style-name="ce92"/>
          <table:table-cell office:value-type="float" office:value="0" table:formula="of:=IF(INDEX([Tracker.$A$1:.$AG$120];6+9*(MONTH([.$A221])-1)+(COLUMN()-4);DAY([.$A221])+2)&lt;&gt;&quot;&quot;;1;0)" table:style-name="ce92"/>
          <table:table-cell office:value-type="float" office:value="0" table:formula="of:=SUM([.D221:.I221])" table:style-name="ce6"/>
          <table:table-cell office:value-type="percentage" office:value="0" table:formula="of:=[.J221]/6" table:style-name="ce8">
            <text:p>0%</text:p>
          </table:table-cell>
          <table:table-cell table:style-name="ce1"/>
          <table:table-cell office:value-type="float" office:value="0" table:formula="of:=IF([.D221]=1;[.M220]+1;0)" table:style-name="ce1">
            <text:p>0</text:p>
          </table:table-cell>
          <table:table-cell office:value-type="float" office:value="0" table:formula="of:=IF([.E221]=1;[.N220]+1;0)" table:style-name="ce1">
            <text:p>0</text:p>
          </table:table-cell>
          <table:table-cell office:value-type="float" office:value="0" table:formula="of:=IF([.F221]=1;[.O220]+1;0)" table:style-name="ce1">
            <text:p>0</text:p>
          </table:table-cell>
          <table:table-cell office:value-type="float" office:value="0" table:formula="of:=IF([.G221]=1;[.P220]+1;0)" table:style-name="ce1">
            <text:p>0</text:p>
          </table:table-cell>
          <table:table-cell office:value-type="float" office:value="0" table:formula="of:=IF([.H221]=1;[.Q220]+1;0)" table:style-name="ce1">
            <text:p>0</text:p>
          </table:table-cell>
          <table:table-cell office:value-type="float" office:value="0" table:formula="of:=IF([.I221]=1;[.R22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7T00:00:00" table:formula="of:=[.A221]+1" table:style-name="ce10">
            <text:p>Fri, 07 Aug 2026</text:p>
          </table:table-cell>
          <table:table-cell office:value-type="string" office:string-value="Fri" table:formula="of:=TEXT([.A222];&quot;ddd&quot;)" table:style-name="ce5">
            <text:p>Fri</text:p>
          </table:table-cell>
          <table:table-cell office:value-type="string" office:string-value="Aug" table:formula="of:=TEXT([.A222];&quot;mmm&quot;)" table:style-name="ce5">
            <text:p>Aug</text:p>
          </table:table-cell>
          <table:table-cell office:value-type="float" office:value="0" table:formula="of:=IF(INDEX([Tracker.$A$1:.$AG$120];6+9*(MONTH([.$A222])-1)+(COLUMN()-4);DAY([.$A222])+2)&lt;&gt;&quot;&quot;;1;0)" table:style-name="ce92"/>
          <table:table-cell office:value-type="float" office:value="0" table:formula="of:=IF(INDEX([Tracker.$A$1:.$AG$120];6+9*(MONTH([.$A222])-1)+(COLUMN()-4);DAY([.$A222])+2)&lt;&gt;&quot;&quot;;1;0)" table:style-name="ce92"/>
          <table:table-cell office:value-type="float" office:value="0" table:formula="of:=IF(INDEX([Tracker.$A$1:.$AG$120];6+9*(MONTH([.$A222])-1)+(COLUMN()-4);DAY([.$A222])+2)&lt;&gt;&quot;&quot;;1;0)" table:style-name="ce92"/>
          <table:table-cell office:value-type="float" office:value="0" table:formula="of:=IF(INDEX([Tracker.$A$1:.$AG$120];6+9*(MONTH([.$A222])-1)+(COLUMN()-4);DAY([.$A222])+2)&lt;&gt;&quot;&quot;;1;0)" table:style-name="ce92"/>
          <table:table-cell office:value-type="float" office:value="0" table:formula="of:=IF(INDEX([Tracker.$A$1:.$AG$120];6+9*(MONTH([.$A222])-1)+(COLUMN()-4);DAY([.$A222])+2)&lt;&gt;&quot;&quot;;1;0)" table:style-name="ce92"/>
          <table:table-cell office:value-type="float" office:value="0" table:formula="of:=IF(INDEX([Tracker.$A$1:.$AG$120];6+9*(MONTH([.$A222])-1)+(COLUMN()-4);DAY([.$A222])+2)&lt;&gt;&quot;&quot;;1;0)" table:style-name="ce92"/>
          <table:table-cell office:value-type="float" office:value="0" table:formula="of:=SUM([.D222:.I222])" table:style-name="ce6"/>
          <table:table-cell office:value-type="percentage" office:value="0" table:formula="of:=[.J222]/6" table:style-name="ce8">
            <text:p>0%</text:p>
          </table:table-cell>
          <table:table-cell table:style-name="ce1"/>
          <table:table-cell office:value-type="float" office:value="0" table:formula="of:=IF([.D222]=1;[.M221]+1;0)" table:style-name="ce1">
            <text:p>0</text:p>
          </table:table-cell>
          <table:table-cell office:value-type="float" office:value="0" table:formula="of:=IF([.E222]=1;[.N221]+1;0)" table:style-name="ce1">
            <text:p>0</text:p>
          </table:table-cell>
          <table:table-cell office:value-type="float" office:value="0" table:formula="of:=IF([.F222]=1;[.O221]+1;0)" table:style-name="ce1">
            <text:p>0</text:p>
          </table:table-cell>
          <table:table-cell office:value-type="float" office:value="0" table:formula="of:=IF([.G222]=1;[.P221]+1;0)" table:style-name="ce1">
            <text:p>0</text:p>
          </table:table-cell>
          <table:table-cell office:value-type="float" office:value="0" table:formula="of:=IF([.H222]=1;[.Q221]+1;0)" table:style-name="ce1">
            <text:p>0</text:p>
          </table:table-cell>
          <table:table-cell office:value-type="float" office:value="0" table:formula="of:=IF([.I222]=1;[.R22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8T00:00:00" table:formula="of:=[.A222]+1" table:style-name="ce10">
            <text:p>Sat, 08 Aug 2026</text:p>
          </table:table-cell>
          <table:table-cell office:value-type="string" office:string-value="Sat" table:formula="of:=TEXT([.A223];&quot;ddd&quot;)" table:style-name="ce5">
            <text:p>Sat</text:p>
          </table:table-cell>
          <table:table-cell office:value-type="string" office:string-value="Aug" table:formula="of:=TEXT([.A223];&quot;mmm&quot;)" table:style-name="ce5">
            <text:p>Aug</text:p>
          </table:table-cell>
          <table:table-cell office:value-type="float" office:value="0" table:formula="of:=IF(INDEX([Tracker.$A$1:.$AG$120];6+9*(MONTH([.$A223])-1)+(COLUMN()-4);DAY([.$A223])+2)&lt;&gt;&quot;&quot;;1;0)" table:style-name="ce92"/>
          <table:table-cell office:value-type="float" office:value="0" table:formula="of:=IF(INDEX([Tracker.$A$1:.$AG$120];6+9*(MONTH([.$A223])-1)+(COLUMN()-4);DAY([.$A223])+2)&lt;&gt;&quot;&quot;;1;0)" table:style-name="ce92"/>
          <table:table-cell office:value-type="float" office:value="0" table:formula="of:=IF(INDEX([Tracker.$A$1:.$AG$120];6+9*(MONTH([.$A223])-1)+(COLUMN()-4);DAY([.$A223])+2)&lt;&gt;&quot;&quot;;1;0)" table:style-name="ce92"/>
          <table:table-cell office:value-type="float" office:value="0" table:formula="of:=IF(INDEX([Tracker.$A$1:.$AG$120];6+9*(MONTH([.$A223])-1)+(COLUMN()-4);DAY([.$A223])+2)&lt;&gt;&quot;&quot;;1;0)" table:style-name="ce92"/>
          <table:table-cell office:value-type="float" office:value="0" table:formula="of:=IF(INDEX([Tracker.$A$1:.$AG$120];6+9*(MONTH([.$A223])-1)+(COLUMN()-4);DAY([.$A223])+2)&lt;&gt;&quot;&quot;;1;0)" table:style-name="ce92"/>
          <table:table-cell office:value-type="float" office:value="0" table:formula="of:=IF(INDEX([Tracker.$A$1:.$AG$120];6+9*(MONTH([.$A223])-1)+(COLUMN()-4);DAY([.$A223])+2)&lt;&gt;&quot;&quot;;1;0)" table:style-name="ce92"/>
          <table:table-cell office:value-type="float" office:value="0" table:formula="of:=SUM([.D223:.I223])" table:style-name="ce6"/>
          <table:table-cell office:value-type="percentage" office:value="0" table:formula="of:=[.J223]/6" table:style-name="ce8">
            <text:p>0%</text:p>
          </table:table-cell>
          <table:table-cell table:style-name="ce1"/>
          <table:table-cell office:value-type="float" office:value="0" table:formula="of:=IF([.D223]=1;[.M222]+1;0)" table:style-name="ce1">
            <text:p>0</text:p>
          </table:table-cell>
          <table:table-cell office:value-type="float" office:value="0" table:formula="of:=IF([.E223]=1;[.N222]+1;0)" table:style-name="ce1">
            <text:p>0</text:p>
          </table:table-cell>
          <table:table-cell office:value-type="float" office:value="0" table:formula="of:=IF([.F223]=1;[.O222]+1;0)" table:style-name="ce1">
            <text:p>0</text:p>
          </table:table-cell>
          <table:table-cell office:value-type="float" office:value="0" table:formula="of:=IF([.G223]=1;[.P222]+1;0)" table:style-name="ce1">
            <text:p>0</text:p>
          </table:table-cell>
          <table:table-cell office:value-type="float" office:value="0" table:formula="of:=IF([.H223]=1;[.Q222]+1;0)" table:style-name="ce1">
            <text:p>0</text:p>
          </table:table-cell>
          <table:table-cell office:value-type="float" office:value="0" table:formula="of:=IF([.I223]=1;[.R22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09T00:00:00" table:formula="of:=[.A223]+1" table:style-name="ce10">
            <text:p>Sun, 09 Aug 2026</text:p>
          </table:table-cell>
          <table:table-cell office:value-type="string" office:string-value="Sun" table:formula="of:=TEXT([.A224];&quot;ddd&quot;)" table:style-name="ce5">
            <text:p>Sun</text:p>
          </table:table-cell>
          <table:table-cell office:value-type="string" office:string-value="Aug" table:formula="of:=TEXT([.A224];&quot;mmm&quot;)" table:style-name="ce5">
            <text:p>Aug</text:p>
          </table:table-cell>
          <table:table-cell office:value-type="float" office:value="0" table:formula="of:=IF(INDEX([Tracker.$A$1:.$AG$120];6+9*(MONTH([.$A224])-1)+(COLUMN()-4);DAY([.$A224])+2)&lt;&gt;&quot;&quot;;1;0)" table:style-name="ce92"/>
          <table:table-cell office:value-type="float" office:value="0" table:formula="of:=IF(INDEX([Tracker.$A$1:.$AG$120];6+9*(MONTH([.$A224])-1)+(COLUMN()-4);DAY([.$A224])+2)&lt;&gt;&quot;&quot;;1;0)" table:style-name="ce92"/>
          <table:table-cell office:value-type="float" office:value="0" table:formula="of:=IF(INDEX([Tracker.$A$1:.$AG$120];6+9*(MONTH([.$A224])-1)+(COLUMN()-4);DAY([.$A224])+2)&lt;&gt;&quot;&quot;;1;0)" table:style-name="ce92"/>
          <table:table-cell office:value-type="float" office:value="0" table:formula="of:=IF(INDEX([Tracker.$A$1:.$AG$120];6+9*(MONTH([.$A224])-1)+(COLUMN()-4);DAY([.$A224])+2)&lt;&gt;&quot;&quot;;1;0)" table:style-name="ce92"/>
          <table:table-cell office:value-type="float" office:value="0" table:formula="of:=IF(INDEX([Tracker.$A$1:.$AG$120];6+9*(MONTH([.$A224])-1)+(COLUMN()-4);DAY([.$A224])+2)&lt;&gt;&quot;&quot;;1;0)" table:style-name="ce92"/>
          <table:table-cell office:value-type="float" office:value="0" table:formula="of:=IF(INDEX([Tracker.$A$1:.$AG$120];6+9*(MONTH([.$A224])-1)+(COLUMN()-4);DAY([.$A224])+2)&lt;&gt;&quot;&quot;;1;0)" table:style-name="ce92"/>
          <table:table-cell office:value-type="float" office:value="0" table:formula="of:=SUM([.D224:.I224])" table:style-name="ce6"/>
          <table:table-cell office:value-type="percentage" office:value="0" table:formula="of:=[.J224]/6" table:style-name="ce8">
            <text:p>0%</text:p>
          </table:table-cell>
          <table:table-cell table:style-name="ce1"/>
          <table:table-cell office:value-type="float" office:value="0" table:formula="of:=IF([.D224]=1;[.M223]+1;0)" table:style-name="ce1">
            <text:p>0</text:p>
          </table:table-cell>
          <table:table-cell office:value-type="float" office:value="0" table:formula="of:=IF([.E224]=1;[.N223]+1;0)" table:style-name="ce1">
            <text:p>0</text:p>
          </table:table-cell>
          <table:table-cell office:value-type="float" office:value="0" table:formula="of:=IF([.F224]=1;[.O223]+1;0)" table:style-name="ce1">
            <text:p>0</text:p>
          </table:table-cell>
          <table:table-cell office:value-type="float" office:value="0" table:formula="of:=IF([.G224]=1;[.P223]+1;0)" table:style-name="ce1">
            <text:p>0</text:p>
          </table:table-cell>
          <table:table-cell office:value-type="float" office:value="0" table:formula="of:=IF([.H224]=1;[.Q223]+1;0)" table:style-name="ce1">
            <text:p>0</text:p>
          </table:table-cell>
          <table:table-cell office:value-type="float" office:value="0" table:formula="of:=IF([.I224]=1;[.R22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0T00:00:00" table:formula="of:=[.A224]+1" table:style-name="ce10">
            <text:p>Mon, 10 Aug 2026</text:p>
          </table:table-cell>
          <table:table-cell office:value-type="string" office:string-value="Mon" table:formula="of:=TEXT([.A225];&quot;ddd&quot;)" table:style-name="ce5">
            <text:p>Mon</text:p>
          </table:table-cell>
          <table:table-cell office:value-type="string" office:string-value="Aug" table:formula="of:=TEXT([.A225];&quot;mmm&quot;)" table:style-name="ce5">
            <text:p>Aug</text:p>
          </table:table-cell>
          <table:table-cell office:value-type="float" office:value="0" table:formula="of:=IF(INDEX([Tracker.$A$1:.$AG$120];6+9*(MONTH([.$A225])-1)+(COLUMN()-4);DAY([.$A225])+2)&lt;&gt;&quot;&quot;;1;0)" table:style-name="ce92"/>
          <table:table-cell office:value-type="float" office:value="0" table:formula="of:=IF(INDEX([Tracker.$A$1:.$AG$120];6+9*(MONTH([.$A225])-1)+(COLUMN()-4);DAY([.$A225])+2)&lt;&gt;&quot;&quot;;1;0)" table:style-name="ce92"/>
          <table:table-cell office:value-type="float" office:value="0" table:formula="of:=IF(INDEX([Tracker.$A$1:.$AG$120];6+9*(MONTH([.$A225])-1)+(COLUMN()-4);DAY([.$A225])+2)&lt;&gt;&quot;&quot;;1;0)" table:style-name="ce92"/>
          <table:table-cell office:value-type="float" office:value="0" table:formula="of:=IF(INDEX([Tracker.$A$1:.$AG$120];6+9*(MONTH([.$A225])-1)+(COLUMN()-4);DAY([.$A225])+2)&lt;&gt;&quot;&quot;;1;0)" table:style-name="ce92"/>
          <table:table-cell office:value-type="float" office:value="0" table:formula="of:=IF(INDEX([Tracker.$A$1:.$AG$120];6+9*(MONTH([.$A225])-1)+(COLUMN()-4);DAY([.$A225])+2)&lt;&gt;&quot;&quot;;1;0)" table:style-name="ce92"/>
          <table:table-cell office:value-type="float" office:value="0" table:formula="of:=IF(INDEX([Tracker.$A$1:.$AG$120];6+9*(MONTH([.$A225])-1)+(COLUMN()-4);DAY([.$A225])+2)&lt;&gt;&quot;&quot;;1;0)" table:style-name="ce92"/>
          <table:table-cell office:value-type="float" office:value="0" table:formula="of:=SUM([.D225:.I225])" table:style-name="ce6"/>
          <table:table-cell office:value-type="percentage" office:value="0" table:formula="of:=[.J225]/6" table:style-name="ce8">
            <text:p>0%</text:p>
          </table:table-cell>
          <table:table-cell table:style-name="ce1"/>
          <table:table-cell office:value-type="float" office:value="0" table:formula="of:=IF([.D225]=1;[.M224]+1;0)" table:style-name="ce1">
            <text:p>0</text:p>
          </table:table-cell>
          <table:table-cell office:value-type="float" office:value="0" table:formula="of:=IF([.E225]=1;[.N224]+1;0)" table:style-name="ce1">
            <text:p>0</text:p>
          </table:table-cell>
          <table:table-cell office:value-type="float" office:value="0" table:formula="of:=IF([.F225]=1;[.O224]+1;0)" table:style-name="ce1">
            <text:p>0</text:p>
          </table:table-cell>
          <table:table-cell office:value-type="float" office:value="0" table:formula="of:=IF([.G225]=1;[.P224]+1;0)" table:style-name="ce1">
            <text:p>0</text:p>
          </table:table-cell>
          <table:table-cell office:value-type="float" office:value="0" table:formula="of:=IF([.H225]=1;[.Q224]+1;0)" table:style-name="ce1">
            <text:p>0</text:p>
          </table:table-cell>
          <table:table-cell office:value-type="float" office:value="0" table:formula="of:=IF([.I225]=1;[.R22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1T00:00:00" table:formula="of:=[.A225]+1" table:style-name="ce10">
            <text:p>Tue, 11 Aug 2026</text:p>
          </table:table-cell>
          <table:table-cell office:value-type="string" office:string-value="Tue" table:formula="of:=TEXT([.A226];&quot;ddd&quot;)" table:style-name="ce5">
            <text:p>Tue</text:p>
          </table:table-cell>
          <table:table-cell office:value-type="string" office:string-value="Aug" table:formula="of:=TEXT([.A226];&quot;mmm&quot;)" table:style-name="ce5">
            <text:p>Aug</text:p>
          </table:table-cell>
          <table:table-cell office:value-type="float" office:value="0" table:formula="of:=IF(INDEX([Tracker.$A$1:.$AG$120];6+9*(MONTH([.$A226])-1)+(COLUMN()-4);DAY([.$A226])+2)&lt;&gt;&quot;&quot;;1;0)" table:style-name="ce92"/>
          <table:table-cell office:value-type="float" office:value="0" table:formula="of:=IF(INDEX([Tracker.$A$1:.$AG$120];6+9*(MONTH([.$A226])-1)+(COLUMN()-4);DAY([.$A226])+2)&lt;&gt;&quot;&quot;;1;0)" table:style-name="ce92"/>
          <table:table-cell office:value-type="float" office:value="0" table:formula="of:=IF(INDEX([Tracker.$A$1:.$AG$120];6+9*(MONTH([.$A226])-1)+(COLUMN()-4);DAY([.$A226])+2)&lt;&gt;&quot;&quot;;1;0)" table:style-name="ce92"/>
          <table:table-cell office:value-type="float" office:value="0" table:formula="of:=IF(INDEX([Tracker.$A$1:.$AG$120];6+9*(MONTH([.$A226])-1)+(COLUMN()-4);DAY([.$A226])+2)&lt;&gt;&quot;&quot;;1;0)" table:style-name="ce92"/>
          <table:table-cell office:value-type="float" office:value="0" table:formula="of:=IF(INDEX([Tracker.$A$1:.$AG$120];6+9*(MONTH([.$A226])-1)+(COLUMN()-4);DAY([.$A226])+2)&lt;&gt;&quot;&quot;;1;0)" table:style-name="ce92"/>
          <table:table-cell office:value-type="float" office:value="0" table:formula="of:=IF(INDEX([Tracker.$A$1:.$AG$120];6+9*(MONTH([.$A226])-1)+(COLUMN()-4);DAY([.$A226])+2)&lt;&gt;&quot;&quot;;1;0)" table:style-name="ce92"/>
          <table:table-cell office:value-type="float" office:value="0" table:formula="of:=SUM([.D226:.I226])" table:style-name="ce6"/>
          <table:table-cell office:value-type="percentage" office:value="0" table:formula="of:=[.J226]/6" table:style-name="ce8">
            <text:p>0%</text:p>
          </table:table-cell>
          <table:table-cell table:style-name="ce1"/>
          <table:table-cell office:value-type="float" office:value="0" table:formula="of:=IF([.D226]=1;[.M225]+1;0)" table:style-name="ce1">
            <text:p>0</text:p>
          </table:table-cell>
          <table:table-cell office:value-type="float" office:value="0" table:formula="of:=IF([.E226]=1;[.N225]+1;0)" table:style-name="ce1">
            <text:p>0</text:p>
          </table:table-cell>
          <table:table-cell office:value-type="float" office:value="0" table:formula="of:=IF([.F226]=1;[.O225]+1;0)" table:style-name="ce1">
            <text:p>0</text:p>
          </table:table-cell>
          <table:table-cell office:value-type="float" office:value="0" table:formula="of:=IF([.G226]=1;[.P225]+1;0)" table:style-name="ce1">
            <text:p>0</text:p>
          </table:table-cell>
          <table:table-cell office:value-type="float" office:value="0" table:formula="of:=IF([.H226]=1;[.Q225]+1;0)" table:style-name="ce1">
            <text:p>0</text:p>
          </table:table-cell>
          <table:table-cell office:value-type="float" office:value="0" table:formula="of:=IF([.I226]=1;[.R22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2T00:00:00" table:formula="of:=[.A226]+1" table:style-name="ce10">
            <text:p>Wed, 12 Aug 2026</text:p>
          </table:table-cell>
          <table:table-cell office:value-type="string" office:string-value="Wed" table:formula="of:=TEXT([.A227];&quot;ddd&quot;)" table:style-name="ce5">
            <text:p>Wed</text:p>
          </table:table-cell>
          <table:table-cell office:value-type="string" office:string-value="Aug" table:formula="of:=TEXT([.A227];&quot;mmm&quot;)" table:style-name="ce5">
            <text:p>Aug</text:p>
          </table:table-cell>
          <table:table-cell office:value-type="float" office:value="0" table:formula="of:=IF(INDEX([Tracker.$A$1:.$AG$120];6+9*(MONTH([.$A227])-1)+(COLUMN()-4);DAY([.$A227])+2)&lt;&gt;&quot;&quot;;1;0)" table:style-name="ce92"/>
          <table:table-cell office:value-type="float" office:value="0" table:formula="of:=IF(INDEX([Tracker.$A$1:.$AG$120];6+9*(MONTH([.$A227])-1)+(COLUMN()-4);DAY([.$A227])+2)&lt;&gt;&quot;&quot;;1;0)" table:style-name="ce92"/>
          <table:table-cell office:value-type="float" office:value="0" table:formula="of:=IF(INDEX([Tracker.$A$1:.$AG$120];6+9*(MONTH([.$A227])-1)+(COLUMN()-4);DAY([.$A227])+2)&lt;&gt;&quot;&quot;;1;0)" table:style-name="ce92"/>
          <table:table-cell office:value-type="float" office:value="0" table:formula="of:=IF(INDEX([Tracker.$A$1:.$AG$120];6+9*(MONTH([.$A227])-1)+(COLUMN()-4);DAY([.$A227])+2)&lt;&gt;&quot;&quot;;1;0)" table:style-name="ce92"/>
          <table:table-cell office:value-type="float" office:value="0" table:formula="of:=IF(INDEX([Tracker.$A$1:.$AG$120];6+9*(MONTH([.$A227])-1)+(COLUMN()-4);DAY([.$A227])+2)&lt;&gt;&quot;&quot;;1;0)" table:style-name="ce92"/>
          <table:table-cell office:value-type="float" office:value="0" table:formula="of:=IF(INDEX([Tracker.$A$1:.$AG$120];6+9*(MONTH([.$A227])-1)+(COLUMN()-4);DAY([.$A227])+2)&lt;&gt;&quot;&quot;;1;0)" table:style-name="ce92"/>
          <table:table-cell office:value-type="float" office:value="0" table:formula="of:=SUM([.D227:.I227])" table:style-name="ce6"/>
          <table:table-cell office:value-type="percentage" office:value="0" table:formula="of:=[.J227]/6" table:style-name="ce8">
            <text:p>0%</text:p>
          </table:table-cell>
          <table:table-cell table:style-name="ce1"/>
          <table:table-cell office:value-type="float" office:value="0" table:formula="of:=IF([.D227]=1;[.M226]+1;0)" table:style-name="ce1">
            <text:p>0</text:p>
          </table:table-cell>
          <table:table-cell office:value-type="float" office:value="0" table:formula="of:=IF([.E227]=1;[.N226]+1;0)" table:style-name="ce1">
            <text:p>0</text:p>
          </table:table-cell>
          <table:table-cell office:value-type="float" office:value="0" table:formula="of:=IF([.F227]=1;[.O226]+1;0)" table:style-name="ce1">
            <text:p>0</text:p>
          </table:table-cell>
          <table:table-cell office:value-type="float" office:value="0" table:formula="of:=IF([.G227]=1;[.P226]+1;0)" table:style-name="ce1">
            <text:p>0</text:p>
          </table:table-cell>
          <table:table-cell office:value-type="float" office:value="0" table:formula="of:=IF([.H227]=1;[.Q226]+1;0)" table:style-name="ce1">
            <text:p>0</text:p>
          </table:table-cell>
          <table:table-cell office:value-type="float" office:value="0" table:formula="of:=IF([.I227]=1;[.R22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3T00:00:00" table:formula="of:=[.A227]+1" table:style-name="ce10">
            <text:p>Thu, 13 Aug 2026</text:p>
          </table:table-cell>
          <table:table-cell office:value-type="string" office:string-value="Thu" table:formula="of:=TEXT([.A228];&quot;ddd&quot;)" table:style-name="ce5">
            <text:p>Thu</text:p>
          </table:table-cell>
          <table:table-cell office:value-type="string" office:string-value="Aug" table:formula="of:=TEXT([.A228];&quot;mmm&quot;)" table:style-name="ce5">
            <text:p>Aug</text:p>
          </table:table-cell>
          <table:table-cell office:value-type="float" office:value="0" table:formula="of:=IF(INDEX([Tracker.$A$1:.$AG$120];6+9*(MONTH([.$A228])-1)+(COLUMN()-4);DAY([.$A228])+2)&lt;&gt;&quot;&quot;;1;0)" table:style-name="ce92"/>
          <table:table-cell office:value-type="float" office:value="0" table:formula="of:=IF(INDEX([Tracker.$A$1:.$AG$120];6+9*(MONTH([.$A228])-1)+(COLUMN()-4);DAY([.$A228])+2)&lt;&gt;&quot;&quot;;1;0)" table:style-name="ce92"/>
          <table:table-cell office:value-type="float" office:value="0" table:formula="of:=IF(INDEX([Tracker.$A$1:.$AG$120];6+9*(MONTH([.$A228])-1)+(COLUMN()-4);DAY([.$A228])+2)&lt;&gt;&quot;&quot;;1;0)" table:style-name="ce92"/>
          <table:table-cell office:value-type="float" office:value="0" table:formula="of:=IF(INDEX([Tracker.$A$1:.$AG$120];6+9*(MONTH([.$A228])-1)+(COLUMN()-4);DAY([.$A228])+2)&lt;&gt;&quot;&quot;;1;0)" table:style-name="ce92"/>
          <table:table-cell office:value-type="float" office:value="0" table:formula="of:=IF(INDEX([Tracker.$A$1:.$AG$120];6+9*(MONTH([.$A228])-1)+(COLUMN()-4);DAY([.$A228])+2)&lt;&gt;&quot;&quot;;1;0)" table:style-name="ce92"/>
          <table:table-cell office:value-type="float" office:value="0" table:formula="of:=IF(INDEX([Tracker.$A$1:.$AG$120];6+9*(MONTH([.$A228])-1)+(COLUMN()-4);DAY([.$A228])+2)&lt;&gt;&quot;&quot;;1;0)" table:style-name="ce92"/>
          <table:table-cell office:value-type="float" office:value="0" table:formula="of:=SUM([.D228:.I228])" table:style-name="ce6"/>
          <table:table-cell office:value-type="percentage" office:value="0" table:formula="of:=[.J228]/6" table:style-name="ce8">
            <text:p>0%</text:p>
          </table:table-cell>
          <table:table-cell table:style-name="ce1"/>
          <table:table-cell office:value-type="float" office:value="0" table:formula="of:=IF([.D228]=1;[.M227]+1;0)" table:style-name="ce1">
            <text:p>0</text:p>
          </table:table-cell>
          <table:table-cell office:value-type="float" office:value="0" table:formula="of:=IF([.E228]=1;[.N227]+1;0)" table:style-name="ce1">
            <text:p>0</text:p>
          </table:table-cell>
          <table:table-cell office:value-type="float" office:value="0" table:formula="of:=IF([.F228]=1;[.O227]+1;0)" table:style-name="ce1">
            <text:p>0</text:p>
          </table:table-cell>
          <table:table-cell office:value-type="float" office:value="0" table:formula="of:=IF([.G228]=1;[.P227]+1;0)" table:style-name="ce1">
            <text:p>0</text:p>
          </table:table-cell>
          <table:table-cell office:value-type="float" office:value="0" table:formula="of:=IF([.H228]=1;[.Q227]+1;0)" table:style-name="ce1">
            <text:p>0</text:p>
          </table:table-cell>
          <table:table-cell office:value-type="float" office:value="0" table:formula="of:=IF([.I228]=1;[.R22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4T00:00:00" table:formula="of:=[.A228]+1" table:style-name="ce10">
            <text:p>Fri, 14 Aug 2026</text:p>
          </table:table-cell>
          <table:table-cell office:value-type="string" office:string-value="Fri" table:formula="of:=TEXT([.A229];&quot;ddd&quot;)" table:style-name="ce5">
            <text:p>Fri</text:p>
          </table:table-cell>
          <table:table-cell office:value-type="string" office:string-value="Aug" table:formula="of:=TEXT([.A229];&quot;mmm&quot;)" table:style-name="ce5">
            <text:p>Aug</text:p>
          </table:table-cell>
          <table:table-cell office:value-type="float" office:value="0" table:formula="of:=IF(INDEX([Tracker.$A$1:.$AG$120];6+9*(MONTH([.$A229])-1)+(COLUMN()-4);DAY([.$A229])+2)&lt;&gt;&quot;&quot;;1;0)" table:style-name="ce92"/>
          <table:table-cell office:value-type="float" office:value="0" table:formula="of:=IF(INDEX([Tracker.$A$1:.$AG$120];6+9*(MONTH([.$A229])-1)+(COLUMN()-4);DAY([.$A229])+2)&lt;&gt;&quot;&quot;;1;0)" table:style-name="ce92"/>
          <table:table-cell office:value-type="float" office:value="0" table:formula="of:=IF(INDEX([Tracker.$A$1:.$AG$120];6+9*(MONTH([.$A229])-1)+(COLUMN()-4);DAY([.$A229])+2)&lt;&gt;&quot;&quot;;1;0)" table:style-name="ce92"/>
          <table:table-cell office:value-type="float" office:value="0" table:formula="of:=IF(INDEX([Tracker.$A$1:.$AG$120];6+9*(MONTH([.$A229])-1)+(COLUMN()-4);DAY([.$A229])+2)&lt;&gt;&quot;&quot;;1;0)" table:style-name="ce92"/>
          <table:table-cell office:value-type="float" office:value="0" table:formula="of:=IF(INDEX([Tracker.$A$1:.$AG$120];6+9*(MONTH([.$A229])-1)+(COLUMN()-4);DAY([.$A229])+2)&lt;&gt;&quot;&quot;;1;0)" table:style-name="ce92"/>
          <table:table-cell office:value-type="float" office:value="0" table:formula="of:=IF(INDEX([Tracker.$A$1:.$AG$120];6+9*(MONTH([.$A229])-1)+(COLUMN()-4);DAY([.$A229])+2)&lt;&gt;&quot;&quot;;1;0)" table:style-name="ce92"/>
          <table:table-cell office:value-type="float" office:value="0" table:formula="of:=SUM([.D229:.I229])" table:style-name="ce6"/>
          <table:table-cell office:value-type="percentage" office:value="0" table:formula="of:=[.J229]/6" table:style-name="ce8">
            <text:p>0%</text:p>
          </table:table-cell>
          <table:table-cell table:style-name="ce1"/>
          <table:table-cell office:value-type="float" office:value="0" table:formula="of:=IF([.D229]=1;[.M228]+1;0)" table:style-name="ce1">
            <text:p>0</text:p>
          </table:table-cell>
          <table:table-cell office:value-type="float" office:value="0" table:formula="of:=IF([.E229]=1;[.N228]+1;0)" table:style-name="ce1">
            <text:p>0</text:p>
          </table:table-cell>
          <table:table-cell office:value-type="float" office:value="0" table:formula="of:=IF([.F229]=1;[.O228]+1;0)" table:style-name="ce1">
            <text:p>0</text:p>
          </table:table-cell>
          <table:table-cell office:value-type="float" office:value="0" table:formula="of:=IF([.G229]=1;[.P228]+1;0)" table:style-name="ce1">
            <text:p>0</text:p>
          </table:table-cell>
          <table:table-cell office:value-type="float" office:value="0" table:formula="of:=IF([.H229]=1;[.Q228]+1;0)" table:style-name="ce1">
            <text:p>0</text:p>
          </table:table-cell>
          <table:table-cell office:value-type="float" office:value="0" table:formula="of:=IF([.I229]=1;[.R22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5T00:00:00" table:formula="of:=[.A229]+1" table:style-name="ce10">
            <text:p>Sat, 15 Aug 2026</text:p>
          </table:table-cell>
          <table:table-cell office:value-type="string" office:string-value="Sat" table:formula="of:=TEXT([.A230];&quot;ddd&quot;)" table:style-name="ce5">
            <text:p>Sat</text:p>
          </table:table-cell>
          <table:table-cell office:value-type="string" office:string-value="Aug" table:formula="of:=TEXT([.A230];&quot;mmm&quot;)" table:style-name="ce5">
            <text:p>Aug</text:p>
          </table:table-cell>
          <table:table-cell office:value-type="float" office:value="0" table:formula="of:=IF(INDEX([Tracker.$A$1:.$AG$120];6+9*(MONTH([.$A230])-1)+(COLUMN()-4);DAY([.$A230])+2)&lt;&gt;&quot;&quot;;1;0)" table:style-name="ce92"/>
          <table:table-cell office:value-type="float" office:value="0" table:formula="of:=IF(INDEX([Tracker.$A$1:.$AG$120];6+9*(MONTH([.$A230])-1)+(COLUMN()-4);DAY([.$A230])+2)&lt;&gt;&quot;&quot;;1;0)" table:style-name="ce92"/>
          <table:table-cell office:value-type="float" office:value="0" table:formula="of:=IF(INDEX([Tracker.$A$1:.$AG$120];6+9*(MONTH([.$A230])-1)+(COLUMN()-4);DAY([.$A230])+2)&lt;&gt;&quot;&quot;;1;0)" table:style-name="ce92"/>
          <table:table-cell office:value-type="float" office:value="0" table:formula="of:=IF(INDEX([Tracker.$A$1:.$AG$120];6+9*(MONTH([.$A230])-1)+(COLUMN()-4);DAY([.$A230])+2)&lt;&gt;&quot;&quot;;1;0)" table:style-name="ce92"/>
          <table:table-cell office:value-type="float" office:value="0" table:formula="of:=IF(INDEX([Tracker.$A$1:.$AG$120];6+9*(MONTH([.$A230])-1)+(COLUMN()-4);DAY([.$A230])+2)&lt;&gt;&quot;&quot;;1;0)" table:style-name="ce92"/>
          <table:table-cell office:value-type="float" office:value="0" table:formula="of:=IF(INDEX([Tracker.$A$1:.$AG$120];6+9*(MONTH([.$A230])-1)+(COLUMN()-4);DAY([.$A230])+2)&lt;&gt;&quot;&quot;;1;0)" table:style-name="ce92"/>
          <table:table-cell office:value-type="float" office:value="0" table:formula="of:=SUM([.D230:.I230])" table:style-name="ce6"/>
          <table:table-cell office:value-type="percentage" office:value="0" table:formula="of:=[.J230]/6" table:style-name="ce8">
            <text:p>0%</text:p>
          </table:table-cell>
          <table:table-cell table:style-name="ce1"/>
          <table:table-cell office:value-type="float" office:value="0" table:formula="of:=IF([.D230]=1;[.M229]+1;0)" table:style-name="ce1">
            <text:p>0</text:p>
          </table:table-cell>
          <table:table-cell office:value-type="float" office:value="0" table:formula="of:=IF([.E230]=1;[.N229]+1;0)" table:style-name="ce1">
            <text:p>0</text:p>
          </table:table-cell>
          <table:table-cell office:value-type="float" office:value="0" table:formula="of:=IF([.F230]=1;[.O229]+1;0)" table:style-name="ce1">
            <text:p>0</text:p>
          </table:table-cell>
          <table:table-cell office:value-type="float" office:value="0" table:formula="of:=IF([.G230]=1;[.P229]+1;0)" table:style-name="ce1">
            <text:p>0</text:p>
          </table:table-cell>
          <table:table-cell office:value-type="float" office:value="0" table:formula="of:=IF([.H230]=1;[.Q229]+1;0)" table:style-name="ce1">
            <text:p>0</text:p>
          </table:table-cell>
          <table:table-cell office:value-type="float" office:value="0" table:formula="of:=IF([.I230]=1;[.R22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6T00:00:00" table:formula="of:=[.A230]+1" table:style-name="ce10">
            <text:p>Sun, 16 Aug 2026</text:p>
          </table:table-cell>
          <table:table-cell office:value-type="string" office:string-value="Sun" table:formula="of:=TEXT([.A231];&quot;ddd&quot;)" table:style-name="ce5">
            <text:p>Sun</text:p>
          </table:table-cell>
          <table:table-cell office:value-type="string" office:string-value="Aug" table:formula="of:=TEXT([.A231];&quot;mmm&quot;)" table:style-name="ce5">
            <text:p>Aug</text:p>
          </table:table-cell>
          <table:table-cell office:value-type="float" office:value="0" table:formula="of:=IF(INDEX([Tracker.$A$1:.$AG$120];6+9*(MONTH([.$A231])-1)+(COLUMN()-4);DAY([.$A231])+2)&lt;&gt;&quot;&quot;;1;0)" table:style-name="ce92"/>
          <table:table-cell office:value-type="float" office:value="0" table:formula="of:=IF(INDEX([Tracker.$A$1:.$AG$120];6+9*(MONTH([.$A231])-1)+(COLUMN()-4);DAY([.$A231])+2)&lt;&gt;&quot;&quot;;1;0)" table:style-name="ce92"/>
          <table:table-cell office:value-type="float" office:value="0" table:formula="of:=IF(INDEX([Tracker.$A$1:.$AG$120];6+9*(MONTH([.$A231])-1)+(COLUMN()-4);DAY([.$A231])+2)&lt;&gt;&quot;&quot;;1;0)" table:style-name="ce92"/>
          <table:table-cell office:value-type="float" office:value="0" table:formula="of:=IF(INDEX([Tracker.$A$1:.$AG$120];6+9*(MONTH([.$A231])-1)+(COLUMN()-4);DAY([.$A231])+2)&lt;&gt;&quot;&quot;;1;0)" table:style-name="ce92"/>
          <table:table-cell office:value-type="float" office:value="0" table:formula="of:=IF(INDEX([Tracker.$A$1:.$AG$120];6+9*(MONTH([.$A231])-1)+(COLUMN()-4);DAY([.$A231])+2)&lt;&gt;&quot;&quot;;1;0)" table:style-name="ce92"/>
          <table:table-cell office:value-type="float" office:value="0" table:formula="of:=IF(INDEX([Tracker.$A$1:.$AG$120];6+9*(MONTH([.$A231])-1)+(COLUMN()-4);DAY([.$A231])+2)&lt;&gt;&quot;&quot;;1;0)" table:style-name="ce92"/>
          <table:table-cell office:value-type="float" office:value="0" table:formula="of:=SUM([.D231:.I231])" table:style-name="ce6"/>
          <table:table-cell office:value-type="percentage" office:value="0" table:formula="of:=[.J231]/6" table:style-name="ce8">
            <text:p>0%</text:p>
          </table:table-cell>
          <table:table-cell table:style-name="ce1"/>
          <table:table-cell office:value-type="float" office:value="0" table:formula="of:=IF([.D231]=1;[.M230]+1;0)" table:style-name="ce1">
            <text:p>0</text:p>
          </table:table-cell>
          <table:table-cell office:value-type="float" office:value="0" table:formula="of:=IF([.E231]=1;[.N230]+1;0)" table:style-name="ce1">
            <text:p>0</text:p>
          </table:table-cell>
          <table:table-cell office:value-type="float" office:value="0" table:formula="of:=IF([.F231]=1;[.O230]+1;0)" table:style-name="ce1">
            <text:p>0</text:p>
          </table:table-cell>
          <table:table-cell office:value-type="float" office:value="0" table:formula="of:=IF([.G231]=1;[.P230]+1;0)" table:style-name="ce1">
            <text:p>0</text:p>
          </table:table-cell>
          <table:table-cell office:value-type="float" office:value="0" table:formula="of:=IF([.H231]=1;[.Q230]+1;0)" table:style-name="ce1">
            <text:p>0</text:p>
          </table:table-cell>
          <table:table-cell office:value-type="float" office:value="0" table:formula="of:=IF([.I231]=1;[.R23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7T00:00:00" table:formula="of:=[.A231]+1" table:style-name="ce10">
            <text:p>Mon, 17 Aug 2026</text:p>
          </table:table-cell>
          <table:table-cell office:value-type="string" office:string-value="Mon" table:formula="of:=TEXT([.A232];&quot;ddd&quot;)" table:style-name="ce5">
            <text:p>Mon</text:p>
          </table:table-cell>
          <table:table-cell office:value-type="string" office:string-value="Aug" table:formula="of:=TEXT([.A232];&quot;mmm&quot;)" table:style-name="ce5">
            <text:p>Aug</text:p>
          </table:table-cell>
          <table:table-cell office:value-type="float" office:value="0" table:formula="of:=IF(INDEX([Tracker.$A$1:.$AG$120];6+9*(MONTH([.$A232])-1)+(COLUMN()-4);DAY([.$A232])+2)&lt;&gt;&quot;&quot;;1;0)" table:style-name="ce92"/>
          <table:table-cell office:value-type="float" office:value="0" table:formula="of:=IF(INDEX([Tracker.$A$1:.$AG$120];6+9*(MONTH([.$A232])-1)+(COLUMN()-4);DAY([.$A232])+2)&lt;&gt;&quot;&quot;;1;0)" table:style-name="ce92"/>
          <table:table-cell office:value-type="float" office:value="0" table:formula="of:=IF(INDEX([Tracker.$A$1:.$AG$120];6+9*(MONTH([.$A232])-1)+(COLUMN()-4);DAY([.$A232])+2)&lt;&gt;&quot;&quot;;1;0)" table:style-name="ce92"/>
          <table:table-cell office:value-type="float" office:value="0" table:formula="of:=IF(INDEX([Tracker.$A$1:.$AG$120];6+9*(MONTH([.$A232])-1)+(COLUMN()-4);DAY([.$A232])+2)&lt;&gt;&quot;&quot;;1;0)" table:style-name="ce92"/>
          <table:table-cell office:value-type="float" office:value="0" table:formula="of:=IF(INDEX([Tracker.$A$1:.$AG$120];6+9*(MONTH([.$A232])-1)+(COLUMN()-4);DAY([.$A232])+2)&lt;&gt;&quot;&quot;;1;0)" table:style-name="ce92"/>
          <table:table-cell office:value-type="float" office:value="0" table:formula="of:=IF(INDEX([Tracker.$A$1:.$AG$120];6+9*(MONTH([.$A232])-1)+(COLUMN()-4);DAY([.$A232])+2)&lt;&gt;&quot;&quot;;1;0)" table:style-name="ce92"/>
          <table:table-cell office:value-type="float" office:value="0" table:formula="of:=SUM([.D232:.I232])" table:style-name="ce6"/>
          <table:table-cell office:value-type="percentage" office:value="0" table:formula="of:=[.J232]/6" table:style-name="ce8">
            <text:p>0%</text:p>
          </table:table-cell>
          <table:table-cell table:style-name="ce1"/>
          <table:table-cell office:value-type="float" office:value="0" table:formula="of:=IF([.D232]=1;[.M231]+1;0)" table:style-name="ce1">
            <text:p>0</text:p>
          </table:table-cell>
          <table:table-cell office:value-type="float" office:value="0" table:formula="of:=IF([.E232]=1;[.N231]+1;0)" table:style-name="ce1">
            <text:p>0</text:p>
          </table:table-cell>
          <table:table-cell office:value-type="float" office:value="0" table:formula="of:=IF([.F232]=1;[.O231]+1;0)" table:style-name="ce1">
            <text:p>0</text:p>
          </table:table-cell>
          <table:table-cell office:value-type="float" office:value="0" table:formula="of:=IF([.G232]=1;[.P231]+1;0)" table:style-name="ce1">
            <text:p>0</text:p>
          </table:table-cell>
          <table:table-cell office:value-type="float" office:value="0" table:formula="of:=IF([.H232]=1;[.Q231]+1;0)" table:style-name="ce1">
            <text:p>0</text:p>
          </table:table-cell>
          <table:table-cell office:value-type="float" office:value="0" table:formula="of:=IF([.I232]=1;[.R23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8T00:00:00" table:formula="of:=[.A232]+1" table:style-name="ce10">
            <text:p>Tue, 18 Aug 2026</text:p>
          </table:table-cell>
          <table:table-cell office:value-type="string" office:string-value="Tue" table:formula="of:=TEXT([.A233];&quot;ddd&quot;)" table:style-name="ce5">
            <text:p>Tue</text:p>
          </table:table-cell>
          <table:table-cell office:value-type="string" office:string-value="Aug" table:formula="of:=TEXT([.A233];&quot;mmm&quot;)" table:style-name="ce5">
            <text:p>Aug</text:p>
          </table:table-cell>
          <table:table-cell office:value-type="float" office:value="0" table:formula="of:=IF(INDEX([Tracker.$A$1:.$AG$120];6+9*(MONTH([.$A233])-1)+(COLUMN()-4);DAY([.$A233])+2)&lt;&gt;&quot;&quot;;1;0)" table:style-name="ce92"/>
          <table:table-cell office:value-type="float" office:value="0" table:formula="of:=IF(INDEX([Tracker.$A$1:.$AG$120];6+9*(MONTH([.$A233])-1)+(COLUMN()-4);DAY([.$A233])+2)&lt;&gt;&quot;&quot;;1;0)" table:style-name="ce92"/>
          <table:table-cell office:value-type="float" office:value="0" table:formula="of:=IF(INDEX([Tracker.$A$1:.$AG$120];6+9*(MONTH([.$A233])-1)+(COLUMN()-4);DAY([.$A233])+2)&lt;&gt;&quot;&quot;;1;0)" table:style-name="ce92"/>
          <table:table-cell office:value-type="float" office:value="0" table:formula="of:=IF(INDEX([Tracker.$A$1:.$AG$120];6+9*(MONTH([.$A233])-1)+(COLUMN()-4);DAY([.$A233])+2)&lt;&gt;&quot;&quot;;1;0)" table:style-name="ce92"/>
          <table:table-cell office:value-type="float" office:value="0" table:formula="of:=IF(INDEX([Tracker.$A$1:.$AG$120];6+9*(MONTH([.$A233])-1)+(COLUMN()-4);DAY([.$A233])+2)&lt;&gt;&quot;&quot;;1;0)" table:style-name="ce92"/>
          <table:table-cell office:value-type="float" office:value="0" table:formula="of:=IF(INDEX([Tracker.$A$1:.$AG$120];6+9*(MONTH([.$A233])-1)+(COLUMN()-4);DAY([.$A233])+2)&lt;&gt;&quot;&quot;;1;0)" table:style-name="ce92"/>
          <table:table-cell office:value-type="float" office:value="0" table:formula="of:=SUM([.D233:.I233])" table:style-name="ce6"/>
          <table:table-cell office:value-type="percentage" office:value="0" table:formula="of:=[.J233]/6" table:style-name="ce8">
            <text:p>0%</text:p>
          </table:table-cell>
          <table:table-cell table:style-name="ce1"/>
          <table:table-cell office:value-type="float" office:value="0" table:formula="of:=IF([.D233]=1;[.M232]+1;0)" table:style-name="ce1">
            <text:p>0</text:p>
          </table:table-cell>
          <table:table-cell office:value-type="float" office:value="0" table:formula="of:=IF([.E233]=1;[.N232]+1;0)" table:style-name="ce1">
            <text:p>0</text:p>
          </table:table-cell>
          <table:table-cell office:value-type="float" office:value="0" table:formula="of:=IF([.F233]=1;[.O232]+1;0)" table:style-name="ce1">
            <text:p>0</text:p>
          </table:table-cell>
          <table:table-cell office:value-type="float" office:value="0" table:formula="of:=IF([.G233]=1;[.P232]+1;0)" table:style-name="ce1">
            <text:p>0</text:p>
          </table:table-cell>
          <table:table-cell office:value-type="float" office:value="0" table:formula="of:=IF([.H233]=1;[.Q232]+1;0)" table:style-name="ce1">
            <text:p>0</text:p>
          </table:table-cell>
          <table:table-cell office:value-type="float" office:value="0" table:formula="of:=IF([.I233]=1;[.R23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19T00:00:00" table:formula="of:=[.A233]+1" table:style-name="ce10">
            <text:p>Wed, 19 Aug 2026</text:p>
          </table:table-cell>
          <table:table-cell office:value-type="string" office:string-value="Wed" table:formula="of:=TEXT([.A234];&quot;ddd&quot;)" table:style-name="ce5">
            <text:p>Wed</text:p>
          </table:table-cell>
          <table:table-cell office:value-type="string" office:string-value="Aug" table:formula="of:=TEXT([.A234];&quot;mmm&quot;)" table:style-name="ce5">
            <text:p>Aug</text:p>
          </table:table-cell>
          <table:table-cell office:value-type="float" office:value="0" table:formula="of:=IF(INDEX([Tracker.$A$1:.$AG$120];6+9*(MONTH([.$A234])-1)+(COLUMN()-4);DAY([.$A234])+2)&lt;&gt;&quot;&quot;;1;0)" table:style-name="ce92"/>
          <table:table-cell office:value-type="float" office:value="0" table:formula="of:=IF(INDEX([Tracker.$A$1:.$AG$120];6+9*(MONTH([.$A234])-1)+(COLUMN()-4);DAY([.$A234])+2)&lt;&gt;&quot;&quot;;1;0)" table:style-name="ce92"/>
          <table:table-cell office:value-type="float" office:value="0" table:formula="of:=IF(INDEX([Tracker.$A$1:.$AG$120];6+9*(MONTH([.$A234])-1)+(COLUMN()-4);DAY([.$A234])+2)&lt;&gt;&quot;&quot;;1;0)" table:style-name="ce92"/>
          <table:table-cell office:value-type="float" office:value="0" table:formula="of:=IF(INDEX([Tracker.$A$1:.$AG$120];6+9*(MONTH([.$A234])-1)+(COLUMN()-4);DAY([.$A234])+2)&lt;&gt;&quot;&quot;;1;0)" table:style-name="ce92"/>
          <table:table-cell office:value-type="float" office:value="0" table:formula="of:=IF(INDEX([Tracker.$A$1:.$AG$120];6+9*(MONTH([.$A234])-1)+(COLUMN()-4);DAY([.$A234])+2)&lt;&gt;&quot;&quot;;1;0)" table:style-name="ce92"/>
          <table:table-cell office:value-type="float" office:value="0" table:formula="of:=IF(INDEX([Tracker.$A$1:.$AG$120];6+9*(MONTH([.$A234])-1)+(COLUMN()-4);DAY([.$A234])+2)&lt;&gt;&quot;&quot;;1;0)" table:style-name="ce92"/>
          <table:table-cell office:value-type="float" office:value="0" table:formula="of:=SUM([.D234:.I234])" table:style-name="ce6"/>
          <table:table-cell office:value-type="percentage" office:value="0" table:formula="of:=[.J234]/6" table:style-name="ce8">
            <text:p>0%</text:p>
          </table:table-cell>
          <table:table-cell table:style-name="ce1"/>
          <table:table-cell office:value-type="float" office:value="0" table:formula="of:=IF([.D234]=1;[.M233]+1;0)" table:style-name="ce1">
            <text:p>0</text:p>
          </table:table-cell>
          <table:table-cell office:value-type="float" office:value="0" table:formula="of:=IF([.E234]=1;[.N233]+1;0)" table:style-name="ce1">
            <text:p>0</text:p>
          </table:table-cell>
          <table:table-cell office:value-type="float" office:value="0" table:formula="of:=IF([.F234]=1;[.O233]+1;0)" table:style-name="ce1">
            <text:p>0</text:p>
          </table:table-cell>
          <table:table-cell office:value-type="float" office:value="0" table:formula="of:=IF([.G234]=1;[.P233]+1;0)" table:style-name="ce1">
            <text:p>0</text:p>
          </table:table-cell>
          <table:table-cell office:value-type="float" office:value="0" table:formula="of:=IF([.H234]=1;[.Q233]+1;0)" table:style-name="ce1">
            <text:p>0</text:p>
          </table:table-cell>
          <table:table-cell office:value-type="float" office:value="0" table:formula="of:=IF([.I234]=1;[.R23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0T00:00:00" table:formula="of:=[.A234]+1" table:style-name="ce10">
            <text:p>Thu, 20 Aug 2026</text:p>
          </table:table-cell>
          <table:table-cell office:value-type="string" office:string-value="Thu" table:formula="of:=TEXT([.A235];&quot;ddd&quot;)" table:style-name="ce5">
            <text:p>Thu</text:p>
          </table:table-cell>
          <table:table-cell office:value-type="string" office:string-value="Aug" table:formula="of:=TEXT([.A235];&quot;mmm&quot;)" table:style-name="ce5">
            <text:p>Aug</text:p>
          </table:table-cell>
          <table:table-cell office:value-type="float" office:value="0" table:formula="of:=IF(INDEX([Tracker.$A$1:.$AG$120];6+9*(MONTH([.$A235])-1)+(COLUMN()-4);DAY([.$A235])+2)&lt;&gt;&quot;&quot;;1;0)" table:style-name="ce92"/>
          <table:table-cell office:value-type="float" office:value="0" table:formula="of:=IF(INDEX([Tracker.$A$1:.$AG$120];6+9*(MONTH([.$A235])-1)+(COLUMN()-4);DAY([.$A235])+2)&lt;&gt;&quot;&quot;;1;0)" table:style-name="ce92"/>
          <table:table-cell office:value-type="float" office:value="0" table:formula="of:=IF(INDEX([Tracker.$A$1:.$AG$120];6+9*(MONTH([.$A235])-1)+(COLUMN()-4);DAY([.$A235])+2)&lt;&gt;&quot;&quot;;1;0)" table:style-name="ce92"/>
          <table:table-cell office:value-type="float" office:value="0" table:formula="of:=IF(INDEX([Tracker.$A$1:.$AG$120];6+9*(MONTH([.$A235])-1)+(COLUMN()-4);DAY([.$A235])+2)&lt;&gt;&quot;&quot;;1;0)" table:style-name="ce92"/>
          <table:table-cell office:value-type="float" office:value="0" table:formula="of:=IF(INDEX([Tracker.$A$1:.$AG$120];6+9*(MONTH([.$A235])-1)+(COLUMN()-4);DAY([.$A235])+2)&lt;&gt;&quot;&quot;;1;0)" table:style-name="ce92"/>
          <table:table-cell office:value-type="float" office:value="0" table:formula="of:=IF(INDEX([Tracker.$A$1:.$AG$120];6+9*(MONTH([.$A235])-1)+(COLUMN()-4);DAY([.$A235])+2)&lt;&gt;&quot;&quot;;1;0)" table:style-name="ce92"/>
          <table:table-cell office:value-type="float" office:value="0" table:formula="of:=SUM([.D235:.I235])" table:style-name="ce6"/>
          <table:table-cell office:value-type="percentage" office:value="0" table:formula="of:=[.J235]/6" table:style-name="ce8">
            <text:p>0%</text:p>
          </table:table-cell>
          <table:table-cell table:style-name="ce1"/>
          <table:table-cell office:value-type="float" office:value="0" table:formula="of:=IF([.D235]=1;[.M234]+1;0)" table:style-name="ce1">
            <text:p>0</text:p>
          </table:table-cell>
          <table:table-cell office:value-type="float" office:value="0" table:formula="of:=IF([.E235]=1;[.N234]+1;0)" table:style-name="ce1">
            <text:p>0</text:p>
          </table:table-cell>
          <table:table-cell office:value-type="float" office:value="0" table:formula="of:=IF([.F235]=1;[.O234]+1;0)" table:style-name="ce1">
            <text:p>0</text:p>
          </table:table-cell>
          <table:table-cell office:value-type="float" office:value="0" table:formula="of:=IF([.G235]=1;[.P234]+1;0)" table:style-name="ce1">
            <text:p>0</text:p>
          </table:table-cell>
          <table:table-cell office:value-type="float" office:value="0" table:formula="of:=IF([.H235]=1;[.Q234]+1;0)" table:style-name="ce1">
            <text:p>0</text:p>
          </table:table-cell>
          <table:table-cell office:value-type="float" office:value="0" table:formula="of:=IF([.I235]=1;[.R23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1T00:00:00" table:formula="of:=[.A235]+1" table:style-name="ce10">
            <text:p>Fri, 21 Aug 2026</text:p>
          </table:table-cell>
          <table:table-cell office:value-type="string" office:string-value="Fri" table:formula="of:=TEXT([.A236];&quot;ddd&quot;)" table:style-name="ce5">
            <text:p>Fri</text:p>
          </table:table-cell>
          <table:table-cell office:value-type="string" office:string-value="Aug" table:formula="of:=TEXT([.A236];&quot;mmm&quot;)" table:style-name="ce5">
            <text:p>Aug</text:p>
          </table:table-cell>
          <table:table-cell office:value-type="float" office:value="0" table:formula="of:=IF(INDEX([Tracker.$A$1:.$AG$120];6+9*(MONTH([.$A236])-1)+(COLUMN()-4);DAY([.$A236])+2)&lt;&gt;&quot;&quot;;1;0)" table:style-name="ce92"/>
          <table:table-cell office:value-type="float" office:value="0" table:formula="of:=IF(INDEX([Tracker.$A$1:.$AG$120];6+9*(MONTH([.$A236])-1)+(COLUMN()-4);DAY([.$A236])+2)&lt;&gt;&quot;&quot;;1;0)" table:style-name="ce92"/>
          <table:table-cell office:value-type="float" office:value="0" table:formula="of:=IF(INDEX([Tracker.$A$1:.$AG$120];6+9*(MONTH([.$A236])-1)+(COLUMN()-4);DAY([.$A236])+2)&lt;&gt;&quot;&quot;;1;0)" table:style-name="ce92"/>
          <table:table-cell office:value-type="float" office:value="0" table:formula="of:=IF(INDEX([Tracker.$A$1:.$AG$120];6+9*(MONTH([.$A236])-1)+(COLUMN()-4);DAY([.$A236])+2)&lt;&gt;&quot;&quot;;1;0)" table:style-name="ce92"/>
          <table:table-cell office:value-type="float" office:value="0" table:formula="of:=IF(INDEX([Tracker.$A$1:.$AG$120];6+9*(MONTH([.$A236])-1)+(COLUMN()-4);DAY([.$A236])+2)&lt;&gt;&quot;&quot;;1;0)" table:style-name="ce92"/>
          <table:table-cell office:value-type="float" office:value="0" table:formula="of:=IF(INDEX([Tracker.$A$1:.$AG$120];6+9*(MONTH([.$A236])-1)+(COLUMN()-4);DAY([.$A236])+2)&lt;&gt;&quot;&quot;;1;0)" table:style-name="ce92"/>
          <table:table-cell office:value-type="float" office:value="0" table:formula="of:=SUM([.D236:.I236])" table:style-name="ce6"/>
          <table:table-cell office:value-type="percentage" office:value="0" table:formula="of:=[.J236]/6" table:style-name="ce8">
            <text:p>0%</text:p>
          </table:table-cell>
          <table:table-cell table:style-name="ce1"/>
          <table:table-cell office:value-type="float" office:value="0" table:formula="of:=IF([.D236]=1;[.M235]+1;0)" table:style-name="ce1">
            <text:p>0</text:p>
          </table:table-cell>
          <table:table-cell office:value-type="float" office:value="0" table:formula="of:=IF([.E236]=1;[.N235]+1;0)" table:style-name="ce1">
            <text:p>0</text:p>
          </table:table-cell>
          <table:table-cell office:value-type="float" office:value="0" table:formula="of:=IF([.F236]=1;[.O235]+1;0)" table:style-name="ce1">
            <text:p>0</text:p>
          </table:table-cell>
          <table:table-cell office:value-type="float" office:value="0" table:formula="of:=IF([.G236]=1;[.P235]+1;0)" table:style-name="ce1">
            <text:p>0</text:p>
          </table:table-cell>
          <table:table-cell office:value-type="float" office:value="0" table:formula="of:=IF([.H236]=1;[.Q235]+1;0)" table:style-name="ce1">
            <text:p>0</text:p>
          </table:table-cell>
          <table:table-cell office:value-type="float" office:value="0" table:formula="of:=IF([.I236]=1;[.R23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2T00:00:00" table:formula="of:=[.A236]+1" table:style-name="ce10">
            <text:p>Sat, 22 Aug 2026</text:p>
          </table:table-cell>
          <table:table-cell office:value-type="string" office:string-value="Sat" table:formula="of:=TEXT([.A237];&quot;ddd&quot;)" table:style-name="ce5">
            <text:p>Sat</text:p>
          </table:table-cell>
          <table:table-cell office:value-type="string" office:string-value="Aug" table:formula="of:=TEXT([.A237];&quot;mmm&quot;)" table:style-name="ce5">
            <text:p>Aug</text:p>
          </table:table-cell>
          <table:table-cell office:value-type="float" office:value="0" table:formula="of:=IF(INDEX([Tracker.$A$1:.$AG$120];6+9*(MONTH([.$A237])-1)+(COLUMN()-4);DAY([.$A237])+2)&lt;&gt;&quot;&quot;;1;0)" table:style-name="ce92"/>
          <table:table-cell office:value-type="float" office:value="0" table:formula="of:=IF(INDEX([Tracker.$A$1:.$AG$120];6+9*(MONTH([.$A237])-1)+(COLUMN()-4);DAY([.$A237])+2)&lt;&gt;&quot;&quot;;1;0)" table:style-name="ce92"/>
          <table:table-cell office:value-type="float" office:value="0" table:formula="of:=IF(INDEX([Tracker.$A$1:.$AG$120];6+9*(MONTH([.$A237])-1)+(COLUMN()-4);DAY([.$A237])+2)&lt;&gt;&quot;&quot;;1;0)" table:style-name="ce92"/>
          <table:table-cell office:value-type="float" office:value="0" table:formula="of:=IF(INDEX([Tracker.$A$1:.$AG$120];6+9*(MONTH([.$A237])-1)+(COLUMN()-4);DAY([.$A237])+2)&lt;&gt;&quot;&quot;;1;0)" table:style-name="ce92"/>
          <table:table-cell office:value-type="float" office:value="0" table:formula="of:=IF(INDEX([Tracker.$A$1:.$AG$120];6+9*(MONTH([.$A237])-1)+(COLUMN()-4);DAY([.$A237])+2)&lt;&gt;&quot;&quot;;1;0)" table:style-name="ce92"/>
          <table:table-cell office:value-type="float" office:value="0" table:formula="of:=IF(INDEX([Tracker.$A$1:.$AG$120];6+9*(MONTH([.$A237])-1)+(COLUMN()-4);DAY([.$A237])+2)&lt;&gt;&quot;&quot;;1;0)" table:style-name="ce92"/>
          <table:table-cell office:value-type="float" office:value="0" table:formula="of:=SUM([.D237:.I237])" table:style-name="ce6"/>
          <table:table-cell office:value-type="percentage" office:value="0" table:formula="of:=[.J237]/6" table:style-name="ce8">
            <text:p>0%</text:p>
          </table:table-cell>
          <table:table-cell table:style-name="ce1"/>
          <table:table-cell office:value-type="float" office:value="0" table:formula="of:=IF([.D237]=1;[.M236]+1;0)" table:style-name="ce1">
            <text:p>0</text:p>
          </table:table-cell>
          <table:table-cell office:value-type="float" office:value="0" table:formula="of:=IF([.E237]=1;[.N236]+1;0)" table:style-name="ce1">
            <text:p>0</text:p>
          </table:table-cell>
          <table:table-cell office:value-type="float" office:value="0" table:formula="of:=IF([.F237]=1;[.O236]+1;0)" table:style-name="ce1">
            <text:p>0</text:p>
          </table:table-cell>
          <table:table-cell office:value-type="float" office:value="0" table:formula="of:=IF([.G237]=1;[.P236]+1;0)" table:style-name="ce1">
            <text:p>0</text:p>
          </table:table-cell>
          <table:table-cell office:value-type="float" office:value="0" table:formula="of:=IF([.H237]=1;[.Q236]+1;0)" table:style-name="ce1">
            <text:p>0</text:p>
          </table:table-cell>
          <table:table-cell office:value-type="float" office:value="0" table:formula="of:=IF([.I237]=1;[.R23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3T00:00:00" table:formula="of:=[.A237]+1" table:style-name="ce10">
            <text:p>Sun, 23 Aug 2026</text:p>
          </table:table-cell>
          <table:table-cell office:value-type="string" office:string-value="Sun" table:formula="of:=TEXT([.A238];&quot;ddd&quot;)" table:style-name="ce5">
            <text:p>Sun</text:p>
          </table:table-cell>
          <table:table-cell office:value-type="string" office:string-value="Aug" table:formula="of:=TEXT([.A238];&quot;mmm&quot;)" table:style-name="ce5">
            <text:p>Aug</text:p>
          </table:table-cell>
          <table:table-cell office:value-type="float" office:value="0" table:formula="of:=IF(INDEX([Tracker.$A$1:.$AG$120];6+9*(MONTH([.$A238])-1)+(COLUMN()-4);DAY([.$A238])+2)&lt;&gt;&quot;&quot;;1;0)" table:style-name="ce92"/>
          <table:table-cell office:value-type="float" office:value="0" table:formula="of:=IF(INDEX([Tracker.$A$1:.$AG$120];6+9*(MONTH([.$A238])-1)+(COLUMN()-4);DAY([.$A238])+2)&lt;&gt;&quot;&quot;;1;0)" table:style-name="ce92"/>
          <table:table-cell office:value-type="float" office:value="0" table:formula="of:=IF(INDEX([Tracker.$A$1:.$AG$120];6+9*(MONTH([.$A238])-1)+(COLUMN()-4);DAY([.$A238])+2)&lt;&gt;&quot;&quot;;1;0)" table:style-name="ce92"/>
          <table:table-cell office:value-type="float" office:value="0" table:formula="of:=IF(INDEX([Tracker.$A$1:.$AG$120];6+9*(MONTH([.$A238])-1)+(COLUMN()-4);DAY([.$A238])+2)&lt;&gt;&quot;&quot;;1;0)" table:style-name="ce92"/>
          <table:table-cell office:value-type="float" office:value="0" table:formula="of:=IF(INDEX([Tracker.$A$1:.$AG$120];6+9*(MONTH([.$A238])-1)+(COLUMN()-4);DAY([.$A238])+2)&lt;&gt;&quot;&quot;;1;0)" table:style-name="ce92"/>
          <table:table-cell office:value-type="float" office:value="0" table:formula="of:=IF(INDEX([Tracker.$A$1:.$AG$120];6+9*(MONTH([.$A238])-1)+(COLUMN()-4);DAY([.$A238])+2)&lt;&gt;&quot;&quot;;1;0)" table:style-name="ce92"/>
          <table:table-cell office:value-type="float" office:value="0" table:formula="of:=SUM([.D238:.I238])" table:style-name="ce6"/>
          <table:table-cell office:value-type="percentage" office:value="0" table:formula="of:=[.J238]/6" table:style-name="ce8">
            <text:p>0%</text:p>
          </table:table-cell>
          <table:table-cell table:style-name="ce1"/>
          <table:table-cell office:value-type="float" office:value="0" table:formula="of:=IF([.D238]=1;[.M237]+1;0)" table:style-name="ce1">
            <text:p>0</text:p>
          </table:table-cell>
          <table:table-cell office:value-type="float" office:value="0" table:formula="of:=IF([.E238]=1;[.N237]+1;0)" table:style-name="ce1">
            <text:p>0</text:p>
          </table:table-cell>
          <table:table-cell office:value-type="float" office:value="0" table:formula="of:=IF([.F238]=1;[.O237]+1;0)" table:style-name="ce1">
            <text:p>0</text:p>
          </table:table-cell>
          <table:table-cell office:value-type="float" office:value="0" table:formula="of:=IF([.G238]=1;[.P237]+1;0)" table:style-name="ce1">
            <text:p>0</text:p>
          </table:table-cell>
          <table:table-cell office:value-type="float" office:value="0" table:formula="of:=IF([.H238]=1;[.Q237]+1;0)" table:style-name="ce1">
            <text:p>0</text:p>
          </table:table-cell>
          <table:table-cell office:value-type="float" office:value="0" table:formula="of:=IF([.I238]=1;[.R23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4T00:00:00" table:formula="of:=[.A238]+1" table:style-name="ce10">
            <text:p>Mon, 24 Aug 2026</text:p>
          </table:table-cell>
          <table:table-cell office:value-type="string" office:string-value="Mon" table:formula="of:=TEXT([.A239];&quot;ddd&quot;)" table:style-name="ce5">
            <text:p>Mon</text:p>
          </table:table-cell>
          <table:table-cell office:value-type="string" office:string-value="Aug" table:formula="of:=TEXT([.A239];&quot;mmm&quot;)" table:style-name="ce5">
            <text:p>Aug</text:p>
          </table:table-cell>
          <table:table-cell office:value-type="float" office:value="0" table:formula="of:=IF(INDEX([Tracker.$A$1:.$AG$120];6+9*(MONTH([.$A239])-1)+(COLUMN()-4);DAY([.$A239])+2)&lt;&gt;&quot;&quot;;1;0)" table:style-name="ce92"/>
          <table:table-cell office:value-type="float" office:value="0" table:formula="of:=IF(INDEX([Tracker.$A$1:.$AG$120];6+9*(MONTH([.$A239])-1)+(COLUMN()-4);DAY([.$A239])+2)&lt;&gt;&quot;&quot;;1;0)" table:style-name="ce92"/>
          <table:table-cell office:value-type="float" office:value="0" table:formula="of:=IF(INDEX([Tracker.$A$1:.$AG$120];6+9*(MONTH([.$A239])-1)+(COLUMN()-4);DAY([.$A239])+2)&lt;&gt;&quot;&quot;;1;0)" table:style-name="ce92"/>
          <table:table-cell office:value-type="float" office:value="0" table:formula="of:=IF(INDEX([Tracker.$A$1:.$AG$120];6+9*(MONTH([.$A239])-1)+(COLUMN()-4);DAY([.$A239])+2)&lt;&gt;&quot;&quot;;1;0)" table:style-name="ce92"/>
          <table:table-cell office:value-type="float" office:value="0" table:formula="of:=IF(INDEX([Tracker.$A$1:.$AG$120];6+9*(MONTH([.$A239])-1)+(COLUMN()-4);DAY([.$A239])+2)&lt;&gt;&quot;&quot;;1;0)" table:style-name="ce92"/>
          <table:table-cell office:value-type="float" office:value="0" table:formula="of:=IF(INDEX([Tracker.$A$1:.$AG$120];6+9*(MONTH([.$A239])-1)+(COLUMN()-4);DAY([.$A239])+2)&lt;&gt;&quot;&quot;;1;0)" table:style-name="ce92"/>
          <table:table-cell office:value-type="float" office:value="0" table:formula="of:=SUM([.D239:.I239])" table:style-name="ce6"/>
          <table:table-cell office:value-type="percentage" office:value="0" table:formula="of:=[.J239]/6" table:style-name="ce8">
            <text:p>0%</text:p>
          </table:table-cell>
          <table:table-cell table:style-name="ce1"/>
          <table:table-cell office:value-type="float" office:value="0" table:formula="of:=IF([.D239]=1;[.M238]+1;0)" table:style-name="ce1">
            <text:p>0</text:p>
          </table:table-cell>
          <table:table-cell office:value-type="float" office:value="0" table:formula="of:=IF([.E239]=1;[.N238]+1;0)" table:style-name="ce1">
            <text:p>0</text:p>
          </table:table-cell>
          <table:table-cell office:value-type="float" office:value="0" table:formula="of:=IF([.F239]=1;[.O238]+1;0)" table:style-name="ce1">
            <text:p>0</text:p>
          </table:table-cell>
          <table:table-cell office:value-type="float" office:value="0" table:formula="of:=IF([.G239]=1;[.P238]+1;0)" table:style-name="ce1">
            <text:p>0</text:p>
          </table:table-cell>
          <table:table-cell office:value-type="float" office:value="0" table:formula="of:=IF([.H239]=1;[.Q238]+1;0)" table:style-name="ce1">
            <text:p>0</text:p>
          </table:table-cell>
          <table:table-cell office:value-type="float" office:value="0" table:formula="of:=IF([.I239]=1;[.R23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5T00:00:00" table:formula="of:=[.A239]+1" table:style-name="ce10">
            <text:p>Tue, 25 Aug 2026</text:p>
          </table:table-cell>
          <table:table-cell office:value-type="string" office:string-value="Tue" table:formula="of:=TEXT([.A240];&quot;ddd&quot;)" table:style-name="ce5">
            <text:p>Tue</text:p>
          </table:table-cell>
          <table:table-cell office:value-type="string" office:string-value="Aug" table:formula="of:=TEXT([.A240];&quot;mmm&quot;)" table:style-name="ce5">
            <text:p>Aug</text:p>
          </table:table-cell>
          <table:table-cell office:value-type="float" office:value="0" table:formula="of:=IF(INDEX([Tracker.$A$1:.$AG$120];6+9*(MONTH([.$A240])-1)+(COLUMN()-4);DAY([.$A240])+2)&lt;&gt;&quot;&quot;;1;0)" table:style-name="ce92"/>
          <table:table-cell office:value-type="float" office:value="0" table:formula="of:=IF(INDEX([Tracker.$A$1:.$AG$120];6+9*(MONTH([.$A240])-1)+(COLUMN()-4);DAY([.$A240])+2)&lt;&gt;&quot;&quot;;1;0)" table:style-name="ce92"/>
          <table:table-cell office:value-type="float" office:value="0" table:formula="of:=IF(INDEX([Tracker.$A$1:.$AG$120];6+9*(MONTH([.$A240])-1)+(COLUMN()-4);DAY([.$A240])+2)&lt;&gt;&quot;&quot;;1;0)" table:style-name="ce92"/>
          <table:table-cell office:value-type="float" office:value="0" table:formula="of:=IF(INDEX([Tracker.$A$1:.$AG$120];6+9*(MONTH([.$A240])-1)+(COLUMN()-4);DAY([.$A240])+2)&lt;&gt;&quot;&quot;;1;0)" table:style-name="ce92"/>
          <table:table-cell office:value-type="float" office:value="0" table:formula="of:=IF(INDEX([Tracker.$A$1:.$AG$120];6+9*(MONTH([.$A240])-1)+(COLUMN()-4);DAY([.$A240])+2)&lt;&gt;&quot;&quot;;1;0)" table:style-name="ce92"/>
          <table:table-cell office:value-type="float" office:value="0" table:formula="of:=IF(INDEX([Tracker.$A$1:.$AG$120];6+9*(MONTH([.$A240])-1)+(COLUMN()-4);DAY([.$A240])+2)&lt;&gt;&quot;&quot;;1;0)" table:style-name="ce92"/>
          <table:table-cell office:value-type="float" office:value="0" table:formula="of:=SUM([.D240:.I240])" table:style-name="ce6"/>
          <table:table-cell office:value-type="percentage" office:value="0" table:formula="of:=[.J240]/6" table:style-name="ce8">
            <text:p>0%</text:p>
          </table:table-cell>
          <table:table-cell table:style-name="ce1"/>
          <table:table-cell office:value-type="float" office:value="0" table:formula="of:=IF([.D240]=1;[.M239]+1;0)" table:style-name="ce1">
            <text:p>0</text:p>
          </table:table-cell>
          <table:table-cell office:value-type="float" office:value="0" table:formula="of:=IF([.E240]=1;[.N239]+1;0)" table:style-name="ce1">
            <text:p>0</text:p>
          </table:table-cell>
          <table:table-cell office:value-type="float" office:value="0" table:formula="of:=IF([.F240]=1;[.O239]+1;0)" table:style-name="ce1">
            <text:p>0</text:p>
          </table:table-cell>
          <table:table-cell office:value-type="float" office:value="0" table:formula="of:=IF([.G240]=1;[.P239]+1;0)" table:style-name="ce1">
            <text:p>0</text:p>
          </table:table-cell>
          <table:table-cell office:value-type="float" office:value="0" table:formula="of:=IF([.H240]=1;[.Q239]+1;0)" table:style-name="ce1">
            <text:p>0</text:p>
          </table:table-cell>
          <table:table-cell office:value-type="float" office:value="0" table:formula="of:=IF([.I240]=1;[.R23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6T00:00:00" table:formula="of:=[.A240]+1" table:style-name="ce10">
            <text:p>Wed, 26 Aug 2026</text:p>
          </table:table-cell>
          <table:table-cell office:value-type="string" office:string-value="Wed" table:formula="of:=TEXT([.A241];&quot;ddd&quot;)" table:style-name="ce5">
            <text:p>Wed</text:p>
          </table:table-cell>
          <table:table-cell office:value-type="string" office:string-value="Aug" table:formula="of:=TEXT([.A241];&quot;mmm&quot;)" table:style-name="ce5">
            <text:p>Aug</text:p>
          </table:table-cell>
          <table:table-cell office:value-type="float" office:value="0" table:formula="of:=IF(INDEX([Tracker.$A$1:.$AG$120];6+9*(MONTH([.$A241])-1)+(COLUMN()-4);DAY([.$A241])+2)&lt;&gt;&quot;&quot;;1;0)" table:style-name="ce92"/>
          <table:table-cell office:value-type="float" office:value="0" table:formula="of:=IF(INDEX([Tracker.$A$1:.$AG$120];6+9*(MONTH([.$A241])-1)+(COLUMN()-4);DAY([.$A241])+2)&lt;&gt;&quot;&quot;;1;0)" table:style-name="ce92"/>
          <table:table-cell office:value-type="float" office:value="0" table:formula="of:=IF(INDEX([Tracker.$A$1:.$AG$120];6+9*(MONTH([.$A241])-1)+(COLUMN()-4);DAY([.$A241])+2)&lt;&gt;&quot;&quot;;1;0)" table:style-name="ce92"/>
          <table:table-cell office:value-type="float" office:value="0" table:formula="of:=IF(INDEX([Tracker.$A$1:.$AG$120];6+9*(MONTH([.$A241])-1)+(COLUMN()-4);DAY([.$A241])+2)&lt;&gt;&quot;&quot;;1;0)" table:style-name="ce92"/>
          <table:table-cell office:value-type="float" office:value="0" table:formula="of:=IF(INDEX([Tracker.$A$1:.$AG$120];6+9*(MONTH([.$A241])-1)+(COLUMN()-4);DAY([.$A241])+2)&lt;&gt;&quot;&quot;;1;0)" table:style-name="ce92"/>
          <table:table-cell office:value-type="float" office:value="0" table:formula="of:=IF(INDEX([Tracker.$A$1:.$AG$120];6+9*(MONTH([.$A241])-1)+(COLUMN()-4);DAY([.$A241])+2)&lt;&gt;&quot;&quot;;1;0)" table:style-name="ce92"/>
          <table:table-cell office:value-type="float" office:value="0" table:formula="of:=SUM([.D241:.I241])" table:style-name="ce6"/>
          <table:table-cell office:value-type="percentage" office:value="0" table:formula="of:=[.J241]/6" table:style-name="ce8">
            <text:p>0%</text:p>
          </table:table-cell>
          <table:table-cell table:style-name="ce1"/>
          <table:table-cell office:value-type="float" office:value="0" table:formula="of:=IF([.D241]=1;[.M240]+1;0)" table:style-name="ce1">
            <text:p>0</text:p>
          </table:table-cell>
          <table:table-cell office:value-type="float" office:value="0" table:formula="of:=IF([.E241]=1;[.N240]+1;0)" table:style-name="ce1">
            <text:p>0</text:p>
          </table:table-cell>
          <table:table-cell office:value-type="float" office:value="0" table:formula="of:=IF([.F241]=1;[.O240]+1;0)" table:style-name="ce1">
            <text:p>0</text:p>
          </table:table-cell>
          <table:table-cell office:value-type="float" office:value="0" table:formula="of:=IF([.G241]=1;[.P240]+1;0)" table:style-name="ce1">
            <text:p>0</text:p>
          </table:table-cell>
          <table:table-cell office:value-type="float" office:value="0" table:formula="of:=IF([.H241]=1;[.Q240]+1;0)" table:style-name="ce1">
            <text:p>0</text:p>
          </table:table-cell>
          <table:table-cell office:value-type="float" office:value="0" table:formula="of:=IF([.I241]=1;[.R24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7T00:00:00" table:formula="of:=[.A241]+1" table:style-name="ce10">
            <text:p>Thu, 27 Aug 2026</text:p>
          </table:table-cell>
          <table:table-cell office:value-type="string" office:string-value="Thu" table:formula="of:=TEXT([.A242];&quot;ddd&quot;)" table:style-name="ce5">
            <text:p>Thu</text:p>
          </table:table-cell>
          <table:table-cell office:value-type="string" office:string-value="Aug" table:formula="of:=TEXT([.A242];&quot;mmm&quot;)" table:style-name="ce5">
            <text:p>Aug</text:p>
          </table:table-cell>
          <table:table-cell office:value-type="float" office:value="0" table:formula="of:=IF(INDEX([Tracker.$A$1:.$AG$120];6+9*(MONTH([.$A242])-1)+(COLUMN()-4);DAY([.$A242])+2)&lt;&gt;&quot;&quot;;1;0)" table:style-name="ce92"/>
          <table:table-cell office:value-type="float" office:value="0" table:formula="of:=IF(INDEX([Tracker.$A$1:.$AG$120];6+9*(MONTH([.$A242])-1)+(COLUMN()-4);DAY([.$A242])+2)&lt;&gt;&quot;&quot;;1;0)" table:style-name="ce92"/>
          <table:table-cell office:value-type="float" office:value="0" table:formula="of:=IF(INDEX([Tracker.$A$1:.$AG$120];6+9*(MONTH([.$A242])-1)+(COLUMN()-4);DAY([.$A242])+2)&lt;&gt;&quot;&quot;;1;0)" table:style-name="ce92"/>
          <table:table-cell office:value-type="float" office:value="0" table:formula="of:=IF(INDEX([Tracker.$A$1:.$AG$120];6+9*(MONTH([.$A242])-1)+(COLUMN()-4);DAY([.$A242])+2)&lt;&gt;&quot;&quot;;1;0)" table:style-name="ce92"/>
          <table:table-cell office:value-type="float" office:value="0" table:formula="of:=IF(INDEX([Tracker.$A$1:.$AG$120];6+9*(MONTH([.$A242])-1)+(COLUMN()-4);DAY([.$A242])+2)&lt;&gt;&quot;&quot;;1;0)" table:style-name="ce92"/>
          <table:table-cell office:value-type="float" office:value="0" table:formula="of:=IF(INDEX([Tracker.$A$1:.$AG$120];6+9*(MONTH([.$A242])-1)+(COLUMN()-4);DAY([.$A242])+2)&lt;&gt;&quot;&quot;;1;0)" table:style-name="ce92"/>
          <table:table-cell office:value-type="float" office:value="0" table:formula="of:=SUM([.D242:.I242])" table:style-name="ce6"/>
          <table:table-cell office:value-type="percentage" office:value="0" table:formula="of:=[.J242]/6" table:style-name="ce8">
            <text:p>0%</text:p>
          </table:table-cell>
          <table:table-cell table:style-name="ce1"/>
          <table:table-cell office:value-type="float" office:value="0" table:formula="of:=IF([.D242]=1;[.M241]+1;0)" table:style-name="ce1">
            <text:p>0</text:p>
          </table:table-cell>
          <table:table-cell office:value-type="float" office:value="0" table:formula="of:=IF([.E242]=1;[.N241]+1;0)" table:style-name="ce1">
            <text:p>0</text:p>
          </table:table-cell>
          <table:table-cell office:value-type="float" office:value="0" table:formula="of:=IF([.F242]=1;[.O241]+1;0)" table:style-name="ce1">
            <text:p>0</text:p>
          </table:table-cell>
          <table:table-cell office:value-type="float" office:value="0" table:formula="of:=IF([.G242]=1;[.P241]+1;0)" table:style-name="ce1">
            <text:p>0</text:p>
          </table:table-cell>
          <table:table-cell office:value-type="float" office:value="0" table:formula="of:=IF([.H242]=1;[.Q241]+1;0)" table:style-name="ce1">
            <text:p>0</text:p>
          </table:table-cell>
          <table:table-cell office:value-type="float" office:value="0" table:formula="of:=IF([.I242]=1;[.R24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8T00:00:00" table:formula="of:=[.A242]+1" table:style-name="ce10">
            <text:p>Fri, 28 Aug 2026</text:p>
          </table:table-cell>
          <table:table-cell office:value-type="string" office:string-value="Fri" table:formula="of:=TEXT([.A243];&quot;ddd&quot;)" table:style-name="ce5">
            <text:p>Fri</text:p>
          </table:table-cell>
          <table:table-cell office:value-type="string" office:string-value="Aug" table:formula="of:=TEXT([.A243];&quot;mmm&quot;)" table:style-name="ce5">
            <text:p>Aug</text:p>
          </table:table-cell>
          <table:table-cell office:value-type="float" office:value="0" table:formula="of:=IF(INDEX([Tracker.$A$1:.$AG$120];6+9*(MONTH([.$A243])-1)+(COLUMN()-4);DAY([.$A243])+2)&lt;&gt;&quot;&quot;;1;0)" table:style-name="ce92"/>
          <table:table-cell office:value-type="float" office:value="0" table:formula="of:=IF(INDEX([Tracker.$A$1:.$AG$120];6+9*(MONTH([.$A243])-1)+(COLUMN()-4);DAY([.$A243])+2)&lt;&gt;&quot;&quot;;1;0)" table:style-name="ce92"/>
          <table:table-cell office:value-type="float" office:value="0" table:formula="of:=IF(INDEX([Tracker.$A$1:.$AG$120];6+9*(MONTH([.$A243])-1)+(COLUMN()-4);DAY([.$A243])+2)&lt;&gt;&quot;&quot;;1;0)" table:style-name="ce92"/>
          <table:table-cell office:value-type="float" office:value="0" table:formula="of:=IF(INDEX([Tracker.$A$1:.$AG$120];6+9*(MONTH([.$A243])-1)+(COLUMN()-4);DAY([.$A243])+2)&lt;&gt;&quot;&quot;;1;0)" table:style-name="ce92"/>
          <table:table-cell office:value-type="float" office:value="0" table:formula="of:=IF(INDEX([Tracker.$A$1:.$AG$120];6+9*(MONTH([.$A243])-1)+(COLUMN()-4);DAY([.$A243])+2)&lt;&gt;&quot;&quot;;1;0)" table:style-name="ce92"/>
          <table:table-cell office:value-type="float" office:value="0" table:formula="of:=IF(INDEX([Tracker.$A$1:.$AG$120];6+9*(MONTH([.$A243])-1)+(COLUMN()-4);DAY([.$A243])+2)&lt;&gt;&quot;&quot;;1;0)" table:style-name="ce92"/>
          <table:table-cell office:value-type="float" office:value="0" table:formula="of:=SUM([.D243:.I243])" table:style-name="ce6"/>
          <table:table-cell office:value-type="percentage" office:value="0" table:formula="of:=[.J243]/6" table:style-name="ce8">
            <text:p>0%</text:p>
          </table:table-cell>
          <table:table-cell table:style-name="ce1"/>
          <table:table-cell office:value-type="float" office:value="0" table:formula="of:=IF([.D243]=1;[.M242]+1;0)" table:style-name="ce1">
            <text:p>0</text:p>
          </table:table-cell>
          <table:table-cell office:value-type="float" office:value="0" table:formula="of:=IF([.E243]=1;[.N242]+1;0)" table:style-name="ce1">
            <text:p>0</text:p>
          </table:table-cell>
          <table:table-cell office:value-type="float" office:value="0" table:formula="of:=IF([.F243]=1;[.O242]+1;0)" table:style-name="ce1">
            <text:p>0</text:p>
          </table:table-cell>
          <table:table-cell office:value-type="float" office:value="0" table:formula="of:=IF([.G243]=1;[.P242]+1;0)" table:style-name="ce1">
            <text:p>0</text:p>
          </table:table-cell>
          <table:table-cell office:value-type="float" office:value="0" table:formula="of:=IF([.H243]=1;[.Q242]+1;0)" table:style-name="ce1">
            <text:p>0</text:p>
          </table:table-cell>
          <table:table-cell office:value-type="float" office:value="0" table:formula="of:=IF([.I243]=1;[.R24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29T00:00:00" table:formula="of:=[.A243]+1" table:style-name="ce10">
            <text:p>Sat, 29 Aug 2026</text:p>
          </table:table-cell>
          <table:table-cell office:value-type="string" office:string-value="Sat" table:formula="of:=TEXT([.A244];&quot;ddd&quot;)" table:style-name="ce5">
            <text:p>Sat</text:p>
          </table:table-cell>
          <table:table-cell office:value-type="string" office:string-value="Aug" table:formula="of:=TEXT([.A244];&quot;mmm&quot;)" table:style-name="ce5">
            <text:p>Aug</text:p>
          </table:table-cell>
          <table:table-cell office:value-type="float" office:value="0" table:formula="of:=IF(INDEX([Tracker.$A$1:.$AG$120];6+9*(MONTH([.$A244])-1)+(COLUMN()-4);DAY([.$A244])+2)&lt;&gt;&quot;&quot;;1;0)" table:style-name="ce92"/>
          <table:table-cell office:value-type="float" office:value="0" table:formula="of:=IF(INDEX([Tracker.$A$1:.$AG$120];6+9*(MONTH([.$A244])-1)+(COLUMN()-4);DAY([.$A244])+2)&lt;&gt;&quot;&quot;;1;0)" table:style-name="ce92"/>
          <table:table-cell office:value-type="float" office:value="0" table:formula="of:=IF(INDEX([Tracker.$A$1:.$AG$120];6+9*(MONTH([.$A244])-1)+(COLUMN()-4);DAY([.$A244])+2)&lt;&gt;&quot;&quot;;1;0)" table:style-name="ce92"/>
          <table:table-cell office:value-type="float" office:value="0" table:formula="of:=IF(INDEX([Tracker.$A$1:.$AG$120];6+9*(MONTH([.$A244])-1)+(COLUMN()-4);DAY([.$A244])+2)&lt;&gt;&quot;&quot;;1;0)" table:style-name="ce92"/>
          <table:table-cell office:value-type="float" office:value="0" table:formula="of:=IF(INDEX([Tracker.$A$1:.$AG$120];6+9*(MONTH([.$A244])-1)+(COLUMN()-4);DAY([.$A244])+2)&lt;&gt;&quot;&quot;;1;0)" table:style-name="ce92"/>
          <table:table-cell office:value-type="float" office:value="0" table:formula="of:=IF(INDEX([Tracker.$A$1:.$AG$120];6+9*(MONTH([.$A244])-1)+(COLUMN()-4);DAY([.$A244])+2)&lt;&gt;&quot;&quot;;1;0)" table:style-name="ce92"/>
          <table:table-cell office:value-type="float" office:value="0" table:formula="of:=SUM([.D244:.I244])" table:style-name="ce6"/>
          <table:table-cell office:value-type="percentage" office:value="0" table:formula="of:=[.J244]/6" table:style-name="ce8">
            <text:p>0%</text:p>
          </table:table-cell>
          <table:table-cell table:style-name="ce1"/>
          <table:table-cell office:value-type="float" office:value="0" table:formula="of:=IF([.D244]=1;[.M243]+1;0)" table:style-name="ce1">
            <text:p>0</text:p>
          </table:table-cell>
          <table:table-cell office:value-type="float" office:value="0" table:formula="of:=IF([.E244]=1;[.N243]+1;0)" table:style-name="ce1">
            <text:p>0</text:p>
          </table:table-cell>
          <table:table-cell office:value-type="float" office:value="0" table:formula="of:=IF([.F244]=1;[.O243]+1;0)" table:style-name="ce1">
            <text:p>0</text:p>
          </table:table-cell>
          <table:table-cell office:value-type="float" office:value="0" table:formula="of:=IF([.G244]=1;[.P243]+1;0)" table:style-name="ce1">
            <text:p>0</text:p>
          </table:table-cell>
          <table:table-cell office:value-type="float" office:value="0" table:formula="of:=IF([.H244]=1;[.Q243]+1;0)" table:style-name="ce1">
            <text:p>0</text:p>
          </table:table-cell>
          <table:table-cell office:value-type="float" office:value="0" table:formula="of:=IF([.I244]=1;[.R24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30T00:00:00" table:formula="of:=[.A244]+1" table:style-name="ce10">
            <text:p>Sun, 30 Aug 2026</text:p>
          </table:table-cell>
          <table:table-cell office:value-type="string" office:string-value="Sun" table:formula="of:=TEXT([.A245];&quot;ddd&quot;)" table:style-name="ce5">
            <text:p>Sun</text:p>
          </table:table-cell>
          <table:table-cell office:value-type="string" office:string-value="Aug" table:formula="of:=TEXT([.A245];&quot;mmm&quot;)" table:style-name="ce5">
            <text:p>Aug</text:p>
          </table:table-cell>
          <table:table-cell office:value-type="float" office:value="0" table:formula="of:=IF(INDEX([Tracker.$A$1:.$AG$120];6+9*(MONTH([.$A245])-1)+(COLUMN()-4);DAY([.$A245])+2)&lt;&gt;&quot;&quot;;1;0)" table:style-name="ce92"/>
          <table:table-cell office:value-type="float" office:value="0" table:formula="of:=IF(INDEX([Tracker.$A$1:.$AG$120];6+9*(MONTH([.$A245])-1)+(COLUMN()-4);DAY([.$A245])+2)&lt;&gt;&quot;&quot;;1;0)" table:style-name="ce92"/>
          <table:table-cell office:value-type="float" office:value="0" table:formula="of:=IF(INDEX([Tracker.$A$1:.$AG$120];6+9*(MONTH([.$A245])-1)+(COLUMN()-4);DAY([.$A245])+2)&lt;&gt;&quot;&quot;;1;0)" table:style-name="ce92"/>
          <table:table-cell office:value-type="float" office:value="0" table:formula="of:=IF(INDEX([Tracker.$A$1:.$AG$120];6+9*(MONTH([.$A245])-1)+(COLUMN()-4);DAY([.$A245])+2)&lt;&gt;&quot;&quot;;1;0)" table:style-name="ce92"/>
          <table:table-cell office:value-type="float" office:value="0" table:formula="of:=IF(INDEX([Tracker.$A$1:.$AG$120];6+9*(MONTH([.$A245])-1)+(COLUMN()-4);DAY([.$A245])+2)&lt;&gt;&quot;&quot;;1;0)" table:style-name="ce92"/>
          <table:table-cell office:value-type="float" office:value="0" table:formula="of:=IF(INDEX([Tracker.$A$1:.$AG$120];6+9*(MONTH([.$A245])-1)+(COLUMN()-4);DAY([.$A245])+2)&lt;&gt;&quot;&quot;;1;0)" table:style-name="ce92"/>
          <table:table-cell office:value-type="float" office:value="0" table:formula="of:=SUM([.D245:.I245])" table:style-name="ce6"/>
          <table:table-cell office:value-type="percentage" office:value="0" table:formula="of:=[.J245]/6" table:style-name="ce8">
            <text:p>0%</text:p>
          </table:table-cell>
          <table:table-cell table:style-name="ce1"/>
          <table:table-cell office:value-type="float" office:value="0" table:formula="of:=IF([.D245]=1;[.M244]+1;0)" table:style-name="ce1">
            <text:p>0</text:p>
          </table:table-cell>
          <table:table-cell office:value-type="float" office:value="0" table:formula="of:=IF([.E245]=1;[.N244]+1;0)" table:style-name="ce1">
            <text:p>0</text:p>
          </table:table-cell>
          <table:table-cell office:value-type="float" office:value="0" table:formula="of:=IF([.F245]=1;[.O244]+1;0)" table:style-name="ce1">
            <text:p>0</text:p>
          </table:table-cell>
          <table:table-cell office:value-type="float" office:value="0" table:formula="of:=IF([.G245]=1;[.P244]+1;0)" table:style-name="ce1">
            <text:p>0</text:p>
          </table:table-cell>
          <table:table-cell office:value-type="float" office:value="0" table:formula="of:=IF([.H245]=1;[.Q244]+1;0)" table:style-name="ce1">
            <text:p>0</text:p>
          </table:table-cell>
          <table:table-cell office:value-type="float" office:value="0" table:formula="of:=IF([.I245]=1;[.R24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8-31T00:00:00" table:formula="of:=[.A245]+1" table:style-name="ce10">
            <text:p>Mon, 31 Aug 2026</text:p>
          </table:table-cell>
          <table:table-cell office:value-type="string" office:string-value="Mon" table:formula="of:=TEXT([.A246];&quot;ddd&quot;)" table:style-name="ce5">
            <text:p>Mon</text:p>
          </table:table-cell>
          <table:table-cell office:value-type="string" office:string-value="Aug" table:formula="of:=TEXT([.A246];&quot;mmm&quot;)" table:style-name="ce5">
            <text:p>Aug</text:p>
          </table:table-cell>
          <table:table-cell office:value-type="float" office:value="0" table:formula="of:=IF(INDEX([Tracker.$A$1:.$AG$120];6+9*(MONTH([.$A246])-1)+(COLUMN()-4);DAY([.$A246])+2)&lt;&gt;&quot;&quot;;1;0)" table:style-name="ce92"/>
          <table:table-cell office:value-type="float" office:value="0" table:formula="of:=IF(INDEX([Tracker.$A$1:.$AG$120];6+9*(MONTH([.$A246])-1)+(COLUMN()-4);DAY([.$A246])+2)&lt;&gt;&quot;&quot;;1;0)" table:style-name="ce92"/>
          <table:table-cell office:value-type="float" office:value="0" table:formula="of:=IF(INDEX([Tracker.$A$1:.$AG$120];6+9*(MONTH([.$A246])-1)+(COLUMN()-4);DAY([.$A246])+2)&lt;&gt;&quot;&quot;;1;0)" table:style-name="ce92"/>
          <table:table-cell office:value-type="float" office:value="0" table:formula="of:=IF(INDEX([Tracker.$A$1:.$AG$120];6+9*(MONTH([.$A246])-1)+(COLUMN()-4);DAY([.$A246])+2)&lt;&gt;&quot;&quot;;1;0)" table:style-name="ce92"/>
          <table:table-cell office:value-type="float" office:value="0" table:formula="of:=IF(INDEX([Tracker.$A$1:.$AG$120];6+9*(MONTH([.$A246])-1)+(COLUMN()-4);DAY([.$A246])+2)&lt;&gt;&quot;&quot;;1;0)" table:style-name="ce92"/>
          <table:table-cell office:value-type="float" office:value="0" table:formula="of:=IF(INDEX([Tracker.$A$1:.$AG$120];6+9*(MONTH([.$A246])-1)+(COLUMN()-4);DAY([.$A246])+2)&lt;&gt;&quot;&quot;;1;0)" table:style-name="ce92"/>
          <table:table-cell office:value-type="float" office:value="0" table:formula="of:=SUM([.D246:.I246])" table:style-name="ce6"/>
          <table:table-cell office:value-type="percentage" office:value="0" table:formula="of:=[.J246]/6" table:style-name="ce8">
            <text:p>0%</text:p>
          </table:table-cell>
          <table:table-cell table:style-name="ce1"/>
          <table:table-cell office:value-type="float" office:value="0" table:formula="of:=IF([.D246]=1;[.M245]+1;0)" table:style-name="ce1">
            <text:p>0</text:p>
          </table:table-cell>
          <table:table-cell office:value-type="float" office:value="0" table:formula="of:=IF([.E246]=1;[.N245]+1;0)" table:style-name="ce1">
            <text:p>0</text:p>
          </table:table-cell>
          <table:table-cell office:value-type="float" office:value="0" table:formula="of:=IF([.F246]=1;[.O245]+1;0)" table:style-name="ce1">
            <text:p>0</text:p>
          </table:table-cell>
          <table:table-cell office:value-type="float" office:value="0" table:formula="of:=IF([.G246]=1;[.P245]+1;0)" table:style-name="ce1">
            <text:p>0</text:p>
          </table:table-cell>
          <table:table-cell office:value-type="float" office:value="0" table:formula="of:=IF([.H246]=1;[.Q245]+1;0)" table:style-name="ce1">
            <text:p>0</text:p>
          </table:table-cell>
          <table:table-cell office:value-type="float" office:value="0" table:formula="of:=IF([.I246]=1;[.R24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1T00:00:00" table:formula="of:=[.A246]+1" table:style-name="ce10">
            <text:p>Tue, 01 Sep 2026</text:p>
          </table:table-cell>
          <table:table-cell office:value-type="string" office:string-value="Tue" table:formula="of:=TEXT([.A247];&quot;ddd&quot;)" table:style-name="ce5">
            <text:p>Tue</text:p>
          </table:table-cell>
          <table:table-cell office:value-type="string" office:string-value="Sep" table:formula="of:=TEXT([.A247];&quot;mmm&quot;)" table:style-name="ce5">
            <text:p>Sep</text:p>
          </table:table-cell>
          <table:table-cell office:value-type="float" office:value="0" table:formula="of:=IF(INDEX([Tracker.$A$1:.$AG$120];6+9*(MONTH([.$A247])-1)+(COLUMN()-4);DAY([.$A247])+2)&lt;&gt;&quot;&quot;;1;0)" table:style-name="ce92"/>
          <table:table-cell office:value-type="float" office:value="0" table:formula="of:=IF(INDEX([Tracker.$A$1:.$AG$120];6+9*(MONTH([.$A247])-1)+(COLUMN()-4);DAY([.$A247])+2)&lt;&gt;&quot;&quot;;1;0)" table:style-name="ce92"/>
          <table:table-cell office:value-type="float" office:value="0" table:formula="of:=IF(INDEX([Tracker.$A$1:.$AG$120];6+9*(MONTH([.$A247])-1)+(COLUMN()-4);DAY([.$A247])+2)&lt;&gt;&quot;&quot;;1;0)" table:style-name="ce92"/>
          <table:table-cell office:value-type="float" office:value="0" table:formula="of:=IF(INDEX([Tracker.$A$1:.$AG$120];6+9*(MONTH([.$A247])-1)+(COLUMN()-4);DAY([.$A247])+2)&lt;&gt;&quot;&quot;;1;0)" table:style-name="ce92"/>
          <table:table-cell office:value-type="float" office:value="0" table:formula="of:=IF(INDEX([Tracker.$A$1:.$AG$120];6+9*(MONTH([.$A247])-1)+(COLUMN()-4);DAY([.$A247])+2)&lt;&gt;&quot;&quot;;1;0)" table:style-name="ce92"/>
          <table:table-cell office:value-type="float" office:value="0" table:formula="of:=IF(INDEX([Tracker.$A$1:.$AG$120];6+9*(MONTH([.$A247])-1)+(COLUMN()-4);DAY([.$A247])+2)&lt;&gt;&quot;&quot;;1;0)" table:style-name="ce92"/>
          <table:table-cell office:value-type="float" office:value="0" table:formula="of:=SUM([.D247:.I247])" table:style-name="ce6"/>
          <table:table-cell office:value-type="percentage" office:value="0" table:formula="of:=[.J247]/6" table:style-name="ce8">
            <text:p>0%</text:p>
          </table:table-cell>
          <table:table-cell table:style-name="ce1"/>
          <table:table-cell office:value-type="float" office:value="0" table:formula="of:=IF([.D247]=1;[.M246]+1;0)" table:style-name="ce1">
            <text:p>0</text:p>
          </table:table-cell>
          <table:table-cell office:value-type="float" office:value="0" table:formula="of:=IF([.E247]=1;[.N246]+1;0)" table:style-name="ce1">
            <text:p>0</text:p>
          </table:table-cell>
          <table:table-cell office:value-type="float" office:value="0" table:formula="of:=IF([.F247]=1;[.O246]+1;0)" table:style-name="ce1">
            <text:p>0</text:p>
          </table:table-cell>
          <table:table-cell office:value-type="float" office:value="0" table:formula="of:=IF([.G247]=1;[.P246]+1;0)" table:style-name="ce1">
            <text:p>0</text:p>
          </table:table-cell>
          <table:table-cell office:value-type="float" office:value="0" table:formula="of:=IF([.H247]=1;[.Q246]+1;0)" table:style-name="ce1">
            <text:p>0</text:p>
          </table:table-cell>
          <table:table-cell office:value-type="float" office:value="0" table:formula="of:=IF([.I247]=1;[.R24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2T00:00:00" table:formula="of:=[.A247]+1" table:style-name="ce10">
            <text:p>Wed, 02 Sep 2026</text:p>
          </table:table-cell>
          <table:table-cell office:value-type="string" office:string-value="Wed" table:formula="of:=TEXT([.A248];&quot;ddd&quot;)" table:style-name="ce5">
            <text:p>Wed</text:p>
          </table:table-cell>
          <table:table-cell office:value-type="string" office:string-value="Sep" table:formula="of:=TEXT([.A248];&quot;mmm&quot;)" table:style-name="ce5">
            <text:p>Sep</text:p>
          </table:table-cell>
          <table:table-cell office:value-type="float" office:value="0" table:formula="of:=IF(INDEX([Tracker.$A$1:.$AG$120];6+9*(MONTH([.$A248])-1)+(COLUMN()-4);DAY([.$A248])+2)&lt;&gt;&quot;&quot;;1;0)" table:style-name="ce92"/>
          <table:table-cell office:value-type="float" office:value="0" table:formula="of:=IF(INDEX([Tracker.$A$1:.$AG$120];6+9*(MONTH([.$A248])-1)+(COLUMN()-4);DAY([.$A248])+2)&lt;&gt;&quot;&quot;;1;0)" table:style-name="ce92"/>
          <table:table-cell office:value-type="float" office:value="0" table:formula="of:=IF(INDEX([Tracker.$A$1:.$AG$120];6+9*(MONTH([.$A248])-1)+(COLUMN()-4);DAY([.$A248])+2)&lt;&gt;&quot;&quot;;1;0)" table:style-name="ce92"/>
          <table:table-cell office:value-type="float" office:value="0" table:formula="of:=IF(INDEX([Tracker.$A$1:.$AG$120];6+9*(MONTH([.$A248])-1)+(COLUMN()-4);DAY([.$A248])+2)&lt;&gt;&quot;&quot;;1;0)" table:style-name="ce92"/>
          <table:table-cell office:value-type="float" office:value="0" table:formula="of:=IF(INDEX([Tracker.$A$1:.$AG$120];6+9*(MONTH([.$A248])-1)+(COLUMN()-4);DAY([.$A248])+2)&lt;&gt;&quot;&quot;;1;0)" table:style-name="ce92"/>
          <table:table-cell office:value-type="float" office:value="0" table:formula="of:=IF(INDEX([Tracker.$A$1:.$AG$120];6+9*(MONTH([.$A248])-1)+(COLUMN()-4);DAY([.$A248])+2)&lt;&gt;&quot;&quot;;1;0)" table:style-name="ce92"/>
          <table:table-cell office:value-type="float" office:value="0" table:formula="of:=SUM([.D248:.I248])" table:style-name="ce6"/>
          <table:table-cell office:value-type="percentage" office:value="0" table:formula="of:=[.J248]/6" table:style-name="ce8">
            <text:p>0%</text:p>
          </table:table-cell>
          <table:table-cell table:style-name="ce1"/>
          <table:table-cell office:value-type="float" office:value="0" table:formula="of:=IF([.D248]=1;[.M247]+1;0)" table:style-name="ce1">
            <text:p>0</text:p>
          </table:table-cell>
          <table:table-cell office:value-type="float" office:value="0" table:formula="of:=IF([.E248]=1;[.N247]+1;0)" table:style-name="ce1">
            <text:p>0</text:p>
          </table:table-cell>
          <table:table-cell office:value-type="float" office:value="0" table:formula="of:=IF([.F248]=1;[.O247]+1;0)" table:style-name="ce1">
            <text:p>0</text:p>
          </table:table-cell>
          <table:table-cell office:value-type="float" office:value="0" table:formula="of:=IF([.G248]=1;[.P247]+1;0)" table:style-name="ce1">
            <text:p>0</text:p>
          </table:table-cell>
          <table:table-cell office:value-type="float" office:value="0" table:formula="of:=IF([.H248]=1;[.Q247]+1;0)" table:style-name="ce1">
            <text:p>0</text:p>
          </table:table-cell>
          <table:table-cell office:value-type="float" office:value="0" table:formula="of:=IF([.I248]=1;[.R24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3T00:00:00" table:formula="of:=[.A248]+1" table:style-name="ce10">
            <text:p>Thu, 03 Sep 2026</text:p>
          </table:table-cell>
          <table:table-cell office:value-type="string" office:string-value="Thu" table:formula="of:=TEXT([.A249];&quot;ddd&quot;)" table:style-name="ce5">
            <text:p>Thu</text:p>
          </table:table-cell>
          <table:table-cell office:value-type="string" office:string-value="Sep" table:formula="of:=TEXT([.A249];&quot;mmm&quot;)" table:style-name="ce5">
            <text:p>Sep</text:p>
          </table:table-cell>
          <table:table-cell office:value-type="float" office:value="0" table:formula="of:=IF(INDEX([Tracker.$A$1:.$AG$120];6+9*(MONTH([.$A249])-1)+(COLUMN()-4);DAY([.$A249])+2)&lt;&gt;&quot;&quot;;1;0)" table:style-name="ce92"/>
          <table:table-cell office:value-type="float" office:value="0" table:formula="of:=IF(INDEX([Tracker.$A$1:.$AG$120];6+9*(MONTH([.$A249])-1)+(COLUMN()-4);DAY([.$A249])+2)&lt;&gt;&quot;&quot;;1;0)" table:style-name="ce92"/>
          <table:table-cell office:value-type="float" office:value="0" table:formula="of:=IF(INDEX([Tracker.$A$1:.$AG$120];6+9*(MONTH([.$A249])-1)+(COLUMN()-4);DAY([.$A249])+2)&lt;&gt;&quot;&quot;;1;0)" table:style-name="ce92"/>
          <table:table-cell office:value-type="float" office:value="0" table:formula="of:=IF(INDEX([Tracker.$A$1:.$AG$120];6+9*(MONTH([.$A249])-1)+(COLUMN()-4);DAY([.$A249])+2)&lt;&gt;&quot;&quot;;1;0)" table:style-name="ce92"/>
          <table:table-cell office:value-type="float" office:value="0" table:formula="of:=IF(INDEX([Tracker.$A$1:.$AG$120];6+9*(MONTH([.$A249])-1)+(COLUMN()-4);DAY([.$A249])+2)&lt;&gt;&quot;&quot;;1;0)" table:style-name="ce92"/>
          <table:table-cell office:value-type="float" office:value="0" table:formula="of:=IF(INDEX([Tracker.$A$1:.$AG$120];6+9*(MONTH([.$A249])-1)+(COLUMN()-4);DAY([.$A249])+2)&lt;&gt;&quot;&quot;;1;0)" table:style-name="ce92"/>
          <table:table-cell office:value-type="float" office:value="0" table:formula="of:=SUM([.D249:.I249])" table:style-name="ce6"/>
          <table:table-cell office:value-type="percentage" office:value="0" table:formula="of:=[.J249]/6" table:style-name="ce8">
            <text:p>0%</text:p>
          </table:table-cell>
          <table:table-cell table:style-name="ce1"/>
          <table:table-cell office:value-type="float" office:value="0" table:formula="of:=IF([.D249]=1;[.M248]+1;0)" table:style-name="ce1">
            <text:p>0</text:p>
          </table:table-cell>
          <table:table-cell office:value-type="float" office:value="0" table:formula="of:=IF([.E249]=1;[.N248]+1;0)" table:style-name="ce1">
            <text:p>0</text:p>
          </table:table-cell>
          <table:table-cell office:value-type="float" office:value="0" table:formula="of:=IF([.F249]=1;[.O248]+1;0)" table:style-name="ce1">
            <text:p>0</text:p>
          </table:table-cell>
          <table:table-cell office:value-type="float" office:value="0" table:formula="of:=IF([.G249]=1;[.P248]+1;0)" table:style-name="ce1">
            <text:p>0</text:p>
          </table:table-cell>
          <table:table-cell office:value-type="float" office:value="0" table:formula="of:=IF([.H249]=1;[.Q248]+1;0)" table:style-name="ce1">
            <text:p>0</text:p>
          </table:table-cell>
          <table:table-cell office:value-type="float" office:value="0" table:formula="of:=IF([.I249]=1;[.R24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4T00:00:00" table:formula="of:=[.A249]+1" table:style-name="ce10">
            <text:p>Fri, 04 Sep 2026</text:p>
          </table:table-cell>
          <table:table-cell office:value-type="string" office:string-value="Fri" table:formula="of:=TEXT([.A250];&quot;ddd&quot;)" table:style-name="ce5">
            <text:p>Fri</text:p>
          </table:table-cell>
          <table:table-cell office:value-type="string" office:string-value="Sep" table:formula="of:=TEXT([.A250];&quot;mmm&quot;)" table:style-name="ce5">
            <text:p>Sep</text:p>
          </table:table-cell>
          <table:table-cell office:value-type="float" office:value="0" table:formula="of:=IF(INDEX([Tracker.$A$1:.$AG$120];6+9*(MONTH([.$A250])-1)+(COLUMN()-4);DAY([.$A250])+2)&lt;&gt;&quot;&quot;;1;0)" table:style-name="ce92"/>
          <table:table-cell office:value-type="float" office:value="0" table:formula="of:=IF(INDEX([Tracker.$A$1:.$AG$120];6+9*(MONTH([.$A250])-1)+(COLUMN()-4);DAY([.$A250])+2)&lt;&gt;&quot;&quot;;1;0)" table:style-name="ce92"/>
          <table:table-cell office:value-type="float" office:value="0" table:formula="of:=IF(INDEX([Tracker.$A$1:.$AG$120];6+9*(MONTH([.$A250])-1)+(COLUMN()-4);DAY([.$A250])+2)&lt;&gt;&quot;&quot;;1;0)" table:style-name="ce92"/>
          <table:table-cell office:value-type="float" office:value="0" table:formula="of:=IF(INDEX([Tracker.$A$1:.$AG$120];6+9*(MONTH([.$A250])-1)+(COLUMN()-4);DAY([.$A250])+2)&lt;&gt;&quot;&quot;;1;0)" table:style-name="ce92"/>
          <table:table-cell office:value-type="float" office:value="0" table:formula="of:=IF(INDEX([Tracker.$A$1:.$AG$120];6+9*(MONTH([.$A250])-1)+(COLUMN()-4);DAY([.$A250])+2)&lt;&gt;&quot;&quot;;1;0)" table:style-name="ce92"/>
          <table:table-cell office:value-type="float" office:value="0" table:formula="of:=IF(INDEX([Tracker.$A$1:.$AG$120];6+9*(MONTH([.$A250])-1)+(COLUMN()-4);DAY([.$A250])+2)&lt;&gt;&quot;&quot;;1;0)" table:style-name="ce92"/>
          <table:table-cell office:value-type="float" office:value="0" table:formula="of:=SUM([.D250:.I250])" table:style-name="ce6"/>
          <table:table-cell office:value-type="percentage" office:value="0" table:formula="of:=[.J250]/6" table:style-name="ce8">
            <text:p>0%</text:p>
          </table:table-cell>
          <table:table-cell table:style-name="ce1"/>
          <table:table-cell office:value-type="float" office:value="0" table:formula="of:=IF([.D250]=1;[.M249]+1;0)" table:style-name="ce1">
            <text:p>0</text:p>
          </table:table-cell>
          <table:table-cell office:value-type="float" office:value="0" table:formula="of:=IF([.E250]=1;[.N249]+1;0)" table:style-name="ce1">
            <text:p>0</text:p>
          </table:table-cell>
          <table:table-cell office:value-type="float" office:value="0" table:formula="of:=IF([.F250]=1;[.O249]+1;0)" table:style-name="ce1">
            <text:p>0</text:p>
          </table:table-cell>
          <table:table-cell office:value-type="float" office:value="0" table:formula="of:=IF([.G250]=1;[.P249]+1;0)" table:style-name="ce1">
            <text:p>0</text:p>
          </table:table-cell>
          <table:table-cell office:value-type="float" office:value="0" table:formula="of:=IF([.H250]=1;[.Q249]+1;0)" table:style-name="ce1">
            <text:p>0</text:p>
          </table:table-cell>
          <table:table-cell office:value-type="float" office:value="0" table:formula="of:=IF([.I250]=1;[.R24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5T00:00:00" table:formula="of:=[.A250]+1" table:style-name="ce10">
            <text:p>Sat, 05 Sep 2026</text:p>
          </table:table-cell>
          <table:table-cell office:value-type="string" office:string-value="Sat" table:formula="of:=TEXT([.A251];&quot;ddd&quot;)" table:style-name="ce5">
            <text:p>Sat</text:p>
          </table:table-cell>
          <table:table-cell office:value-type="string" office:string-value="Sep" table:formula="of:=TEXT([.A251];&quot;mmm&quot;)" table:style-name="ce5">
            <text:p>Sep</text:p>
          </table:table-cell>
          <table:table-cell office:value-type="float" office:value="0" table:formula="of:=IF(INDEX([Tracker.$A$1:.$AG$120];6+9*(MONTH([.$A251])-1)+(COLUMN()-4);DAY([.$A251])+2)&lt;&gt;&quot;&quot;;1;0)" table:style-name="ce92"/>
          <table:table-cell office:value-type="float" office:value="0" table:formula="of:=IF(INDEX([Tracker.$A$1:.$AG$120];6+9*(MONTH([.$A251])-1)+(COLUMN()-4);DAY([.$A251])+2)&lt;&gt;&quot;&quot;;1;0)" table:style-name="ce92"/>
          <table:table-cell office:value-type="float" office:value="0" table:formula="of:=IF(INDEX([Tracker.$A$1:.$AG$120];6+9*(MONTH([.$A251])-1)+(COLUMN()-4);DAY([.$A251])+2)&lt;&gt;&quot;&quot;;1;0)" table:style-name="ce92"/>
          <table:table-cell office:value-type="float" office:value="0" table:formula="of:=IF(INDEX([Tracker.$A$1:.$AG$120];6+9*(MONTH([.$A251])-1)+(COLUMN()-4);DAY([.$A251])+2)&lt;&gt;&quot;&quot;;1;0)" table:style-name="ce92"/>
          <table:table-cell office:value-type="float" office:value="0" table:formula="of:=IF(INDEX([Tracker.$A$1:.$AG$120];6+9*(MONTH([.$A251])-1)+(COLUMN()-4);DAY([.$A251])+2)&lt;&gt;&quot;&quot;;1;0)" table:style-name="ce92"/>
          <table:table-cell office:value-type="float" office:value="0" table:formula="of:=IF(INDEX([Tracker.$A$1:.$AG$120];6+9*(MONTH([.$A251])-1)+(COLUMN()-4);DAY([.$A251])+2)&lt;&gt;&quot;&quot;;1;0)" table:style-name="ce92"/>
          <table:table-cell office:value-type="float" office:value="0" table:formula="of:=SUM([.D251:.I251])" table:style-name="ce6"/>
          <table:table-cell office:value-type="percentage" office:value="0" table:formula="of:=[.J251]/6" table:style-name="ce8">
            <text:p>0%</text:p>
          </table:table-cell>
          <table:table-cell table:style-name="ce1"/>
          <table:table-cell office:value-type="float" office:value="0" table:formula="of:=IF([.D251]=1;[.M250]+1;0)" table:style-name="ce1">
            <text:p>0</text:p>
          </table:table-cell>
          <table:table-cell office:value-type="float" office:value="0" table:formula="of:=IF([.E251]=1;[.N250]+1;0)" table:style-name="ce1">
            <text:p>0</text:p>
          </table:table-cell>
          <table:table-cell office:value-type="float" office:value="0" table:formula="of:=IF([.F251]=1;[.O250]+1;0)" table:style-name="ce1">
            <text:p>0</text:p>
          </table:table-cell>
          <table:table-cell office:value-type="float" office:value="0" table:formula="of:=IF([.G251]=1;[.P250]+1;0)" table:style-name="ce1">
            <text:p>0</text:p>
          </table:table-cell>
          <table:table-cell office:value-type="float" office:value="0" table:formula="of:=IF([.H251]=1;[.Q250]+1;0)" table:style-name="ce1">
            <text:p>0</text:p>
          </table:table-cell>
          <table:table-cell office:value-type="float" office:value="0" table:formula="of:=IF([.I251]=1;[.R25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6T00:00:00" table:formula="of:=[.A251]+1" table:style-name="ce10">
            <text:p>Sun, 06 Sep 2026</text:p>
          </table:table-cell>
          <table:table-cell office:value-type="string" office:string-value="Sun" table:formula="of:=TEXT([.A252];&quot;ddd&quot;)" table:style-name="ce5">
            <text:p>Sun</text:p>
          </table:table-cell>
          <table:table-cell office:value-type="string" office:string-value="Sep" table:formula="of:=TEXT([.A252];&quot;mmm&quot;)" table:style-name="ce5">
            <text:p>Sep</text:p>
          </table:table-cell>
          <table:table-cell office:value-type="float" office:value="0" table:formula="of:=IF(INDEX([Tracker.$A$1:.$AG$120];6+9*(MONTH([.$A252])-1)+(COLUMN()-4);DAY([.$A252])+2)&lt;&gt;&quot;&quot;;1;0)" table:style-name="ce92"/>
          <table:table-cell office:value-type="float" office:value="0" table:formula="of:=IF(INDEX([Tracker.$A$1:.$AG$120];6+9*(MONTH([.$A252])-1)+(COLUMN()-4);DAY([.$A252])+2)&lt;&gt;&quot;&quot;;1;0)" table:style-name="ce92"/>
          <table:table-cell office:value-type="float" office:value="0" table:formula="of:=IF(INDEX([Tracker.$A$1:.$AG$120];6+9*(MONTH([.$A252])-1)+(COLUMN()-4);DAY([.$A252])+2)&lt;&gt;&quot;&quot;;1;0)" table:style-name="ce92"/>
          <table:table-cell office:value-type="float" office:value="0" table:formula="of:=IF(INDEX([Tracker.$A$1:.$AG$120];6+9*(MONTH([.$A252])-1)+(COLUMN()-4);DAY([.$A252])+2)&lt;&gt;&quot;&quot;;1;0)" table:style-name="ce92"/>
          <table:table-cell office:value-type="float" office:value="0" table:formula="of:=IF(INDEX([Tracker.$A$1:.$AG$120];6+9*(MONTH([.$A252])-1)+(COLUMN()-4);DAY([.$A252])+2)&lt;&gt;&quot;&quot;;1;0)" table:style-name="ce92"/>
          <table:table-cell office:value-type="float" office:value="0" table:formula="of:=IF(INDEX([Tracker.$A$1:.$AG$120];6+9*(MONTH([.$A252])-1)+(COLUMN()-4);DAY([.$A252])+2)&lt;&gt;&quot;&quot;;1;0)" table:style-name="ce92"/>
          <table:table-cell office:value-type="float" office:value="0" table:formula="of:=SUM([.D252:.I252])" table:style-name="ce6"/>
          <table:table-cell office:value-type="percentage" office:value="0" table:formula="of:=[.J252]/6" table:style-name="ce8">
            <text:p>0%</text:p>
          </table:table-cell>
          <table:table-cell table:style-name="ce1"/>
          <table:table-cell office:value-type="float" office:value="0" table:formula="of:=IF([.D252]=1;[.M251]+1;0)" table:style-name="ce1">
            <text:p>0</text:p>
          </table:table-cell>
          <table:table-cell office:value-type="float" office:value="0" table:formula="of:=IF([.E252]=1;[.N251]+1;0)" table:style-name="ce1">
            <text:p>0</text:p>
          </table:table-cell>
          <table:table-cell office:value-type="float" office:value="0" table:formula="of:=IF([.F252]=1;[.O251]+1;0)" table:style-name="ce1">
            <text:p>0</text:p>
          </table:table-cell>
          <table:table-cell office:value-type="float" office:value="0" table:formula="of:=IF([.G252]=1;[.P251]+1;0)" table:style-name="ce1">
            <text:p>0</text:p>
          </table:table-cell>
          <table:table-cell office:value-type="float" office:value="0" table:formula="of:=IF([.H252]=1;[.Q251]+1;0)" table:style-name="ce1">
            <text:p>0</text:p>
          </table:table-cell>
          <table:table-cell office:value-type="float" office:value="0" table:formula="of:=IF([.I252]=1;[.R25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7T00:00:00" table:formula="of:=[.A252]+1" table:style-name="ce10">
            <text:p>Mon, 07 Sep 2026</text:p>
          </table:table-cell>
          <table:table-cell office:value-type="string" office:string-value="Mon" table:formula="of:=TEXT([.A253];&quot;ddd&quot;)" table:style-name="ce5">
            <text:p>Mon</text:p>
          </table:table-cell>
          <table:table-cell office:value-type="string" office:string-value="Sep" table:formula="of:=TEXT([.A253];&quot;mmm&quot;)" table:style-name="ce5">
            <text:p>Sep</text:p>
          </table:table-cell>
          <table:table-cell office:value-type="float" office:value="0" table:formula="of:=IF(INDEX([Tracker.$A$1:.$AG$120];6+9*(MONTH([.$A253])-1)+(COLUMN()-4);DAY([.$A253])+2)&lt;&gt;&quot;&quot;;1;0)" table:style-name="ce92"/>
          <table:table-cell office:value-type="float" office:value="0" table:formula="of:=IF(INDEX([Tracker.$A$1:.$AG$120];6+9*(MONTH([.$A253])-1)+(COLUMN()-4);DAY([.$A253])+2)&lt;&gt;&quot;&quot;;1;0)" table:style-name="ce92"/>
          <table:table-cell office:value-type="float" office:value="0" table:formula="of:=IF(INDEX([Tracker.$A$1:.$AG$120];6+9*(MONTH([.$A253])-1)+(COLUMN()-4);DAY([.$A253])+2)&lt;&gt;&quot;&quot;;1;0)" table:style-name="ce92"/>
          <table:table-cell office:value-type="float" office:value="0" table:formula="of:=IF(INDEX([Tracker.$A$1:.$AG$120];6+9*(MONTH([.$A253])-1)+(COLUMN()-4);DAY([.$A253])+2)&lt;&gt;&quot;&quot;;1;0)" table:style-name="ce92"/>
          <table:table-cell office:value-type="float" office:value="0" table:formula="of:=IF(INDEX([Tracker.$A$1:.$AG$120];6+9*(MONTH([.$A253])-1)+(COLUMN()-4);DAY([.$A253])+2)&lt;&gt;&quot;&quot;;1;0)" table:style-name="ce92"/>
          <table:table-cell office:value-type="float" office:value="0" table:formula="of:=IF(INDEX([Tracker.$A$1:.$AG$120];6+9*(MONTH([.$A253])-1)+(COLUMN()-4);DAY([.$A253])+2)&lt;&gt;&quot;&quot;;1;0)" table:style-name="ce92"/>
          <table:table-cell office:value-type="float" office:value="0" table:formula="of:=SUM([.D253:.I253])" table:style-name="ce6"/>
          <table:table-cell office:value-type="percentage" office:value="0" table:formula="of:=[.J253]/6" table:style-name="ce8">
            <text:p>0%</text:p>
          </table:table-cell>
          <table:table-cell table:style-name="ce1"/>
          <table:table-cell office:value-type="float" office:value="0" table:formula="of:=IF([.D253]=1;[.M252]+1;0)" table:style-name="ce1">
            <text:p>0</text:p>
          </table:table-cell>
          <table:table-cell office:value-type="float" office:value="0" table:formula="of:=IF([.E253]=1;[.N252]+1;0)" table:style-name="ce1">
            <text:p>0</text:p>
          </table:table-cell>
          <table:table-cell office:value-type="float" office:value="0" table:formula="of:=IF([.F253]=1;[.O252]+1;0)" table:style-name="ce1">
            <text:p>0</text:p>
          </table:table-cell>
          <table:table-cell office:value-type="float" office:value="0" table:formula="of:=IF([.G253]=1;[.P252]+1;0)" table:style-name="ce1">
            <text:p>0</text:p>
          </table:table-cell>
          <table:table-cell office:value-type="float" office:value="0" table:formula="of:=IF([.H253]=1;[.Q252]+1;0)" table:style-name="ce1">
            <text:p>0</text:p>
          </table:table-cell>
          <table:table-cell office:value-type="float" office:value="0" table:formula="of:=IF([.I253]=1;[.R25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8T00:00:00" table:formula="of:=[.A253]+1" table:style-name="ce10">
            <text:p>Tue, 08 Sep 2026</text:p>
          </table:table-cell>
          <table:table-cell office:value-type="string" office:string-value="Tue" table:formula="of:=TEXT([.A254];&quot;ddd&quot;)" table:style-name="ce5">
            <text:p>Tue</text:p>
          </table:table-cell>
          <table:table-cell office:value-type="string" office:string-value="Sep" table:formula="of:=TEXT([.A254];&quot;mmm&quot;)" table:style-name="ce5">
            <text:p>Sep</text:p>
          </table:table-cell>
          <table:table-cell office:value-type="float" office:value="0" table:formula="of:=IF(INDEX([Tracker.$A$1:.$AG$120];6+9*(MONTH([.$A254])-1)+(COLUMN()-4);DAY([.$A254])+2)&lt;&gt;&quot;&quot;;1;0)" table:style-name="ce92"/>
          <table:table-cell office:value-type="float" office:value="0" table:formula="of:=IF(INDEX([Tracker.$A$1:.$AG$120];6+9*(MONTH([.$A254])-1)+(COLUMN()-4);DAY([.$A254])+2)&lt;&gt;&quot;&quot;;1;0)" table:style-name="ce92"/>
          <table:table-cell office:value-type="float" office:value="0" table:formula="of:=IF(INDEX([Tracker.$A$1:.$AG$120];6+9*(MONTH([.$A254])-1)+(COLUMN()-4);DAY([.$A254])+2)&lt;&gt;&quot;&quot;;1;0)" table:style-name="ce92"/>
          <table:table-cell office:value-type="float" office:value="0" table:formula="of:=IF(INDEX([Tracker.$A$1:.$AG$120];6+9*(MONTH([.$A254])-1)+(COLUMN()-4);DAY([.$A254])+2)&lt;&gt;&quot;&quot;;1;0)" table:style-name="ce92"/>
          <table:table-cell office:value-type="float" office:value="0" table:formula="of:=IF(INDEX([Tracker.$A$1:.$AG$120];6+9*(MONTH([.$A254])-1)+(COLUMN()-4);DAY([.$A254])+2)&lt;&gt;&quot;&quot;;1;0)" table:style-name="ce92"/>
          <table:table-cell office:value-type="float" office:value="0" table:formula="of:=IF(INDEX([Tracker.$A$1:.$AG$120];6+9*(MONTH([.$A254])-1)+(COLUMN()-4);DAY([.$A254])+2)&lt;&gt;&quot;&quot;;1;0)" table:style-name="ce92"/>
          <table:table-cell office:value-type="float" office:value="0" table:formula="of:=SUM([.D254:.I254])" table:style-name="ce6"/>
          <table:table-cell office:value-type="percentage" office:value="0" table:formula="of:=[.J254]/6" table:style-name="ce8">
            <text:p>0%</text:p>
          </table:table-cell>
          <table:table-cell table:style-name="ce1"/>
          <table:table-cell office:value-type="float" office:value="0" table:formula="of:=IF([.D254]=1;[.M253]+1;0)" table:style-name="ce1">
            <text:p>0</text:p>
          </table:table-cell>
          <table:table-cell office:value-type="float" office:value="0" table:formula="of:=IF([.E254]=1;[.N253]+1;0)" table:style-name="ce1">
            <text:p>0</text:p>
          </table:table-cell>
          <table:table-cell office:value-type="float" office:value="0" table:formula="of:=IF([.F254]=1;[.O253]+1;0)" table:style-name="ce1">
            <text:p>0</text:p>
          </table:table-cell>
          <table:table-cell office:value-type="float" office:value="0" table:formula="of:=IF([.G254]=1;[.P253]+1;0)" table:style-name="ce1">
            <text:p>0</text:p>
          </table:table-cell>
          <table:table-cell office:value-type="float" office:value="0" table:formula="of:=IF([.H254]=1;[.Q253]+1;0)" table:style-name="ce1">
            <text:p>0</text:p>
          </table:table-cell>
          <table:table-cell office:value-type="float" office:value="0" table:formula="of:=IF([.I254]=1;[.R25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09T00:00:00" table:formula="of:=[.A254]+1" table:style-name="ce10">
            <text:p>Wed, 09 Sep 2026</text:p>
          </table:table-cell>
          <table:table-cell office:value-type="string" office:string-value="Wed" table:formula="of:=TEXT([.A255];&quot;ddd&quot;)" table:style-name="ce5">
            <text:p>Wed</text:p>
          </table:table-cell>
          <table:table-cell office:value-type="string" office:string-value="Sep" table:formula="of:=TEXT([.A255];&quot;mmm&quot;)" table:style-name="ce5">
            <text:p>Sep</text:p>
          </table:table-cell>
          <table:table-cell office:value-type="float" office:value="0" table:formula="of:=IF(INDEX([Tracker.$A$1:.$AG$120];6+9*(MONTH([.$A255])-1)+(COLUMN()-4);DAY([.$A255])+2)&lt;&gt;&quot;&quot;;1;0)" table:style-name="ce92"/>
          <table:table-cell office:value-type="float" office:value="0" table:formula="of:=IF(INDEX([Tracker.$A$1:.$AG$120];6+9*(MONTH([.$A255])-1)+(COLUMN()-4);DAY([.$A255])+2)&lt;&gt;&quot;&quot;;1;0)" table:style-name="ce92"/>
          <table:table-cell office:value-type="float" office:value="0" table:formula="of:=IF(INDEX([Tracker.$A$1:.$AG$120];6+9*(MONTH([.$A255])-1)+(COLUMN()-4);DAY([.$A255])+2)&lt;&gt;&quot;&quot;;1;0)" table:style-name="ce92"/>
          <table:table-cell office:value-type="float" office:value="0" table:formula="of:=IF(INDEX([Tracker.$A$1:.$AG$120];6+9*(MONTH([.$A255])-1)+(COLUMN()-4);DAY([.$A255])+2)&lt;&gt;&quot;&quot;;1;0)" table:style-name="ce92"/>
          <table:table-cell office:value-type="float" office:value="0" table:formula="of:=IF(INDEX([Tracker.$A$1:.$AG$120];6+9*(MONTH([.$A255])-1)+(COLUMN()-4);DAY([.$A255])+2)&lt;&gt;&quot;&quot;;1;0)" table:style-name="ce92"/>
          <table:table-cell office:value-type="float" office:value="0" table:formula="of:=IF(INDEX([Tracker.$A$1:.$AG$120];6+9*(MONTH([.$A255])-1)+(COLUMN()-4);DAY([.$A255])+2)&lt;&gt;&quot;&quot;;1;0)" table:style-name="ce92"/>
          <table:table-cell office:value-type="float" office:value="0" table:formula="of:=SUM([.D255:.I255])" table:style-name="ce6"/>
          <table:table-cell office:value-type="percentage" office:value="0" table:formula="of:=[.J255]/6" table:style-name="ce8">
            <text:p>0%</text:p>
          </table:table-cell>
          <table:table-cell table:style-name="ce1"/>
          <table:table-cell office:value-type="float" office:value="0" table:formula="of:=IF([.D255]=1;[.M254]+1;0)" table:style-name="ce1">
            <text:p>0</text:p>
          </table:table-cell>
          <table:table-cell office:value-type="float" office:value="0" table:formula="of:=IF([.E255]=1;[.N254]+1;0)" table:style-name="ce1">
            <text:p>0</text:p>
          </table:table-cell>
          <table:table-cell office:value-type="float" office:value="0" table:formula="of:=IF([.F255]=1;[.O254]+1;0)" table:style-name="ce1">
            <text:p>0</text:p>
          </table:table-cell>
          <table:table-cell office:value-type="float" office:value="0" table:formula="of:=IF([.G255]=1;[.P254]+1;0)" table:style-name="ce1">
            <text:p>0</text:p>
          </table:table-cell>
          <table:table-cell office:value-type="float" office:value="0" table:formula="of:=IF([.H255]=1;[.Q254]+1;0)" table:style-name="ce1">
            <text:p>0</text:p>
          </table:table-cell>
          <table:table-cell office:value-type="float" office:value="0" table:formula="of:=IF([.I255]=1;[.R25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0T00:00:00" table:formula="of:=[.A255]+1" table:style-name="ce10">
            <text:p>Thu, 10 Sep 2026</text:p>
          </table:table-cell>
          <table:table-cell office:value-type="string" office:string-value="Thu" table:formula="of:=TEXT([.A256];&quot;ddd&quot;)" table:style-name="ce5">
            <text:p>Thu</text:p>
          </table:table-cell>
          <table:table-cell office:value-type="string" office:string-value="Sep" table:formula="of:=TEXT([.A256];&quot;mmm&quot;)" table:style-name="ce5">
            <text:p>Sep</text:p>
          </table:table-cell>
          <table:table-cell office:value-type="float" office:value="0" table:formula="of:=IF(INDEX([Tracker.$A$1:.$AG$120];6+9*(MONTH([.$A256])-1)+(COLUMN()-4);DAY([.$A256])+2)&lt;&gt;&quot;&quot;;1;0)" table:style-name="ce92"/>
          <table:table-cell office:value-type="float" office:value="0" table:formula="of:=IF(INDEX([Tracker.$A$1:.$AG$120];6+9*(MONTH([.$A256])-1)+(COLUMN()-4);DAY([.$A256])+2)&lt;&gt;&quot;&quot;;1;0)" table:style-name="ce92"/>
          <table:table-cell office:value-type="float" office:value="0" table:formula="of:=IF(INDEX([Tracker.$A$1:.$AG$120];6+9*(MONTH([.$A256])-1)+(COLUMN()-4);DAY([.$A256])+2)&lt;&gt;&quot;&quot;;1;0)" table:style-name="ce92"/>
          <table:table-cell office:value-type="float" office:value="0" table:formula="of:=IF(INDEX([Tracker.$A$1:.$AG$120];6+9*(MONTH([.$A256])-1)+(COLUMN()-4);DAY([.$A256])+2)&lt;&gt;&quot;&quot;;1;0)" table:style-name="ce92"/>
          <table:table-cell office:value-type="float" office:value="0" table:formula="of:=IF(INDEX([Tracker.$A$1:.$AG$120];6+9*(MONTH([.$A256])-1)+(COLUMN()-4);DAY([.$A256])+2)&lt;&gt;&quot;&quot;;1;0)" table:style-name="ce92"/>
          <table:table-cell office:value-type="float" office:value="0" table:formula="of:=IF(INDEX([Tracker.$A$1:.$AG$120];6+9*(MONTH([.$A256])-1)+(COLUMN()-4);DAY([.$A256])+2)&lt;&gt;&quot;&quot;;1;0)" table:style-name="ce92"/>
          <table:table-cell office:value-type="float" office:value="0" table:formula="of:=SUM([.D256:.I256])" table:style-name="ce6"/>
          <table:table-cell office:value-type="percentage" office:value="0" table:formula="of:=[.J256]/6" table:style-name="ce8">
            <text:p>0%</text:p>
          </table:table-cell>
          <table:table-cell table:style-name="ce1"/>
          <table:table-cell office:value-type="float" office:value="0" table:formula="of:=IF([.D256]=1;[.M255]+1;0)" table:style-name="ce1">
            <text:p>0</text:p>
          </table:table-cell>
          <table:table-cell office:value-type="float" office:value="0" table:formula="of:=IF([.E256]=1;[.N255]+1;0)" table:style-name="ce1">
            <text:p>0</text:p>
          </table:table-cell>
          <table:table-cell office:value-type="float" office:value="0" table:formula="of:=IF([.F256]=1;[.O255]+1;0)" table:style-name="ce1">
            <text:p>0</text:p>
          </table:table-cell>
          <table:table-cell office:value-type="float" office:value="0" table:formula="of:=IF([.G256]=1;[.P255]+1;0)" table:style-name="ce1">
            <text:p>0</text:p>
          </table:table-cell>
          <table:table-cell office:value-type="float" office:value="0" table:formula="of:=IF([.H256]=1;[.Q255]+1;0)" table:style-name="ce1">
            <text:p>0</text:p>
          </table:table-cell>
          <table:table-cell office:value-type="float" office:value="0" table:formula="of:=IF([.I256]=1;[.R25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1T00:00:00" table:formula="of:=[.A256]+1" table:style-name="ce10">
            <text:p>Fri, 11 Sep 2026</text:p>
          </table:table-cell>
          <table:table-cell office:value-type="string" office:string-value="Fri" table:formula="of:=TEXT([.A257];&quot;ddd&quot;)" table:style-name="ce5">
            <text:p>Fri</text:p>
          </table:table-cell>
          <table:table-cell office:value-type="string" office:string-value="Sep" table:formula="of:=TEXT([.A257];&quot;mmm&quot;)" table:style-name="ce5">
            <text:p>Sep</text:p>
          </table:table-cell>
          <table:table-cell office:value-type="float" office:value="0" table:formula="of:=IF(INDEX([Tracker.$A$1:.$AG$120];6+9*(MONTH([.$A257])-1)+(COLUMN()-4);DAY([.$A257])+2)&lt;&gt;&quot;&quot;;1;0)" table:style-name="ce92"/>
          <table:table-cell office:value-type="float" office:value="0" table:formula="of:=IF(INDEX([Tracker.$A$1:.$AG$120];6+9*(MONTH([.$A257])-1)+(COLUMN()-4);DAY([.$A257])+2)&lt;&gt;&quot;&quot;;1;0)" table:style-name="ce92"/>
          <table:table-cell office:value-type="float" office:value="0" table:formula="of:=IF(INDEX([Tracker.$A$1:.$AG$120];6+9*(MONTH([.$A257])-1)+(COLUMN()-4);DAY([.$A257])+2)&lt;&gt;&quot;&quot;;1;0)" table:style-name="ce92"/>
          <table:table-cell office:value-type="float" office:value="0" table:formula="of:=IF(INDEX([Tracker.$A$1:.$AG$120];6+9*(MONTH([.$A257])-1)+(COLUMN()-4);DAY([.$A257])+2)&lt;&gt;&quot;&quot;;1;0)" table:style-name="ce92"/>
          <table:table-cell office:value-type="float" office:value="0" table:formula="of:=IF(INDEX([Tracker.$A$1:.$AG$120];6+9*(MONTH([.$A257])-1)+(COLUMN()-4);DAY([.$A257])+2)&lt;&gt;&quot;&quot;;1;0)" table:style-name="ce92"/>
          <table:table-cell office:value-type="float" office:value="0" table:formula="of:=IF(INDEX([Tracker.$A$1:.$AG$120];6+9*(MONTH([.$A257])-1)+(COLUMN()-4);DAY([.$A257])+2)&lt;&gt;&quot;&quot;;1;0)" table:style-name="ce92"/>
          <table:table-cell office:value-type="float" office:value="0" table:formula="of:=SUM([.D257:.I257])" table:style-name="ce6"/>
          <table:table-cell office:value-type="percentage" office:value="0" table:formula="of:=[.J257]/6" table:style-name="ce8">
            <text:p>0%</text:p>
          </table:table-cell>
          <table:table-cell table:style-name="ce1"/>
          <table:table-cell office:value-type="float" office:value="0" table:formula="of:=IF([.D257]=1;[.M256]+1;0)" table:style-name="ce1">
            <text:p>0</text:p>
          </table:table-cell>
          <table:table-cell office:value-type="float" office:value="0" table:formula="of:=IF([.E257]=1;[.N256]+1;0)" table:style-name="ce1">
            <text:p>0</text:p>
          </table:table-cell>
          <table:table-cell office:value-type="float" office:value="0" table:formula="of:=IF([.F257]=1;[.O256]+1;0)" table:style-name="ce1">
            <text:p>0</text:p>
          </table:table-cell>
          <table:table-cell office:value-type="float" office:value="0" table:formula="of:=IF([.G257]=1;[.P256]+1;0)" table:style-name="ce1">
            <text:p>0</text:p>
          </table:table-cell>
          <table:table-cell office:value-type="float" office:value="0" table:formula="of:=IF([.H257]=1;[.Q256]+1;0)" table:style-name="ce1">
            <text:p>0</text:p>
          </table:table-cell>
          <table:table-cell office:value-type="float" office:value="0" table:formula="of:=IF([.I257]=1;[.R25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2T00:00:00" table:formula="of:=[.A257]+1" table:style-name="ce10">
            <text:p>Sat, 12 Sep 2026</text:p>
          </table:table-cell>
          <table:table-cell office:value-type="string" office:string-value="Sat" table:formula="of:=TEXT([.A258];&quot;ddd&quot;)" table:style-name="ce5">
            <text:p>Sat</text:p>
          </table:table-cell>
          <table:table-cell office:value-type="string" office:string-value="Sep" table:formula="of:=TEXT([.A258];&quot;mmm&quot;)" table:style-name="ce5">
            <text:p>Sep</text:p>
          </table:table-cell>
          <table:table-cell office:value-type="float" office:value="0" table:formula="of:=IF(INDEX([Tracker.$A$1:.$AG$120];6+9*(MONTH([.$A258])-1)+(COLUMN()-4);DAY([.$A258])+2)&lt;&gt;&quot;&quot;;1;0)" table:style-name="ce92"/>
          <table:table-cell office:value-type="float" office:value="0" table:formula="of:=IF(INDEX([Tracker.$A$1:.$AG$120];6+9*(MONTH([.$A258])-1)+(COLUMN()-4);DAY([.$A258])+2)&lt;&gt;&quot;&quot;;1;0)" table:style-name="ce92"/>
          <table:table-cell office:value-type="float" office:value="0" table:formula="of:=IF(INDEX([Tracker.$A$1:.$AG$120];6+9*(MONTH([.$A258])-1)+(COLUMN()-4);DAY([.$A258])+2)&lt;&gt;&quot;&quot;;1;0)" table:style-name="ce92"/>
          <table:table-cell office:value-type="float" office:value="0" table:formula="of:=IF(INDEX([Tracker.$A$1:.$AG$120];6+9*(MONTH([.$A258])-1)+(COLUMN()-4);DAY([.$A258])+2)&lt;&gt;&quot;&quot;;1;0)" table:style-name="ce92"/>
          <table:table-cell office:value-type="float" office:value="0" table:formula="of:=IF(INDEX([Tracker.$A$1:.$AG$120];6+9*(MONTH([.$A258])-1)+(COLUMN()-4);DAY([.$A258])+2)&lt;&gt;&quot;&quot;;1;0)" table:style-name="ce92"/>
          <table:table-cell office:value-type="float" office:value="0" table:formula="of:=IF(INDEX([Tracker.$A$1:.$AG$120];6+9*(MONTH([.$A258])-1)+(COLUMN()-4);DAY([.$A258])+2)&lt;&gt;&quot;&quot;;1;0)" table:style-name="ce92"/>
          <table:table-cell office:value-type="float" office:value="0" table:formula="of:=SUM([.D258:.I258])" table:style-name="ce6"/>
          <table:table-cell office:value-type="percentage" office:value="0" table:formula="of:=[.J258]/6" table:style-name="ce8">
            <text:p>0%</text:p>
          </table:table-cell>
          <table:table-cell table:style-name="ce1"/>
          <table:table-cell office:value-type="float" office:value="0" table:formula="of:=IF([.D258]=1;[.M257]+1;0)" table:style-name="ce1">
            <text:p>0</text:p>
          </table:table-cell>
          <table:table-cell office:value-type="float" office:value="0" table:formula="of:=IF([.E258]=1;[.N257]+1;0)" table:style-name="ce1">
            <text:p>0</text:p>
          </table:table-cell>
          <table:table-cell office:value-type="float" office:value="0" table:formula="of:=IF([.F258]=1;[.O257]+1;0)" table:style-name="ce1">
            <text:p>0</text:p>
          </table:table-cell>
          <table:table-cell office:value-type="float" office:value="0" table:formula="of:=IF([.G258]=1;[.P257]+1;0)" table:style-name="ce1">
            <text:p>0</text:p>
          </table:table-cell>
          <table:table-cell office:value-type="float" office:value="0" table:formula="of:=IF([.H258]=1;[.Q257]+1;0)" table:style-name="ce1">
            <text:p>0</text:p>
          </table:table-cell>
          <table:table-cell office:value-type="float" office:value="0" table:formula="of:=IF([.I258]=1;[.R25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3T00:00:00" table:formula="of:=[.A258]+1" table:style-name="ce10">
            <text:p>Sun, 13 Sep 2026</text:p>
          </table:table-cell>
          <table:table-cell office:value-type="string" office:string-value="Sun" table:formula="of:=TEXT([.A259];&quot;ddd&quot;)" table:style-name="ce5">
            <text:p>Sun</text:p>
          </table:table-cell>
          <table:table-cell office:value-type="string" office:string-value="Sep" table:formula="of:=TEXT([.A259];&quot;mmm&quot;)" table:style-name="ce5">
            <text:p>Sep</text:p>
          </table:table-cell>
          <table:table-cell office:value-type="float" office:value="0" table:formula="of:=IF(INDEX([Tracker.$A$1:.$AG$120];6+9*(MONTH([.$A259])-1)+(COLUMN()-4);DAY([.$A259])+2)&lt;&gt;&quot;&quot;;1;0)" table:style-name="ce92"/>
          <table:table-cell office:value-type="float" office:value="0" table:formula="of:=IF(INDEX([Tracker.$A$1:.$AG$120];6+9*(MONTH([.$A259])-1)+(COLUMN()-4);DAY([.$A259])+2)&lt;&gt;&quot;&quot;;1;0)" table:style-name="ce92"/>
          <table:table-cell office:value-type="float" office:value="0" table:formula="of:=IF(INDEX([Tracker.$A$1:.$AG$120];6+9*(MONTH([.$A259])-1)+(COLUMN()-4);DAY([.$A259])+2)&lt;&gt;&quot;&quot;;1;0)" table:style-name="ce92"/>
          <table:table-cell office:value-type="float" office:value="0" table:formula="of:=IF(INDEX([Tracker.$A$1:.$AG$120];6+9*(MONTH([.$A259])-1)+(COLUMN()-4);DAY([.$A259])+2)&lt;&gt;&quot;&quot;;1;0)" table:style-name="ce92"/>
          <table:table-cell office:value-type="float" office:value="0" table:formula="of:=IF(INDEX([Tracker.$A$1:.$AG$120];6+9*(MONTH([.$A259])-1)+(COLUMN()-4);DAY([.$A259])+2)&lt;&gt;&quot;&quot;;1;0)" table:style-name="ce92"/>
          <table:table-cell office:value-type="float" office:value="0" table:formula="of:=IF(INDEX([Tracker.$A$1:.$AG$120];6+9*(MONTH([.$A259])-1)+(COLUMN()-4);DAY([.$A259])+2)&lt;&gt;&quot;&quot;;1;0)" table:style-name="ce92"/>
          <table:table-cell office:value-type="float" office:value="0" table:formula="of:=SUM([.D259:.I259])" table:style-name="ce6"/>
          <table:table-cell office:value-type="percentage" office:value="0" table:formula="of:=[.J259]/6" table:style-name="ce8">
            <text:p>0%</text:p>
          </table:table-cell>
          <table:table-cell table:style-name="ce1"/>
          <table:table-cell office:value-type="float" office:value="0" table:formula="of:=IF([.D259]=1;[.M258]+1;0)" table:style-name="ce1">
            <text:p>0</text:p>
          </table:table-cell>
          <table:table-cell office:value-type="float" office:value="0" table:formula="of:=IF([.E259]=1;[.N258]+1;0)" table:style-name="ce1">
            <text:p>0</text:p>
          </table:table-cell>
          <table:table-cell office:value-type="float" office:value="0" table:formula="of:=IF([.F259]=1;[.O258]+1;0)" table:style-name="ce1">
            <text:p>0</text:p>
          </table:table-cell>
          <table:table-cell office:value-type="float" office:value="0" table:formula="of:=IF([.G259]=1;[.P258]+1;0)" table:style-name="ce1">
            <text:p>0</text:p>
          </table:table-cell>
          <table:table-cell office:value-type="float" office:value="0" table:formula="of:=IF([.H259]=1;[.Q258]+1;0)" table:style-name="ce1">
            <text:p>0</text:p>
          </table:table-cell>
          <table:table-cell office:value-type="float" office:value="0" table:formula="of:=IF([.I259]=1;[.R25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4T00:00:00" table:formula="of:=[.A259]+1" table:style-name="ce10">
            <text:p>Mon, 14 Sep 2026</text:p>
          </table:table-cell>
          <table:table-cell office:value-type="string" office:string-value="Mon" table:formula="of:=TEXT([.A260];&quot;ddd&quot;)" table:style-name="ce5">
            <text:p>Mon</text:p>
          </table:table-cell>
          <table:table-cell office:value-type="string" office:string-value="Sep" table:formula="of:=TEXT([.A260];&quot;mmm&quot;)" table:style-name="ce5">
            <text:p>Sep</text:p>
          </table:table-cell>
          <table:table-cell office:value-type="float" office:value="0" table:formula="of:=IF(INDEX([Tracker.$A$1:.$AG$120];6+9*(MONTH([.$A260])-1)+(COLUMN()-4);DAY([.$A260])+2)&lt;&gt;&quot;&quot;;1;0)" table:style-name="ce92"/>
          <table:table-cell office:value-type="float" office:value="0" table:formula="of:=IF(INDEX([Tracker.$A$1:.$AG$120];6+9*(MONTH([.$A260])-1)+(COLUMN()-4);DAY([.$A260])+2)&lt;&gt;&quot;&quot;;1;0)" table:style-name="ce92"/>
          <table:table-cell office:value-type="float" office:value="0" table:formula="of:=IF(INDEX([Tracker.$A$1:.$AG$120];6+9*(MONTH([.$A260])-1)+(COLUMN()-4);DAY([.$A260])+2)&lt;&gt;&quot;&quot;;1;0)" table:style-name="ce92"/>
          <table:table-cell office:value-type="float" office:value="0" table:formula="of:=IF(INDEX([Tracker.$A$1:.$AG$120];6+9*(MONTH([.$A260])-1)+(COLUMN()-4);DAY([.$A260])+2)&lt;&gt;&quot;&quot;;1;0)" table:style-name="ce92"/>
          <table:table-cell office:value-type="float" office:value="0" table:formula="of:=IF(INDEX([Tracker.$A$1:.$AG$120];6+9*(MONTH([.$A260])-1)+(COLUMN()-4);DAY([.$A260])+2)&lt;&gt;&quot;&quot;;1;0)" table:style-name="ce92"/>
          <table:table-cell office:value-type="float" office:value="0" table:formula="of:=IF(INDEX([Tracker.$A$1:.$AG$120];6+9*(MONTH([.$A260])-1)+(COLUMN()-4);DAY([.$A260])+2)&lt;&gt;&quot;&quot;;1;0)" table:style-name="ce92"/>
          <table:table-cell office:value-type="float" office:value="0" table:formula="of:=SUM([.D260:.I260])" table:style-name="ce6"/>
          <table:table-cell office:value-type="percentage" office:value="0" table:formula="of:=[.J260]/6" table:style-name="ce8">
            <text:p>0%</text:p>
          </table:table-cell>
          <table:table-cell table:style-name="ce1"/>
          <table:table-cell office:value-type="float" office:value="0" table:formula="of:=IF([.D260]=1;[.M259]+1;0)" table:style-name="ce1">
            <text:p>0</text:p>
          </table:table-cell>
          <table:table-cell office:value-type="float" office:value="0" table:formula="of:=IF([.E260]=1;[.N259]+1;0)" table:style-name="ce1">
            <text:p>0</text:p>
          </table:table-cell>
          <table:table-cell office:value-type="float" office:value="0" table:formula="of:=IF([.F260]=1;[.O259]+1;0)" table:style-name="ce1">
            <text:p>0</text:p>
          </table:table-cell>
          <table:table-cell office:value-type="float" office:value="0" table:formula="of:=IF([.G260]=1;[.P259]+1;0)" table:style-name="ce1">
            <text:p>0</text:p>
          </table:table-cell>
          <table:table-cell office:value-type="float" office:value="0" table:formula="of:=IF([.H260]=1;[.Q259]+1;0)" table:style-name="ce1">
            <text:p>0</text:p>
          </table:table-cell>
          <table:table-cell office:value-type="float" office:value="0" table:formula="of:=IF([.I260]=1;[.R25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5T00:00:00" table:formula="of:=[.A260]+1" table:style-name="ce10">
            <text:p>Tue, 15 Sep 2026</text:p>
          </table:table-cell>
          <table:table-cell office:value-type="string" office:string-value="Tue" table:formula="of:=TEXT([.A261];&quot;ddd&quot;)" table:style-name="ce5">
            <text:p>Tue</text:p>
          </table:table-cell>
          <table:table-cell office:value-type="string" office:string-value="Sep" table:formula="of:=TEXT([.A261];&quot;mmm&quot;)" table:style-name="ce5">
            <text:p>Sep</text:p>
          </table:table-cell>
          <table:table-cell office:value-type="float" office:value="0" table:formula="of:=IF(INDEX([Tracker.$A$1:.$AG$120];6+9*(MONTH([.$A261])-1)+(COLUMN()-4);DAY([.$A261])+2)&lt;&gt;&quot;&quot;;1;0)" table:style-name="ce92"/>
          <table:table-cell office:value-type="float" office:value="0" table:formula="of:=IF(INDEX([Tracker.$A$1:.$AG$120];6+9*(MONTH([.$A261])-1)+(COLUMN()-4);DAY([.$A261])+2)&lt;&gt;&quot;&quot;;1;0)" table:style-name="ce92"/>
          <table:table-cell office:value-type="float" office:value="0" table:formula="of:=IF(INDEX([Tracker.$A$1:.$AG$120];6+9*(MONTH([.$A261])-1)+(COLUMN()-4);DAY([.$A261])+2)&lt;&gt;&quot;&quot;;1;0)" table:style-name="ce92"/>
          <table:table-cell office:value-type="float" office:value="0" table:formula="of:=IF(INDEX([Tracker.$A$1:.$AG$120];6+9*(MONTH([.$A261])-1)+(COLUMN()-4);DAY([.$A261])+2)&lt;&gt;&quot;&quot;;1;0)" table:style-name="ce92"/>
          <table:table-cell office:value-type="float" office:value="0" table:formula="of:=IF(INDEX([Tracker.$A$1:.$AG$120];6+9*(MONTH([.$A261])-1)+(COLUMN()-4);DAY([.$A261])+2)&lt;&gt;&quot;&quot;;1;0)" table:style-name="ce92"/>
          <table:table-cell office:value-type="float" office:value="0" table:formula="of:=IF(INDEX([Tracker.$A$1:.$AG$120];6+9*(MONTH([.$A261])-1)+(COLUMN()-4);DAY([.$A261])+2)&lt;&gt;&quot;&quot;;1;0)" table:style-name="ce92"/>
          <table:table-cell office:value-type="float" office:value="0" table:formula="of:=SUM([.D261:.I261])" table:style-name="ce6"/>
          <table:table-cell office:value-type="percentage" office:value="0" table:formula="of:=[.J261]/6" table:style-name="ce8">
            <text:p>0%</text:p>
          </table:table-cell>
          <table:table-cell table:style-name="ce1"/>
          <table:table-cell office:value-type="float" office:value="0" table:formula="of:=IF([.D261]=1;[.M260]+1;0)" table:style-name="ce1">
            <text:p>0</text:p>
          </table:table-cell>
          <table:table-cell office:value-type="float" office:value="0" table:formula="of:=IF([.E261]=1;[.N260]+1;0)" table:style-name="ce1">
            <text:p>0</text:p>
          </table:table-cell>
          <table:table-cell office:value-type="float" office:value="0" table:formula="of:=IF([.F261]=1;[.O260]+1;0)" table:style-name="ce1">
            <text:p>0</text:p>
          </table:table-cell>
          <table:table-cell office:value-type="float" office:value="0" table:formula="of:=IF([.G261]=1;[.P260]+1;0)" table:style-name="ce1">
            <text:p>0</text:p>
          </table:table-cell>
          <table:table-cell office:value-type="float" office:value="0" table:formula="of:=IF([.H261]=1;[.Q260]+1;0)" table:style-name="ce1">
            <text:p>0</text:p>
          </table:table-cell>
          <table:table-cell office:value-type="float" office:value="0" table:formula="of:=IF([.I261]=1;[.R26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6T00:00:00" table:formula="of:=[.A261]+1" table:style-name="ce10">
            <text:p>Wed, 16 Sep 2026</text:p>
          </table:table-cell>
          <table:table-cell office:value-type="string" office:string-value="Wed" table:formula="of:=TEXT([.A262];&quot;ddd&quot;)" table:style-name="ce5">
            <text:p>Wed</text:p>
          </table:table-cell>
          <table:table-cell office:value-type="string" office:string-value="Sep" table:formula="of:=TEXT([.A262];&quot;mmm&quot;)" table:style-name="ce5">
            <text:p>Sep</text:p>
          </table:table-cell>
          <table:table-cell office:value-type="float" office:value="0" table:formula="of:=IF(INDEX([Tracker.$A$1:.$AG$120];6+9*(MONTH([.$A262])-1)+(COLUMN()-4);DAY([.$A262])+2)&lt;&gt;&quot;&quot;;1;0)" table:style-name="ce92"/>
          <table:table-cell office:value-type="float" office:value="0" table:formula="of:=IF(INDEX([Tracker.$A$1:.$AG$120];6+9*(MONTH([.$A262])-1)+(COLUMN()-4);DAY([.$A262])+2)&lt;&gt;&quot;&quot;;1;0)" table:style-name="ce92"/>
          <table:table-cell office:value-type="float" office:value="0" table:formula="of:=IF(INDEX([Tracker.$A$1:.$AG$120];6+9*(MONTH([.$A262])-1)+(COLUMN()-4);DAY([.$A262])+2)&lt;&gt;&quot;&quot;;1;0)" table:style-name="ce92"/>
          <table:table-cell office:value-type="float" office:value="0" table:formula="of:=IF(INDEX([Tracker.$A$1:.$AG$120];6+9*(MONTH([.$A262])-1)+(COLUMN()-4);DAY([.$A262])+2)&lt;&gt;&quot;&quot;;1;0)" table:style-name="ce92"/>
          <table:table-cell office:value-type="float" office:value="0" table:formula="of:=IF(INDEX([Tracker.$A$1:.$AG$120];6+9*(MONTH([.$A262])-1)+(COLUMN()-4);DAY([.$A262])+2)&lt;&gt;&quot;&quot;;1;0)" table:style-name="ce92"/>
          <table:table-cell office:value-type="float" office:value="0" table:formula="of:=IF(INDEX([Tracker.$A$1:.$AG$120];6+9*(MONTH([.$A262])-1)+(COLUMN()-4);DAY([.$A262])+2)&lt;&gt;&quot;&quot;;1;0)" table:style-name="ce92"/>
          <table:table-cell office:value-type="float" office:value="0" table:formula="of:=SUM([.D262:.I262])" table:style-name="ce6"/>
          <table:table-cell office:value-type="percentage" office:value="0" table:formula="of:=[.J262]/6" table:style-name="ce8">
            <text:p>0%</text:p>
          </table:table-cell>
          <table:table-cell table:style-name="ce1"/>
          <table:table-cell office:value-type="float" office:value="0" table:formula="of:=IF([.D262]=1;[.M261]+1;0)" table:style-name="ce1">
            <text:p>0</text:p>
          </table:table-cell>
          <table:table-cell office:value-type="float" office:value="0" table:formula="of:=IF([.E262]=1;[.N261]+1;0)" table:style-name="ce1">
            <text:p>0</text:p>
          </table:table-cell>
          <table:table-cell office:value-type="float" office:value="0" table:formula="of:=IF([.F262]=1;[.O261]+1;0)" table:style-name="ce1">
            <text:p>0</text:p>
          </table:table-cell>
          <table:table-cell office:value-type="float" office:value="0" table:formula="of:=IF([.G262]=1;[.P261]+1;0)" table:style-name="ce1">
            <text:p>0</text:p>
          </table:table-cell>
          <table:table-cell office:value-type="float" office:value="0" table:formula="of:=IF([.H262]=1;[.Q261]+1;0)" table:style-name="ce1">
            <text:p>0</text:p>
          </table:table-cell>
          <table:table-cell office:value-type="float" office:value="0" table:formula="of:=IF([.I262]=1;[.R26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7T00:00:00" table:formula="of:=[.A262]+1" table:style-name="ce10">
            <text:p>Thu, 17 Sep 2026</text:p>
          </table:table-cell>
          <table:table-cell office:value-type="string" office:string-value="Thu" table:formula="of:=TEXT([.A263];&quot;ddd&quot;)" table:style-name="ce5">
            <text:p>Thu</text:p>
          </table:table-cell>
          <table:table-cell office:value-type="string" office:string-value="Sep" table:formula="of:=TEXT([.A263];&quot;mmm&quot;)" table:style-name="ce5">
            <text:p>Sep</text:p>
          </table:table-cell>
          <table:table-cell office:value-type="float" office:value="0" table:formula="of:=IF(INDEX([Tracker.$A$1:.$AG$120];6+9*(MONTH([.$A263])-1)+(COLUMN()-4);DAY([.$A263])+2)&lt;&gt;&quot;&quot;;1;0)" table:style-name="ce92"/>
          <table:table-cell office:value-type="float" office:value="0" table:formula="of:=IF(INDEX([Tracker.$A$1:.$AG$120];6+9*(MONTH([.$A263])-1)+(COLUMN()-4);DAY([.$A263])+2)&lt;&gt;&quot;&quot;;1;0)" table:style-name="ce92"/>
          <table:table-cell office:value-type="float" office:value="0" table:formula="of:=IF(INDEX([Tracker.$A$1:.$AG$120];6+9*(MONTH([.$A263])-1)+(COLUMN()-4);DAY([.$A263])+2)&lt;&gt;&quot;&quot;;1;0)" table:style-name="ce92"/>
          <table:table-cell office:value-type="float" office:value="0" table:formula="of:=IF(INDEX([Tracker.$A$1:.$AG$120];6+9*(MONTH([.$A263])-1)+(COLUMN()-4);DAY([.$A263])+2)&lt;&gt;&quot;&quot;;1;0)" table:style-name="ce92"/>
          <table:table-cell office:value-type="float" office:value="0" table:formula="of:=IF(INDEX([Tracker.$A$1:.$AG$120];6+9*(MONTH([.$A263])-1)+(COLUMN()-4);DAY([.$A263])+2)&lt;&gt;&quot;&quot;;1;0)" table:style-name="ce92"/>
          <table:table-cell office:value-type="float" office:value="0" table:formula="of:=IF(INDEX([Tracker.$A$1:.$AG$120];6+9*(MONTH([.$A263])-1)+(COLUMN()-4);DAY([.$A263])+2)&lt;&gt;&quot;&quot;;1;0)" table:style-name="ce92"/>
          <table:table-cell office:value-type="float" office:value="0" table:formula="of:=SUM([.D263:.I263])" table:style-name="ce6"/>
          <table:table-cell office:value-type="percentage" office:value="0" table:formula="of:=[.J263]/6" table:style-name="ce8">
            <text:p>0%</text:p>
          </table:table-cell>
          <table:table-cell table:style-name="ce1"/>
          <table:table-cell office:value-type="float" office:value="0" table:formula="of:=IF([.D263]=1;[.M262]+1;0)" table:style-name="ce1">
            <text:p>0</text:p>
          </table:table-cell>
          <table:table-cell office:value-type="float" office:value="0" table:formula="of:=IF([.E263]=1;[.N262]+1;0)" table:style-name="ce1">
            <text:p>0</text:p>
          </table:table-cell>
          <table:table-cell office:value-type="float" office:value="0" table:formula="of:=IF([.F263]=1;[.O262]+1;0)" table:style-name="ce1">
            <text:p>0</text:p>
          </table:table-cell>
          <table:table-cell office:value-type="float" office:value="0" table:formula="of:=IF([.G263]=1;[.P262]+1;0)" table:style-name="ce1">
            <text:p>0</text:p>
          </table:table-cell>
          <table:table-cell office:value-type="float" office:value="0" table:formula="of:=IF([.H263]=1;[.Q262]+1;0)" table:style-name="ce1">
            <text:p>0</text:p>
          </table:table-cell>
          <table:table-cell office:value-type="float" office:value="0" table:formula="of:=IF([.I263]=1;[.R26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8T00:00:00" table:formula="of:=[.A263]+1" table:style-name="ce10">
            <text:p>Fri, 18 Sep 2026</text:p>
          </table:table-cell>
          <table:table-cell office:value-type="string" office:string-value="Fri" table:formula="of:=TEXT([.A264];&quot;ddd&quot;)" table:style-name="ce5">
            <text:p>Fri</text:p>
          </table:table-cell>
          <table:table-cell office:value-type="string" office:string-value="Sep" table:formula="of:=TEXT([.A264];&quot;mmm&quot;)" table:style-name="ce5">
            <text:p>Sep</text:p>
          </table:table-cell>
          <table:table-cell office:value-type="float" office:value="0" table:formula="of:=IF(INDEX([Tracker.$A$1:.$AG$120];6+9*(MONTH([.$A264])-1)+(COLUMN()-4);DAY([.$A264])+2)&lt;&gt;&quot;&quot;;1;0)" table:style-name="ce92"/>
          <table:table-cell office:value-type="float" office:value="0" table:formula="of:=IF(INDEX([Tracker.$A$1:.$AG$120];6+9*(MONTH([.$A264])-1)+(COLUMN()-4);DAY([.$A264])+2)&lt;&gt;&quot;&quot;;1;0)" table:style-name="ce92"/>
          <table:table-cell office:value-type="float" office:value="0" table:formula="of:=IF(INDEX([Tracker.$A$1:.$AG$120];6+9*(MONTH([.$A264])-1)+(COLUMN()-4);DAY([.$A264])+2)&lt;&gt;&quot;&quot;;1;0)" table:style-name="ce92"/>
          <table:table-cell office:value-type="float" office:value="0" table:formula="of:=IF(INDEX([Tracker.$A$1:.$AG$120];6+9*(MONTH([.$A264])-1)+(COLUMN()-4);DAY([.$A264])+2)&lt;&gt;&quot;&quot;;1;0)" table:style-name="ce92"/>
          <table:table-cell office:value-type="float" office:value="0" table:formula="of:=IF(INDEX([Tracker.$A$1:.$AG$120];6+9*(MONTH([.$A264])-1)+(COLUMN()-4);DAY([.$A264])+2)&lt;&gt;&quot;&quot;;1;0)" table:style-name="ce92"/>
          <table:table-cell office:value-type="float" office:value="0" table:formula="of:=IF(INDEX([Tracker.$A$1:.$AG$120];6+9*(MONTH([.$A264])-1)+(COLUMN()-4);DAY([.$A264])+2)&lt;&gt;&quot;&quot;;1;0)" table:style-name="ce92"/>
          <table:table-cell office:value-type="float" office:value="0" table:formula="of:=SUM([.D264:.I264])" table:style-name="ce6"/>
          <table:table-cell office:value-type="percentage" office:value="0" table:formula="of:=[.J264]/6" table:style-name="ce8">
            <text:p>0%</text:p>
          </table:table-cell>
          <table:table-cell table:style-name="ce1"/>
          <table:table-cell office:value-type="float" office:value="0" table:formula="of:=IF([.D264]=1;[.M263]+1;0)" table:style-name="ce1">
            <text:p>0</text:p>
          </table:table-cell>
          <table:table-cell office:value-type="float" office:value="0" table:formula="of:=IF([.E264]=1;[.N263]+1;0)" table:style-name="ce1">
            <text:p>0</text:p>
          </table:table-cell>
          <table:table-cell office:value-type="float" office:value="0" table:formula="of:=IF([.F264]=1;[.O263]+1;0)" table:style-name="ce1">
            <text:p>0</text:p>
          </table:table-cell>
          <table:table-cell office:value-type="float" office:value="0" table:formula="of:=IF([.G264]=1;[.P263]+1;0)" table:style-name="ce1">
            <text:p>0</text:p>
          </table:table-cell>
          <table:table-cell office:value-type="float" office:value="0" table:formula="of:=IF([.H264]=1;[.Q263]+1;0)" table:style-name="ce1">
            <text:p>0</text:p>
          </table:table-cell>
          <table:table-cell office:value-type="float" office:value="0" table:formula="of:=IF([.I264]=1;[.R26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19T00:00:00" table:formula="of:=[.A264]+1" table:style-name="ce10">
            <text:p>Sat, 19 Sep 2026</text:p>
          </table:table-cell>
          <table:table-cell office:value-type="string" office:string-value="Sat" table:formula="of:=TEXT([.A265];&quot;ddd&quot;)" table:style-name="ce5">
            <text:p>Sat</text:p>
          </table:table-cell>
          <table:table-cell office:value-type="string" office:string-value="Sep" table:formula="of:=TEXT([.A265];&quot;mmm&quot;)" table:style-name="ce5">
            <text:p>Sep</text:p>
          </table:table-cell>
          <table:table-cell office:value-type="float" office:value="0" table:formula="of:=IF(INDEX([Tracker.$A$1:.$AG$120];6+9*(MONTH([.$A265])-1)+(COLUMN()-4);DAY([.$A265])+2)&lt;&gt;&quot;&quot;;1;0)" table:style-name="ce92"/>
          <table:table-cell office:value-type="float" office:value="0" table:formula="of:=IF(INDEX([Tracker.$A$1:.$AG$120];6+9*(MONTH([.$A265])-1)+(COLUMN()-4);DAY([.$A265])+2)&lt;&gt;&quot;&quot;;1;0)" table:style-name="ce92"/>
          <table:table-cell office:value-type="float" office:value="0" table:formula="of:=IF(INDEX([Tracker.$A$1:.$AG$120];6+9*(MONTH([.$A265])-1)+(COLUMN()-4);DAY([.$A265])+2)&lt;&gt;&quot;&quot;;1;0)" table:style-name="ce92"/>
          <table:table-cell office:value-type="float" office:value="0" table:formula="of:=IF(INDEX([Tracker.$A$1:.$AG$120];6+9*(MONTH([.$A265])-1)+(COLUMN()-4);DAY([.$A265])+2)&lt;&gt;&quot;&quot;;1;0)" table:style-name="ce92"/>
          <table:table-cell office:value-type="float" office:value="0" table:formula="of:=IF(INDEX([Tracker.$A$1:.$AG$120];6+9*(MONTH([.$A265])-1)+(COLUMN()-4);DAY([.$A265])+2)&lt;&gt;&quot;&quot;;1;0)" table:style-name="ce92"/>
          <table:table-cell office:value-type="float" office:value="0" table:formula="of:=IF(INDEX([Tracker.$A$1:.$AG$120];6+9*(MONTH([.$A265])-1)+(COLUMN()-4);DAY([.$A265])+2)&lt;&gt;&quot;&quot;;1;0)" table:style-name="ce92"/>
          <table:table-cell office:value-type="float" office:value="0" table:formula="of:=SUM([.D265:.I265])" table:style-name="ce6"/>
          <table:table-cell office:value-type="percentage" office:value="0" table:formula="of:=[.J265]/6" table:style-name="ce8">
            <text:p>0%</text:p>
          </table:table-cell>
          <table:table-cell table:style-name="ce1"/>
          <table:table-cell office:value-type="float" office:value="0" table:formula="of:=IF([.D265]=1;[.M264]+1;0)" table:style-name="ce1">
            <text:p>0</text:p>
          </table:table-cell>
          <table:table-cell office:value-type="float" office:value="0" table:formula="of:=IF([.E265]=1;[.N264]+1;0)" table:style-name="ce1">
            <text:p>0</text:p>
          </table:table-cell>
          <table:table-cell office:value-type="float" office:value="0" table:formula="of:=IF([.F265]=1;[.O264]+1;0)" table:style-name="ce1">
            <text:p>0</text:p>
          </table:table-cell>
          <table:table-cell office:value-type="float" office:value="0" table:formula="of:=IF([.G265]=1;[.P264]+1;0)" table:style-name="ce1">
            <text:p>0</text:p>
          </table:table-cell>
          <table:table-cell office:value-type="float" office:value="0" table:formula="of:=IF([.H265]=1;[.Q264]+1;0)" table:style-name="ce1">
            <text:p>0</text:p>
          </table:table-cell>
          <table:table-cell office:value-type="float" office:value="0" table:formula="of:=IF([.I265]=1;[.R26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0T00:00:00" table:formula="of:=[.A265]+1" table:style-name="ce10">
            <text:p>Sun, 20 Sep 2026</text:p>
          </table:table-cell>
          <table:table-cell office:value-type="string" office:string-value="Sun" table:formula="of:=TEXT([.A266];&quot;ddd&quot;)" table:style-name="ce5">
            <text:p>Sun</text:p>
          </table:table-cell>
          <table:table-cell office:value-type="string" office:string-value="Sep" table:formula="of:=TEXT([.A266];&quot;mmm&quot;)" table:style-name="ce5">
            <text:p>Sep</text:p>
          </table:table-cell>
          <table:table-cell office:value-type="float" office:value="0" table:formula="of:=IF(INDEX([Tracker.$A$1:.$AG$120];6+9*(MONTH([.$A266])-1)+(COLUMN()-4);DAY([.$A266])+2)&lt;&gt;&quot;&quot;;1;0)" table:style-name="ce92"/>
          <table:table-cell office:value-type="float" office:value="0" table:formula="of:=IF(INDEX([Tracker.$A$1:.$AG$120];6+9*(MONTH([.$A266])-1)+(COLUMN()-4);DAY([.$A266])+2)&lt;&gt;&quot;&quot;;1;0)" table:style-name="ce92"/>
          <table:table-cell office:value-type="float" office:value="0" table:formula="of:=IF(INDEX([Tracker.$A$1:.$AG$120];6+9*(MONTH([.$A266])-1)+(COLUMN()-4);DAY([.$A266])+2)&lt;&gt;&quot;&quot;;1;0)" table:style-name="ce92"/>
          <table:table-cell office:value-type="float" office:value="0" table:formula="of:=IF(INDEX([Tracker.$A$1:.$AG$120];6+9*(MONTH([.$A266])-1)+(COLUMN()-4);DAY([.$A266])+2)&lt;&gt;&quot;&quot;;1;0)" table:style-name="ce92"/>
          <table:table-cell office:value-type="float" office:value="0" table:formula="of:=IF(INDEX([Tracker.$A$1:.$AG$120];6+9*(MONTH([.$A266])-1)+(COLUMN()-4);DAY([.$A266])+2)&lt;&gt;&quot;&quot;;1;0)" table:style-name="ce92"/>
          <table:table-cell office:value-type="float" office:value="0" table:formula="of:=IF(INDEX([Tracker.$A$1:.$AG$120];6+9*(MONTH([.$A266])-1)+(COLUMN()-4);DAY([.$A266])+2)&lt;&gt;&quot;&quot;;1;0)" table:style-name="ce92"/>
          <table:table-cell office:value-type="float" office:value="0" table:formula="of:=SUM([.D266:.I266])" table:style-name="ce6"/>
          <table:table-cell office:value-type="percentage" office:value="0" table:formula="of:=[.J266]/6" table:style-name="ce8">
            <text:p>0%</text:p>
          </table:table-cell>
          <table:table-cell table:style-name="ce1"/>
          <table:table-cell office:value-type="float" office:value="0" table:formula="of:=IF([.D266]=1;[.M265]+1;0)" table:style-name="ce1">
            <text:p>0</text:p>
          </table:table-cell>
          <table:table-cell office:value-type="float" office:value="0" table:formula="of:=IF([.E266]=1;[.N265]+1;0)" table:style-name="ce1">
            <text:p>0</text:p>
          </table:table-cell>
          <table:table-cell office:value-type="float" office:value="0" table:formula="of:=IF([.F266]=1;[.O265]+1;0)" table:style-name="ce1">
            <text:p>0</text:p>
          </table:table-cell>
          <table:table-cell office:value-type="float" office:value="0" table:formula="of:=IF([.G266]=1;[.P265]+1;0)" table:style-name="ce1">
            <text:p>0</text:p>
          </table:table-cell>
          <table:table-cell office:value-type="float" office:value="0" table:formula="of:=IF([.H266]=1;[.Q265]+1;0)" table:style-name="ce1">
            <text:p>0</text:p>
          </table:table-cell>
          <table:table-cell office:value-type="float" office:value="0" table:formula="of:=IF([.I266]=1;[.R26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1T00:00:00" table:formula="of:=[.A266]+1" table:style-name="ce10">
            <text:p>Mon, 21 Sep 2026</text:p>
          </table:table-cell>
          <table:table-cell office:value-type="string" office:string-value="Mon" table:formula="of:=TEXT([.A267];&quot;ddd&quot;)" table:style-name="ce5">
            <text:p>Mon</text:p>
          </table:table-cell>
          <table:table-cell office:value-type="string" office:string-value="Sep" table:formula="of:=TEXT([.A267];&quot;mmm&quot;)" table:style-name="ce5">
            <text:p>Sep</text:p>
          </table:table-cell>
          <table:table-cell office:value-type="float" office:value="0" table:formula="of:=IF(INDEX([Tracker.$A$1:.$AG$120];6+9*(MONTH([.$A267])-1)+(COLUMN()-4);DAY([.$A267])+2)&lt;&gt;&quot;&quot;;1;0)" table:style-name="ce92"/>
          <table:table-cell office:value-type="float" office:value="0" table:formula="of:=IF(INDEX([Tracker.$A$1:.$AG$120];6+9*(MONTH([.$A267])-1)+(COLUMN()-4);DAY([.$A267])+2)&lt;&gt;&quot;&quot;;1;0)" table:style-name="ce92"/>
          <table:table-cell office:value-type="float" office:value="0" table:formula="of:=IF(INDEX([Tracker.$A$1:.$AG$120];6+9*(MONTH([.$A267])-1)+(COLUMN()-4);DAY([.$A267])+2)&lt;&gt;&quot;&quot;;1;0)" table:style-name="ce92"/>
          <table:table-cell office:value-type="float" office:value="0" table:formula="of:=IF(INDEX([Tracker.$A$1:.$AG$120];6+9*(MONTH([.$A267])-1)+(COLUMN()-4);DAY([.$A267])+2)&lt;&gt;&quot;&quot;;1;0)" table:style-name="ce92"/>
          <table:table-cell office:value-type="float" office:value="0" table:formula="of:=IF(INDEX([Tracker.$A$1:.$AG$120];6+9*(MONTH([.$A267])-1)+(COLUMN()-4);DAY([.$A267])+2)&lt;&gt;&quot;&quot;;1;0)" table:style-name="ce92"/>
          <table:table-cell office:value-type="float" office:value="0" table:formula="of:=IF(INDEX([Tracker.$A$1:.$AG$120];6+9*(MONTH([.$A267])-1)+(COLUMN()-4);DAY([.$A267])+2)&lt;&gt;&quot;&quot;;1;0)" table:style-name="ce92"/>
          <table:table-cell office:value-type="float" office:value="0" table:formula="of:=SUM([.D267:.I267])" table:style-name="ce6"/>
          <table:table-cell office:value-type="percentage" office:value="0" table:formula="of:=[.J267]/6" table:style-name="ce8">
            <text:p>0%</text:p>
          </table:table-cell>
          <table:table-cell table:style-name="ce1"/>
          <table:table-cell office:value-type="float" office:value="0" table:formula="of:=IF([.D267]=1;[.M266]+1;0)" table:style-name="ce1">
            <text:p>0</text:p>
          </table:table-cell>
          <table:table-cell office:value-type="float" office:value="0" table:formula="of:=IF([.E267]=1;[.N266]+1;0)" table:style-name="ce1">
            <text:p>0</text:p>
          </table:table-cell>
          <table:table-cell office:value-type="float" office:value="0" table:formula="of:=IF([.F267]=1;[.O266]+1;0)" table:style-name="ce1">
            <text:p>0</text:p>
          </table:table-cell>
          <table:table-cell office:value-type="float" office:value="0" table:formula="of:=IF([.G267]=1;[.P266]+1;0)" table:style-name="ce1">
            <text:p>0</text:p>
          </table:table-cell>
          <table:table-cell office:value-type="float" office:value="0" table:formula="of:=IF([.H267]=1;[.Q266]+1;0)" table:style-name="ce1">
            <text:p>0</text:p>
          </table:table-cell>
          <table:table-cell office:value-type="float" office:value="0" table:formula="of:=IF([.I267]=1;[.R26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2T00:00:00" table:formula="of:=[.A267]+1" table:style-name="ce10">
            <text:p>Tue, 22 Sep 2026</text:p>
          </table:table-cell>
          <table:table-cell office:value-type="string" office:string-value="Tue" table:formula="of:=TEXT([.A268];&quot;ddd&quot;)" table:style-name="ce5">
            <text:p>Tue</text:p>
          </table:table-cell>
          <table:table-cell office:value-type="string" office:string-value="Sep" table:formula="of:=TEXT([.A268];&quot;mmm&quot;)" table:style-name="ce5">
            <text:p>Sep</text:p>
          </table:table-cell>
          <table:table-cell office:value-type="float" office:value="0" table:formula="of:=IF(INDEX([Tracker.$A$1:.$AG$120];6+9*(MONTH([.$A268])-1)+(COLUMN()-4);DAY([.$A268])+2)&lt;&gt;&quot;&quot;;1;0)" table:style-name="ce92"/>
          <table:table-cell office:value-type="float" office:value="0" table:formula="of:=IF(INDEX([Tracker.$A$1:.$AG$120];6+9*(MONTH([.$A268])-1)+(COLUMN()-4);DAY([.$A268])+2)&lt;&gt;&quot;&quot;;1;0)" table:style-name="ce92"/>
          <table:table-cell office:value-type="float" office:value="0" table:formula="of:=IF(INDEX([Tracker.$A$1:.$AG$120];6+9*(MONTH([.$A268])-1)+(COLUMN()-4);DAY([.$A268])+2)&lt;&gt;&quot;&quot;;1;0)" table:style-name="ce92"/>
          <table:table-cell office:value-type="float" office:value="0" table:formula="of:=IF(INDEX([Tracker.$A$1:.$AG$120];6+9*(MONTH([.$A268])-1)+(COLUMN()-4);DAY([.$A268])+2)&lt;&gt;&quot;&quot;;1;0)" table:style-name="ce92"/>
          <table:table-cell office:value-type="float" office:value="0" table:formula="of:=IF(INDEX([Tracker.$A$1:.$AG$120];6+9*(MONTH([.$A268])-1)+(COLUMN()-4);DAY([.$A268])+2)&lt;&gt;&quot;&quot;;1;0)" table:style-name="ce92"/>
          <table:table-cell office:value-type="float" office:value="0" table:formula="of:=IF(INDEX([Tracker.$A$1:.$AG$120];6+9*(MONTH([.$A268])-1)+(COLUMN()-4);DAY([.$A268])+2)&lt;&gt;&quot;&quot;;1;0)" table:style-name="ce92"/>
          <table:table-cell office:value-type="float" office:value="0" table:formula="of:=SUM([.D268:.I268])" table:style-name="ce6"/>
          <table:table-cell office:value-type="percentage" office:value="0" table:formula="of:=[.J268]/6" table:style-name="ce8">
            <text:p>0%</text:p>
          </table:table-cell>
          <table:table-cell table:style-name="ce1"/>
          <table:table-cell office:value-type="float" office:value="0" table:formula="of:=IF([.D268]=1;[.M267]+1;0)" table:style-name="ce1">
            <text:p>0</text:p>
          </table:table-cell>
          <table:table-cell office:value-type="float" office:value="0" table:formula="of:=IF([.E268]=1;[.N267]+1;0)" table:style-name="ce1">
            <text:p>0</text:p>
          </table:table-cell>
          <table:table-cell office:value-type="float" office:value="0" table:formula="of:=IF([.F268]=1;[.O267]+1;0)" table:style-name="ce1">
            <text:p>0</text:p>
          </table:table-cell>
          <table:table-cell office:value-type="float" office:value="0" table:formula="of:=IF([.G268]=1;[.P267]+1;0)" table:style-name="ce1">
            <text:p>0</text:p>
          </table:table-cell>
          <table:table-cell office:value-type="float" office:value="0" table:formula="of:=IF([.H268]=1;[.Q267]+1;0)" table:style-name="ce1">
            <text:p>0</text:p>
          </table:table-cell>
          <table:table-cell office:value-type="float" office:value="0" table:formula="of:=IF([.I268]=1;[.R26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3T00:00:00" table:formula="of:=[.A268]+1" table:style-name="ce10">
            <text:p>Wed, 23 Sep 2026</text:p>
          </table:table-cell>
          <table:table-cell office:value-type="string" office:string-value="Wed" table:formula="of:=TEXT([.A269];&quot;ddd&quot;)" table:style-name="ce5">
            <text:p>Wed</text:p>
          </table:table-cell>
          <table:table-cell office:value-type="string" office:string-value="Sep" table:formula="of:=TEXT([.A269];&quot;mmm&quot;)" table:style-name="ce5">
            <text:p>Sep</text:p>
          </table:table-cell>
          <table:table-cell office:value-type="float" office:value="0" table:formula="of:=IF(INDEX([Tracker.$A$1:.$AG$120];6+9*(MONTH([.$A269])-1)+(COLUMN()-4);DAY([.$A269])+2)&lt;&gt;&quot;&quot;;1;0)" table:style-name="ce92"/>
          <table:table-cell office:value-type="float" office:value="0" table:formula="of:=IF(INDEX([Tracker.$A$1:.$AG$120];6+9*(MONTH([.$A269])-1)+(COLUMN()-4);DAY([.$A269])+2)&lt;&gt;&quot;&quot;;1;0)" table:style-name="ce92"/>
          <table:table-cell office:value-type="float" office:value="0" table:formula="of:=IF(INDEX([Tracker.$A$1:.$AG$120];6+9*(MONTH([.$A269])-1)+(COLUMN()-4);DAY([.$A269])+2)&lt;&gt;&quot;&quot;;1;0)" table:style-name="ce92"/>
          <table:table-cell office:value-type="float" office:value="0" table:formula="of:=IF(INDEX([Tracker.$A$1:.$AG$120];6+9*(MONTH([.$A269])-1)+(COLUMN()-4);DAY([.$A269])+2)&lt;&gt;&quot;&quot;;1;0)" table:style-name="ce92"/>
          <table:table-cell office:value-type="float" office:value="0" table:formula="of:=IF(INDEX([Tracker.$A$1:.$AG$120];6+9*(MONTH([.$A269])-1)+(COLUMN()-4);DAY([.$A269])+2)&lt;&gt;&quot;&quot;;1;0)" table:style-name="ce92"/>
          <table:table-cell office:value-type="float" office:value="0" table:formula="of:=IF(INDEX([Tracker.$A$1:.$AG$120];6+9*(MONTH([.$A269])-1)+(COLUMN()-4);DAY([.$A269])+2)&lt;&gt;&quot;&quot;;1;0)" table:style-name="ce92"/>
          <table:table-cell office:value-type="float" office:value="0" table:formula="of:=SUM([.D269:.I269])" table:style-name="ce6"/>
          <table:table-cell office:value-type="percentage" office:value="0" table:formula="of:=[.J269]/6" table:style-name="ce8">
            <text:p>0%</text:p>
          </table:table-cell>
          <table:table-cell table:style-name="ce1"/>
          <table:table-cell office:value-type="float" office:value="0" table:formula="of:=IF([.D269]=1;[.M268]+1;0)" table:style-name="ce1">
            <text:p>0</text:p>
          </table:table-cell>
          <table:table-cell office:value-type="float" office:value="0" table:formula="of:=IF([.E269]=1;[.N268]+1;0)" table:style-name="ce1">
            <text:p>0</text:p>
          </table:table-cell>
          <table:table-cell office:value-type="float" office:value="0" table:formula="of:=IF([.F269]=1;[.O268]+1;0)" table:style-name="ce1">
            <text:p>0</text:p>
          </table:table-cell>
          <table:table-cell office:value-type="float" office:value="0" table:formula="of:=IF([.G269]=1;[.P268]+1;0)" table:style-name="ce1">
            <text:p>0</text:p>
          </table:table-cell>
          <table:table-cell office:value-type="float" office:value="0" table:formula="of:=IF([.H269]=1;[.Q268]+1;0)" table:style-name="ce1">
            <text:p>0</text:p>
          </table:table-cell>
          <table:table-cell office:value-type="float" office:value="0" table:formula="of:=IF([.I269]=1;[.R26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4T00:00:00" table:formula="of:=[.A269]+1" table:style-name="ce10">
            <text:p>Thu, 24 Sep 2026</text:p>
          </table:table-cell>
          <table:table-cell office:value-type="string" office:string-value="Thu" table:formula="of:=TEXT([.A270];&quot;ddd&quot;)" table:style-name="ce5">
            <text:p>Thu</text:p>
          </table:table-cell>
          <table:table-cell office:value-type="string" office:string-value="Sep" table:formula="of:=TEXT([.A270];&quot;mmm&quot;)" table:style-name="ce5">
            <text:p>Sep</text:p>
          </table:table-cell>
          <table:table-cell office:value-type="float" office:value="0" table:formula="of:=IF(INDEX([Tracker.$A$1:.$AG$120];6+9*(MONTH([.$A270])-1)+(COLUMN()-4);DAY([.$A270])+2)&lt;&gt;&quot;&quot;;1;0)" table:style-name="ce92"/>
          <table:table-cell office:value-type="float" office:value="0" table:formula="of:=IF(INDEX([Tracker.$A$1:.$AG$120];6+9*(MONTH([.$A270])-1)+(COLUMN()-4);DAY([.$A270])+2)&lt;&gt;&quot;&quot;;1;0)" table:style-name="ce92"/>
          <table:table-cell office:value-type="float" office:value="0" table:formula="of:=IF(INDEX([Tracker.$A$1:.$AG$120];6+9*(MONTH([.$A270])-1)+(COLUMN()-4);DAY([.$A270])+2)&lt;&gt;&quot;&quot;;1;0)" table:style-name="ce92"/>
          <table:table-cell office:value-type="float" office:value="0" table:formula="of:=IF(INDEX([Tracker.$A$1:.$AG$120];6+9*(MONTH([.$A270])-1)+(COLUMN()-4);DAY([.$A270])+2)&lt;&gt;&quot;&quot;;1;0)" table:style-name="ce92"/>
          <table:table-cell office:value-type="float" office:value="0" table:formula="of:=IF(INDEX([Tracker.$A$1:.$AG$120];6+9*(MONTH([.$A270])-1)+(COLUMN()-4);DAY([.$A270])+2)&lt;&gt;&quot;&quot;;1;0)" table:style-name="ce92"/>
          <table:table-cell office:value-type="float" office:value="0" table:formula="of:=IF(INDEX([Tracker.$A$1:.$AG$120];6+9*(MONTH([.$A270])-1)+(COLUMN()-4);DAY([.$A270])+2)&lt;&gt;&quot;&quot;;1;0)" table:style-name="ce92"/>
          <table:table-cell office:value-type="float" office:value="0" table:formula="of:=SUM([.D270:.I270])" table:style-name="ce6"/>
          <table:table-cell office:value-type="percentage" office:value="0" table:formula="of:=[.J270]/6" table:style-name="ce8">
            <text:p>0%</text:p>
          </table:table-cell>
          <table:table-cell table:style-name="ce1"/>
          <table:table-cell office:value-type="float" office:value="0" table:formula="of:=IF([.D270]=1;[.M269]+1;0)" table:style-name="ce1">
            <text:p>0</text:p>
          </table:table-cell>
          <table:table-cell office:value-type="float" office:value="0" table:formula="of:=IF([.E270]=1;[.N269]+1;0)" table:style-name="ce1">
            <text:p>0</text:p>
          </table:table-cell>
          <table:table-cell office:value-type="float" office:value="0" table:formula="of:=IF([.F270]=1;[.O269]+1;0)" table:style-name="ce1">
            <text:p>0</text:p>
          </table:table-cell>
          <table:table-cell office:value-type="float" office:value="0" table:formula="of:=IF([.G270]=1;[.P269]+1;0)" table:style-name="ce1">
            <text:p>0</text:p>
          </table:table-cell>
          <table:table-cell office:value-type="float" office:value="0" table:formula="of:=IF([.H270]=1;[.Q269]+1;0)" table:style-name="ce1">
            <text:p>0</text:p>
          </table:table-cell>
          <table:table-cell office:value-type="float" office:value="0" table:formula="of:=IF([.I270]=1;[.R26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5T00:00:00" table:formula="of:=[.A270]+1" table:style-name="ce10">
            <text:p>Fri, 25 Sep 2026</text:p>
          </table:table-cell>
          <table:table-cell office:value-type="string" office:string-value="Fri" table:formula="of:=TEXT([.A271];&quot;ddd&quot;)" table:style-name="ce5">
            <text:p>Fri</text:p>
          </table:table-cell>
          <table:table-cell office:value-type="string" office:string-value="Sep" table:formula="of:=TEXT([.A271];&quot;mmm&quot;)" table:style-name="ce5">
            <text:p>Sep</text:p>
          </table:table-cell>
          <table:table-cell office:value-type="float" office:value="0" table:formula="of:=IF(INDEX([Tracker.$A$1:.$AG$120];6+9*(MONTH([.$A271])-1)+(COLUMN()-4);DAY([.$A271])+2)&lt;&gt;&quot;&quot;;1;0)" table:style-name="ce92"/>
          <table:table-cell office:value-type="float" office:value="0" table:formula="of:=IF(INDEX([Tracker.$A$1:.$AG$120];6+9*(MONTH([.$A271])-1)+(COLUMN()-4);DAY([.$A271])+2)&lt;&gt;&quot;&quot;;1;0)" table:style-name="ce92"/>
          <table:table-cell office:value-type="float" office:value="0" table:formula="of:=IF(INDEX([Tracker.$A$1:.$AG$120];6+9*(MONTH([.$A271])-1)+(COLUMN()-4);DAY([.$A271])+2)&lt;&gt;&quot;&quot;;1;0)" table:style-name="ce92"/>
          <table:table-cell office:value-type="float" office:value="0" table:formula="of:=IF(INDEX([Tracker.$A$1:.$AG$120];6+9*(MONTH([.$A271])-1)+(COLUMN()-4);DAY([.$A271])+2)&lt;&gt;&quot;&quot;;1;0)" table:style-name="ce92"/>
          <table:table-cell office:value-type="float" office:value="0" table:formula="of:=IF(INDEX([Tracker.$A$1:.$AG$120];6+9*(MONTH([.$A271])-1)+(COLUMN()-4);DAY([.$A271])+2)&lt;&gt;&quot;&quot;;1;0)" table:style-name="ce92"/>
          <table:table-cell office:value-type="float" office:value="0" table:formula="of:=IF(INDEX([Tracker.$A$1:.$AG$120];6+9*(MONTH([.$A271])-1)+(COLUMN()-4);DAY([.$A271])+2)&lt;&gt;&quot;&quot;;1;0)" table:style-name="ce92"/>
          <table:table-cell office:value-type="float" office:value="0" table:formula="of:=SUM([.D271:.I271])" table:style-name="ce6"/>
          <table:table-cell office:value-type="percentage" office:value="0" table:formula="of:=[.J271]/6" table:style-name="ce8">
            <text:p>0%</text:p>
          </table:table-cell>
          <table:table-cell table:style-name="ce1"/>
          <table:table-cell office:value-type="float" office:value="0" table:formula="of:=IF([.D271]=1;[.M270]+1;0)" table:style-name="ce1">
            <text:p>0</text:p>
          </table:table-cell>
          <table:table-cell office:value-type="float" office:value="0" table:formula="of:=IF([.E271]=1;[.N270]+1;0)" table:style-name="ce1">
            <text:p>0</text:p>
          </table:table-cell>
          <table:table-cell office:value-type="float" office:value="0" table:formula="of:=IF([.F271]=1;[.O270]+1;0)" table:style-name="ce1">
            <text:p>0</text:p>
          </table:table-cell>
          <table:table-cell office:value-type="float" office:value="0" table:formula="of:=IF([.G271]=1;[.P270]+1;0)" table:style-name="ce1">
            <text:p>0</text:p>
          </table:table-cell>
          <table:table-cell office:value-type="float" office:value="0" table:formula="of:=IF([.H271]=1;[.Q270]+1;0)" table:style-name="ce1">
            <text:p>0</text:p>
          </table:table-cell>
          <table:table-cell office:value-type="float" office:value="0" table:formula="of:=IF([.I271]=1;[.R27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6T00:00:00" table:formula="of:=[.A271]+1" table:style-name="ce10">
            <text:p>Sat, 26 Sep 2026</text:p>
          </table:table-cell>
          <table:table-cell office:value-type="string" office:string-value="Sat" table:formula="of:=TEXT([.A272];&quot;ddd&quot;)" table:style-name="ce5">
            <text:p>Sat</text:p>
          </table:table-cell>
          <table:table-cell office:value-type="string" office:string-value="Sep" table:formula="of:=TEXT([.A272];&quot;mmm&quot;)" table:style-name="ce5">
            <text:p>Sep</text:p>
          </table:table-cell>
          <table:table-cell office:value-type="float" office:value="0" table:formula="of:=IF(INDEX([Tracker.$A$1:.$AG$120];6+9*(MONTH([.$A272])-1)+(COLUMN()-4);DAY([.$A272])+2)&lt;&gt;&quot;&quot;;1;0)" table:style-name="ce92"/>
          <table:table-cell office:value-type="float" office:value="0" table:formula="of:=IF(INDEX([Tracker.$A$1:.$AG$120];6+9*(MONTH([.$A272])-1)+(COLUMN()-4);DAY([.$A272])+2)&lt;&gt;&quot;&quot;;1;0)" table:style-name="ce92"/>
          <table:table-cell office:value-type="float" office:value="0" table:formula="of:=IF(INDEX([Tracker.$A$1:.$AG$120];6+9*(MONTH([.$A272])-1)+(COLUMN()-4);DAY([.$A272])+2)&lt;&gt;&quot;&quot;;1;0)" table:style-name="ce92"/>
          <table:table-cell office:value-type="float" office:value="0" table:formula="of:=IF(INDEX([Tracker.$A$1:.$AG$120];6+9*(MONTH([.$A272])-1)+(COLUMN()-4);DAY([.$A272])+2)&lt;&gt;&quot;&quot;;1;0)" table:style-name="ce92"/>
          <table:table-cell office:value-type="float" office:value="0" table:formula="of:=IF(INDEX([Tracker.$A$1:.$AG$120];6+9*(MONTH([.$A272])-1)+(COLUMN()-4);DAY([.$A272])+2)&lt;&gt;&quot;&quot;;1;0)" table:style-name="ce92"/>
          <table:table-cell office:value-type="float" office:value="0" table:formula="of:=IF(INDEX([Tracker.$A$1:.$AG$120];6+9*(MONTH([.$A272])-1)+(COLUMN()-4);DAY([.$A272])+2)&lt;&gt;&quot;&quot;;1;0)" table:style-name="ce92"/>
          <table:table-cell office:value-type="float" office:value="0" table:formula="of:=SUM([.D272:.I272])" table:style-name="ce6"/>
          <table:table-cell office:value-type="percentage" office:value="0" table:formula="of:=[.J272]/6" table:style-name="ce8">
            <text:p>0%</text:p>
          </table:table-cell>
          <table:table-cell table:style-name="ce1"/>
          <table:table-cell office:value-type="float" office:value="0" table:formula="of:=IF([.D272]=1;[.M271]+1;0)" table:style-name="ce1">
            <text:p>0</text:p>
          </table:table-cell>
          <table:table-cell office:value-type="float" office:value="0" table:formula="of:=IF([.E272]=1;[.N271]+1;0)" table:style-name="ce1">
            <text:p>0</text:p>
          </table:table-cell>
          <table:table-cell office:value-type="float" office:value="0" table:formula="of:=IF([.F272]=1;[.O271]+1;0)" table:style-name="ce1">
            <text:p>0</text:p>
          </table:table-cell>
          <table:table-cell office:value-type="float" office:value="0" table:formula="of:=IF([.G272]=1;[.P271]+1;0)" table:style-name="ce1">
            <text:p>0</text:p>
          </table:table-cell>
          <table:table-cell office:value-type="float" office:value="0" table:formula="of:=IF([.H272]=1;[.Q271]+1;0)" table:style-name="ce1">
            <text:p>0</text:p>
          </table:table-cell>
          <table:table-cell office:value-type="float" office:value="0" table:formula="of:=IF([.I272]=1;[.R27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7T00:00:00" table:formula="of:=[.A272]+1" table:style-name="ce10">
            <text:p>Sun, 27 Sep 2026</text:p>
          </table:table-cell>
          <table:table-cell office:value-type="string" office:string-value="Sun" table:formula="of:=TEXT([.A273];&quot;ddd&quot;)" table:style-name="ce5">
            <text:p>Sun</text:p>
          </table:table-cell>
          <table:table-cell office:value-type="string" office:string-value="Sep" table:formula="of:=TEXT([.A273];&quot;mmm&quot;)" table:style-name="ce5">
            <text:p>Sep</text:p>
          </table:table-cell>
          <table:table-cell office:value-type="float" office:value="0" table:formula="of:=IF(INDEX([Tracker.$A$1:.$AG$120];6+9*(MONTH([.$A273])-1)+(COLUMN()-4);DAY([.$A273])+2)&lt;&gt;&quot;&quot;;1;0)" table:style-name="ce92"/>
          <table:table-cell office:value-type="float" office:value="0" table:formula="of:=IF(INDEX([Tracker.$A$1:.$AG$120];6+9*(MONTH([.$A273])-1)+(COLUMN()-4);DAY([.$A273])+2)&lt;&gt;&quot;&quot;;1;0)" table:style-name="ce92"/>
          <table:table-cell office:value-type="float" office:value="0" table:formula="of:=IF(INDEX([Tracker.$A$1:.$AG$120];6+9*(MONTH([.$A273])-1)+(COLUMN()-4);DAY([.$A273])+2)&lt;&gt;&quot;&quot;;1;0)" table:style-name="ce92"/>
          <table:table-cell office:value-type="float" office:value="0" table:formula="of:=IF(INDEX([Tracker.$A$1:.$AG$120];6+9*(MONTH([.$A273])-1)+(COLUMN()-4);DAY([.$A273])+2)&lt;&gt;&quot;&quot;;1;0)" table:style-name="ce92"/>
          <table:table-cell office:value-type="float" office:value="0" table:formula="of:=IF(INDEX([Tracker.$A$1:.$AG$120];6+9*(MONTH([.$A273])-1)+(COLUMN()-4);DAY([.$A273])+2)&lt;&gt;&quot;&quot;;1;0)" table:style-name="ce92"/>
          <table:table-cell office:value-type="float" office:value="0" table:formula="of:=IF(INDEX([Tracker.$A$1:.$AG$120];6+9*(MONTH([.$A273])-1)+(COLUMN()-4);DAY([.$A273])+2)&lt;&gt;&quot;&quot;;1;0)" table:style-name="ce92"/>
          <table:table-cell office:value-type="float" office:value="0" table:formula="of:=SUM([.D273:.I273])" table:style-name="ce6"/>
          <table:table-cell office:value-type="percentage" office:value="0" table:formula="of:=[.J273]/6" table:style-name="ce8">
            <text:p>0%</text:p>
          </table:table-cell>
          <table:table-cell table:style-name="ce1"/>
          <table:table-cell office:value-type="float" office:value="0" table:formula="of:=IF([.D273]=1;[.M272]+1;0)" table:style-name="ce1">
            <text:p>0</text:p>
          </table:table-cell>
          <table:table-cell office:value-type="float" office:value="0" table:formula="of:=IF([.E273]=1;[.N272]+1;0)" table:style-name="ce1">
            <text:p>0</text:p>
          </table:table-cell>
          <table:table-cell office:value-type="float" office:value="0" table:formula="of:=IF([.F273]=1;[.O272]+1;0)" table:style-name="ce1">
            <text:p>0</text:p>
          </table:table-cell>
          <table:table-cell office:value-type="float" office:value="0" table:formula="of:=IF([.G273]=1;[.P272]+1;0)" table:style-name="ce1">
            <text:p>0</text:p>
          </table:table-cell>
          <table:table-cell office:value-type="float" office:value="0" table:formula="of:=IF([.H273]=1;[.Q272]+1;0)" table:style-name="ce1">
            <text:p>0</text:p>
          </table:table-cell>
          <table:table-cell office:value-type="float" office:value="0" table:formula="of:=IF([.I273]=1;[.R27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8T00:00:00" table:formula="of:=[.A273]+1" table:style-name="ce10">
            <text:p>Mon, 28 Sep 2026</text:p>
          </table:table-cell>
          <table:table-cell office:value-type="string" office:string-value="Mon" table:formula="of:=TEXT([.A274];&quot;ddd&quot;)" table:style-name="ce5">
            <text:p>Mon</text:p>
          </table:table-cell>
          <table:table-cell office:value-type="string" office:string-value="Sep" table:formula="of:=TEXT([.A274];&quot;mmm&quot;)" table:style-name="ce5">
            <text:p>Sep</text:p>
          </table:table-cell>
          <table:table-cell office:value-type="float" office:value="0" table:formula="of:=IF(INDEX([Tracker.$A$1:.$AG$120];6+9*(MONTH([.$A274])-1)+(COLUMN()-4);DAY([.$A274])+2)&lt;&gt;&quot;&quot;;1;0)" table:style-name="ce92"/>
          <table:table-cell office:value-type="float" office:value="0" table:formula="of:=IF(INDEX([Tracker.$A$1:.$AG$120];6+9*(MONTH([.$A274])-1)+(COLUMN()-4);DAY([.$A274])+2)&lt;&gt;&quot;&quot;;1;0)" table:style-name="ce92"/>
          <table:table-cell office:value-type="float" office:value="0" table:formula="of:=IF(INDEX([Tracker.$A$1:.$AG$120];6+9*(MONTH([.$A274])-1)+(COLUMN()-4);DAY([.$A274])+2)&lt;&gt;&quot;&quot;;1;0)" table:style-name="ce92"/>
          <table:table-cell office:value-type="float" office:value="0" table:formula="of:=IF(INDEX([Tracker.$A$1:.$AG$120];6+9*(MONTH([.$A274])-1)+(COLUMN()-4);DAY([.$A274])+2)&lt;&gt;&quot;&quot;;1;0)" table:style-name="ce92"/>
          <table:table-cell office:value-type="float" office:value="0" table:formula="of:=IF(INDEX([Tracker.$A$1:.$AG$120];6+9*(MONTH([.$A274])-1)+(COLUMN()-4);DAY([.$A274])+2)&lt;&gt;&quot;&quot;;1;0)" table:style-name="ce92"/>
          <table:table-cell office:value-type="float" office:value="0" table:formula="of:=IF(INDEX([Tracker.$A$1:.$AG$120];6+9*(MONTH([.$A274])-1)+(COLUMN()-4);DAY([.$A274])+2)&lt;&gt;&quot;&quot;;1;0)" table:style-name="ce92"/>
          <table:table-cell office:value-type="float" office:value="0" table:formula="of:=SUM([.D274:.I274])" table:style-name="ce6"/>
          <table:table-cell office:value-type="percentage" office:value="0" table:formula="of:=[.J274]/6" table:style-name="ce8">
            <text:p>0%</text:p>
          </table:table-cell>
          <table:table-cell table:style-name="ce1"/>
          <table:table-cell office:value-type="float" office:value="0" table:formula="of:=IF([.D274]=1;[.M273]+1;0)" table:style-name="ce1">
            <text:p>0</text:p>
          </table:table-cell>
          <table:table-cell office:value-type="float" office:value="0" table:formula="of:=IF([.E274]=1;[.N273]+1;0)" table:style-name="ce1">
            <text:p>0</text:p>
          </table:table-cell>
          <table:table-cell office:value-type="float" office:value="0" table:formula="of:=IF([.F274]=1;[.O273]+1;0)" table:style-name="ce1">
            <text:p>0</text:p>
          </table:table-cell>
          <table:table-cell office:value-type="float" office:value="0" table:formula="of:=IF([.G274]=1;[.P273]+1;0)" table:style-name="ce1">
            <text:p>0</text:p>
          </table:table-cell>
          <table:table-cell office:value-type="float" office:value="0" table:formula="of:=IF([.H274]=1;[.Q273]+1;0)" table:style-name="ce1">
            <text:p>0</text:p>
          </table:table-cell>
          <table:table-cell office:value-type="float" office:value="0" table:formula="of:=IF([.I274]=1;[.R27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29T00:00:00" table:formula="of:=[.A274]+1" table:style-name="ce10">
            <text:p>Tue, 29 Sep 2026</text:p>
          </table:table-cell>
          <table:table-cell office:value-type="string" office:string-value="Tue" table:formula="of:=TEXT([.A275];&quot;ddd&quot;)" table:style-name="ce5">
            <text:p>Tue</text:p>
          </table:table-cell>
          <table:table-cell office:value-type="string" office:string-value="Sep" table:formula="of:=TEXT([.A275];&quot;mmm&quot;)" table:style-name="ce5">
            <text:p>Sep</text:p>
          </table:table-cell>
          <table:table-cell office:value-type="float" office:value="0" table:formula="of:=IF(INDEX([Tracker.$A$1:.$AG$120];6+9*(MONTH([.$A275])-1)+(COLUMN()-4);DAY([.$A275])+2)&lt;&gt;&quot;&quot;;1;0)" table:style-name="ce92"/>
          <table:table-cell office:value-type="float" office:value="0" table:formula="of:=IF(INDEX([Tracker.$A$1:.$AG$120];6+9*(MONTH([.$A275])-1)+(COLUMN()-4);DAY([.$A275])+2)&lt;&gt;&quot;&quot;;1;0)" table:style-name="ce92"/>
          <table:table-cell office:value-type="float" office:value="0" table:formula="of:=IF(INDEX([Tracker.$A$1:.$AG$120];6+9*(MONTH([.$A275])-1)+(COLUMN()-4);DAY([.$A275])+2)&lt;&gt;&quot;&quot;;1;0)" table:style-name="ce92"/>
          <table:table-cell office:value-type="float" office:value="0" table:formula="of:=IF(INDEX([Tracker.$A$1:.$AG$120];6+9*(MONTH([.$A275])-1)+(COLUMN()-4);DAY([.$A275])+2)&lt;&gt;&quot;&quot;;1;0)" table:style-name="ce92"/>
          <table:table-cell office:value-type="float" office:value="0" table:formula="of:=IF(INDEX([Tracker.$A$1:.$AG$120];6+9*(MONTH([.$A275])-1)+(COLUMN()-4);DAY([.$A275])+2)&lt;&gt;&quot;&quot;;1;0)" table:style-name="ce92"/>
          <table:table-cell office:value-type="float" office:value="0" table:formula="of:=IF(INDEX([Tracker.$A$1:.$AG$120];6+9*(MONTH([.$A275])-1)+(COLUMN()-4);DAY([.$A275])+2)&lt;&gt;&quot;&quot;;1;0)" table:style-name="ce92"/>
          <table:table-cell office:value-type="float" office:value="0" table:formula="of:=SUM([.D275:.I275])" table:style-name="ce6"/>
          <table:table-cell office:value-type="percentage" office:value="0" table:formula="of:=[.J275]/6" table:style-name="ce8">
            <text:p>0%</text:p>
          </table:table-cell>
          <table:table-cell table:style-name="ce1"/>
          <table:table-cell office:value-type="float" office:value="0" table:formula="of:=IF([.D275]=1;[.M274]+1;0)" table:style-name="ce1">
            <text:p>0</text:p>
          </table:table-cell>
          <table:table-cell office:value-type="float" office:value="0" table:formula="of:=IF([.E275]=1;[.N274]+1;0)" table:style-name="ce1">
            <text:p>0</text:p>
          </table:table-cell>
          <table:table-cell office:value-type="float" office:value="0" table:formula="of:=IF([.F275]=1;[.O274]+1;0)" table:style-name="ce1">
            <text:p>0</text:p>
          </table:table-cell>
          <table:table-cell office:value-type="float" office:value="0" table:formula="of:=IF([.G275]=1;[.P274]+1;0)" table:style-name="ce1">
            <text:p>0</text:p>
          </table:table-cell>
          <table:table-cell office:value-type="float" office:value="0" table:formula="of:=IF([.H275]=1;[.Q274]+1;0)" table:style-name="ce1">
            <text:p>0</text:p>
          </table:table-cell>
          <table:table-cell office:value-type="float" office:value="0" table:formula="of:=IF([.I275]=1;[.R27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09-30T00:00:00" table:formula="of:=[.A275]+1" table:style-name="ce10">
            <text:p>Wed, 30 Sep 2026</text:p>
          </table:table-cell>
          <table:table-cell office:value-type="string" office:string-value="Wed" table:formula="of:=TEXT([.A276];&quot;ddd&quot;)" table:style-name="ce5">
            <text:p>Wed</text:p>
          </table:table-cell>
          <table:table-cell office:value-type="string" office:string-value="Sep" table:formula="of:=TEXT([.A276];&quot;mmm&quot;)" table:style-name="ce5">
            <text:p>Sep</text:p>
          </table:table-cell>
          <table:table-cell office:value-type="float" office:value="0" table:formula="of:=IF(INDEX([Tracker.$A$1:.$AG$120];6+9*(MONTH([.$A276])-1)+(COLUMN()-4);DAY([.$A276])+2)&lt;&gt;&quot;&quot;;1;0)" table:style-name="ce92"/>
          <table:table-cell office:value-type="float" office:value="0" table:formula="of:=IF(INDEX([Tracker.$A$1:.$AG$120];6+9*(MONTH([.$A276])-1)+(COLUMN()-4);DAY([.$A276])+2)&lt;&gt;&quot;&quot;;1;0)" table:style-name="ce92"/>
          <table:table-cell office:value-type="float" office:value="0" table:formula="of:=IF(INDEX([Tracker.$A$1:.$AG$120];6+9*(MONTH([.$A276])-1)+(COLUMN()-4);DAY([.$A276])+2)&lt;&gt;&quot;&quot;;1;0)" table:style-name="ce92"/>
          <table:table-cell office:value-type="float" office:value="0" table:formula="of:=IF(INDEX([Tracker.$A$1:.$AG$120];6+9*(MONTH([.$A276])-1)+(COLUMN()-4);DAY([.$A276])+2)&lt;&gt;&quot;&quot;;1;0)" table:style-name="ce92"/>
          <table:table-cell office:value-type="float" office:value="0" table:formula="of:=IF(INDEX([Tracker.$A$1:.$AG$120];6+9*(MONTH([.$A276])-1)+(COLUMN()-4);DAY([.$A276])+2)&lt;&gt;&quot;&quot;;1;0)" table:style-name="ce92"/>
          <table:table-cell office:value-type="float" office:value="0" table:formula="of:=IF(INDEX([Tracker.$A$1:.$AG$120];6+9*(MONTH([.$A276])-1)+(COLUMN()-4);DAY([.$A276])+2)&lt;&gt;&quot;&quot;;1;0)" table:style-name="ce92"/>
          <table:table-cell office:value-type="float" office:value="0" table:formula="of:=SUM([.D276:.I276])" table:style-name="ce6"/>
          <table:table-cell office:value-type="percentage" office:value="0" table:formula="of:=[.J276]/6" table:style-name="ce8">
            <text:p>0%</text:p>
          </table:table-cell>
          <table:table-cell table:style-name="ce1"/>
          <table:table-cell office:value-type="float" office:value="0" table:formula="of:=IF([.D276]=1;[.M275]+1;0)" table:style-name="ce1">
            <text:p>0</text:p>
          </table:table-cell>
          <table:table-cell office:value-type="float" office:value="0" table:formula="of:=IF([.E276]=1;[.N275]+1;0)" table:style-name="ce1">
            <text:p>0</text:p>
          </table:table-cell>
          <table:table-cell office:value-type="float" office:value="0" table:formula="of:=IF([.F276]=1;[.O275]+1;0)" table:style-name="ce1">
            <text:p>0</text:p>
          </table:table-cell>
          <table:table-cell office:value-type="float" office:value="0" table:formula="of:=IF([.G276]=1;[.P275]+1;0)" table:style-name="ce1">
            <text:p>0</text:p>
          </table:table-cell>
          <table:table-cell office:value-type="float" office:value="0" table:formula="of:=IF([.H276]=1;[.Q275]+1;0)" table:style-name="ce1">
            <text:p>0</text:p>
          </table:table-cell>
          <table:table-cell office:value-type="float" office:value="0" table:formula="of:=IF([.I276]=1;[.R27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1T00:00:00" table:formula="of:=[.A276]+1" table:style-name="ce10">
            <text:p>Thu, 01 Oct 2026</text:p>
          </table:table-cell>
          <table:table-cell office:value-type="string" office:string-value="Thu" table:formula="of:=TEXT([.A277];&quot;ddd&quot;)" table:style-name="ce5">
            <text:p>Thu</text:p>
          </table:table-cell>
          <table:table-cell office:value-type="string" office:string-value="Oct" table:formula="of:=TEXT([.A277];&quot;mmm&quot;)" table:style-name="ce5">
            <text:p>Oct</text:p>
          </table:table-cell>
          <table:table-cell office:value-type="float" office:value="0" table:formula="of:=IF(INDEX([Tracker.$A$1:.$AG$120];6+9*(MONTH([.$A277])-1)+(COLUMN()-4);DAY([.$A277])+2)&lt;&gt;&quot;&quot;;1;0)" table:style-name="ce92"/>
          <table:table-cell office:value-type="float" office:value="0" table:formula="of:=IF(INDEX([Tracker.$A$1:.$AG$120];6+9*(MONTH([.$A277])-1)+(COLUMN()-4);DAY([.$A277])+2)&lt;&gt;&quot;&quot;;1;0)" table:style-name="ce92"/>
          <table:table-cell office:value-type="float" office:value="0" table:formula="of:=IF(INDEX([Tracker.$A$1:.$AG$120];6+9*(MONTH([.$A277])-1)+(COLUMN()-4);DAY([.$A277])+2)&lt;&gt;&quot;&quot;;1;0)" table:style-name="ce92"/>
          <table:table-cell office:value-type="float" office:value="0" table:formula="of:=IF(INDEX([Tracker.$A$1:.$AG$120];6+9*(MONTH([.$A277])-1)+(COLUMN()-4);DAY([.$A277])+2)&lt;&gt;&quot;&quot;;1;0)" table:style-name="ce92"/>
          <table:table-cell office:value-type="float" office:value="0" table:formula="of:=IF(INDEX([Tracker.$A$1:.$AG$120];6+9*(MONTH([.$A277])-1)+(COLUMN()-4);DAY([.$A277])+2)&lt;&gt;&quot;&quot;;1;0)" table:style-name="ce92"/>
          <table:table-cell office:value-type="float" office:value="0" table:formula="of:=IF(INDEX([Tracker.$A$1:.$AG$120];6+9*(MONTH([.$A277])-1)+(COLUMN()-4);DAY([.$A277])+2)&lt;&gt;&quot;&quot;;1;0)" table:style-name="ce92"/>
          <table:table-cell office:value-type="float" office:value="0" table:formula="of:=SUM([.D277:.I277])" table:style-name="ce6"/>
          <table:table-cell office:value-type="percentage" office:value="0" table:formula="of:=[.J277]/6" table:style-name="ce8">
            <text:p>0%</text:p>
          </table:table-cell>
          <table:table-cell table:style-name="ce1"/>
          <table:table-cell office:value-type="float" office:value="0" table:formula="of:=IF([.D277]=1;[.M276]+1;0)" table:style-name="ce1">
            <text:p>0</text:p>
          </table:table-cell>
          <table:table-cell office:value-type="float" office:value="0" table:formula="of:=IF([.E277]=1;[.N276]+1;0)" table:style-name="ce1">
            <text:p>0</text:p>
          </table:table-cell>
          <table:table-cell office:value-type="float" office:value="0" table:formula="of:=IF([.F277]=1;[.O276]+1;0)" table:style-name="ce1">
            <text:p>0</text:p>
          </table:table-cell>
          <table:table-cell office:value-type="float" office:value="0" table:formula="of:=IF([.G277]=1;[.P276]+1;0)" table:style-name="ce1">
            <text:p>0</text:p>
          </table:table-cell>
          <table:table-cell office:value-type="float" office:value="0" table:formula="of:=IF([.H277]=1;[.Q276]+1;0)" table:style-name="ce1">
            <text:p>0</text:p>
          </table:table-cell>
          <table:table-cell office:value-type="float" office:value="0" table:formula="of:=IF([.I277]=1;[.R27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2T00:00:00" table:formula="of:=[.A277]+1" table:style-name="ce10">
            <text:p>Fri, 02 Oct 2026</text:p>
          </table:table-cell>
          <table:table-cell office:value-type="string" office:string-value="Fri" table:formula="of:=TEXT([.A278];&quot;ddd&quot;)" table:style-name="ce5">
            <text:p>Fri</text:p>
          </table:table-cell>
          <table:table-cell office:value-type="string" office:string-value="Oct" table:formula="of:=TEXT([.A278];&quot;mmm&quot;)" table:style-name="ce5">
            <text:p>Oct</text:p>
          </table:table-cell>
          <table:table-cell office:value-type="float" office:value="0" table:formula="of:=IF(INDEX([Tracker.$A$1:.$AG$120];6+9*(MONTH([.$A278])-1)+(COLUMN()-4);DAY([.$A278])+2)&lt;&gt;&quot;&quot;;1;0)" table:style-name="ce92"/>
          <table:table-cell office:value-type="float" office:value="0" table:formula="of:=IF(INDEX([Tracker.$A$1:.$AG$120];6+9*(MONTH([.$A278])-1)+(COLUMN()-4);DAY([.$A278])+2)&lt;&gt;&quot;&quot;;1;0)" table:style-name="ce92"/>
          <table:table-cell office:value-type="float" office:value="0" table:formula="of:=IF(INDEX([Tracker.$A$1:.$AG$120];6+9*(MONTH([.$A278])-1)+(COLUMN()-4);DAY([.$A278])+2)&lt;&gt;&quot;&quot;;1;0)" table:style-name="ce92"/>
          <table:table-cell office:value-type="float" office:value="0" table:formula="of:=IF(INDEX([Tracker.$A$1:.$AG$120];6+9*(MONTH([.$A278])-1)+(COLUMN()-4);DAY([.$A278])+2)&lt;&gt;&quot;&quot;;1;0)" table:style-name="ce92"/>
          <table:table-cell office:value-type="float" office:value="0" table:formula="of:=IF(INDEX([Tracker.$A$1:.$AG$120];6+9*(MONTH([.$A278])-1)+(COLUMN()-4);DAY([.$A278])+2)&lt;&gt;&quot;&quot;;1;0)" table:style-name="ce92"/>
          <table:table-cell office:value-type="float" office:value="0" table:formula="of:=IF(INDEX([Tracker.$A$1:.$AG$120];6+9*(MONTH([.$A278])-1)+(COLUMN()-4);DAY([.$A278])+2)&lt;&gt;&quot;&quot;;1;0)" table:style-name="ce92"/>
          <table:table-cell office:value-type="float" office:value="0" table:formula="of:=SUM([.D278:.I278])" table:style-name="ce6"/>
          <table:table-cell office:value-type="percentage" office:value="0" table:formula="of:=[.J278]/6" table:style-name="ce8">
            <text:p>0%</text:p>
          </table:table-cell>
          <table:table-cell table:style-name="ce1"/>
          <table:table-cell office:value-type="float" office:value="0" table:formula="of:=IF([.D278]=1;[.M277]+1;0)" table:style-name="ce1">
            <text:p>0</text:p>
          </table:table-cell>
          <table:table-cell office:value-type="float" office:value="0" table:formula="of:=IF([.E278]=1;[.N277]+1;0)" table:style-name="ce1">
            <text:p>0</text:p>
          </table:table-cell>
          <table:table-cell office:value-type="float" office:value="0" table:formula="of:=IF([.F278]=1;[.O277]+1;0)" table:style-name="ce1">
            <text:p>0</text:p>
          </table:table-cell>
          <table:table-cell office:value-type="float" office:value="0" table:formula="of:=IF([.G278]=1;[.P277]+1;0)" table:style-name="ce1">
            <text:p>0</text:p>
          </table:table-cell>
          <table:table-cell office:value-type="float" office:value="0" table:formula="of:=IF([.H278]=1;[.Q277]+1;0)" table:style-name="ce1">
            <text:p>0</text:p>
          </table:table-cell>
          <table:table-cell office:value-type="float" office:value="0" table:formula="of:=IF([.I278]=1;[.R27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3T00:00:00" table:formula="of:=[.A278]+1" table:style-name="ce10">
            <text:p>Sat, 03 Oct 2026</text:p>
          </table:table-cell>
          <table:table-cell office:value-type="string" office:string-value="Sat" table:formula="of:=TEXT([.A279];&quot;ddd&quot;)" table:style-name="ce5">
            <text:p>Sat</text:p>
          </table:table-cell>
          <table:table-cell office:value-type="string" office:string-value="Oct" table:formula="of:=TEXT([.A279];&quot;mmm&quot;)" table:style-name="ce5">
            <text:p>Oct</text:p>
          </table:table-cell>
          <table:table-cell office:value-type="float" office:value="0" table:formula="of:=IF(INDEX([Tracker.$A$1:.$AG$120];6+9*(MONTH([.$A279])-1)+(COLUMN()-4);DAY([.$A279])+2)&lt;&gt;&quot;&quot;;1;0)" table:style-name="ce92"/>
          <table:table-cell office:value-type="float" office:value="0" table:formula="of:=IF(INDEX([Tracker.$A$1:.$AG$120];6+9*(MONTH([.$A279])-1)+(COLUMN()-4);DAY([.$A279])+2)&lt;&gt;&quot;&quot;;1;0)" table:style-name="ce92"/>
          <table:table-cell office:value-type="float" office:value="0" table:formula="of:=IF(INDEX([Tracker.$A$1:.$AG$120];6+9*(MONTH([.$A279])-1)+(COLUMN()-4);DAY([.$A279])+2)&lt;&gt;&quot;&quot;;1;0)" table:style-name="ce92"/>
          <table:table-cell office:value-type="float" office:value="0" table:formula="of:=IF(INDEX([Tracker.$A$1:.$AG$120];6+9*(MONTH([.$A279])-1)+(COLUMN()-4);DAY([.$A279])+2)&lt;&gt;&quot;&quot;;1;0)" table:style-name="ce92"/>
          <table:table-cell office:value-type="float" office:value="0" table:formula="of:=IF(INDEX([Tracker.$A$1:.$AG$120];6+9*(MONTH([.$A279])-1)+(COLUMN()-4);DAY([.$A279])+2)&lt;&gt;&quot;&quot;;1;0)" table:style-name="ce92"/>
          <table:table-cell office:value-type="float" office:value="0" table:formula="of:=IF(INDEX([Tracker.$A$1:.$AG$120];6+9*(MONTH([.$A279])-1)+(COLUMN()-4);DAY([.$A279])+2)&lt;&gt;&quot;&quot;;1;0)" table:style-name="ce92"/>
          <table:table-cell office:value-type="float" office:value="0" table:formula="of:=SUM([.D279:.I279])" table:style-name="ce6"/>
          <table:table-cell office:value-type="percentage" office:value="0" table:formula="of:=[.J279]/6" table:style-name="ce8">
            <text:p>0%</text:p>
          </table:table-cell>
          <table:table-cell table:style-name="ce1"/>
          <table:table-cell office:value-type="float" office:value="0" table:formula="of:=IF([.D279]=1;[.M278]+1;0)" table:style-name="ce1">
            <text:p>0</text:p>
          </table:table-cell>
          <table:table-cell office:value-type="float" office:value="0" table:formula="of:=IF([.E279]=1;[.N278]+1;0)" table:style-name="ce1">
            <text:p>0</text:p>
          </table:table-cell>
          <table:table-cell office:value-type="float" office:value="0" table:formula="of:=IF([.F279]=1;[.O278]+1;0)" table:style-name="ce1">
            <text:p>0</text:p>
          </table:table-cell>
          <table:table-cell office:value-type="float" office:value="0" table:formula="of:=IF([.G279]=1;[.P278]+1;0)" table:style-name="ce1">
            <text:p>0</text:p>
          </table:table-cell>
          <table:table-cell office:value-type="float" office:value="0" table:formula="of:=IF([.H279]=1;[.Q278]+1;0)" table:style-name="ce1">
            <text:p>0</text:p>
          </table:table-cell>
          <table:table-cell office:value-type="float" office:value="0" table:formula="of:=IF([.I279]=1;[.R27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4T00:00:00" table:formula="of:=[.A279]+1" table:style-name="ce10">
            <text:p>Sun, 04 Oct 2026</text:p>
          </table:table-cell>
          <table:table-cell office:value-type="string" office:string-value="Sun" table:formula="of:=TEXT([.A280];&quot;ddd&quot;)" table:style-name="ce5">
            <text:p>Sun</text:p>
          </table:table-cell>
          <table:table-cell office:value-type="string" office:string-value="Oct" table:formula="of:=TEXT([.A280];&quot;mmm&quot;)" table:style-name="ce5">
            <text:p>Oct</text:p>
          </table:table-cell>
          <table:table-cell office:value-type="float" office:value="0" table:formula="of:=IF(INDEX([Tracker.$A$1:.$AG$120];6+9*(MONTH([.$A280])-1)+(COLUMN()-4);DAY([.$A280])+2)&lt;&gt;&quot;&quot;;1;0)" table:style-name="ce92"/>
          <table:table-cell office:value-type="float" office:value="0" table:formula="of:=IF(INDEX([Tracker.$A$1:.$AG$120];6+9*(MONTH([.$A280])-1)+(COLUMN()-4);DAY([.$A280])+2)&lt;&gt;&quot;&quot;;1;0)" table:style-name="ce92"/>
          <table:table-cell office:value-type="float" office:value="0" table:formula="of:=IF(INDEX([Tracker.$A$1:.$AG$120];6+9*(MONTH([.$A280])-1)+(COLUMN()-4);DAY([.$A280])+2)&lt;&gt;&quot;&quot;;1;0)" table:style-name="ce92"/>
          <table:table-cell office:value-type="float" office:value="0" table:formula="of:=IF(INDEX([Tracker.$A$1:.$AG$120];6+9*(MONTH([.$A280])-1)+(COLUMN()-4);DAY([.$A280])+2)&lt;&gt;&quot;&quot;;1;0)" table:style-name="ce92"/>
          <table:table-cell office:value-type="float" office:value="0" table:formula="of:=IF(INDEX([Tracker.$A$1:.$AG$120];6+9*(MONTH([.$A280])-1)+(COLUMN()-4);DAY([.$A280])+2)&lt;&gt;&quot;&quot;;1;0)" table:style-name="ce92"/>
          <table:table-cell office:value-type="float" office:value="0" table:formula="of:=IF(INDEX([Tracker.$A$1:.$AG$120];6+9*(MONTH([.$A280])-1)+(COLUMN()-4);DAY([.$A280])+2)&lt;&gt;&quot;&quot;;1;0)" table:style-name="ce92"/>
          <table:table-cell office:value-type="float" office:value="0" table:formula="of:=SUM([.D280:.I280])" table:style-name="ce6"/>
          <table:table-cell office:value-type="percentage" office:value="0" table:formula="of:=[.J280]/6" table:style-name="ce8">
            <text:p>0%</text:p>
          </table:table-cell>
          <table:table-cell table:style-name="ce1"/>
          <table:table-cell office:value-type="float" office:value="0" table:formula="of:=IF([.D280]=1;[.M279]+1;0)" table:style-name="ce1">
            <text:p>0</text:p>
          </table:table-cell>
          <table:table-cell office:value-type="float" office:value="0" table:formula="of:=IF([.E280]=1;[.N279]+1;0)" table:style-name="ce1">
            <text:p>0</text:p>
          </table:table-cell>
          <table:table-cell office:value-type="float" office:value="0" table:formula="of:=IF([.F280]=1;[.O279]+1;0)" table:style-name="ce1">
            <text:p>0</text:p>
          </table:table-cell>
          <table:table-cell office:value-type="float" office:value="0" table:formula="of:=IF([.G280]=1;[.P279]+1;0)" table:style-name="ce1">
            <text:p>0</text:p>
          </table:table-cell>
          <table:table-cell office:value-type="float" office:value="0" table:formula="of:=IF([.H280]=1;[.Q279]+1;0)" table:style-name="ce1">
            <text:p>0</text:p>
          </table:table-cell>
          <table:table-cell office:value-type="float" office:value="0" table:formula="of:=IF([.I280]=1;[.R27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5T00:00:00" table:formula="of:=[.A280]+1" table:style-name="ce10">
            <text:p>Mon, 05 Oct 2026</text:p>
          </table:table-cell>
          <table:table-cell office:value-type="string" office:string-value="Mon" table:formula="of:=TEXT([.A281];&quot;ddd&quot;)" table:style-name="ce5">
            <text:p>Mon</text:p>
          </table:table-cell>
          <table:table-cell office:value-type="string" office:string-value="Oct" table:formula="of:=TEXT([.A281];&quot;mmm&quot;)" table:style-name="ce5">
            <text:p>Oct</text:p>
          </table:table-cell>
          <table:table-cell office:value-type="float" office:value="0" table:formula="of:=IF(INDEX([Tracker.$A$1:.$AG$120];6+9*(MONTH([.$A281])-1)+(COLUMN()-4);DAY([.$A281])+2)&lt;&gt;&quot;&quot;;1;0)" table:style-name="ce92"/>
          <table:table-cell office:value-type="float" office:value="0" table:formula="of:=IF(INDEX([Tracker.$A$1:.$AG$120];6+9*(MONTH([.$A281])-1)+(COLUMN()-4);DAY([.$A281])+2)&lt;&gt;&quot;&quot;;1;0)" table:style-name="ce92"/>
          <table:table-cell office:value-type="float" office:value="0" table:formula="of:=IF(INDEX([Tracker.$A$1:.$AG$120];6+9*(MONTH([.$A281])-1)+(COLUMN()-4);DAY([.$A281])+2)&lt;&gt;&quot;&quot;;1;0)" table:style-name="ce92"/>
          <table:table-cell office:value-type="float" office:value="0" table:formula="of:=IF(INDEX([Tracker.$A$1:.$AG$120];6+9*(MONTH([.$A281])-1)+(COLUMN()-4);DAY([.$A281])+2)&lt;&gt;&quot;&quot;;1;0)" table:style-name="ce92"/>
          <table:table-cell office:value-type="float" office:value="0" table:formula="of:=IF(INDEX([Tracker.$A$1:.$AG$120];6+9*(MONTH([.$A281])-1)+(COLUMN()-4);DAY([.$A281])+2)&lt;&gt;&quot;&quot;;1;0)" table:style-name="ce92"/>
          <table:table-cell office:value-type="float" office:value="0" table:formula="of:=IF(INDEX([Tracker.$A$1:.$AG$120];6+9*(MONTH([.$A281])-1)+(COLUMN()-4);DAY([.$A281])+2)&lt;&gt;&quot;&quot;;1;0)" table:style-name="ce92"/>
          <table:table-cell office:value-type="float" office:value="0" table:formula="of:=SUM([.D281:.I281])" table:style-name="ce6"/>
          <table:table-cell office:value-type="percentage" office:value="0" table:formula="of:=[.J281]/6" table:style-name="ce8">
            <text:p>0%</text:p>
          </table:table-cell>
          <table:table-cell table:style-name="ce1"/>
          <table:table-cell office:value-type="float" office:value="0" table:formula="of:=IF([.D281]=1;[.M280]+1;0)" table:style-name="ce1">
            <text:p>0</text:p>
          </table:table-cell>
          <table:table-cell office:value-type="float" office:value="0" table:formula="of:=IF([.E281]=1;[.N280]+1;0)" table:style-name="ce1">
            <text:p>0</text:p>
          </table:table-cell>
          <table:table-cell office:value-type="float" office:value="0" table:formula="of:=IF([.F281]=1;[.O280]+1;0)" table:style-name="ce1">
            <text:p>0</text:p>
          </table:table-cell>
          <table:table-cell office:value-type="float" office:value="0" table:formula="of:=IF([.G281]=1;[.P280]+1;0)" table:style-name="ce1">
            <text:p>0</text:p>
          </table:table-cell>
          <table:table-cell office:value-type="float" office:value="0" table:formula="of:=IF([.H281]=1;[.Q280]+1;0)" table:style-name="ce1">
            <text:p>0</text:p>
          </table:table-cell>
          <table:table-cell office:value-type="float" office:value="0" table:formula="of:=IF([.I281]=1;[.R28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6T00:00:00" table:formula="of:=[.A281]+1" table:style-name="ce10">
            <text:p>Tue, 06 Oct 2026</text:p>
          </table:table-cell>
          <table:table-cell office:value-type="string" office:string-value="Tue" table:formula="of:=TEXT([.A282];&quot;ddd&quot;)" table:style-name="ce5">
            <text:p>Tue</text:p>
          </table:table-cell>
          <table:table-cell office:value-type="string" office:string-value="Oct" table:formula="of:=TEXT([.A282];&quot;mmm&quot;)" table:style-name="ce5">
            <text:p>Oct</text:p>
          </table:table-cell>
          <table:table-cell office:value-type="float" office:value="0" table:formula="of:=IF(INDEX([Tracker.$A$1:.$AG$120];6+9*(MONTH([.$A282])-1)+(COLUMN()-4);DAY([.$A282])+2)&lt;&gt;&quot;&quot;;1;0)" table:style-name="ce92"/>
          <table:table-cell office:value-type="float" office:value="0" table:formula="of:=IF(INDEX([Tracker.$A$1:.$AG$120];6+9*(MONTH([.$A282])-1)+(COLUMN()-4);DAY([.$A282])+2)&lt;&gt;&quot;&quot;;1;0)" table:style-name="ce92"/>
          <table:table-cell office:value-type="float" office:value="0" table:formula="of:=IF(INDEX([Tracker.$A$1:.$AG$120];6+9*(MONTH([.$A282])-1)+(COLUMN()-4);DAY([.$A282])+2)&lt;&gt;&quot;&quot;;1;0)" table:style-name="ce92"/>
          <table:table-cell office:value-type="float" office:value="0" table:formula="of:=IF(INDEX([Tracker.$A$1:.$AG$120];6+9*(MONTH([.$A282])-1)+(COLUMN()-4);DAY([.$A282])+2)&lt;&gt;&quot;&quot;;1;0)" table:style-name="ce92"/>
          <table:table-cell office:value-type="float" office:value="0" table:formula="of:=IF(INDEX([Tracker.$A$1:.$AG$120];6+9*(MONTH([.$A282])-1)+(COLUMN()-4);DAY([.$A282])+2)&lt;&gt;&quot;&quot;;1;0)" table:style-name="ce92"/>
          <table:table-cell office:value-type="float" office:value="0" table:formula="of:=IF(INDEX([Tracker.$A$1:.$AG$120];6+9*(MONTH([.$A282])-1)+(COLUMN()-4);DAY([.$A282])+2)&lt;&gt;&quot;&quot;;1;0)" table:style-name="ce92"/>
          <table:table-cell office:value-type="float" office:value="0" table:formula="of:=SUM([.D282:.I282])" table:style-name="ce6"/>
          <table:table-cell office:value-type="percentage" office:value="0" table:formula="of:=[.J282]/6" table:style-name="ce8">
            <text:p>0%</text:p>
          </table:table-cell>
          <table:table-cell table:style-name="ce1"/>
          <table:table-cell office:value-type="float" office:value="0" table:formula="of:=IF([.D282]=1;[.M281]+1;0)" table:style-name="ce1">
            <text:p>0</text:p>
          </table:table-cell>
          <table:table-cell office:value-type="float" office:value="0" table:formula="of:=IF([.E282]=1;[.N281]+1;0)" table:style-name="ce1">
            <text:p>0</text:p>
          </table:table-cell>
          <table:table-cell office:value-type="float" office:value="0" table:formula="of:=IF([.F282]=1;[.O281]+1;0)" table:style-name="ce1">
            <text:p>0</text:p>
          </table:table-cell>
          <table:table-cell office:value-type="float" office:value="0" table:formula="of:=IF([.G282]=1;[.P281]+1;0)" table:style-name="ce1">
            <text:p>0</text:p>
          </table:table-cell>
          <table:table-cell office:value-type="float" office:value="0" table:formula="of:=IF([.H282]=1;[.Q281]+1;0)" table:style-name="ce1">
            <text:p>0</text:p>
          </table:table-cell>
          <table:table-cell office:value-type="float" office:value="0" table:formula="of:=IF([.I282]=1;[.R28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7T00:00:00" table:formula="of:=[.A282]+1" table:style-name="ce10">
            <text:p>Wed, 07 Oct 2026</text:p>
          </table:table-cell>
          <table:table-cell office:value-type="string" office:string-value="Wed" table:formula="of:=TEXT([.A283];&quot;ddd&quot;)" table:style-name="ce5">
            <text:p>Wed</text:p>
          </table:table-cell>
          <table:table-cell office:value-type="string" office:string-value="Oct" table:formula="of:=TEXT([.A283];&quot;mmm&quot;)" table:style-name="ce5">
            <text:p>Oct</text:p>
          </table:table-cell>
          <table:table-cell office:value-type="float" office:value="0" table:formula="of:=IF(INDEX([Tracker.$A$1:.$AG$120];6+9*(MONTH([.$A283])-1)+(COLUMN()-4);DAY([.$A283])+2)&lt;&gt;&quot;&quot;;1;0)" table:style-name="ce92"/>
          <table:table-cell office:value-type="float" office:value="0" table:formula="of:=IF(INDEX([Tracker.$A$1:.$AG$120];6+9*(MONTH([.$A283])-1)+(COLUMN()-4);DAY([.$A283])+2)&lt;&gt;&quot;&quot;;1;0)" table:style-name="ce92"/>
          <table:table-cell office:value-type="float" office:value="0" table:formula="of:=IF(INDEX([Tracker.$A$1:.$AG$120];6+9*(MONTH([.$A283])-1)+(COLUMN()-4);DAY([.$A283])+2)&lt;&gt;&quot;&quot;;1;0)" table:style-name="ce92"/>
          <table:table-cell office:value-type="float" office:value="0" table:formula="of:=IF(INDEX([Tracker.$A$1:.$AG$120];6+9*(MONTH([.$A283])-1)+(COLUMN()-4);DAY([.$A283])+2)&lt;&gt;&quot;&quot;;1;0)" table:style-name="ce92"/>
          <table:table-cell office:value-type="float" office:value="0" table:formula="of:=IF(INDEX([Tracker.$A$1:.$AG$120];6+9*(MONTH([.$A283])-1)+(COLUMN()-4);DAY([.$A283])+2)&lt;&gt;&quot;&quot;;1;0)" table:style-name="ce92"/>
          <table:table-cell office:value-type="float" office:value="0" table:formula="of:=IF(INDEX([Tracker.$A$1:.$AG$120];6+9*(MONTH([.$A283])-1)+(COLUMN()-4);DAY([.$A283])+2)&lt;&gt;&quot;&quot;;1;0)" table:style-name="ce92"/>
          <table:table-cell office:value-type="float" office:value="0" table:formula="of:=SUM([.D283:.I283])" table:style-name="ce6"/>
          <table:table-cell office:value-type="percentage" office:value="0" table:formula="of:=[.J283]/6" table:style-name="ce8">
            <text:p>0%</text:p>
          </table:table-cell>
          <table:table-cell table:style-name="ce1"/>
          <table:table-cell office:value-type="float" office:value="0" table:formula="of:=IF([.D283]=1;[.M282]+1;0)" table:style-name="ce1">
            <text:p>0</text:p>
          </table:table-cell>
          <table:table-cell office:value-type="float" office:value="0" table:formula="of:=IF([.E283]=1;[.N282]+1;0)" table:style-name="ce1">
            <text:p>0</text:p>
          </table:table-cell>
          <table:table-cell office:value-type="float" office:value="0" table:formula="of:=IF([.F283]=1;[.O282]+1;0)" table:style-name="ce1">
            <text:p>0</text:p>
          </table:table-cell>
          <table:table-cell office:value-type="float" office:value="0" table:formula="of:=IF([.G283]=1;[.P282]+1;0)" table:style-name="ce1">
            <text:p>0</text:p>
          </table:table-cell>
          <table:table-cell office:value-type="float" office:value="0" table:formula="of:=IF([.H283]=1;[.Q282]+1;0)" table:style-name="ce1">
            <text:p>0</text:p>
          </table:table-cell>
          <table:table-cell office:value-type="float" office:value="0" table:formula="of:=IF([.I283]=1;[.R28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8T00:00:00" table:formula="of:=[.A283]+1" table:style-name="ce10">
            <text:p>Thu, 08 Oct 2026</text:p>
          </table:table-cell>
          <table:table-cell office:value-type="string" office:string-value="Thu" table:formula="of:=TEXT([.A284];&quot;ddd&quot;)" table:style-name="ce5">
            <text:p>Thu</text:p>
          </table:table-cell>
          <table:table-cell office:value-type="string" office:string-value="Oct" table:formula="of:=TEXT([.A284];&quot;mmm&quot;)" table:style-name="ce5">
            <text:p>Oct</text:p>
          </table:table-cell>
          <table:table-cell office:value-type="float" office:value="0" table:formula="of:=IF(INDEX([Tracker.$A$1:.$AG$120];6+9*(MONTH([.$A284])-1)+(COLUMN()-4);DAY([.$A284])+2)&lt;&gt;&quot;&quot;;1;0)" table:style-name="ce92"/>
          <table:table-cell office:value-type="float" office:value="0" table:formula="of:=IF(INDEX([Tracker.$A$1:.$AG$120];6+9*(MONTH([.$A284])-1)+(COLUMN()-4);DAY([.$A284])+2)&lt;&gt;&quot;&quot;;1;0)" table:style-name="ce92"/>
          <table:table-cell office:value-type="float" office:value="0" table:formula="of:=IF(INDEX([Tracker.$A$1:.$AG$120];6+9*(MONTH([.$A284])-1)+(COLUMN()-4);DAY([.$A284])+2)&lt;&gt;&quot;&quot;;1;0)" table:style-name="ce92"/>
          <table:table-cell office:value-type="float" office:value="0" table:formula="of:=IF(INDEX([Tracker.$A$1:.$AG$120];6+9*(MONTH([.$A284])-1)+(COLUMN()-4);DAY([.$A284])+2)&lt;&gt;&quot;&quot;;1;0)" table:style-name="ce92"/>
          <table:table-cell office:value-type="float" office:value="0" table:formula="of:=IF(INDEX([Tracker.$A$1:.$AG$120];6+9*(MONTH([.$A284])-1)+(COLUMN()-4);DAY([.$A284])+2)&lt;&gt;&quot;&quot;;1;0)" table:style-name="ce92"/>
          <table:table-cell office:value-type="float" office:value="0" table:formula="of:=IF(INDEX([Tracker.$A$1:.$AG$120];6+9*(MONTH([.$A284])-1)+(COLUMN()-4);DAY([.$A284])+2)&lt;&gt;&quot;&quot;;1;0)" table:style-name="ce92"/>
          <table:table-cell office:value-type="float" office:value="0" table:formula="of:=SUM([.D284:.I284])" table:style-name="ce6"/>
          <table:table-cell office:value-type="percentage" office:value="0" table:formula="of:=[.J284]/6" table:style-name="ce8">
            <text:p>0%</text:p>
          </table:table-cell>
          <table:table-cell table:style-name="ce1"/>
          <table:table-cell office:value-type="float" office:value="0" table:formula="of:=IF([.D284]=1;[.M283]+1;0)" table:style-name="ce1">
            <text:p>0</text:p>
          </table:table-cell>
          <table:table-cell office:value-type="float" office:value="0" table:formula="of:=IF([.E284]=1;[.N283]+1;0)" table:style-name="ce1">
            <text:p>0</text:p>
          </table:table-cell>
          <table:table-cell office:value-type="float" office:value="0" table:formula="of:=IF([.F284]=1;[.O283]+1;0)" table:style-name="ce1">
            <text:p>0</text:p>
          </table:table-cell>
          <table:table-cell office:value-type="float" office:value="0" table:formula="of:=IF([.G284]=1;[.P283]+1;0)" table:style-name="ce1">
            <text:p>0</text:p>
          </table:table-cell>
          <table:table-cell office:value-type="float" office:value="0" table:formula="of:=IF([.H284]=1;[.Q283]+1;0)" table:style-name="ce1">
            <text:p>0</text:p>
          </table:table-cell>
          <table:table-cell office:value-type="float" office:value="0" table:formula="of:=IF([.I284]=1;[.R28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09T00:00:00" table:formula="of:=[.A284]+1" table:style-name="ce10">
            <text:p>Fri, 09 Oct 2026</text:p>
          </table:table-cell>
          <table:table-cell office:value-type="string" office:string-value="Fri" table:formula="of:=TEXT([.A285];&quot;ddd&quot;)" table:style-name="ce5">
            <text:p>Fri</text:p>
          </table:table-cell>
          <table:table-cell office:value-type="string" office:string-value="Oct" table:formula="of:=TEXT([.A285];&quot;mmm&quot;)" table:style-name="ce5">
            <text:p>Oct</text:p>
          </table:table-cell>
          <table:table-cell office:value-type="float" office:value="0" table:formula="of:=IF(INDEX([Tracker.$A$1:.$AG$120];6+9*(MONTH([.$A285])-1)+(COLUMN()-4);DAY([.$A285])+2)&lt;&gt;&quot;&quot;;1;0)" table:style-name="ce92"/>
          <table:table-cell office:value-type="float" office:value="0" table:formula="of:=IF(INDEX([Tracker.$A$1:.$AG$120];6+9*(MONTH([.$A285])-1)+(COLUMN()-4);DAY([.$A285])+2)&lt;&gt;&quot;&quot;;1;0)" table:style-name="ce92"/>
          <table:table-cell office:value-type="float" office:value="0" table:formula="of:=IF(INDEX([Tracker.$A$1:.$AG$120];6+9*(MONTH([.$A285])-1)+(COLUMN()-4);DAY([.$A285])+2)&lt;&gt;&quot;&quot;;1;0)" table:style-name="ce92"/>
          <table:table-cell office:value-type="float" office:value="0" table:formula="of:=IF(INDEX([Tracker.$A$1:.$AG$120];6+9*(MONTH([.$A285])-1)+(COLUMN()-4);DAY([.$A285])+2)&lt;&gt;&quot;&quot;;1;0)" table:style-name="ce92"/>
          <table:table-cell office:value-type="float" office:value="0" table:formula="of:=IF(INDEX([Tracker.$A$1:.$AG$120];6+9*(MONTH([.$A285])-1)+(COLUMN()-4);DAY([.$A285])+2)&lt;&gt;&quot;&quot;;1;0)" table:style-name="ce92"/>
          <table:table-cell office:value-type="float" office:value="0" table:formula="of:=IF(INDEX([Tracker.$A$1:.$AG$120];6+9*(MONTH([.$A285])-1)+(COLUMN()-4);DAY([.$A285])+2)&lt;&gt;&quot;&quot;;1;0)" table:style-name="ce92"/>
          <table:table-cell office:value-type="float" office:value="0" table:formula="of:=SUM([.D285:.I285])" table:style-name="ce6"/>
          <table:table-cell office:value-type="percentage" office:value="0" table:formula="of:=[.J285]/6" table:style-name="ce8">
            <text:p>0%</text:p>
          </table:table-cell>
          <table:table-cell table:style-name="ce1"/>
          <table:table-cell office:value-type="float" office:value="0" table:formula="of:=IF([.D285]=1;[.M284]+1;0)" table:style-name="ce1">
            <text:p>0</text:p>
          </table:table-cell>
          <table:table-cell office:value-type="float" office:value="0" table:formula="of:=IF([.E285]=1;[.N284]+1;0)" table:style-name="ce1">
            <text:p>0</text:p>
          </table:table-cell>
          <table:table-cell office:value-type="float" office:value="0" table:formula="of:=IF([.F285]=1;[.O284]+1;0)" table:style-name="ce1">
            <text:p>0</text:p>
          </table:table-cell>
          <table:table-cell office:value-type="float" office:value="0" table:formula="of:=IF([.G285]=1;[.P284]+1;0)" table:style-name="ce1">
            <text:p>0</text:p>
          </table:table-cell>
          <table:table-cell office:value-type="float" office:value="0" table:formula="of:=IF([.H285]=1;[.Q284]+1;0)" table:style-name="ce1">
            <text:p>0</text:p>
          </table:table-cell>
          <table:table-cell office:value-type="float" office:value="0" table:formula="of:=IF([.I285]=1;[.R28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0T00:00:00" table:formula="of:=[.A285]+1" table:style-name="ce10">
            <text:p>Sat, 10 Oct 2026</text:p>
          </table:table-cell>
          <table:table-cell office:value-type="string" office:string-value="Sat" table:formula="of:=TEXT([.A286];&quot;ddd&quot;)" table:style-name="ce5">
            <text:p>Sat</text:p>
          </table:table-cell>
          <table:table-cell office:value-type="string" office:string-value="Oct" table:formula="of:=TEXT([.A286];&quot;mmm&quot;)" table:style-name="ce5">
            <text:p>Oct</text:p>
          </table:table-cell>
          <table:table-cell office:value-type="float" office:value="0" table:formula="of:=IF(INDEX([Tracker.$A$1:.$AG$120];6+9*(MONTH([.$A286])-1)+(COLUMN()-4);DAY([.$A286])+2)&lt;&gt;&quot;&quot;;1;0)" table:style-name="ce92"/>
          <table:table-cell office:value-type="float" office:value="0" table:formula="of:=IF(INDEX([Tracker.$A$1:.$AG$120];6+9*(MONTH([.$A286])-1)+(COLUMN()-4);DAY([.$A286])+2)&lt;&gt;&quot;&quot;;1;0)" table:style-name="ce92"/>
          <table:table-cell office:value-type="float" office:value="0" table:formula="of:=IF(INDEX([Tracker.$A$1:.$AG$120];6+9*(MONTH([.$A286])-1)+(COLUMN()-4);DAY([.$A286])+2)&lt;&gt;&quot;&quot;;1;0)" table:style-name="ce92"/>
          <table:table-cell office:value-type="float" office:value="0" table:formula="of:=IF(INDEX([Tracker.$A$1:.$AG$120];6+9*(MONTH([.$A286])-1)+(COLUMN()-4);DAY([.$A286])+2)&lt;&gt;&quot;&quot;;1;0)" table:style-name="ce92"/>
          <table:table-cell office:value-type="float" office:value="0" table:formula="of:=IF(INDEX([Tracker.$A$1:.$AG$120];6+9*(MONTH([.$A286])-1)+(COLUMN()-4);DAY([.$A286])+2)&lt;&gt;&quot;&quot;;1;0)" table:style-name="ce92"/>
          <table:table-cell office:value-type="float" office:value="0" table:formula="of:=IF(INDEX([Tracker.$A$1:.$AG$120];6+9*(MONTH([.$A286])-1)+(COLUMN()-4);DAY([.$A286])+2)&lt;&gt;&quot;&quot;;1;0)" table:style-name="ce92"/>
          <table:table-cell office:value-type="float" office:value="0" table:formula="of:=SUM([.D286:.I286])" table:style-name="ce6"/>
          <table:table-cell office:value-type="percentage" office:value="0" table:formula="of:=[.J286]/6" table:style-name="ce8">
            <text:p>0%</text:p>
          </table:table-cell>
          <table:table-cell table:style-name="ce1"/>
          <table:table-cell office:value-type="float" office:value="0" table:formula="of:=IF([.D286]=1;[.M285]+1;0)" table:style-name="ce1">
            <text:p>0</text:p>
          </table:table-cell>
          <table:table-cell office:value-type="float" office:value="0" table:formula="of:=IF([.E286]=1;[.N285]+1;0)" table:style-name="ce1">
            <text:p>0</text:p>
          </table:table-cell>
          <table:table-cell office:value-type="float" office:value="0" table:formula="of:=IF([.F286]=1;[.O285]+1;0)" table:style-name="ce1">
            <text:p>0</text:p>
          </table:table-cell>
          <table:table-cell office:value-type="float" office:value="0" table:formula="of:=IF([.G286]=1;[.P285]+1;0)" table:style-name="ce1">
            <text:p>0</text:p>
          </table:table-cell>
          <table:table-cell office:value-type="float" office:value="0" table:formula="of:=IF([.H286]=1;[.Q285]+1;0)" table:style-name="ce1">
            <text:p>0</text:p>
          </table:table-cell>
          <table:table-cell office:value-type="float" office:value="0" table:formula="of:=IF([.I286]=1;[.R28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1T00:00:00" table:formula="of:=[.A286]+1" table:style-name="ce10">
            <text:p>Sun, 11 Oct 2026</text:p>
          </table:table-cell>
          <table:table-cell office:value-type="string" office:string-value="Sun" table:formula="of:=TEXT([.A287];&quot;ddd&quot;)" table:style-name="ce5">
            <text:p>Sun</text:p>
          </table:table-cell>
          <table:table-cell office:value-type="string" office:string-value="Oct" table:formula="of:=TEXT([.A287];&quot;mmm&quot;)" table:style-name="ce5">
            <text:p>Oct</text:p>
          </table:table-cell>
          <table:table-cell office:value-type="float" office:value="0" table:formula="of:=IF(INDEX([Tracker.$A$1:.$AG$120];6+9*(MONTH([.$A287])-1)+(COLUMN()-4);DAY([.$A287])+2)&lt;&gt;&quot;&quot;;1;0)" table:style-name="ce92"/>
          <table:table-cell office:value-type="float" office:value="0" table:formula="of:=IF(INDEX([Tracker.$A$1:.$AG$120];6+9*(MONTH([.$A287])-1)+(COLUMN()-4);DAY([.$A287])+2)&lt;&gt;&quot;&quot;;1;0)" table:style-name="ce92"/>
          <table:table-cell office:value-type="float" office:value="0" table:formula="of:=IF(INDEX([Tracker.$A$1:.$AG$120];6+9*(MONTH([.$A287])-1)+(COLUMN()-4);DAY([.$A287])+2)&lt;&gt;&quot;&quot;;1;0)" table:style-name="ce92"/>
          <table:table-cell office:value-type="float" office:value="0" table:formula="of:=IF(INDEX([Tracker.$A$1:.$AG$120];6+9*(MONTH([.$A287])-1)+(COLUMN()-4);DAY([.$A287])+2)&lt;&gt;&quot;&quot;;1;0)" table:style-name="ce92"/>
          <table:table-cell office:value-type="float" office:value="0" table:formula="of:=IF(INDEX([Tracker.$A$1:.$AG$120];6+9*(MONTH([.$A287])-1)+(COLUMN()-4);DAY([.$A287])+2)&lt;&gt;&quot;&quot;;1;0)" table:style-name="ce92"/>
          <table:table-cell office:value-type="float" office:value="0" table:formula="of:=IF(INDEX([Tracker.$A$1:.$AG$120];6+9*(MONTH([.$A287])-1)+(COLUMN()-4);DAY([.$A287])+2)&lt;&gt;&quot;&quot;;1;0)" table:style-name="ce92"/>
          <table:table-cell office:value-type="float" office:value="0" table:formula="of:=SUM([.D287:.I287])" table:style-name="ce6"/>
          <table:table-cell office:value-type="percentage" office:value="0" table:formula="of:=[.J287]/6" table:style-name="ce8">
            <text:p>0%</text:p>
          </table:table-cell>
          <table:table-cell table:style-name="ce1"/>
          <table:table-cell office:value-type="float" office:value="0" table:formula="of:=IF([.D287]=1;[.M286]+1;0)" table:style-name="ce1">
            <text:p>0</text:p>
          </table:table-cell>
          <table:table-cell office:value-type="float" office:value="0" table:formula="of:=IF([.E287]=1;[.N286]+1;0)" table:style-name="ce1">
            <text:p>0</text:p>
          </table:table-cell>
          <table:table-cell office:value-type="float" office:value="0" table:formula="of:=IF([.F287]=1;[.O286]+1;0)" table:style-name="ce1">
            <text:p>0</text:p>
          </table:table-cell>
          <table:table-cell office:value-type="float" office:value="0" table:formula="of:=IF([.G287]=1;[.P286]+1;0)" table:style-name="ce1">
            <text:p>0</text:p>
          </table:table-cell>
          <table:table-cell office:value-type="float" office:value="0" table:formula="of:=IF([.H287]=1;[.Q286]+1;0)" table:style-name="ce1">
            <text:p>0</text:p>
          </table:table-cell>
          <table:table-cell office:value-type="float" office:value="0" table:formula="of:=IF([.I287]=1;[.R28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2T00:00:00" table:formula="of:=[.A287]+1" table:style-name="ce10">
            <text:p>Mon, 12 Oct 2026</text:p>
          </table:table-cell>
          <table:table-cell office:value-type="string" office:string-value="Mon" table:formula="of:=TEXT([.A288];&quot;ddd&quot;)" table:style-name="ce5">
            <text:p>Mon</text:p>
          </table:table-cell>
          <table:table-cell office:value-type="string" office:string-value="Oct" table:formula="of:=TEXT([.A288];&quot;mmm&quot;)" table:style-name="ce5">
            <text:p>Oct</text:p>
          </table:table-cell>
          <table:table-cell office:value-type="float" office:value="0" table:formula="of:=IF(INDEX([Tracker.$A$1:.$AG$120];6+9*(MONTH([.$A288])-1)+(COLUMN()-4);DAY([.$A288])+2)&lt;&gt;&quot;&quot;;1;0)" table:style-name="ce92"/>
          <table:table-cell office:value-type="float" office:value="0" table:formula="of:=IF(INDEX([Tracker.$A$1:.$AG$120];6+9*(MONTH([.$A288])-1)+(COLUMN()-4);DAY([.$A288])+2)&lt;&gt;&quot;&quot;;1;0)" table:style-name="ce92"/>
          <table:table-cell office:value-type="float" office:value="0" table:formula="of:=IF(INDEX([Tracker.$A$1:.$AG$120];6+9*(MONTH([.$A288])-1)+(COLUMN()-4);DAY([.$A288])+2)&lt;&gt;&quot;&quot;;1;0)" table:style-name="ce92"/>
          <table:table-cell office:value-type="float" office:value="0" table:formula="of:=IF(INDEX([Tracker.$A$1:.$AG$120];6+9*(MONTH([.$A288])-1)+(COLUMN()-4);DAY([.$A288])+2)&lt;&gt;&quot;&quot;;1;0)" table:style-name="ce92"/>
          <table:table-cell office:value-type="float" office:value="0" table:formula="of:=IF(INDEX([Tracker.$A$1:.$AG$120];6+9*(MONTH([.$A288])-1)+(COLUMN()-4);DAY([.$A288])+2)&lt;&gt;&quot;&quot;;1;0)" table:style-name="ce92"/>
          <table:table-cell office:value-type="float" office:value="0" table:formula="of:=IF(INDEX([Tracker.$A$1:.$AG$120];6+9*(MONTH([.$A288])-1)+(COLUMN()-4);DAY([.$A288])+2)&lt;&gt;&quot;&quot;;1;0)" table:style-name="ce92"/>
          <table:table-cell office:value-type="float" office:value="0" table:formula="of:=SUM([.D288:.I288])" table:style-name="ce6"/>
          <table:table-cell office:value-type="percentage" office:value="0" table:formula="of:=[.J288]/6" table:style-name="ce8">
            <text:p>0%</text:p>
          </table:table-cell>
          <table:table-cell table:style-name="ce1"/>
          <table:table-cell office:value-type="float" office:value="0" table:formula="of:=IF([.D288]=1;[.M287]+1;0)" table:style-name="ce1">
            <text:p>0</text:p>
          </table:table-cell>
          <table:table-cell office:value-type="float" office:value="0" table:formula="of:=IF([.E288]=1;[.N287]+1;0)" table:style-name="ce1">
            <text:p>0</text:p>
          </table:table-cell>
          <table:table-cell office:value-type="float" office:value="0" table:formula="of:=IF([.F288]=1;[.O287]+1;0)" table:style-name="ce1">
            <text:p>0</text:p>
          </table:table-cell>
          <table:table-cell office:value-type="float" office:value="0" table:formula="of:=IF([.G288]=1;[.P287]+1;0)" table:style-name="ce1">
            <text:p>0</text:p>
          </table:table-cell>
          <table:table-cell office:value-type="float" office:value="0" table:formula="of:=IF([.H288]=1;[.Q287]+1;0)" table:style-name="ce1">
            <text:p>0</text:p>
          </table:table-cell>
          <table:table-cell office:value-type="float" office:value="0" table:formula="of:=IF([.I288]=1;[.R28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3T00:00:00" table:formula="of:=[.A288]+1" table:style-name="ce10">
            <text:p>Tue, 13 Oct 2026</text:p>
          </table:table-cell>
          <table:table-cell office:value-type="string" office:string-value="Tue" table:formula="of:=TEXT([.A289];&quot;ddd&quot;)" table:style-name="ce5">
            <text:p>Tue</text:p>
          </table:table-cell>
          <table:table-cell office:value-type="string" office:string-value="Oct" table:formula="of:=TEXT([.A289];&quot;mmm&quot;)" table:style-name="ce5">
            <text:p>Oct</text:p>
          </table:table-cell>
          <table:table-cell office:value-type="float" office:value="0" table:formula="of:=IF(INDEX([Tracker.$A$1:.$AG$120];6+9*(MONTH([.$A289])-1)+(COLUMN()-4);DAY([.$A289])+2)&lt;&gt;&quot;&quot;;1;0)" table:style-name="ce92"/>
          <table:table-cell office:value-type="float" office:value="0" table:formula="of:=IF(INDEX([Tracker.$A$1:.$AG$120];6+9*(MONTH([.$A289])-1)+(COLUMN()-4);DAY([.$A289])+2)&lt;&gt;&quot;&quot;;1;0)" table:style-name="ce92"/>
          <table:table-cell office:value-type="float" office:value="0" table:formula="of:=IF(INDEX([Tracker.$A$1:.$AG$120];6+9*(MONTH([.$A289])-1)+(COLUMN()-4);DAY([.$A289])+2)&lt;&gt;&quot;&quot;;1;0)" table:style-name="ce92"/>
          <table:table-cell office:value-type="float" office:value="0" table:formula="of:=IF(INDEX([Tracker.$A$1:.$AG$120];6+9*(MONTH([.$A289])-1)+(COLUMN()-4);DAY([.$A289])+2)&lt;&gt;&quot;&quot;;1;0)" table:style-name="ce92"/>
          <table:table-cell office:value-type="float" office:value="0" table:formula="of:=IF(INDEX([Tracker.$A$1:.$AG$120];6+9*(MONTH([.$A289])-1)+(COLUMN()-4);DAY([.$A289])+2)&lt;&gt;&quot;&quot;;1;0)" table:style-name="ce92"/>
          <table:table-cell office:value-type="float" office:value="0" table:formula="of:=IF(INDEX([Tracker.$A$1:.$AG$120];6+9*(MONTH([.$A289])-1)+(COLUMN()-4);DAY([.$A289])+2)&lt;&gt;&quot;&quot;;1;0)" table:style-name="ce92"/>
          <table:table-cell office:value-type="float" office:value="0" table:formula="of:=SUM([.D289:.I289])" table:style-name="ce6"/>
          <table:table-cell office:value-type="percentage" office:value="0" table:formula="of:=[.J289]/6" table:style-name="ce8">
            <text:p>0%</text:p>
          </table:table-cell>
          <table:table-cell table:style-name="ce1"/>
          <table:table-cell office:value-type="float" office:value="0" table:formula="of:=IF([.D289]=1;[.M288]+1;0)" table:style-name="ce1">
            <text:p>0</text:p>
          </table:table-cell>
          <table:table-cell office:value-type="float" office:value="0" table:formula="of:=IF([.E289]=1;[.N288]+1;0)" table:style-name="ce1">
            <text:p>0</text:p>
          </table:table-cell>
          <table:table-cell office:value-type="float" office:value="0" table:formula="of:=IF([.F289]=1;[.O288]+1;0)" table:style-name="ce1">
            <text:p>0</text:p>
          </table:table-cell>
          <table:table-cell office:value-type="float" office:value="0" table:formula="of:=IF([.G289]=1;[.P288]+1;0)" table:style-name="ce1">
            <text:p>0</text:p>
          </table:table-cell>
          <table:table-cell office:value-type="float" office:value="0" table:formula="of:=IF([.H289]=1;[.Q288]+1;0)" table:style-name="ce1">
            <text:p>0</text:p>
          </table:table-cell>
          <table:table-cell office:value-type="float" office:value="0" table:formula="of:=IF([.I289]=1;[.R28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4T00:00:00" table:formula="of:=[.A289]+1" table:style-name="ce10">
            <text:p>Wed, 14 Oct 2026</text:p>
          </table:table-cell>
          <table:table-cell office:value-type="string" office:string-value="Wed" table:formula="of:=TEXT([.A290];&quot;ddd&quot;)" table:style-name="ce5">
            <text:p>Wed</text:p>
          </table:table-cell>
          <table:table-cell office:value-type="string" office:string-value="Oct" table:formula="of:=TEXT([.A290];&quot;mmm&quot;)" table:style-name="ce5">
            <text:p>Oct</text:p>
          </table:table-cell>
          <table:table-cell office:value-type="float" office:value="0" table:formula="of:=IF(INDEX([Tracker.$A$1:.$AG$120];6+9*(MONTH([.$A290])-1)+(COLUMN()-4);DAY([.$A290])+2)&lt;&gt;&quot;&quot;;1;0)" table:style-name="ce92"/>
          <table:table-cell office:value-type="float" office:value="0" table:formula="of:=IF(INDEX([Tracker.$A$1:.$AG$120];6+9*(MONTH([.$A290])-1)+(COLUMN()-4);DAY([.$A290])+2)&lt;&gt;&quot;&quot;;1;0)" table:style-name="ce92"/>
          <table:table-cell office:value-type="float" office:value="0" table:formula="of:=IF(INDEX([Tracker.$A$1:.$AG$120];6+9*(MONTH([.$A290])-1)+(COLUMN()-4);DAY([.$A290])+2)&lt;&gt;&quot;&quot;;1;0)" table:style-name="ce92"/>
          <table:table-cell office:value-type="float" office:value="0" table:formula="of:=IF(INDEX([Tracker.$A$1:.$AG$120];6+9*(MONTH([.$A290])-1)+(COLUMN()-4);DAY([.$A290])+2)&lt;&gt;&quot;&quot;;1;0)" table:style-name="ce92"/>
          <table:table-cell office:value-type="float" office:value="0" table:formula="of:=IF(INDEX([Tracker.$A$1:.$AG$120];6+9*(MONTH([.$A290])-1)+(COLUMN()-4);DAY([.$A290])+2)&lt;&gt;&quot;&quot;;1;0)" table:style-name="ce92"/>
          <table:table-cell office:value-type="float" office:value="0" table:formula="of:=IF(INDEX([Tracker.$A$1:.$AG$120];6+9*(MONTH([.$A290])-1)+(COLUMN()-4);DAY([.$A290])+2)&lt;&gt;&quot;&quot;;1;0)" table:style-name="ce92"/>
          <table:table-cell office:value-type="float" office:value="0" table:formula="of:=SUM([.D290:.I290])" table:style-name="ce6"/>
          <table:table-cell office:value-type="percentage" office:value="0" table:formula="of:=[.J290]/6" table:style-name="ce8">
            <text:p>0%</text:p>
          </table:table-cell>
          <table:table-cell table:style-name="ce1"/>
          <table:table-cell office:value-type="float" office:value="0" table:formula="of:=IF([.D290]=1;[.M289]+1;0)" table:style-name="ce1">
            <text:p>0</text:p>
          </table:table-cell>
          <table:table-cell office:value-type="float" office:value="0" table:formula="of:=IF([.E290]=1;[.N289]+1;0)" table:style-name="ce1">
            <text:p>0</text:p>
          </table:table-cell>
          <table:table-cell office:value-type="float" office:value="0" table:formula="of:=IF([.F290]=1;[.O289]+1;0)" table:style-name="ce1">
            <text:p>0</text:p>
          </table:table-cell>
          <table:table-cell office:value-type="float" office:value="0" table:formula="of:=IF([.G290]=1;[.P289]+1;0)" table:style-name="ce1">
            <text:p>0</text:p>
          </table:table-cell>
          <table:table-cell office:value-type="float" office:value="0" table:formula="of:=IF([.H290]=1;[.Q289]+1;0)" table:style-name="ce1">
            <text:p>0</text:p>
          </table:table-cell>
          <table:table-cell office:value-type="float" office:value="0" table:formula="of:=IF([.I290]=1;[.R28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5T00:00:00" table:formula="of:=[.A290]+1" table:style-name="ce10">
            <text:p>Thu, 15 Oct 2026</text:p>
          </table:table-cell>
          <table:table-cell office:value-type="string" office:string-value="Thu" table:formula="of:=TEXT([.A291];&quot;ddd&quot;)" table:style-name="ce5">
            <text:p>Thu</text:p>
          </table:table-cell>
          <table:table-cell office:value-type="string" office:string-value="Oct" table:formula="of:=TEXT([.A291];&quot;mmm&quot;)" table:style-name="ce5">
            <text:p>Oct</text:p>
          </table:table-cell>
          <table:table-cell office:value-type="float" office:value="0" table:formula="of:=IF(INDEX([Tracker.$A$1:.$AG$120];6+9*(MONTH([.$A291])-1)+(COLUMN()-4);DAY([.$A291])+2)&lt;&gt;&quot;&quot;;1;0)" table:style-name="ce92"/>
          <table:table-cell office:value-type="float" office:value="0" table:formula="of:=IF(INDEX([Tracker.$A$1:.$AG$120];6+9*(MONTH([.$A291])-1)+(COLUMN()-4);DAY([.$A291])+2)&lt;&gt;&quot;&quot;;1;0)" table:style-name="ce92"/>
          <table:table-cell office:value-type="float" office:value="0" table:formula="of:=IF(INDEX([Tracker.$A$1:.$AG$120];6+9*(MONTH([.$A291])-1)+(COLUMN()-4);DAY([.$A291])+2)&lt;&gt;&quot;&quot;;1;0)" table:style-name="ce92"/>
          <table:table-cell office:value-type="float" office:value="0" table:formula="of:=IF(INDEX([Tracker.$A$1:.$AG$120];6+9*(MONTH([.$A291])-1)+(COLUMN()-4);DAY([.$A291])+2)&lt;&gt;&quot;&quot;;1;0)" table:style-name="ce92"/>
          <table:table-cell office:value-type="float" office:value="0" table:formula="of:=IF(INDEX([Tracker.$A$1:.$AG$120];6+9*(MONTH([.$A291])-1)+(COLUMN()-4);DAY([.$A291])+2)&lt;&gt;&quot;&quot;;1;0)" table:style-name="ce92"/>
          <table:table-cell office:value-type="float" office:value="0" table:formula="of:=IF(INDEX([Tracker.$A$1:.$AG$120];6+9*(MONTH([.$A291])-1)+(COLUMN()-4);DAY([.$A291])+2)&lt;&gt;&quot;&quot;;1;0)" table:style-name="ce92"/>
          <table:table-cell office:value-type="float" office:value="0" table:formula="of:=SUM([.D291:.I291])" table:style-name="ce6"/>
          <table:table-cell office:value-type="percentage" office:value="0" table:formula="of:=[.J291]/6" table:style-name="ce8">
            <text:p>0%</text:p>
          </table:table-cell>
          <table:table-cell table:style-name="ce1"/>
          <table:table-cell office:value-type="float" office:value="0" table:formula="of:=IF([.D291]=1;[.M290]+1;0)" table:style-name="ce1">
            <text:p>0</text:p>
          </table:table-cell>
          <table:table-cell office:value-type="float" office:value="0" table:formula="of:=IF([.E291]=1;[.N290]+1;0)" table:style-name="ce1">
            <text:p>0</text:p>
          </table:table-cell>
          <table:table-cell office:value-type="float" office:value="0" table:formula="of:=IF([.F291]=1;[.O290]+1;0)" table:style-name="ce1">
            <text:p>0</text:p>
          </table:table-cell>
          <table:table-cell office:value-type="float" office:value="0" table:formula="of:=IF([.G291]=1;[.P290]+1;0)" table:style-name="ce1">
            <text:p>0</text:p>
          </table:table-cell>
          <table:table-cell office:value-type="float" office:value="0" table:formula="of:=IF([.H291]=1;[.Q290]+1;0)" table:style-name="ce1">
            <text:p>0</text:p>
          </table:table-cell>
          <table:table-cell office:value-type="float" office:value="0" table:formula="of:=IF([.I291]=1;[.R29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6T00:00:00" table:formula="of:=[.A291]+1" table:style-name="ce10">
            <text:p>Fri, 16 Oct 2026</text:p>
          </table:table-cell>
          <table:table-cell office:value-type="string" office:string-value="Fri" table:formula="of:=TEXT([.A292];&quot;ddd&quot;)" table:style-name="ce5">
            <text:p>Fri</text:p>
          </table:table-cell>
          <table:table-cell office:value-type="string" office:string-value="Oct" table:formula="of:=TEXT([.A292];&quot;mmm&quot;)" table:style-name="ce5">
            <text:p>Oct</text:p>
          </table:table-cell>
          <table:table-cell office:value-type="float" office:value="0" table:formula="of:=IF(INDEX([Tracker.$A$1:.$AG$120];6+9*(MONTH([.$A292])-1)+(COLUMN()-4);DAY([.$A292])+2)&lt;&gt;&quot;&quot;;1;0)" table:style-name="ce92"/>
          <table:table-cell office:value-type="float" office:value="0" table:formula="of:=IF(INDEX([Tracker.$A$1:.$AG$120];6+9*(MONTH([.$A292])-1)+(COLUMN()-4);DAY([.$A292])+2)&lt;&gt;&quot;&quot;;1;0)" table:style-name="ce92"/>
          <table:table-cell office:value-type="float" office:value="0" table:formula="of:=IF(INDEX([Tracker.$A$1:.$AG$120];6+9*(MONTH([.$A292])-1)+(COLUMN()-4);DAY([.$A292])+2)&lt;&gt;&quot;&quot;;1;0)" table:style-name="ce92"/>
          <table:table-cell office:value-type="float" office:value="0" table:formula="of:=IF(INDEX([Tracker.$A$1:.$AG$120];6+9*(MONTH([.$A292])-1)+(COLUMN()-4);DAY([.$A292])+2)&lt;&gt;&quot;&quot;;1;0)" table:style-name="ce92"/>
          <table:table-cell office:value-type="float" office:value="0" table:formula="of:=IF(INDEX([Tracker.$A$1:.$AG$120];6+9*(MONTH([.$A292])-1)+(COLUMN()-4);DAY([.$A292])+2)&lt;&gt;&quot;&quot;;1;0)" table:style-name="ce92"/>
          <table:table-cell office:value-type="float" office:value="0" table:formula="of:=IF(INDEX([Tracker.$A$1:.$AG$120];6+9*(MONTH([.$A292])-1)+(COLUMN()-4);DAY([.$A292])+2)&lt;&gt;&quot;&quot;;1;0)" table:style-name="ce92"/>
          <table:table-cell office:value-type="float" office:value="0" table:formula="of:=SUM([.D292:.I292])" table:style-name="ce6"/>
          <table:table-cell office:value-type="percentage" office:value="0" table:formula="of:=[.J292]/6" table:style-name="ce8">
            <text:p>0%</text:p>
          </table:table-cell>
          <table:table-cell table:style-name="ce1"/>
          <table:table-cell office:value-type="float" office:value="0" table:formula="of:=IF([.D292]=1;[.M291]+1;0)" table:style-name="ce1">
            <text:p>0</text:p>
          </table:table-cell>
          <table:table-cell office:value-type="float" office:value="0" table:formula="of:=IF([.E292]=1;[.N291]+1;0)" table:style-name="ce1">
            <text:p>0</text:p>
          </table:table-cell>
          <table:table-cell office:value-type="float" office:value="0" table:formula="of:=IF([.F292]=1;[.O291]+1;0)" table:style-name="ce1">
            <text:p>0</text:p>
          </table:table-cell>
          <table:table-cell office:value-type="float" office:value="0" table:formula="of:=IF([.G292]=1;[.P291]+1;0)" table:style-name="ce1">
            <text:p>0</text:p>
          </table:table-cell>
          <table:table-cell office:value-type="float" office:value="0" table:formula="of:=IF([.H292]=1;[.Q291]+1;0)" table:style-name="ce1">
            <text:p>0</text:p>
          </table:table-cell>
          <table:table-cell office:value-type="float" office:value="0" table:formula="of:=IF([.I292]=1;[.R29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7T00:00:00" table:formula="of:=[.A292]+1" table:style-name="ce10">
            <text:p>Sat, 17 Oct 2026</text:p>
          </table:table-cell>
          <table:table-cell office:value-type="string" office:string-value="Sat" table:formula="of:=TEXT([.A293];&quot;ddd&quot;)" table:style-name="ce5">
            <text:p>Sat</text:p>
          </table:table-cell>
          <table:table-cell office:value-type="string" office:string-value="Oct" table:formula="of:=TEXT([.A293];&quot;mmm&quot;)" table:style-name="ce5">
            <text:p>Oct</text:p>
          </table:table-cell>
          <table:table-cell office:value-type="float" office:value="0" table:formula="of:=IF(INDEX([Tracker.$A$1:.$AG$120];6+9*(MONTH([.$A293])-1)+(COLUMN()-4);DAY([.$A293])+2)&lt;&gt;&quot;&quot;;1;0)" table:style-name="ce92"/>
          <table:table-cell office:value-type="float" office:value="0" table:formula="of:=IF(INDEX([Tracker.$A$1:.$AG$120];6+9*(MONTH([.$A293])-1)+(COLUMN()-4);DAY([.$A293])+2)&lt;&gt;&quot;&quot;;1;0)" table:style-name="ce92"/>
          <table:table-cell office:value-type="float" office:value="0" table:formula="of:=IF(INDEX([Tracker.$A$1:.$AG$120];6+9*(MONTH([.$A293])-1)+(COLUMN()-4);DAY([.$A293])+2)&lt;&gt;&quot;&quot;;1;0)" table:style-name="ce92"/>
          <table:table-cell office:value-type="float" office:value="0" table:formula="of:=IF(INDEX([Tracker.$A$1:.$AG$120];6+9*(MONTH([.$A293])-1)+(COLUMN()-4);DAY([.$A293])+2)&lt;&gt;&quot;&quot;;1;0)" table:style-name="ce92"/>
          <table:table-cell office:value-type="float" office:value="0" table:formula="of:=IF(INDEX([Tracker.$A$1:.$AG$120];6+9*(MONTH([.$A293])-1)+(COLUMN()-4);DAY([.$A293])+2)&lt;&gt;&quot;&quot;;1;0)" table:style-name="ce92"/>
          <table:table-cell office:value-type="float" office:value="0" table:formula="of:=IF(INDEX([Tracker.$A$1:.$AG$120];6+9*(MONTH([.$A293])-1)+(COLUMN()-4);DAY([.$A293])+2)&lt;&gt;&quot;&quot;;1;0)" table:style-name="ce92"/>
          <table:table-cell office:value-type="float" office:value="0" table:formula="of:=SUM([.D293:.I293])" table:style-name="ce6"/>
          <table:table-cell office:value-type="percentage" office:value="0" table:formula="of:=[.J293]/6" table:style-name="ce8">
            <text:p>0%</text:p>
          </table:table-cell>
          <table:table-cell table:style-name="ce1"/>
          <table:table-cell office:value-type="float" office:value="0" table:formula="of:=IF([.D293]=1;[.M292]+1;0)" table:style-name="ce1">
            <text:p>0</text:p>
          </table:table-cell>
          <table:table-cell office:value-type="float" office:value="0" table:formula="of:=IF([.E293]=1;[.N292]+1;0)" table:style-name="ce1">
            <text:p>0</text:p>
          </table:table-cell>
          <table:table-cell office:value-type="float" office:value="0" table:formula="of:=IF([.F293]=1;[.O292]+1;0)" table:style-name="ce1">
            <text:p>0</text:p>
          </table:table-cell>
          <table:table-cell office:value-type="float" office:value="0" table:formula="of:=IF([.G293]=1;[.P292]+1;0)" table:style-name="ce1">
            <text:p>0</text:p>
          </table:table-cell>
          <table:table-cell office:value-type="float" office:value="0" table:formula="of:=IF([.H293]=1;[.Q292]+1;0)" table:style-name="ce1">
            <text:p>0</text:p>
          </table:table-cell>
          <table:table-cell office:value-type="float" office:value="0" table:formula="of:=IF([.I293]=1;[.R29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8T00:00:00" table:formula="of:=[.A293]+1" table:style-name="ce10">
            <text:p>Sun, 18 Oct 2026</text:p>
          </table:table-cell>
          <table:table-cell office:value-type="string" office:string-value="Sun" table:formula="of:=TEXT([.A294];&quot;ddd&quot;)" table:style-name="ce5">
            <text:p>Sun</text:p>
          </table:table-cell>
          <table:table-cell office:value-type="string" office:string-value="Oct" table:formula="of:=TEXT([.A294];&quot;mmm&quot;)" table:style-name="ce5">
            <text:p>Oct</text:p>
          </table:table-cell>
          <table:table-cell office:value-type="float" office:value="0" table:formula="of:=IF(INDEX([Tracker.$A$1:.$AG$120];6+9*(MONTH([.$A294])-1)+(COLUMN()-4);DAY([.$A294])+2)&lt;&gt;&quot;&quot;;1;0)" table:style-name="ce92"/>
          <table:table-cell office:value-type="float" office:value="0" table:formula="of:=IF(INDEX([Tracker.$A$1:.$AG$120];6+9*(MONTH([.$A294])-1)+(COLUMN()-4);DAY([.$A294])+2)&lt;&gt;&quot;&quot;;1;0)" table:style-name="ce92"/>
          <table:table-cell office:value-type="float" office:value="0" table:formula="of:=IF(INDEX([Tracker.$A$1:.$AG$120];6+9*(MONTH([.$A294])-1)+(COLUMN()-4);DAY([.$A294])+2)&lt;&gt;&quot;&quot;;1;0)" table:style-name="ce92"/>
          <table:table-cell office:value-type="float" office:value="0" table:formula="of:=IF(INDEX([Tracker.$A$1:.$AG$120];6+9*(MONTH([.$A294])-1)+(COLUMN()-4);DAY([.$A294])+2)&lt;&gt;&quot;&quot;;1;0)" table:style-name="ce92"/>
          <table:table-cell office:value-type="float" office:value="0" table:formula="of:=IF(INDEX([Tracker.$A$1:.$AG$120];6+9*(MONTH([.$A294])-1)+(COLUMN()-4);DAY([.$A294])+2)&lt;&gt;&quot;&quot;;1;0)" table:style-name="ce92"/>
          <table:table-cell office:value-type="float" office:value="0" table:formula="of:=IF(INDEX([Tracker.$A$1:.$AG$120];6+9*(MONTH([.$A294])-1)+(COLUMN()-4);DAY([.$A294])+2)&lt;&gt;&quot;&quot;;1;0)" table:style-name="ce92"/>
          <table:table-cell office:value-type="float" office:value="0" table:formula="of:=SUM([.D294:.I294])" table:style-name="ce6"/>
          <table:table-cell office:value-type="percentage" office:value="0" table:formula="of:=[.J294]/6" table:style-name="ce8">
            <text:p>0%</text:p>
          </table:table-cell>
          <table:table-cell table:style-name="ce1"/>
          <table:table-cell office:value-type="float" office:value="0" table:formula="of:=IF([.D294]=1;[.M293]+1;0)" table:style-name="ce1">
            <text:p>0</text:p>
          </table:table-cell>
          <table:table-cell office:value-type="float" office:value="0" table:formula="of:=IF([.E294]=1;[.N293]+1;0)" table:style-name="ce1">
            <text:p>0</text:p>
          </table:table-cell>
          <table:table-cell office:value-type="float" office:value="0" table:formula="of:=IF([.F294]=1;[.O293]+1;0)" table:style-name="ce1">
            <text:p>0</text:p>
          </table:table-cell>
          <table:table-cell office:value-type="float" office:value="0" table:formula="of:=IF([.G294]=1;[.P293]+1;0)" table:style-name="ce1">
            <text:p>0</text:p>
          </table:table-cell>
          <table:table-cell office:value-type="float" office:value="0" table:formula="of:=IF([.H294]=1;[.Q293]+1;0)" table:style-name="ce1">
            <text:p>0</text:p>
          </table:table-cell>
          <table:table-cell office:value-type="float" office:value="0" table:formula="of:=IF([.I294]=1;[.R29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19T00:00:00" table:formula="of:=[.A294]+1" table:style-name="ce10">
            <text:p>Mon, 19 Oct 2026</text:p>
          </table:table-cell>
          <table:table-cell office:value-type="string" office:string-value="Mon" table:formula="of:=TEXT([.A295];&quot;ddd&quot;)" table:style-name="ce5">
            <text:p>Mon</text:p>
          </table:table-cell>
          <table:table-cell office:value-type="string" office:string-value="Oct" table:formula="of:=TEXT([.A295];&quot;mmm&quot;)" table:style-name="ce5">
            <text:p>Oct</text:p>
          </table:table-cell>
          <table:table-cell office:value-type="float" office:value="0" table:formula="of:=IF(INDEX([Tracker.$A$1:.$AG$120];6+9*(MONTH([.$A295])-1)+(COLUMN()-4);DAY([.$A295])+2)&lt;&gt;&quot;&quot;;1;0)" table:style-name="ce92"/>
          <table:table-cell office:value-type="float" office:value="0" table:formula="of:=IF(INDEX([Tracker.$A$1:.$AG$120];6+9*(MONTH([.$A295])-1)+(COLUMN()-4);DAY([.$A295])+2)&lt;&gt;&quot;&quot;;1;0)" table:style-name="ce92"/>
          <table:table-cell office:value-type="float" office:value="0" table:formula="of:=IF(INDEX([Tracker.$A$1:.$AG$120];6+9*(MONTH([.$A295])-1)+(COLUMN()-4);DAY([.$A295])+2)&lt;&gt;&quot;&quot;;1;0)" table:style-name="ce92"/>
          <table:table-cell office:value-type="float" office:value="0" table:formula="of:=IF(INDEX([Tracker.$A$1:.$AG$120];6+9*(MONTH([.$A295])-1)+(COLUMN()-4);DAY([.$A295])+2)&lt;&gt;&quot;&quot;;1;0)" table:style-name="ce92"/>
          <table:table-cell office:value-type="float" office:value="0" table:formula="of:=IF(INDEX([Tracker.$A$1:.$AG$120];6+9*(MONTH([.$A295])-1)+(COLUMN()-4);DAY([.$A295])+2)&lt;&gt;&quot;&quot;;1;0)" table:style-name="ce92"/>
          <table:table-cell office:value-type="float" office:value="0" table:formula="of:=IF(INDEX([Tracker.$A$1:.$AG$120];6+9*(MONTH([.$A295])-1)+(COLUMN()-4);DAY([.$A295])+2)&lt;&gt;&quot;&quot;;1;0)" table:style-name="ce92"/>
          <table:table-cell office:value-type="float" office:value="0" table:formula="of:=SUM([.D295:.I295])" table:style-name="ce6"/>
          <table:table-cell office:value-type="percentage" office:value="0" table:formula="of:=[.J295]/6" table:style-name="ce8">
            <text:p>0%</text:p>
          </table:table-cell>
          <table:table-cell table:style-name="ce1"/>
          <table:table-cell office:value-type="float" office:value="0" table:formula="of:=IF([.D295]=1;[.M294]+1;0)" table:style-name="ce1">
            <text:p>0</text:p>
          </table:table-cell>
          <table:table-cell office:value-type="float" office:value="0" table:formula="of:=IF([.E295]=1;[.N294]+1;0)" table:style-name="ce1">
            <text:p>0</text:p>
          </table:table-cell>
          <table:table-cell office:value-type="float" office:value="0" table:formula="of:=IF([.F295]=1;[.O294]+1;0)" table:style-name="ce1">
            <text:p>0</text:p>
          </table:table-cell>
          <table:table-cell office:value-type="float" office:value="0" table:formula="of:=IF([.G295]=1;[.P294]+1;0)" table:style-name="ce1">
            <text:p>0</text:p>
          </table:table-cell>
          <table:table-cell office:value-type="float" office:value="0" table:formula="of:=IF([.H295]=1;[.Q294]+1;0)" table:style-name="ce1">
            <text:p>0</text:p>
          </table:table-cell>
          <table:table-cell office:value-type="float" office:value="0" table:formula="of:=IF([.I295]=1;[.R29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0T00:00:00" table:formula="of:=[.A295]+1" table:style-name="ce10">
            <text:p>Tue, 20 Oct 2026</text:p>
          </table:table-cell>
          <table:table-cell office:value-type="string" office:string-value="Tue" table:formula="of:=TEXT([.A296];&quot;ddd&quot;)" table:style-name="ce5">
            <text:p>Tue</text:p>
          </table:table-cell>
          <table:table-cell office:value-type="string" office:string-value="Oct" table:formula="of:=TEXT([.A296];&quot;mmm&quot;)" table:style-name="ce5">
            <text:p>Oct</text:p>
          </table:table-cell>
          <table:table-cell office:value-type="float" office:value="0" table:formula="of:=IF(INDEX([Tracker.$A$1:.$AG$120];6+9*(MONTH([.$A296])-1)+(COLUMN()-4);DAY([.$A296])+2)&lt;&gt;&quot;&quot;;1;0)" table:style-name="ce92"/>
          <table:table-cell office:value-type="float" office:value="0" table:formula="of:=IF(INDEX([Tracker.$A$1:.$AG$120];6+9*(MONTH([.$A296])-1)+(COLUMN()-4);DAY([.$A296])+2)&lt;&gt;&quot;&quot;;1;0)" table:style-name="ce92"/>
          <table:table-cell office:value-type="float" office:value="0" table:formula="of:=IF(INDEX([Tracker.$A$1:.$AG$120];6+9*(MONTH([.$A296])-1)+(COLUMN()-4);DAY([.$A296])+2)&lt;&gt;&quot;&quot;;1;0)" table:style-name="ce92"/>
          <table:table-cell office:value-type="float" office:value="0" table:formula="of:=IF(INDEX([Tracker.$A$1:.$AG$120];6+9*(MONTH([.$A296])-1)+(COLUMN()-4);DAY([.$A296])+2)&lt;&gt;&quot;&quot;;1;0)" table:style-name="ce92"/>
          <table:table-cell office:value-type="float" office:value="0" table:formula="of:=IF(INDEX([Tracker.$A$1:.$AG$120];6+9*(MONTH([.$A296])-1)+(COLUMN()-4);DAY([.$A296])+2)&lt;&gt;&quot;&quot;;1;0)" table:style-name="ce92"/>
          <table:table-cell office:value-type="float" office:value="0" table:formula="of:=IF(INDEX([Tracker.$A$1:.$AG$120];6+9*(MONTH([.$A296])-1)+(COLUMN()-4);DAY([.$A296])+2)&lt;&gt;&quot;&quot;;1;0)" table:style-name="ce92"/>
          <table:table-cell office:value-type="float" office:value="0" table:formula="of:=SUM([.D296:.I296])" table:style-name="ce6"/>
          <table:table-cell office:value-type="percentage" office:value="0" table:formula="of:=[.J296]/6" table:style-name="ce8">
            <text:p>0%</text:p>
          </table:table-cell>
          <table:table-cell table:style-name="ce1"/>
          <table:table-cell office:value-type="float" office:value="0" table:formula="of:=IF([.D296]=1;[.M295]+1;0)" table:style-name="ce1">
            <text:p>0</text:p>
          </table:table-cell>
          <table:table-cell office:value-type="float" office:value="0" table:formula="of:=IF([.E296]=1;[.N295]+1;0)" table:style-name="ce1">
            <text:p>0</text:p>
          </table:table-cell>
          <table:table-cell office:value-type="float" office:value="0" table:formula="of:=IF([.F296]=1;[.O295]+1;0)" table:style-name="ce1">
            <text:p>0</text:p>
          </table:table-cell>
          <table:table-cell office:value-type="float" office:value="0" table:formula="of:=IF([.G296]=1;[.P295]+1;0)" table:style-name="ce1">
            <text:p>0</text:p>
          </table:table-cell>
          <table:table-cell office:value-type="float" office:value="0" table:formula="of:=IF([.H296]=1;[.Q295]+1;0)" table:style-name="ce1">
            <text:p>0</text:p>
          </table:table-cell>
          <table:table-cell office:value-type="float" office:value="0" table:formula="of:=IF([.I296]=1;[.R29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1T00:00:00" table:formula="of:=[.A296]+1" table:style-name="ce10">
            <text:p>Wed, 21 Oct 2026</text:p>
          </table:table-cell>
          <table:table-cell office:value-type="string" office:string-value="Wed" table:formula="of:=TEXT([.A297];&quot;ddd&quot;)" table:style-name="ce5">
            <text:p>Wed</text:p>
          </table:table-cell>
          <table:table-cell office:value-type="string" office:string-value="Oct" table:formula="of:=TEXT([.A297];&quot;mmm&quot;)" table:style-name="ce5">
            <text:p>Oct</text:p>
          </table:table-cell>
          <table:table-cell office:value-type="float" office:value="0" table:formula="of:=IF(INDEX([Tracker.$A$1:.$AG$120];6+9*(MONTH([.$A297])-1)+(COLUMN()-4);DAY([.$A297])+2)&lt;&gt;&quot;&quot;;1;0)" table:style-name="ce92"/>
          <table:table-cell office:value-type="float" office:value="0" table:formula="of:=IF(INDEX([Tracker.$A$1:.$AG$120];6+9*(MONTH([.$A297])-1)+(COLUMN()-4);DAY([.$A297])+2)&lt;&gt;&quot;&quot;;1;0)" table:style-name="ce92"/>
          <table:table-cell office:value-type="float" office:value="0" table:formula="of:=IF(INDEX([Tracker.$A$1:.$AG$120];6+9*(MONTH([.$A297])-1)+(COLUMN()-4);DAY([.$A297])+2)&lt;&gt;&quot;&quot;;1;0)" table:style-name="ce92"/>
          <table:table-cell office:value-type="float" office:value="0" table:formula="of:=IF(INDEX([Tracker.$A$1:.$AG$120];6+9*(MONTH([.$A297])-1)+(COLUMN()-4);DAY([.$A297])+2)&lt;&gt;&quot;&quot;;1;0)" table:style-name="ce92"/>
          <table:table-cell office:value-type="float" office:value="0" table:formula="of:=IF(INDEX([Tracker.$A$1:.$AG$120];6+9*(MONTH([.$A297])-1)+(COLUMN()-4);DAY([.$A297])+2)&lt;&gt;&quot;&quot;;1;0)" table:style-name="ce92"/>
          <table:table-cell office:value-type="float" office:value="0" table:formula="of:=IF(INDEX([Tracker.$A$1:.$AG$120];6+9*(MONTH([.$A297])-1)+(COLUMN()-4);DAY([.$A297])+2)&lt;&gt;&quot;&quot;;1;0)" table:style-name="ce92"/>
          <table:table-cell office:value-type="float" office:value="0" table:formula="of:=SUM([.D297:.I297])" table:style-name="ce6"/>
          <table:table-cell office:value-type="percentage" office:value="0" table:formula="of:=[.J297]/6" table:style-name="ce8">
            <text:p>0%</text:p>
          </table:table-cell>
          <table:table-cell table:style-name="ce1"/>
          <table:table-cell office:value-type="float" office:value="0" table:formula="of:=IF([.D297]=1;[.M296]+1;0)" table:style-name="ce1">
            <text:p>0</text:p>
          </table:table-cell>
          <table:table-cell office:value-type="float" office:value="0" table:formula="of:=IF([.E297]=1;[.N296]+1;0)" table:style-name="ce1">
            <text:p>0</text:p>
          </table:table-cell>
          <table:table-cell office:value-type="float" office:value="0" table:formula="of:=IF([.F297]=1;[.O296]+1;0)" table:style-name="ce1">
            <text:p>0</text:p>
          </table:table-cell>
          <table:table-cell office:value-type="float" office:value="0" table:formula="of:=IF([.G297]=1;[.P296]+1;0)" table:style-name="ce1">
            <text:p>0</text:p>
          </table:table-cell>
          <table:table-cell office:value-type="float" office:value="0" table:formula="of:=IF([.H297]=1;[.Q296]+1;0)" table:style-name="ce1">
            <text:p>0</text:p>
          </table:table-cell>
          <table:table-cell office:value-type="float" office:value="0" table:formula="of:=IF([.I297]=1;[.R29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2T00:00:00" table:formula="of:=[.A297]+1" table:style-name="ce10">
            <text:p>Thu, 22 Oct 2026</text:p>
          </table:table-cell>
          <table:table-cell office:value-type="string" office:string-value="Thu" table:formula="of:=TEXT([.A298];&quot;ddd&quot;)" table:style-name="ce5">
            <text:p>Thu</text:p>
          </table:table-cell>
          <table:table-cell office:value-type="string" office:string-value="Oct" table:formula="of:=TEXT([.A298];&quot;mmm&quot;)" table:style-name="ce5">
            <text:p>Oct</text:p>
          </table:table-cell>
          <table:table-cell office:value-type="float" office:value="0" table:formula="of:=IF(INDEX([Tracker.$A$1:.$AG$120];6+9*(MONTH([.$A298])-1)+(COLUMN()-4);DAY([.$A298])+2)&lt;&gt;&quot;&quot;;1;0)" table:style-name="ce92"/>
          <table:table-cell office:value-type="float" office:value="0" table:formula="of:=IF(INDEX([Tracker.$A$1:.$AG$120];6+9*(MONTH([.$A298])-1)+(COLUMN()-4);DAY([.$A298])+2)&lt;&gt;&quot;&quot;;1;0)" table:style-name="ce92"/>
          <table:table-cell office:value-type="float" office:value="0" table:formula="of:=IF(INDEX([Tracker.$A$1:.$AG$120];6+9*(MONTH([.$A298])-1)+(COLUMN()-4);DAY([.$A298])+2)&lt;&gt;&quot;&quot;;1;0)" table:style-name="ce92"/>
          <table:table-cell office:value-type="float" office:value="0" table:formula="of:=IF(INDEX([Tracker.$A$1:.$AG$120];6+9*(MONTH([.$A298])-1)+(COLUMN()-4);DAY([.$A298])+2)&lt;&gt;&quot;&quot;;1;0)" table:style-name="ce92"/>
          <table:table-cell office:value-type="float" office:value="0" table:formula="of:=IF(INDEX([Tracker.$A$1:.$AG$120];6+9*(MONTH([.$A298])-1)+(COLUMN()-4);DAY([.$A298])+2)&lt;&gt;&quot;&quot;;1;0)" table:style-name="ce92"/>
          <table:table-cell office:value-type="float" office:value="0" table:formula="of:=IF(INDEX([Tracker.$A$1:.$AG$120];6+9*(MONTH([.$A298])-1)+(COLUMN()-4);DAY([.$A298])+2)&lt;&gt;&quot;&quot;;1;0)" table:style-name="ce92"/>
          <table:table-cell office:value-type="float" office:value="0" table:formula="of:=SUM([.D298:.I298])" table:style-name="ce6"/>
          <table:table-cell office:value-type="percentage" office:value="0" table:formula="of:=[.J298]/6" table:style-name="ce8">
            <text:p>0%</text:p>
          </table:table-cell>
          <table:table-cell table:style-name="ce1"/>
          <table:table-cell office:value-type="float" office:value="0" table:formula="of:=IF([.D298]=1;[.M297]+1;0)" table:style-name="ce1">
            <text:p>0</text:p>
          </table:table-cell>
          <table:table-cell office:value-type="float" office:value="0" table:formula="of:=IF([.E298]=1;[.N297]+1;0)" table:style-name="ce1">
            <text:p>0</text:p>
          </table:table-cell>
          <table:table-cell office:value-type="float" office:value="0" table:formula="of:=IF([.F298]=1;[.O297]+1;0)" table:style-name="ce1">
            <text:p>0</text:p>
          </table:table-cell>
          <table:table-cell office:value-type="float" office:value="0" table:formula="of:=IF([.G298]=1;[.P297]+1;0)" table:style-name="ce1">
            <text:p>0</text:p>
          </table:table-cell>
          <table:table-cell office:value-type="float" office:value="0" table:formula="of:=IF([.H298]=1;[.Q297]+1;0)" table:style-name="ce1">
            <text:p>0</text:p>
          </table:table-cell>
          <table:table-cell office:value-type="float" office:value="0" table:formula="of:=IF([.I298]=1;[.R29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3T00:00:00" table:formula="of:=[.A298]+1" table:style-name="ce10">
            <text:p>Fri, 23 Oct 2026</text:p>
          </table:table-cell>
          <table:table-cell office:value-type="string" office:string-value="Fri" table:formula="of:=TEXT([.A299];&quot;ddd&quot;)" table:style-name="ce5">
            <text:p>Fri</text:p>
          </table:table-cell>
          <table:table-cell office:value-type="string" office:string-value="Oct" table:formula="of:=TEXT([.A299];&quot;mmm&quot;)" table:style-name="ce5">
            <text:p>Oct</text:p>
          </table:table-cell>
          <table:table-cell office:value-type="float" office:value="0" table:formula="of:=IF(INDEX([Tracker.$A$1:.$AG$120];6+9*(MONTH([.$A299])-1)+(COLUMN()-4);DAY([.$A299])+2)&lt;&gt;&quot;&quot;;1;0)" table:style-name="ce92"/>
          <table:table-cell office:value-type="float" office:value="0" table:formula="of:=IF(INDEX([Tracker.$A$1:.$AG$120];6+9*(MONTH([.$A299])-1)+(COLUMN()-4);DAY([.$A299])+2)&lt;&gt;&quot;&quot;;1;0)" table:style-name="ce92"/>
          <table:table-cell office:value-type="float" office:value="0" table:formula="of:=IF(INDEX([Tracker.$A$1:.$AG$120];6+9*(MONTH([.$A299])-1)+(COLUMN()-4);DAY([.$A299])+2)&lt;&gt;&quot;&quot;;1;0)" table:style-name="ce92"/>
          <table:table-cell office:value-type="float" office:value="0" table:formula="of:=IF(INDEX([Tracker.$A$1:.$AG$120];6+9*(MONTH([.$A299])-1)+(COLUMN()-4);DAY([.$A299])+2)&lt;&gt;&quot;&quot;;1;0)" table:style-name="ce92"/>
          <table:table-cell office:value-type="float" office:value="0" table:formula="of:=IF(INDEX([Tracker.$A$1:.$AG$120];6+9*(MONTH([.$A299])-1)+(COLUMN()-4);DAY([.$A299])+2)&lt;&gt;&quot;&quot;;1;0)" table:style-name="ce92"/>
          <table:table-cell office:value-type="float" office:value="0" table:formula="of:=IF(INDEX([Tracker.$A$1:.$AG$120];6+9*(MONTH([.$A299])-1)+(COLUMN()-4);DAY([.$A299])+2)&lt;&gt;&quot;&quot;;1;0)" table:style-name="ce92"/>
          <table:table-cell office:value-type="float" office:value="0" table:formula="of:=SUM([.D299:.I299])" table:style-name="ce6"/>
          <table:table-cell office:value-type="percentage" office:value="0" table:formula="of:=[.J299]/6" table:style-name="ce8">
            <text:p>0%</text:p>
          </table:table-cell>
          <table:table-cell table:style-name="ce1"/>
          <table:table-cell office:value-type="float" office:value="0" table:formula="of:=IF([.D299]=1;[.M298]+1;0)" table:style-name="ce1">
            <text:p>0</text:p>
          </table:table-cell>
          <table:table-cell office:value-type="float" office:value="0" table:formula="of:=IF([.E299]=1;[.N298]+1;0)" table:style-name="ce1">
            <text:p>0</text:p>
          </table:table-cell>
          <table:table-cell office:value-type="float" office:value="0" table:formula="of:=IF([.F299]=1;[.O298]+1;0)" table:style-name="ce1">
            <text:p>0</text:p>
          </table:table-cell>
          <table:table-cell office:value-type="float" office:value="0" table:formula="of:=IF([.G299]=1;[.P298]+1;0)" table:style-name="ce1">
            <text:p>0</text:p>
          </table:table-cell>
          <table:table-cell office:value-type="float" office:value="0" table:formula="of:=IF([.H299]=1;[.Q298]+1;0)" table:style-name="ce1">
            <text:p>0</text:p>
          </table:table-cell>
          <table:table-cell office:value-type="float" office:value="0" table:formula="of:=IF([.I299]=1;[.R29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4T00:00:00" table:formula="of:=[.A299]+1" table:style-name="ce10">
            <text:p>Sat, 24 Oct 2026</text:p>
          </table:table-cell>
          <table:table-cell office:value-type="string" office:string-value="Sat" table:formula="of:=TEXT([.A300];&quot;ddd&quot;)" table:style-name="ce5">
            <text:p>Sat</text:p>
          </table:table-cell>
          <table:table-cell office:value-type="string" office:string-value="Oct" table:formula="of:=TEXT([.A300];&quot;mmm&quot;)" table:style-name="ce5">
            <text:p>Oct</text:p>
          </table:table-cell>
          <table:table-cell office:value-type="float" office:value="0" table:formula="of:=IF(INDEX([Tracker.$A$1:.$AG$120];6+9*(MONTH([.$A300])-1)+(COLUMN()-4);DAY([.$A300])+2)&lt;&gt;&quot;&quot;;1;0)" table:style-name="ce92"/>
          <table:table-cell office:value-type="float" office:value="0" table:formula="of:=IF(INDEX([Tracker.$A$1:.$AG$120];6+9*(MONTH([.$A300])-1)+(COLUMN()-4);DAY([.$A300])+2)&lt;&gt;&quot;&quot;;1;0)" table:style-name="ce92"/>
          <table:table-cell office:value-type="float" office:value="0" table:formula="of:=IF(INDEX([Tracker.$A$1:.$AG$120];6+9*(MONTH([.$A300])-1)+(COLUMN()-4);DAY([.$A300])+2)&lt;&gt;&quot;&quot;;1;0)" table:style-name="ce92"/>
          <table:table-cell office:value-type="float" office:value="0" table:formula="of:=IF(INDEX([Tracker.$A$1:.$AG$120];6+9*(MONTH([.$A300])-1)+(COLUMN()-4);DAY([.$A300])+2)&lt;&gt;&quot;&quot;;1;0)" table:style-name="ce92"/>
          <table:table-cell office:value-type="float" office:value="0" table:formula="of:=IF(INDEX([Tracker.$A$1:.$AG$120];6+9*(MONTH([.$A300])-1)+(COLUMN()-4);DAY([.$A300])+2)&lt;&gt;&quot;&quot;;1;0)" table:style-name="ce92"/>
          <table:table-cell office:value-type="float" office:value="0" table:formula="of:=IF(INDEX([Tracker.$A$1:.$AG$120];6+9*(MONTH([.$A300])-1)+(COLUMN()-4);DAY([.$A300])+2)&lt;&gt;&quot;&quot;;1;0)" table:style-name="ce92"/>
          <table:table-cell office:value-type="float" office:value="0" table:formula="of:=SUM([.D300:.I300])" table:style-name="ce6"/>
          <table:table-cell office:value-type="percentage" office:value="0" table:formula="of:=[.J300]/6" table:style-name="ce8">
            <text:p>0%</text:p>
          </table:table-cell>
          <table:table-cell table:style-name="ce1"/>
          <table:table-cell office:value-type="float" office:value="0" table:formula="of:=IF([.D300]=1;[.M299]+1;0)" table:style-name="ce1">
            <text:p>0</text:p>
          </table:table-cell>
          <table:table-cell office:value-type="float" office:value="0" table:formula="of:=IF([.E300]=1;[.N299]+1;0)" table:style-name="ce1">
            <text:p>0</text:p>
          </table:table-cell>
          <table:table-cell office:value-type="float" office:value="0" table:formula="of:=IF([.F300]=1;[.O299]+1;0)" table:style-name="ce1">
            <text:p>0</text:p>
          </table:table-cell>
          <table:table-cell office:value-type="float" office:value="0" table:formula="of:=IF([.G300]=1;[.P299]+1;0)" table:style-name="ce1">
            <text:p>0</text:p>
          </table:table-cell>
          <table:table-cell office:value-type="float" office:value="0" table:formula="of:=IF([.H300]=1;[.Q299]+1;0)" table:style-name="ce1">
            <text:p>0</text:p>
          </table:table-cell>
          <table:table-cell office:value-type="float" office:value="0" table:formula="of:=IF([.I300]=1;[.R29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5T00:00:00" table:formula="of:=[.A300]+1" table:style-name="ce10">
            <text:p>Sun, 25 Oct 2026</text:p>
          </table:table-cell>
          <table:table-cell office:value-type="string" office:string-value="Sun" table:formula="of:=TEXT([.A301];&quot;ddd&quot;)" table:style-name="ce5">
            <text:p>Sun</text:p>
          </table:table-cell>
          <table:table-cell office:value-type="string" office:string-value="Oct" table:formula="of:=TEXT([.A301];&quot;mmm&quot;)" table:style-name="ce5">
            <text:p>Oct</text:p>
          </table:table-cell>
          <table:table-cell office:value-type="float" office:value="0" table:formula="of:=IF(INDEX([Tracker.$A$1:.$AG$120];6+9*(MONTH([.$A301])-1)+(COLUMN()-4);DAY([.$A301])+2)&lt;&gt;&quot;&quot;;1;0)" table:style-name="ce92"/>
          <table:table-cell office:value-type="float" office:value="0" table:formula="of:=IF(INDEX([Tracker.$A$1:.$AG$120];6+9*(MONTH([.$A301])-1)+(COLUMN()-4);DAY([.$A301])+2)&lt;&gt;&quot;&quot;;1;0)" table:style-name="ce92"/>
          <table:table-cell office:value-type="float" office:value="0" table:formula="of:=IF(INDEX([Tracker.$A$1:.$AG$120];6+9*(MONTH([.$A301])-1)+(COLUMN()-4);DAY([.$A301])+2)&lt;&gt;&quot;&quot;;1;0)" table:style-name="ce92"/>
          <table:table-cell office:value-type="float" office:value="0" table:formula="of:=IF(INDEX([Tracker.$A$1:.$AG$120];6+9*(MONTH([.$A301])-1)+(COLUMN()-4);DAY([.$A301])+2)&lt;&gt;&quot;&quot;;1;0)" table:style-name="ce92"/>
          <table:table-cell office:value-type="float" office:value="0" table:formula="of:=IF(INDEX([Tracker.$A$1:.$AG$120];6+9*(MONTH([.$A301])-1)+(COLUMN()-4);DAY([.$A301])+2)&lt;&gt;&quot;&quot;;1;0)" table:style-name="ce92"/>
          <table:table-cell office:value-type="float" office:value="0" table:formula="of:=IF(INDEX([Tracker.$A$1:.$AG$120];6+9*(MONTH([.$A301])-1)+(COLUMN()-4);DAY([.$A301])+2)&lt;&gt;&quot;&quot;;1;0)" table:style-name="ce92"/>
          <table:table-cell office:value-type="float" office:value="0" table:formula="of:=SUM([.D301:.I301])" table:style-name="ce6"/>
          <table:table-cell office:value-type="percentage" office:value="0" table:formula="of:=[.J301]/6" table:style-name="ce8">
            <text:p>0%</text:p>
          </table:table-cell>
          <table:table-cell table:style-name="ce1"/>
          <table:table-cell office:value-type="float" office:value="0" table:formula="of:=IF([.D301]=1;[.M300]+1;0)" table:style-name="ce1">
            <text:p>0</text:p>
          </table:table-cell>
          <table:table-cell office:value-type="float" office:value="0" table:formula="of:=IF([.E301]=1;[.N300]+1;0)" table:style-name="ce1">
            <text:p>0</text:p>
          </table:table-cell>
          <table:table-cell office:value-type="float" office:value="0" table:formula="of:=IF([.F301]=1;[.O300]+1;0)" table:style-name="ce1">
            <text:p>0</text:p>
          </table:table-cell>
          <table:table-cell office:value-type="float" office:value="0" table:formula="of:=IF([.G301]=1;[.P300]+1;0)" table:style-name="ce1">
            <text:p>0</text:p>
          </table:table-cell>
          <table:table-cell office:value-type="float" office:value="0" table:formula="of:=IF([.H301]=1;[.Q300]+1;0)" table:style-name="ce1">
            <text:p>0</text:p>
          </table:table-cell>
          <table:table-cell office:value-type="float" office:value="0" table:formula="of:=IF([.I301]=1;[.R30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6T00:00:00" table:formula="of:=[.A301]+1" table:style-name="ce10">
            <text:p>Mon, 26 Oct 2026</text:p>
          </table:table-cell>
          <table:table-cell office:value-type="string" office:string-value="Mon" table:formula="of:=TEXT([.A302];&quot;ddd&quot;)" table:style-name="ce5">
            <text:p>Mon</text:p>
          </table:table-cell>
          <table:table-cell office:value-type="string" office:string-value="Oct" table:formula="of:=TEXT([.A302];&quot;mmm&quot;)" table:style-name="ce5">
            <text:p>Oct</text:p>
          </table:table-cell>
          <table:table-cell office:value-type="float" office:value="0" table:formula="of:=IF(INDEX([Tracker.$A$1:.$AG$120];6+9*(MONTH([.$A302])-1)+(COLUMN()-4);DAY([.$A302])+2)&lt;&gt;&quot;&quot;;1;0)" table:style-name="ce92"/>
          <table:table-cell office:value-type="float" office:value="0" table:formula="of:=IF(INDEX([Tracker.$A$1:.$AG$120];6+9*(MONTH([.$A302])-1)+(COLUMN()-4);DAY([.$A302])+2)&lt;&gt;&quot;&quot;;1;0)" table:style-name="ce92"/>
          <table:table-cell office:value-type="float" office:value="0" table:formula="of:=IF(INDEX([Tracker.$A$1:.$AG$120];6+9*(MONTH([.$A302])-1)+(COLUMN()-4);DAY([.$A302])+2)&lt;&gt;&quot;&quot;;1;0)" table:style-name="ce92"/>
          <table:table-cell office:value-type="float" office:value="0" table:formula="of:=IF(INDEX([Tracker.$A$1:.$AG$120];6+9*(MONTH([.$A302])-1)+(COLUMN()-4);DAY([.$A302])+2)&lt;&gt;&quot;&quot;;1;0)" table:style-name="ce92"/>
          <table:table-cell office:value-type="float" office:value="0" table:formula="of:=IF(INDEX([Tracker.$A$1:.$AG$120];6+9*(MONTH([.$A302])-1)+(COLUMN()-4);DAY([.$A302])+2)&lt;&gt;&quot;&quot;;1;0)" table:style-name="ce92"/>
          <table:table-cell office:value-type="float" office:value="0" table:formula="of:=IF(INDEX([Tracker.$A$1:.$AG$120];6+9*(MONTH([.$A302])-1)+(COLUMN()-4);DAY([.$A302])+2)&lt;&gt;&quot;&quot;;1;0)" table:style-name="ce92"/>
          <table:table-cell office:value-type="float" office:value="0" table:formula="of:=SUM([.D302:.I302])" table:style-name="ce6"/>
          <table:table-cell office:value-type="percentage" office:value="0" table:formula="of:=[.J302]/6" table:style-name="ce8">
            <text:p>0%</text:p>
          </table:table-cell>
          <table:table-cell table:style-name="ce1"/>
          <table:table-cell office:value-type="float" office:value="0" table:formula="of:=IF([.D302]=1;[.M301]+1;0)" table:style-name="ce1">
            <text:p>0</text:p>
          </table:table-cell>
          <table:table-cell office:value-type="float" office:value="0" table:formula="of:=IF([.E302]=1;[.N301]+1;0)" table:style-name="ce1">
            <text:p>0</text:p>
          </table:table-cell>
          <table:table-cell office:value-type="float" office:value="0" table:formula="of:=IF([.F302]=1;[.O301]+1;0)" table:style-name="ce1">
            <text:p>0</text:p>
          </table:table-cell>
          <table:table-cell office:value-type="float" office:value="0" table:formula="of:=IF([.G302]=1;[.P301]+1;0)" table:style-name="ce1">
            <text:p>0</text:p>
          </table:table-cell>
          <table:table-cell office:value-type="float" office:value="0" table:formula="of:=IF([.H302]=1;[.Q301]+1;0)" table:style-name="ce1">
            <text:p>0</text:p>
          </table:table-cell>
          <table:table-cell office:value-type="float" office:value="0" table:formula="of:=IF([.I302]=1;[.R30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7T00:00:00" table:formula="of:=[.A302]+1" table:style-name="ce10">
            <text:p>Tue, 27 Oct 2026</text:p>
          </table:table-cell>
          <table:table-cell office:value-type="string" office:string-value="Tue" table:formula="of:=TEXT([.A303];&quot;ddd&quot;)" table:style-name="ce5">
            <text:p>Tue</text:p>
          </table:table-cell>
          <table:table-cell office:value-type="string" office:string-value="Oct" table:formula="of:=TEXT([.A303];&quot;mmm&quot;)" table:style-name="ce5">
            <text:p>Oct</text:p>
          </table:table-cell>
          <table:table-cell office:value-type="float" office:value="0" table:formula="of:=IF(INDEX([Tracker.$A$1:.$AG$120];6+9*(MONTH([.$A303])-1)+(COLUMN()-4);DAY([.$A303])+2)&lt;&gt;&quot;&quot;;1;0)" table:style-name="ce92"/>
          <table:table-cell office:value-type="float" office:value="0" table:formula="of:=IF(INDEX([Tracker.$A$1:.$AG$120];6+9*(MONTH([.$A303])-1)+(COLUMN()-4);DAY([.$A303])+2)&lt;&gt;&quot;&quot;;1;0)" table:style-name="ce92"/>
          <table:table-cell office:value-type="float" office:value="0" table:formula="of:=IF(INDEX([Tracker.$A$1:.$AG$120];6+9*(MONTH([.$A303])-1)+(COLUMN()-4);DAY([.$A303])+2)&lt;&gt;&quot;&quot;;1;0)" table:style-name="ce92"/>
          <table:table-cell office:value-type="float" office:value="0" table:formula="of:=IF(INDEX([Tracker.$A$1:.$AG$120];6+9*(MONTH([.$A303])-1)+(COLUMN()-4);DAY([.$A303])+2)&lt;&gt;&quot;&quot;;1;0)" table:style-name="ce92"/>
          <table:table-cell office:value-type="float" office:value="0" table:formula="of:=IF(INDEX([Tracker.$A$1:.$AG$120];6+9*(MONTH([.$A303])-1)+(COLUMN()-4);DAY([.$A303])+2)&lt;&gt;&quot;&quot;;1;0)" table:style-name="ce92"/>
          <table:table-cell office:value-type="float" office:value="0" table:formula="of:=IF(INDEX([Tracker.$A$1:.$AG$120];6+9*(MONTH([.$A303])-1)+(COLUMN()-4);DAY([.$A303])+2)&lt;&gt;&quot;&quot;;1;0)" table:style-name="ce92"/>
          <table:table-cell office:value-type="float" office:value="0" table:formula="of:=SUM([.D303:.I303])" table:style-name="ce6"/>
          <table:table-cell office:value-type="percentage" office:value="0" table:formula="of:=[.J303]/6" table:style-name="ce8">
            <text:p>0%</text:p>
          </table:table-cell>
          <table:table-cell table:style-name="ce1"/>
          <table:table-cell office:value-type="float" office:value="0" table:formula="of:=IF([.D303]=1;[.M302]+1;0)" table:style-name="ce1">
            <text:p>0</text:p>
          </table:table-cell>
          <table:table-cell office:value-type="float" office:value="0" table:formula="of:=IF([.E303]=1;[.N302]+1;0)" table:style-name="ce1">
            <text:p>0</text:p>
          </table:table-cell>
          <table:table-cell office:value-type="float" office:value="0" table:formula="of:=IF([.F303]=1;[.O302]+1;0)" table:style-name="ce1">
            <text:p>0</text:p>
          </table:table-cell>
          <table:table-cell office:value-type="float" office:value="0" table:formula="of:=IF([.G303]=1;[.P302]+1;0)" table:style-name="ce1">
            <text:p>0</text:p>
          </table:table-cell>
          <table:table-cell office:value-type="float" office:value="0" table:formula="of:=IF([.H303]=1;[.Q302]+1;0)" table:style-name="ce1">
            <text:p>0</text:p>
          </table:table-cell>
          <table:table-cell office:value-type="float" office:value="0" table:formula="of:=IF([.I303]=1;[.R30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8T00:00:00" table:formula="of:=[.A303]+1" table:style-name="ce10">
            <text:p>Wed, 28 Oct 2026</text:p>
          </table:table-cell>
          <table:table-cell office:value-type="string" office:string-value="Wed" table:formula="of:=TEXT([.A304];&quot;ddd&quot;)" table:style-name="ce5">
            <text:p>Wed</text:p>
          </table:table-cell>
          <table:table-cell office:value-type="string" office:string-value="Oct" table:formula="of:=TEXT([.A304];&quot;mmm&quot;)" table:style-name="ce5">
            <text:p>Oct</text:p>
          </table:table-cell>
          <table:table-cell office:value-type="float" office:value="0" table:formula="of:=IF(INDEX([Tracker.$A$1:.$AG$120];6+9*(MONTH([.$A304])-1)+(COLUMN()-4);DAY([.$A304])+2)&lt;&gt;&quot;&quot;;1;0)" table:style-name="ce92"/>
          <table:table-cell office:value-type="float" office:value="0" table:formula="of:=IF(INDEX([Tracker.$A$1:.$AG$120];6+9*(MONTH([.$A304])-1)+(COLUMN()-4);DAY([.$A304])+2)&lt;&gt;&quot;&quot;;1;0)" table:style-name="ce92"/>
          <table:table-cell office:value-type="float" office:value="0" table:formula="of:=IF(INDEX([Tracker.$A$1:.$AG$120];6+9*(MONTH([.$A304])-1)+(COLUMN()-4);DAY([.$A304])+2)&lt;&gt;&quot;&quot;;1;0)" table:style-name="ce92"/>
          <table:table-cell office:value-type="float" office:value="0" table:formula="of:=IF(INDEX([Tracker.$A$1:.$AG$120];6+9*(MONTH([.$A304])-1)+(COLUMN()-4);DAY([.$A304])+2)&lt;&gt;&quot;&quot;;1;0)" table:style-name="ce92"/>
          <table:table-cell office:value-type="float" office:value="0" table:formula="of:=IF(INDEX([Tracker.$A$1:.$AG$120];6+9*(MONTH([.$A304])-1)+(COLUMN()-4);DAY([.$A304])+2)&lt;&gt;&quot;&quot;;1;0)" table:style-name="ce92"/>
          <table:table-cell office:value-type="float" office:value="0" table:formula="of:=IF(INDEX([Tracker.$A$1:.$AG$120];6+9*(MONTH([.$A304])-1)+(COLUMN()-4);DAY([.$A304])+2)&lt;&gt;&quot;&quot;;1;0)" table:style-name="ce92"/>
          <table:table-cell office:value-type="float" office:value="0" table:formula="of:=SUM([.D304:.I304])" table:style-name="ce6"/>
          <table:table-cell office:value-type="percentage" office:value="0" table:formula="of:=[.J304]/6" table:style-name="ce8">
            <text:p>0%</text:p>
          </table:table-cell>
          <table:table-cell table:style-name="ce1"/>
          <table:table-cell office:value-type="float" office:value="0" table:formula="of:=IF([.D304]=1;[.M303]+1;0)" table:style-name="ce1">
            <text:p>0</text:p>
          </table:table-cell>
          <table:table-cell office:value-type="float" office:value="0" table:formula="of:=IF([.E304]=1;[.N303]+1;0)" table:style-name="ce1">
            <text:p>0</text:p>
          </table:table-cell>
          <table:table-cell office:value-type="float" office:value="0" table:formula="of:=IF([.F304]=1;[.O303]+1;0)" table:style-name="ce1">
            <text:p>0</text:p>
          </table:table-cell>
          <table:table-cell office:value-type="float" office:value="0" table:formula="of:=IF([.G304]=1;[.P303]+1;0)" table:style-name="ce1">
            <text:p>0</text:p>
          </table:table-cell>
          <table:table-cell office:value-type="float" office:value="0" table:formula="of:=IF([.H304]=1;[.Q303]+1;0)" table:style-name="ce1">
            <text:p>0</text:p>
          </table:table-cell>
          <table:table-cell office:value-type="float" office:value="0" table:formula="of:=IF([.I304]=1;[.R30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29T00:00:00" table:formula="of:=[.A304]+1" table:style-name="ce10">
            <text:p>Thu, 29 Oct 2026</text:p>
          </table:table-cell>
          <table:table-cell office:value-type="string" office:string-value="Thu" table:formula="of:=TEXT([.A305];&quot;ddd&quot;)" table:style-name="ce5">
            <text:p>Thu</text:p>
          </table:table-cell>
          <table:table-cell office:value-type="string" office:string-value="Oct" table:formula="of:=TEXT([.A305];&quot;mmm&quot;)" table:style-name="ce5">
            <text:p>Oct</text:p>
          </table:table-cell>
          <table:table-cell office:value-type="float" office:value="0" table:formula="of:=IF(INDEX([Tracker.$A$1:.$AG$120];6+9*(MONTH([.$A305])-1)+(COLUMN()-4);DAY([.$A305])+2)&lt;&gt;&quot;&quot;;1;0)" table:style-name="ce92"/>
          <table:table-cell office:value-type="float" office:value="0" table:formula="of:=IF(INDEX([Tracker.$A$1:.$AG$120];6+9*(MONTH([.$A305])-1)+(COLUMN()-4);DAY([.$A305])+2)&lt;&gt;&quot;&quot;;1;0)" table:style-name="ce92"/>
          <table:table-cell office:value-type="float" office:value="0" table:formula="of:=IF(INDEX([Tracker.$A$1:.$AG$120];6+9*(MONTH([.$A305])-1)+(COLUMN()-4);DAY([.$A305])+2)&lt;&gt;&quot;&quot;;1;0)" table:style-name="ce92"/>
          <table:table-cell office:value-type="float" office:value="0" table:formula="of:=IF(INDEX([Tracker.$A$1:.$AG$120];6+9*(MONTH([.$A305])-1)+(COLUMN()-4);DAY([.$A305])+2)&lt;&gt;&quot;&quot;;1;0)" table:style-name="ce92"/>
          <table:table-cell office:value-type="float" office:value="0" table:formula="of:=IF(INDEX([Tracker.$A$1:.$AG$120];6+9*(MONTH([.$A305])-1)+(COLUMN()-4);DAY([.$A305])+2)&lt;&gt;&quot;&quot;;1;0)" table:style-name="ce92"/>
          <table:table-cell office:value-type="float" office:value="0" table:formula="of:=IF(INDEX([Tracker.$A$1:.$AG$120];6+9*(MONTH([.$A305])-1)+(COLUMN()-4);DAY([.$A305])+2)&lt;&gt;&quot;&quot;;1;0)" table:style-name="ce92"/>
          <table:table-cell office:value-type="float" office:value="0" table:formula="of:=SUM([.D305:.I305])" table:style-name="ce6"/>
          <table:table-cell office:value-type="percentage" office:value="0" table:formula="of:=[.J305]/6" table:style-name="ce8">
            <text:p>0%</text:p>
          </table:table-cell>
          <table:table-cell table:style-name="ce1"/>
          <table:table-cell office:value-type="float" office:value="0" table:formula="of:=IF([.D305]=1;[.M304]+1;0)" table:style-name="ce1">
            <text:p>0</text:p>
          </table:table-cell>
          <table:table-cell office:value-type="float" office:value="0" table:formula="of:=IF([.E305]=1;[.N304]+1;0)" table:style-name="ce1">
            <text:p>0</text:p>
          </table:table-cell>
          <table:table-cell office:value-type="float" office:value="0" table:formula="of:=IF([.F305]=1;[.O304]+1;0)" table:style-name="ce1">
            <text:p>0</text:p>
          </table:table-cell>
          <table:table-cell office:value-type="float" office:value="0" table:formula="of:=IF([.G305]=1;[.P304]+1;0)" table:style-name="ce1">
            <text:p>0</text:p>
          </table:table-cell>
          <table:table-cell office:value-type="float" office:value="0" table:formula="of:=IF([.H305]=1;[.Q304]+1;0)" table:style-name="ce1">
            <text:p>0</text:p>
          </table:table-cell>
          <table:table-cell office:value-type="float" office:value="0" table:formula="of:=IF([.I305]=1;[.R30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30T00:00:00" table:formula="of:=[.A305]+1" table:style-name="ce10">
            <text:p>Fri, 30 Oct 2026</text:p>
          </table:table-cell>
          <table:table-cell office:value-type="string" office:string-value="Fri" table:formula="of:=TEXT([.A306];&quot;ddd&quot;)" table:style-name="ce5">
            <text:p>Fri</text:p>
          </table:table-cell>
          <table:table-cell office:value-type="string" office:string-value="Oct" table:formula="of:=TEXT([.A306];&quot;mmm&quot;)" table:style-name="ce5">
            <text:p>Oct</text:p>
          </table:table-cell>
          <table:table-cell office:value-type="float" office:value="0" table:formula="of:=IF(INDEX([Tracker.$A$1:.$AG$120];6+9*(MONTH([.$A306])-1)+(COLUMN()-4);DAY([.$A306])+2)&lt;&gt;&quot;&quot;;1;0)" table:style-name="ce92"/>
          <table:table-cell office:value-type="float" office:value="0" table:formula="of:=IF(INDEX([Tracker.$A$1:.$AG$120];6+9*(MONTH([.$A306])-1)+(COLUMN()-4);DAY([.$A306])+2)&lt;&gt;&quot;&quot;;1;0)" table:style-name="ce92"/>
          <table:table-cell office:value-type="float" office:value="0" table:formula="of:=IF(INDEX([Tracker.$A$1:.$AG$120];6+9*(MONTH([.$A306])-1)+(COLUMN()-4);DAY([.$A306])+2)&lt;&gt;&quot;&quot;;1;0)" table:style-name="ce92"/>
          <table:table-cell office:value-type="float" office:value="0" table:formula="of:=IF(INDEX([Tracker.$A$1:.$AG$120];6+9*(MONTH([.$A306])-1)+(COLUMN()-4);DAY([.$A306])+2)&lt;&gt;&quot;&quot;;1;0)" table:style-name="ce92"/>
          <table:table-cell office:value-type="float" office:value="0" table:formula="of:=IF(INDEX([Tracker.$A$1:.$AG$120];6+9*(MONTH([.$A306])-1)+(COLUMN()-4);DAY([.$A306])+2)&lt;&gt;&quot;&quot;;1;0)" table:style-name="ce92"/>
          <table:table-cell office:value-type="float" office:value="0" table:formula="of:=IF(INDEX([Tracker.$A$1:.$AG$120];6+9*(MONTH([.$A306])-1)+(COLUMN()-4);DAY([.$A306])+2)&lt;&gt;&quot;&quot;;1;0)" table:style-name="ce92"/>
          <table:table-cell office:value-type="float" office:value="0" table:formula="of:=SUM([.D306:.I306])" table:style-name="ce6"/>
          <table:table-cell office:value-type="percentage" office:value="0" table:formula="of:=[.J306]/6" table:style-name="ce8">
            <text:p>0%</text:p>
          </table:table-cell>
          <table:table-cell table:style-name="ce1"/>
          <table:table-cell office:value-type="float" office:value="0" table:formula="of:=IF([.D306]=1;[.M305]+1;0)" table:style-name="ce1">
            <text:p>0</text:p>
          </table:table-cell>
          <table:table-cell office:value-type="float" office:value="0" table:formula="of:=IF([.E306]=1;[.N305]+1;0)" table:style-name="ce1">
            <text:p>0</text:p>
          </table:table-cell>
          <table:table-cell office:value-type="float" office:value="0" table:formula="of:=IF([.F306]=1;[.O305]+1;0)" table:style-name="ce1">
            <text:p>0</text:p>
          </table:table-cell>
          <table:table-cell office:value-type="float" office:value="0" table:formula="of:=IF([.G306]=1;[.P305]+1;0)" table:style-name="ce1">
            <text:p>0</text:p>
          </table:table-cell>
          <table:table-cell office:value-type="float" office:value="0" table:formula="of:=IF([.H306]=1;[.Q305]+1;0)" table:style-name="ce1">
            <text:p>0</text:p>
          </table:table-cell>
          <table:table-cell office:value-type="float" office:value="0" table:formula="of:=IF([.I306]=1;[.R30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0-31T00:00:00" table:formula="of:=[.A306]+1" table:style-name="ce10">
            <text:p>Sat, 31 Oct 2026</text:p>
          </table:table-cell>
          <table:table-cell office:value-type="string" office:string-value="Sat" table:formula="of:=TEXT([.A307];&quot;ddd&quot;)" table:style-name="ce5">
            <text:p>Sat</text:p>
          </table:table-cell>
          <table:table-cell office:value-type="string" office:string-value="Oct" table:formula="of:=TEXT([.A307];&quot;mmm&quot;)" table:style-name="ce5">
            <text:p>Oct</text:p>
          </table:table-cell>
          <table:table-cell office:value-type="float" office:value="0" table:formula="of:=IF(INDEX([Tracker.$A$1:.$AG$120];6+9*(MONTH([.$A307])-1)+(COLUMN()-4);DAY([.$A307])+2)&lt;&gt;&quot;&quot;;1;0)" table:style-name="ce92"/>
          <table:table-cell office:value-type="float" office:value="0" table:formula="of:=IF(INDEX([Tracker.$A$1:.$AG$120];6+9*(MONTH([.$A307])-1)+(COLUMN()-4);DAY([.$A307])+2)&lt;&gt;&quot;&quot;;1;0)" table:style-name="ce92"/>
          <table:table-cell office:value-type="float" office:value="0" table:formula="of:=IF(INDEX([Tracker.$A$1:.$AG$120];6+9*(MONTH([.$A307])-1)+(COLUMN()-4);DAY([.$A307])+2)&lt;&gt;&quot;&quot;;1;0)" table:style-name="ce92"/>
          <table:table-cell office:value-type="float" office:value="0" table:formula="of:=IF(INDEX([Tracker.$A$1:.$AG$120];6+9*(MONTH([.$A307])-1)+(COLUMN()-4);DAY([.$A307])+2)&lt;&gt;&quot;&quot;;1;0)" table:style-name="ce92"/>
          <table:table-cell office:value-type="float" office:value="0" table:formula="of:=IF(INDEX([Tracker.$A$1:.$AG$120];6+9*(MONTH([.$A307])-1)+(COLUMN()-4);DAY([.$A307])+2)&lt;&gt;&quot;&quot;;1;0)" table:style-name="ce92"/>
          <table:table-cell office:value-type="float" office:value="0" table:formula="of:=IF(INDEX([Tracker.$A$1:.$AG$120];6+9*(MONTH([.$A307])-1)+(COLUMN()-4);DAY([.$A307])+2)&lt;&gt;&quot;&quot;;1;0)" table:style-name="ce92"/>
          <table:table-cell office:value-type="float" office:value="0" table:formula="of:=SUM([.D307:.I307])" table:style-name="ce6"/>
          <table:table-cell office:value-type="percentage" office:value="0" table:formula="of:=[.J307]/6" table:style-name="ce8">
            <text:p>0%</text:p>
          </table:table-cell>
          <table:table-cell table:style-name="ce1"/>
          <table:table-cell office:value-type="float" office:value="0" table:formula="of:=IF([.D307]=1;[.M306]+1;0)" table:style-name="ce1">
            <text:p>0</text:p>
          </table:table-cell>
          <table:table-cell office:value-type="float" office:value="0" table:formula="of:=IF([.E307]=1;[.N306]+1;0)" table:style-name="ce1">
            <text:p>0</text:p>
          </table:table-cell>
          <table:table-cell office:value-type="float" office:value="0" table:formula="of:=IF([.F307]=1;[.O306]+1;0)" table:style-name="ce1">
            <text:p>0</text:p>
          </table:table-cell>
          <table:table-cell office:value-type="float" office:value="0" table:formula="of:=IF([.G307]=1;[.P306]+1;0)" table:style-name="ce1">
            <text:p>0</text:p>
          </table:table-cell>
          <table:table-cell office:value-type="float" office:value="0" table:formula="of:=IF([.H307]=1;[.Q306]+1;0)" table:style-name="ce1">
            <text:p>0</text:p>
          </table:table-cell>
          <table:table-cell office:value-type="float" office:value="0" table:formula="of:=IF([.I307]=1;[.R30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1T00:00:00" table:formula="of:=[.A307]+1" table:style-name="ce10">
            <text:p>Sun, 01 Nov 2026</text:p>
          </table:table-cell>
          <table:table-cell office:value-type="string" office:string-value="Sun" table:formula="of:=TEXT([.A308];&quot;ddd&quot;)" table:style-name="ce5">
            <text:p>Sun</text:p>
          </table:table-cell>
          <table:table-cell office:value-type="string" office:string-value="Nov" table:formula="of:=TEXT([.A308];&quot;mmm&quot;)" table:style-name="ce5">
            <text:p>Nov</text:p>
          </table:table-cell>
          <table:table-cell office:value-type="float" office:value="0" table:formula="of:=IF(INDEX([Tracker.$A$1:.$AG$120];6+9*(MONTH([.$A308])-1)+(COLUMN()-4);DAY([.$A308])+2)&lt;&gt;&quot;&quot;;1;0)" table:style-name="ce92"/>
          <table:table-cell office:value-type="float" office:value="0" table:formula="of:=IF(INDEX([Tracker.$A$1:.$AG$120];6+9*(MONTH([.$A308])-1)+(COLUMN()-4);DAY([.$A308])+2)&lt;&gt;&quot;&quot;;1;0)" table:style-name="ce92"/>
          <table:table-cell office:value-type="float" office:value="0" table:formula="of:=IF(INDEX([Tracker.$A$1:.$AG$120];6+9*(MONTH([.$A308])-1)+(COLUMN()-4);DAY([.$A308])+2)&lt;&gt;&quot;&quot;;1;0)" table:style-name="ce92"/>
          <table:table-cell office:value-type="float" office:value="0" table:formula="of:=IF(INDEX([Tracker.$A$1:.$AG$120];6+9*(MONTH([.$A308])-1)+(COLUMN()-4);DAY([.$A308])+2)&lt;&gt;&quot;&quot;;1;0)" table:style-name="ce92"/>
          <table:table-cell office:value-type="float" office:value="0" table:formula="of:=IF(INDEX([Tracker.$A$1:.$AG$120];6+9*(MONTH([.$A308])-1)+(COLUMN()-4);DAY([.$A308])+2)&lt;&gt;&quot;&quot;;1;0)" table:style-name="ce92"/>
          <table:table-cell office:value-type="float" office:value="0" table:formula="of:=IF(INDEX([Tracker.$A$1:.$AG$120];6+9*(MONTH([.$A308])-1)+(COLUMN()-4);DAY([.$A308])+2)&lt;&gt;&quot;&quot;;1;0)" table:style-name="ce92"/>
          <table:table-cell office:value-type="float" office:value="0" table:formula="of:=SUM([.D308:.I308])" table:style-name="ce6"/>
          <table:table-cell office:value-type="percentage" office:value="0" table:formula="of:=[.J308]/6" table:style-name="ce8">
            <text:p>0%</text:p>
          </table:table-cell>
          <table:table-cell table:style-name="ce1"/>
          <table:table-cell office:value-type="float" office:value="0" table:formula="of:=IF([.D308]=1;[.M307]+1;0)" table:style-name="ce1">
            <text:p>0</text:p>
          </table:table-cell>
          <table:table-cell office:value-type="float" office:value="0" table:formula="of:=IF([.E308]=1;[.N307]+1;0)" table:style-name="ce1">
            <text:p>0</text:p>
          </table:table-cell>
          <table:table-cell office:value-type="float" office:value="0" table:formula="of:=IF([.F308]=1;[.O307]+1;0)" table:style-name="ce1">
            <text:p>0</text:p>
          </table:table-cell>
          <table:table-cell office:value-type="float" office:value="0" table:formula="of:=IF([.G308]=1;[.P307]+1;0)" table:style-name="ce1">
            <text:p>0</text:p>
          </table:table-cell>
          <table:table-cell office:value-type="float" office:value="0" table:formula="of:=IF([.H308]=1;[.Q307]+1;0)" table:style-name="ce1">
            <text:p>0</text:p>
          </table:table-cell>
          <table:table-cell office:value-type="float" office:value="0" table:formula="of:=IF([.I308]=1;[.R30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2T00:00:00" table:formula="of:=[.A308]+1" table:style-name="ce10">
            <text:p>Mon, 02 Nov 2026</text:p>
          </table:table-cell>
          <table:table-cell office:value-type="string" office:string-value="Mon" table:formula="of:=TEXT([.A309];&quot;ddd&quot;)" table:style-name="ce5">
            <text:p>Mon</text:p>
          </table:table-cell>
          <table:table-cell office:value-type="string" office:string-value="Nov" table:formula="of:=TEXT([.A309];&quot;mmm&quot;)" table:style-name="ce5">
            <text:p>Nov</text:p>
          </table:table-cell>
          <table:table-cell office:value-type="float" office:value="0" table:formula="of:=IF(INDEX([Tracker.$A$1:.$AG$120];6+9*(MONTH([.$A309])-1)+(COLUMN()-4);DAY([.$A309])+2)&lt;&gt;&quot;&quot;;1;0)" table:style-name="ce92"/>
          <table:table-cell office:value-type="float" office:value="0" table:formula="of:=IF(INDEX([Tracker.$A$1:.$AG$120];6+9*(MONTH([.$A309])-1)+(COLUMN()-4);DAY([.$A309])+2)&lt;&gt;&quot;&quot;;1;0)" table:style-name="ce92"/>
          <table:table-cell office:value-type="float" office:value="0" table:formula="of:=IF(INDEX([Tracker.$A$1:.$AG$120];6+9*(MONTH([.$A309])-1)+(COLUMN()-4);DAY([.$A309])+2)&lt;&gt;&quot;&quot;;1;0)" table:style-name="ce92"/>
          <table:table-cell office:value-type="float" office:value="0" table:formula="of:=IF(INDEX([Tracker.$A$1:.$AG$120];6+9*(MONTH([.$A309])-1)+(COLUMN()-4);DAY([.$A309])+2)&lt;&gt;&quot;&quot;;1;0)" table:style-name="ce92"/>
          <table:table-cell office:value-type="float" office:value="0" table:formula="of:=IF(INDEX([Tracker.$A$1:.$AG$120];6+9*(MONTH([.$A309])-1)+(COLUMN()-4);DAY([.$A309])+2)&lt;&gt;&quot;&quot;;1;0)" table:style-name="ce92"/>
          <table:table-cell office:value-type="float" office:value="0" table:formula="of:=IF(INDEX([Tracker.$A$1:.$AG$120];6+9*(MONTH([.$A309])-1)+(COLUMN()-4);DAY([.$A309])+2)&lt;&gt;&quot;&quot;;1;0)" table:style-name="ce92"/>
          <table:table-cell office:value-type="float" office:value="0" table:formula="of:=SUM([.D309:.I309])" table:style-name="ce6"/>
          <table:table-cell office:value-type="percentage" office:value="0" table:formula="of:=[.J309]/6" table:style-name="ce8">
            <text:p>0%</text:p>
          </table:table-cell>
          <table:table-cell table:style-name="ce1"/>
          <table:table-cell office:value-type="float" office:value="0" table:formula="of:=IF([.D309]=1;[.M308]+1;0)" table:style-name="ce1">
            <text:p>0</text:p>
          </table:table-cell>
          <table:table-cell office:value-type="float" office:value="0" table:formula="of:=IF([.E309]=1;[.N308]+1;0)" table:style-name="ce1">
            <text:p>0</text:p>
          </table:table-cell>
          <table:table-cell office:value-type="float" office:value="0" table:formula="of:=IF([.F309]=1;[.O308]+1;0)" table:style-name="ce1">
            <text:p>0</text:p>
          </table:table-cell>
          <table:table-cell office:value-type="float" office:value="0" table:formula="of:=IF([.G309]=1;[.P308]+1;0)" table:style-name="ce1">
            <text:p>0</text:p>
          </table:table-cell>
          <table:table-cell office:value-type="float" office:value="0" table:formula="of:=IF([.H309]=1;[.Q308]+1;0)" table:style-name="ce1">
            <text:p>0</text:p>
          </table:table-cell>
          <table:table-cell office:value-type="float" office:value="0" table:formula="of:=IF([.I309]=1;[.R30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3T00:00:00" table:formula="of:=[.A309]+1" table:style-name="ce10">
            <text:p>Tue, 03 Nov 2026</text:p>
          </table:table-cell>
          <table:table-cell office:value-type="string" office:string-value="Tue" table:formula="of:=TEXT([.A310];&quot;ddd&quot;)" table:style-name="ce5">
            <text:p>Tue</text:p>
          </table:table-cell>
          <table:table-cell office:value-type="string" office:string-value="Nov" table:formula="of:=TEXT([.A310];&quot;mmm&quot;)" table:style-name="ce5">
            <text:p>Nov</text:p>
          </table:table-cell>
          <table:table-cell office:value-type="float" office:value="0" table:formula="of:=IF(INDEX([Tracker.$A$1:.$AG$120];6+9*(MONTH([.$A310])-1)+(COLUMN()-4);DAY([.$A310])+2)&lt;&gt;&quot;&quot;;1;0)" table:style-name="ce92"/>
          <table:table-cell office:value-type="float" office:value="0" table:formula="of:=IF(INDEX([Tracker.$A$1:.$AG$120];6+9*(MONTH([.$A310])-1)+(COLUMN()-4);DAY([.$A310])+2)&lt;&gt;&quot;&quot;;1;0)" table:style-name="ce92"/>
          <table:table-cell office:value-type="float" office:value="0" table:formula="of:=IF(INDEX([Tracker.$A$1:.$AG$120];6+9*(MONTH([.$A310])-1)+(COLUMN()-4);DAY([.$A310])+2)&lt;&gt;&quot;&quot;;1;0)" table:style-name="ce92"/>
          <table:table-cell office:value-type="float" office:value="0" table:formula="of:=IF(INDEX([Tracker.$A$1:.$AG$120];6+9*(MONTH([.$A310])-1)+(COLUMN()-4);DAY([.$A310])+2)&lt;&gt;&quot;&quot;;1;0)" table:style-name="ce92"/>
          <table:table-cell office:value-type="float" office:value="0" table:formula="of:=IF(INDEX([Tracker.$A$1:.$AG$120];6+9*(MONTH([.$A310])-1)+(COLUMN()-4);DAY([.$A310])+2)&lt;&gt;&quot;&quot;;1;0)" table:style-name="ce92"/>
          <table:table-cell office:value-type="float" office:value="0" table:formula="of:=IF(INDEX([Tracker.$A$1:.$AG$120];6+9*(MONTH([.$A310])-1)+(COLUMN()-4);DAY([.$A310])+2)&lt;&gt;&quot;&quot;;1;0)" table:style-name="ce92"/>
          <table:table-cell office:value-type="float" office:value="0" table:formula="of:=SUM([.D310:.I310])" table:style-name="ce6"/>
          <table:table-cell office:value-type="percentage" office:value="0" table:formula="of:=[.J310]/6" table:style-name="ce8">
            <text:p>0%</text:p>
          </table:table-cell>
          <table:table-cell table:style-name="ce1"/>
          <table:table-cell office:value-type="float" office:value="0" table:formula="of:=IF([.D310]=1;[.M309]+1;0)" table:style-name="ce1">
            <text:p>0</text:p>
          </table:table-cell>
          <table:table-cell office:value-type="float" office:value="0" table:formula="of:=IF([.E310]=1;[.N309]+1;0)" table:style-name="ce1">
            <text:p>0</text:p>
          </table:table-cell>
          <table:table-cell office:value-type="float" office:value="0" table:formula="of:=IF([.F310]=1;[.O309]+1;0)" table:style-name="ce1">
            <text:p>0</text:p>
          </table:table-cell>
          <table:table-cell office:value-type="float" office:value="0" table:formula="of:=IF([.G310]=1;[.P309]+1;0)" table:style-name="ce1">
            <text:p>0</text:p>
          </table:table-cell>
          <table:table-cell office:value-type="float" office:value="0" table:formula="of:=IF([.H310]=1;[.Q309]+1;0)" table:style-name="ce1">
            <text:p>0</text:p>
          </table:table-cell>
          <table:table-cell office:value-type="float" office:value="0" table:formula="of:=IF([.I310]=1;[.R30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4T00:00:00" table:formula="of:=[.A310]+1" table:style-name="ce10">
            <text:p>Wed, 04 Nov 2026</text:p>
          </table:table-cell>
          <table:table-cell office:value-type="string" office:string-value="Wed" table:formula="of:=TEXT([.A311];&quot;ddd&quot;)" table:style-name="ce5">
            <text:p>Wed</text:p>
          </table:table-cell>
          <table:table-cell office:value-type="string" office:string-value="Nov" table:formula="of:=TEXT([.A311];&quot;mmm&quot;)" table:style-name="ce5">
            <text:p>Nov</text:p>
          </table:table-cell>
          <table:table-cell office:value-type="float" office:value="0" table:formula="of:=IF(INDEX([Tracker.$A$1:.$AG$120];6+9*(MONTH([.$A311])-1)+(COLUMN()-4);DAY([.$A311])+2)&lt;&gt;&quot;&quot;;1;0)" table:style-name="ce92"/>
          <table:table-cell office:value-type="float" office:value="0" table:formula="of:=IF(INDEX([Tracker.$A$1:.$AG$120];6+9*(MONTH([.$A311])-1)+(COLUMN()-4);DAY([.$A311])+2)&lt;&gt;&quot;&quot;;1;0)" table:style-name="ce92"/>
          <table:table-cell office:value-type="float" office:value="0" table:formula="of:=IF(INDEX([Tracker.$A$1:.$AG$120];6+9*(MONTH([.$A311])-1)+(COLUMN()-4);DAY([.$A311])+2)&lt;&gt;&quot;&quot;;1;0)" table:style-name="ce92"/>
          <table:table-cell office:value-type="float" office:value="0" table:formula="of:=IF(INDEX([Tracker.$A$1:.$AG$120];6+9*(MONTH([.$A311])-1)+(COLUMN()-4);DAY([.$A311])+2)&lt;&gt;&quot;&quot;;1;0)" table:style-name="ce92"/>
          <table:table-cell office:value-type="float" office:value="0" table:formula="of:=IF(INDEX([Tracker.$A$1:.$AG$120];6+9*(MONTH([.$A311])-1)+(COLUMN()-4);DAY([.$A311])+2)&lt;&gt;&quot;&quot;;1;0)" table:style-name="ce92"/>
          <table:table-cell office:value-type="float" office:value="0" table:formula="of:=IF(INDEX([Tracker.$A$1:.$AG$120];6+9*(MONTH([.$A311])-1)+(COLUMN()-4);DAY([.$A311])+2)&lt;&gt;&quot;&quot;;1;0)" table:style-name="ce92"/>
          <table:table-cell office:value-type="float" office:value="0" table:formula="of:=SUM([.D311:.I311])" table:style-name="ce6"/>
          <table:table-cell office:value-type="percentage" office:value="0" table:formula="of:=[.J311]/6" table:style-name="ce8">
            <text:p>0%</text:p>
          </table:table-cell>
          <table:table-cell table:style-name="ce1"/>
          <table:table-cell office:value-type="float" office:value="0" table:formula="of:=IF([.D311]=1;[.M310]+1;0)" table:style-name="ce1">
            <text:p>0</text:p>
          </table:table-cell>
          <table:table-cell office:value-type="float" office:value="0" table:formula="of:=IF([.E311]=1;[.N310]+1;0)" table:style-name="ce1">
            <text:p>0</text:p>
          </table:table-cell>
          <table:table-cell office:value-type="float" office:value="0" table:formula="of:=IF([.F311]=1;[.O310]+1;0)" table:style-name="ce1">
            <text:p>0</text:p>
          </table:table-cell>
          <table:table-cell office:value-type="float" office:value="0" table:formula="of:=IF([.G311]=1;[.P310]+1;0)" table:style-name="ce1">
            <text:p>0</text:p>
          </table:table-cell>
          <table:table-cell office:value-type="float" office:value="0" table:formula="of:=IF([.H311]=1;[.Q310]+1;0)" table:style-name="ce1">
            <text:p>0</text:p>
          </table:table-cell>
          <table:table-cell office:value-type="float" office:value="0" table:formula="of:=IF([.I311]=1;[.R31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5T00:00:00" table:formula="of:=[.A311]+1" table:style-name="ce10">
            <text:p>Thu, 05 Nov 2026</text:p>
          </table:table-cell>
          <table:table-cell office:value-type="string" office:string-value="Thu" table:formula="of:=TEXT([.A312];&quot;ddd&quot;)" table:style-name="ce5">
            <text:p>Thu</text:p>
          </table:table-cell>
          <table:table-cell office:value-type="string" office:string-value="Nov" table:formula="of:=TEXT([.A312];&quot;mmm&quot;)" table:style-name="ce5">
            <text:p>Nov</text:p>
          </table:table-cell>
          <table:table-cell office:value-type="float" office:value="0" table:formula="of:=IF(INDEX([Tracker.$A$1:.$AG$120];6+9*(MONTH([.$A312])-1)+(COLUMN()-4);DAY([.$A312])+2)&lt;&gt;&quot;&quot;;1;0)" table:style-name="ce92"/>
          <table:table-cell office:value-type="float" office:value="0" table:formula="of:=IF(INDEX([Tracker.$A$1:.$AG$120];6+9*(MONTH([.$A312])-1)+(COLUMN()-4);DAY([.$A312])+2)&lt;&gt;&quot;&quot;;1;0)" table:style-name="ce92"/>
          <table:table-cell office:value-type="float" office:value="0" table:formula="of:=IF(INDEX([Tracker.$A$1:.$AG$120];6+9*(MONTH([.$A312])-1)+(COLUMN()-4);DAY([.$A312])+2)&lt;&gt;&quot;&quot;;1;0)" table:style-name="ce92"/>
          <table:table-cell office:value-type="float" office:value="0" table:formula="of:=IF(INDEX([Tracker.$A$1:.$AG$120];6+9*(MONTH([.$A312])-1)+(COLUMN()-4);DAY([.$A312])+2)&lt;&gt;&quot;&quot;;1;0)" table:style-name="ce92"/>
          <table:table-cell office:value-type="float" office:value="0" table:formula="of:=IF(INDEX([Tracker.$A$1:.$AG$120];6+9*(MONTH([.$A312])-1)+(COLUMN()-4);DAY([.$A312])+2)&lt;&gt;&quot;&quot;;1;0)" table:style-name="ce92"/>
          <table:table-cell office:value-type="float" office:value="0" table:formula="of:=IF(INDEX([Tracker.$A$1:.$AG$120];6+9*(MONTH([.$A312])-1)+(COLUMN()-4);DAY([.$A312])+2)&lt;&gt;&quot;&quot;;1;0)" table:style-name="ce92"/>
          <table:table-cell office:value-type="float" office:value="0" table:formula="of:=SUM([.D312:.I312])" table:style-name="ce6"/>
          <table:table-cell office:value-type="percentage" office:value="0" table:formula="of:=[.J312]/6" table:style-name="ce8">
            <text:p>0%</text:p>
          </table:table-cell>
          <table:table-cell table:style-name="ce1"/>
          <table:table-cell office:value-type="float" office:value="0" table:formula="of:=IF([.D312]=1;[.M311]+1;0)" table:style-name="ce1">
            <text:p>0</text:p>
          </table:table-cell>
          <table:table-cell office:value-type="float" office:value="0" table:formula="of:=IF([.E312]=1;[.N311]+1;0)" table:style-name="ce1">
            <text:p>0</text:p>
          </table:table-cell>
          <table:table-cell office:value-type="float" office:value="0" table:formula="of:=IF([.F312]=1;[.O311]+1;0)" table:style-name="ce1">
            <text:p>0</text:p>
          </table:table-cell>
          <table:table-cell office:value-type="float" office:value="0" table:formula="of:=IF([.G312]=1;[.P311]+1;0)" table:style-name="ce1">
            <text:p>0</text:p>
          </table:table-cell>
          <table:table-cell office:value-type="float" office:value="0" table:formula="of:=IF([.H312]=1;[.Q311]+1;0)" table:style-name="ce1">
            <text:p>0</text:p>
          </table:table-cell>
          <table:table-cell office:value-type="float" office:value="0" table:formula="of:=IF([.I312]=1;[.R31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6T00:00:00" table:formula="of:=[.A312]+1" table:style-name="ce10">
            <text:p>Fri, 06 Nov 2026</text:p>
          </table:table-cell>
          <table:table-cell office:value-type="string" office:string-value="Fri" table:formula="of:=TEXT([.A313];&quot;ddd&quot;)" table:style-name="ce5">
            <text:p>Fri</text:p>
          </table:table-cell>
          <table:table-cell office:value-type="string" office:string-value="Nov" table:formula="of:=TEXT([.A313];&quot;mmm&quot;)" table:style-name="ce5">
            <text:p>Nov</text:p>
          </table:table-cell>
          <table:table-cell office:value-type="float" office:value="0" table:formula="of:=IF(INDEX([Tracker.$A$1:.$AG$120];6+9*(MONTH([.$A313])-1)+(COLUMN()-4);DAY([.$A313])+2)&lt;&gt;&quot;&quot;;1;0)" table:style-name="ce92"/>
          <table:table-cell office:value-type="float" office:value="0" table:formula="of:=IF(INDEX([Tracker.$A$1:.$AG$120];6+9*(MONTH([.$A313])-1)+(COLUMN()-4);DAY([.$A313])+2)&lt;&gt;&quot;&quot;;1;0)" table:style-name="ce92"/>
          <table:table-cell office:value-type="float" office:value="0" table:formula="of:=IF(INDEX([Tracker.$A$1:.$AG$120];6+9*(MONTH([.$A313])-1)+(COLUMN()-4);DAY([.$A313])+2)&lt;&gt;&quot;&quot;;1;0)" table:style-name="ce92"/>
          <table:table-cell office:value-type="float" office:value="0" table:formula="of:=IF(INDEX([Tracker.$A$1:.$AG$120];6+9*(MONTH([.$A313])-1)+(COLUMN()-4);DAY([.$A313])+2)&lt;&gt;&quot;&quot;;1;0)" table:style-name="ce92"/>
          <table:table-cell office:value-type="float" office:value="0" table:formula="of:=IF(INDEX([Tracker.$A$1:.$AG$120];6+9*(MONTH([.$A313])-1)+(COLUMN()-4);DAY([.$A313])+2)&lt;&gt;&quot;&quot;;1;0)" table:style-name="ce92"/>
          <table:table-cell office:value-type="float" office:value="0" table:formula="of:=IF(INDEX([Tracker.$A$1:.$AG$120];6+9*(MONTH([.$A313])-1)+(COLUMN()-4);DAY([.$A313])+2)&lt;&gt;&quot;&quot;;1;0)" table:style-name="ce92"/>
          <table:table-cell office:value-type="float" office:value="0" table:formula="of:=SUM([.D313:.I313])" table:style-name="ce6"/>
          <table:table-cell office:value-type="percentage" office:value="0" table:formula="of:=[.J313]/6" table:style-name="ce8">
            <text:p>0%</text:p>
          </table:table-cell>
          <table:table-cell table:style-name="ce1"/>
          <table:table-cell office:value-type="float" office:value="0" table:formula="of:=IF([.D313]=1;[.M312]+1;0)" table:style-name="ce1">
            <text:p>0</text:p>
          </table:table-cell>
          <table:table-cell office:value-type="float" office:value="0" table:formula="of:=IF([.E313]=1;[.N312]+1;0)" table:style-name="ce1">
            <text:p>0</text:p>
          </table:table-cell>
          <table:table-cell office:value-type="float" office:value="0" table:formula="of:=IF([.F313]=1;[.O312]+1;0)" table:style-name="ce1">
            <text:p>0</text:p>
          </table:table-cell>
          <table:table-cell office:value-type="float" office:value="0" table:formula="of:=IF([.G313]=1;[.P312]+1;0)" table:style-name="ce1">
            <text:p>0</text:p>
          </table:table-cell>
          <table:table-cell office:value-type="float" office:value="0" table:formula="of:=IF([.H313]=1;[.Q312]+1;0)" table:style-name="ce1">
            <text:p>0</text:p>
          </table:table-cell>
          <table:table-cell office:value-type="float" office:value="0" table:formula="of:=IF([.I313]=1;[.R31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7T00:00:00" table:formula="of:=[.A313]+1" table:style-name="ce10">
            <text:p>Sat, 07 Nov 2026</text:p>
          </table:table-cell>
          <table:table-cell office:value-type="string" office:string-value="Sat" table:formula="of:=TEXT([.A314];&quot;ddd&quot;)" table:style-name="ce5">
            <text:p>Sat</text:p>
          </table:table-cell>
          <table:table-cell office:value-type="string" office:string-value="Nov" table:formula="of:=TEXT([.A314];&quot;mmm&quot;)" table:style-name="ce5">
            <text:p>Nov</text:p>
          </table:table-cell>
          <table:table-cell office:value-type="float" office:value="0" table:formula="of:=IF(INDEX([Tracker.$A$1:.$AG$120];6+9*(MONTH([.$A314])-1)+(COLUMN()-4);DAY([.$A314])+2)&lt;&gt;&quot;&quot;;1;0)" table:style-name="ce92"/>
          <table:table-cell office:value-type="float" office:value="0" table:formula="of:=IF(INDEX([Tracker.$A$1:.$AG$120];6+9*(MONTH([.$A314])-1)+(COLUMN()-4);DAY([.$A314])+2)&lt;&gt;&quot;&quot;;1;0)" table:style-name="ce92"/>
          <table:table-cell office:value-type="float" office:value="0" table:formula="of:=IF(INDEX([Tracker.$A$1:.$AG$120];6+9*(MONTH([.$A314])-1)+(COLUMN()-4);DAY([.$A314])+2)&lt;&gt;&quot;&quot;;1;0)" table:style-name="ce92"/>
          <table:table-cell office:value-type="float" office:value="0" table:formula="of:=IF(INDEX([Tracker.$A$1:.$AG$120];6+9*(MONTH([.$A314])-1)+(COLUMN()-4);DAY([.$A314])+2)&lt;&gt;&quot;&quot;;1;0)" table:style-name="ce92"/>
          <table:table-cell office:value-type="float" office:value="0" table:formula="of:=IF(INDEX([Tracker.$A$1:.$AG$120];6+9*(MONTH([.$A314])-1)+(COLUMN()-4);DAY([.$A314])+2)&lt;&gt;&quot;&quot;;1;0)" table:style-name="ce92"/>
          <table:table-cell office:value-type="float" office:value="0" table:formula="of:=IF(INDEX([Tracker.$A$1:.$AG$120];6+9*(MONTH([.$A314])-1)+(COLUMN()-4);DAY([.$A314])+2)&lt;&gt;&quot;&quot;;1;0)" table:style-name="ce92"/>
          <table:table-cell office:value-type="float" office:value="0" table:formula="of:=SUM([.D314:.I314])" table:style-name="ce6"/>
          <table:table-cell office:value-type="percentage" office:value="0" table:formula="of:=[.J314]/6" table:style-name="ce8">
            <text:p>0%</text:p>
          </table:table-cell>
          <table:table-cell table:style-name="ce1"/>
          <table:table-cell office:value-type="float" office:value="0" table:formula="of:=IF([.D314]=1;[.M313]+1;0)" table:style-name="ce1">
            <text:p>0</text:p>
          </table:table-cell>
          <table:table-cell office:value-type="float" office:value="0" table:formula="of:=IF([.E314]=1;[.N313]+1;0)" table:style-name="ce1">
            <text:p>0</text:p>
          </table:table-cell>
          <table:table-cell office:value-type="float" office:value="0" table:formula="of:=IF([.F314]=1;[.O313]+1;0)" table:style-name="ce1">
            <text:p>0</text:p>
          </table:table-cell>
          <table:table-cell office:value-type="float" office:value="0" table:formula="of:=IF([.G314]=1;[.P313]+1;0)" table:style-name="ce1">
            <text:p>0</text:p>
          </table:table-cell>
          <table:table-cell office:value-type="float" office:value="0" table:formula="of:=IF([.H314]=1;[.Q313]+1;0)" table:style-name="ce1">
            <text:p>0</text:p>
          </table:table-cell>
          <table:table-cell office:value-type="float" office:value="0" table:formula="of:=IF([.I314]=1;[.R31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8T00:00:00" table:formula="of:=[.A314]+1" table:style-name="ce10">
            <text:p>Sun, 08 Nov 2026</text:p>
          </table:table-cell>
          <table:table-cell office:value-type="string" office:string-value="Sun" table:formula="of:=TEXT([.A315];&quot;ddd&quot;)" table:style-name="ce5">
            <text:p>Sun</text:p>
          </table:table-cell>
          <table:table-cell office:value-type="string" office:string-value="Nov" table:formula="of:=TEXT([.A315];&quot;mmm&quot;)" table:style-name="ce5">
            <text:p>Nov</text:p>
          </table:table-cell>
          <table:table-cell office:value-type="float" office:value="0" table:formula="of:=IF(INDEX([Tracker.$A$1:.$AG$120];6+9*(MONTH([.$A315])-1)+(COLUMN()-4);DAY([.$A315])+2)&lt;&gt;&quot;&quot;;1;0)" table:style-name="ce92"/>
          <table:table-cell office:value-type="float" office:value="0" table:formula="of:=IF(INDEX([Tracker.$A$1:.$AG$120];6+9*(MONTH([.$A315])-1)+(COLUMN()-4);DAY([.$A315])+2)&lt;&gt;&quot;&quot;;1;0)" table:style-name="ce92"/>
          <table:table-cell office:value-type="float" office:value="0" table:formula="of:=IF(INDEX([Tracker.$A$1:.$AG$120];6+9*(MONTH([.$A315])-1)+(COLUMN()-4);DAY([.$A315])+2)&lt;&gt;&quot;&quot;;1;0)" table:style-name="ce92"/>
          <table:table-cell office:value-type="float" office:value="0" table:formula="of:=IF(INDEX([Tracker.$A$1:.$AG$120];6+9*(MONTH([.$A315])-1)+(COLUMN()-4);DAY([.$A315])+2)&lt;&gt;&quot;&quot;;1;0)" table:style-name="ce92"/>
          <table:table-cell office:value-type="float" office:value="0" table:formula="of:=IF(INDEX([Tracker.$A$1:.$AG$120];6+9*(MONTH([.$A315])-1)+(COLUMN()-4);DAY([.$A315])+2)&lt;&gt;&quot;&quot;;1;0)" table:style-name="ce92"/>
          <table:table-cell office:value-type="float" office:value="0" table:formula="of:=IF(INDEX([Tracker.$A$1:.$AG$120];6+9*(MONTH([.$A315])-1)+(COLUMN()-4);DAY([.$A315])+2)&lt;&gt;&quot;&quot;;1;0)" table:style-name="ce92"/>
          <table:table-cell office:value-type="float" office:value="0" table:formula="of:=SUM([.D315:.I315])" table:style-name="ce6"/>
          <table:table-cell office:value-type="percentage" office:value="0" table:formula="of:=[.J315]/6" table:style-name="ce8">
            <text:p>0%</text:p>
          </table:table-cell>
          <table:table-cell table:style-name="ce1"/>
          <table:table-cell office:value-type="float" office:value="0" table:formula="of:=IF([.D315]=1;[.M314]+1;0)" table:style-name="ce1">
            <text:p>0</text:p>
          </table:table-cell>
          <table:table-cell office:value-type="float" office:value="0" table:formula="of:=IF([.E315]=1;[.N314]+1;0)" table:style-name="ce1">
            <text:p>0</text:p>
          </table:table-cell>
          <table:table-cell office:value-type="float" office:value="0" table:formula="of:=IF([.F315]=1;[.O314]+1;0)" table:style-name="ce1">
            <text:p>0</text:p>
          </table:table-cell>
          <table:table-cell office:value-type="float" office:value="0" table:formula="of:=IF([.G315]=1;[.P314]+1;0)" table:style-name="ce1">
            <text:p>0</text:p>
          </table:table-cell>
          <table:table-cell office:value-type="float" office:value="0" table:formula="of:=IF([.H315]=1;[.Q314]+1;0)" table:style-name="ce1">
            <text:p>0</text:p>
          </table:table-cell>
          <table:table-cell office:value-type="float" office:value="0" table:formula="of:=IF([.I315]=1;[.R31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09T00:00:00" table:formula="of:=[.A315]+1" table:style-name="ce10">
            <text:p>Mon, 09 Nov 2026</text:p>
          </table:table-cell>
          <table:table-cell office:value-type="string" office:string-value="Mon" table:formula="of:=TEXT([.A316];&quot;ddd&quot;)" table:style-name="ce5">
            <text:p>Mon</text:p>
          </table:table-cell>
          <table:table-cell office:value-type="string" office:string-value="Nov" table:formula="of:=TEXT([.A316];&quot;mmm&quot;)" table:style-name="ce5">
            <text:p>Nov</text:p>
          </table:table-cell>
          <table:table-cell office:value-type="float" office:value="0" table:formula="of:=IF(INDEX([Tracker.$A$1:.$AG$120];6+9*(MONTH([.$A316])-1)+(COLUMN()-4);DAY([.$A316])+2)&lt;&gt;&quot;&quot;;1;0)" table:style-name="ce92"/>
          <table:table-cell office:value-type="float" office:value="0" table:formula="of:=IF(INDEX([Tracker.$A$1:.$AG$120];6+9*(MONTH([.$A316])-1)+(COLUMN()-4);DAY([.$A316])+2)&lt;&gt;&quot;&quot;;1;0)" table:style-name="ce92"/>
          <table:table-cell office:value-type="float" office:value="0" table:formula="of:=IF(INDEX([Tracker.$A$1:.$AG$120];6+9*(MONTH([.$A316])-1)+(COLUMN()-4);DAY([.$A316])+2)&lt;&gt;&quot;&quot;;1;0)" table:style-name="ce92"/>
          <table:table-cell office:value-type="float" office:value="0" table:formula="of:=IF(INDEX([Tracker.$A$1:.$AG$120];6+9*(MONTH([.$A316])-1)+(COLUMN()-4);DAY([.$A316])+2)&lt;&gt;&quot;&quot;;1;0)" table:style-name="ce92"/>
          <table:table-cell office:value-type="float" office:value="0" table:formula="of:=IF(INDEX([Tracker.$A$1:.$AG$120];6+9*(MONTH([.$A316])-1)+(COLUMN()-4);DAY([.$A316])+2)&lt;&gt;&quot;&quot;;1;0)" table:style-name="ce92"/>
          <table:table-cell office:value-type="float" office:value="0" table:formula="of:=IF(INDEX([Tracker.$A$1:.$AG$120];6+9*(MONTH([.$A316])-1)+(COLUMN()-4);DAY([.$A316])+2)&lt;&gt;&quot;&quot;;1;0)" table:style-name="ce92"/>
          <table:table-cell office:value-type="float" office:value="0" table:formula="of:=SUM([.D316:.I316])" table:style-name="ce6"/>
          <table:table-cell office:value-type="percentage" office:value="0" table:formula="of:=[.J316]/6" table:style-name="ce8">
            <text:p>0%</text:p>
          </table:table-cell>
          <table:table-cell table:style-name="ce1"/>
          <table:table-cell office:value-type="float" office:value="0" table:formula="of:=IF([.D316]=1;[.M315]+1;0)" table:style-name="ce1">
            <text:p>0</text:p>
          </table:table-cell>
          <table:table-cell office:value-type="float" office:value="0" table:formula="of:=IF([.E316]=1;[.N315]+1;0)" table:style-name="ce1">
            <text:p>0</text:p>
          </table:table-cell>
          <table:table-cell office:value-type="float" office:value="0" table:formula="of:=IF([.F316]=1;[.O315]+1;0)" table:style-name="ce1">
            <text:p>0</text:p>
          </table:table-cell>
          <table:table-cell office:value-type="float" office:value="0" table:formula="of:=IF([.G316]=1;[.P315]+1;0)" table:style-name="ce1">
            <text:p>0</text:p>
          </table:table-cell>
          <table:table-cell office:value-type="float" office:value="0" table:formula="of:=IF([.H316]=1;[.Q315]+1;0)" table:style-name="ce1">
            <text:p>0</text:p>
          </table:table-cell>
          <table:table-cell office:value-type="float" office:value="0" table:formula="of:=IF([.I316]=1;[.R31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0T00:00:00" table:formula="of:=[.A316]+1" table:style-name="ce10">
            <text:p>Tue, 10 Nov 2026</text:p>
          </table:table-cell>
          <table:table-cell office:value-type="string" office:string-value="Tue" table:formula="of:=TEXT([.A317];&quot;ddd&quot;)" table:style-name="ce5">
            <text:p>Tue</text:p>
          </table:table-cell>
          <table:table-cell office:value-type="string" office:string-value="Nov" table:formula="of:=TEXT([.A317];&quot;mmm&quot;)" table:style-name="ce5">
            <text:p>Nov</text:p>
          </table:table-cell>
          <table:table-cell office:value-type="float" office:value="0" table:formula="of:=IF(INDEX([Tracker.$A$1:.$AG$120];6+9*(MONTH([.$A317])-1)+(COLUMN()-4);DAY([.$A317])+2)&lt;&gt;&quot;&quot;;1;0)" table:style-name="ce92"/>
          <table:table-cell office:value-type="float" office:value="0" table:formula="of:=IF(INDEX([Tracker.$A$1:.$AG$120];6+9*(MONTH([.$A317])-1)+(COLUMN()-4);DAY([.$A317])+2)&lt;&gt;&quot;&quot;;1;0)" table:style-name="ce92"/>
          <table:table-cell office:value-type="float" office:value="0" table:formula="of:=IF(INDEX([Tracker.$A$1:.$AG$120];6+9*(MONTH([.$A317])-1)+(COLUMN()-4);DAY([.$A317])+2)&lt;&gt;&quot;&quot;;1;0)" table:style-name="ce92"/>
          <table:table-cell office:value-type="float" office:value="0" table:formula="of:=IF(INDEX([Tracker.$A$1:.$AG$120];6+9*(MONTH([.$A317])-1)+(COLUMN()-4);DAY([.$A317])+2)&lt;&gt;&quot;&quot;;1;0)" table:style-name="ce92"/>
          <table:table-cell office:value-type="float" office:value="0" table:formula="of:=IF(INDEX([Tracker.$A$1:.$AG$120];6+9*(MONTH([.$A317])-1)+(COLUMN()-4);DAY([.$A317])+2)&lt;&gt;&quot;&quot;;1;0)" table:style-name="ce92"/>
          <table:table-cell office:value-type="float" office:value="0" table:formula="of:=IF(INDEX([Tracker.$A$1:.$AG$120];6+9*(MONTH([.$A317])-1)+(COLUMN()-4);DAY([.$A317])+2)&lt;&gt;&quot;&quot;;1;0)" table:style-name="ce92"/>
          <table:table-cell office:value-type="float" office:value="0" table:formula="of:=SUM([.D317:.I317])" table:style-name="ce6"/>
          <table:table-cell office:value-type="percentage" office:value="0" table:formula="of:=[.J317]/6" table:style-name="ce8">
            <text:p>0%</text:p>
          </table:table-cell>
          <table:table-cell table:style-name="ce1"/>
          <table:table-cell office:value-type="float" office:value="0" table:formula="of:=IF([.D317]=1;[.M316]+1;0)" table:style-name="ce1">
            <text:p>0</text:p>
          </table:table-cell>
          <table:table-cell office:value-type="float" office:value="0" table:formula="of:=IF([.E317]=1;[.N316]+1;0)" table:style-name="ce1">
            <text:p>0</text:p>
          </table:table-cell>
          <table:table-cell office:value-type="float" office:value="0" table:formula="of:=IF([.F317]=1;[.O316]+1;0)" table:style-name="ce1">
            <text:p>0</text:p>
          </table:table-cell>
          <table:table-cell office:value-type="float" office:value="0" table:formula="of:=IF([.G317]=1;[.P316]+1;0)" table:style-name="ce1">
            <text:p>0</text:p>
          </table:table-cell>
          <table:table-cell office:value-type="float" office:value="0" table:formula="of:=IF([.H317]=1;[.Q316]+1;0)" table:style-name="ce1">
            <text:p>0</text:p>
          </table:table-cell>
          <table:table-cell office:value-type="float" office:value="0" table:formula="of:=IF([.I317]=1;[.R31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1T00:00:00" table:formula="of:=[.A317]+1" table:style-name="ce10">
            <text:p>Wed, 11 Nov 2026</text:p>
          </table:table-cell>
          <table:table-cell office:value-type="string" office:string-value="Wed" table:formula="of:=TEXT([.A318];&quot;ddd&quot;)" table:style-name="ce5">
            <text:p>Wed</text:p>
          </table:table-cell>
          <table:table-cell office:value-type="string" office:string-value="Nov" table:formula="of:=TEXT([.A318];&quot;mmm&quot;)" table:style-name="ce5">
            <text:p>Nov</text:p>
          </table:table-cell>
          <table:table-cell office:value-type="float" office:value="0" table:formula="of:=IF(INDEX([Tracker.$A$1:.$AG$120];6+9*(MONTH([.$A318])-1)+(COLUMN()-4);DAY([.$A318])+2)&lt;&gt;&quot;&quot;;1;0)" table:style-name="ce92"/>
          <table:table-cell office:value-type="float" office:value="0" table:formula="of:=IF(INDEX([Tracker.$A$1:.$AG$120];6+9*(MONTH([.$A318])-1)+(COLUMN()-4);DAY([.$A318])+2)&lt;&gt;&quot;&quot;;1;0)" table:style-name="ce92"/>
          <table:table-cell office:value-type="float" office:value="0" table:formula="of:=IF(INDEX([Tracker.$A$1:.$AG$120];6+9*(MONTH([.$A318])-1)+(COLUMN()-4);DAY([.$A318])+2)&lt;&gt;&quot;&quot;;1;0)" table:style-name="ce92"/>
          <table:table-cell office:value-type="float" office:value="0" table:formula="of:=IF(INDEX([Tracker.$A$1:.$AG$120];6+9*(MONTH([.$A318])-1)+(COLUMN()-4);DAY([.$A318])+2)&lt;&gt;&quot;&quot;;1;0)" table:style-name="ce92"/>
          <table:table-cell office:value-type="float" office:value="0" table:formula="of:=IF(INDEX([Tracker.$A$1:.$AG$120];6+9*(MONTH([.$A318])-1)+(COLUMN()-4);DAY([.$A318])+2)&lt;&gt;&quot;&quot;;1;0)" table:style-name="ce92"/>
          <table:table-cell office:value-type="float" office:value="0" table:formula="of:=IF(INDEX([Tracker.$A$1:.$AG$120];6+9*(MONTH([.$A318])-1)+(COLUMN()-4);DAY([.$A318])+2)&lt;&gt;&quot;&quot;;1;0)" table:style-name="ce92"/>
          <table:table-cell office:value-type="float" office:value="0" table:formula="of:=SUM([.D318:.I318])" table:style-name="ce6"/>
          <table:table-cell office:value-type="percentage" office:value="0" table:formula="of:=[.J318]/6" table:style-name="ce8">
            <text:p>0%</text:p>
          </table:table-cell>
          <table:table-cell table:style-name="ce1"/>
          <table:table-cell office:value-type="float" office:value="0" table:formula="of:=IF([.D318]=1;[.M317]+1;0)" table:style-name="ce1">
            <text:p>0</text:p>
          </table:table-cell>
          <table:table-cell office:value-type="float" office:value="0" table:formula="of:=IF([.E318]=1;[.N317]+1;0)" table:style-name="ce1">
            <text:p>0</text:p>
          </table:table-cell>
          <table:table-cell office:value-type="float" office:value="0" table:formula="of:=IF([.F318]=1;[.O317]+1;0)" table:style-name="ce1">
            <text:p>0</text:p>
          </table:table-cell>
          <table:table-cell office:value-type="float" office:value="0" table:formula="of:=IF([.G318]=1;[.P317]+1;0)" table:style-name="ce1">
            <text:p>0</text:p>
          </table:table-cell>
          <table:table-cell office:value-type="float" office:value="0" table:formula="of:=IF([.H318]=1;[.Q317]+1;0)" table:style-name="ce1">
            <text:p>0</text:p>
          </table:table-cell>
          <table:table-cell office:value-type="float" office:value="0" table:formula="of:=IF([.I318]=1;[.R31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2T00:00:00" table:formula="of:=[.A318]+1" table:style-name="ce10">
            <text:p>Thu, 12 Nov 2026</text:p>
          </table:table-cell>
          <table:table-cell office:value-type="string" office:string-value="Thu" table:formula="of:=TEXT([.A319];&quot;ddd&quot;)" table:style-name="ce5">
            <text:p>Thu</text:p>
          </table:table-cell>
          <table:table-cell office:value-type="string" office:string-value="Nov" table:formula="of:=TEXT([.A319];&quot;mmm&quot;)" table:style-name="ce5">
            <text:p>Nov</text:p>
          </table:table-cell>
          <table:table-cell office:value-type="float" office:value="0" table:formula="of:=IF(INDEX([Tracker.$A$1:.$AG$120];6+9*(MONTH([.$A319])-1)+(COLUMN()-4);DAY([.$A319])+2)&lt;&gt;&quot;&quot;;1;0)" table:style-name="ce92"/>
          <table:table-cell office:value-type="float" office:value="0" table:formula="of:=IF(INDEX([Tracker.$A$1:.$AG$120];6+9*(MONTH([.$A319])-1)+(COLUMN()-4);DAY([.$A319])+2)&lt;&gt;&quot;&quot;;1;0)" table:style-name="ce92"/>
          <table:table-cell office:value-type="float" office:value="0" table:formula="of:=IF(INDEX([Tracker.$A$1:.$AG$120];6+9*(MONTH([.$A319])-1)+(COLUMN()-4);DAY([.$A319])+2)&lt;&gt;&quot;&quot;;1;0)" table:style-name="ce92"/>
          <table:table-cell office:value-type="float" office:value="0" table:formula="of:=IF(INDEX([Tracker.$A$1:.$AG$120];6+9*(MONTH([.$A319])-1)+(COLUMN()-4);DAY([.$A319])+2)&lt;&gt;&quot;&quot;;1;0)" table:style-name="ce92"/>
          <table:table-cell office:value-type="float" office:value="0" table:formula="of:=IF(INDEX([Tracker.$A$1:.$AG$120];6+9*(MONTH([.$A319])-1)+(COLUMN()-4);DAY([.$A319])+2)&lt;&gt;&quot;&quot;;1;0)" table:style-name="ce92"/>
          <table:table-cell office:value-type="float" office:value="0" table:formula="of:=IF(INDEX([Tracker.$A$1:.$AG$120];6+9*(MONTH([.$A319])-1)+(COLUMN()-4);DAY([.$A319])+2)&lt;&gt;&quot;&quot;;1;0)" table:style-name="ce92"/>
          <table:table-cell office:value-type="float" office:value="0" table:formula="of:=SUM([.D319:.I319])" table:style-name="ce6"/>
          <table:table-cell office:value-type="percentage" office:value="0" table:formula="of:=[.J319]/6" table:style-name="ce8">
            <text:p>0%</text:p>
          </table:table-cell>
          <table:table-cell table:style-name="ce1"/>
          <table:table-cell office:value-type="float" office:value="0" table:formula="of:=IF([.D319]=1;[.M318]+1;0)" table:style-name="ce1">
            <text:p>0</text:p>
          </table:table-cell>
          <table:table-cell office:value-type="float" office:value="0" table:formula="of:=IF([.E319]=1;[.N318]+1;0)" table:style-name="ce1">
            <text:p>0</text:p>
          </table:table-cell>
          <table:table-cell office:value-type="float" office:value="0" table:formula="of:=IF([.F319]=1;[.O318]+1;0)" table:style-name="ce1">
            <text:p>0</text:p>
          </table:table-cell>
          <table:table-cell office:value-type="float" office:value="0" table:formula="of:=IF([.G319]=1;[.P318]+1;0)" table:style-name="ce1">
            <text:p>0</text:p>
          </table:table-cell>
          <table:table-cell office:value-type="float" office:value="0" table:formula="of:=IF([.H319]=1;[.Q318]+1;0)" table:style-name="ce1">
            <text:p>0</text:p>
          </table:table-cell>
          <table:table-cell office:value-type="float" office:value="0" table:formula="of:=IF([.I319]=1;[.R31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3T00:00:00" table:formula="of:=[.A319]+1" table:style-name="ce10">
            <text:p>Fri, 13 Nov 2026</text:p>
          </table:table-cell>
          <table:table-cell office:value-type="string" office:string-value="Fri" table:formula="of:=TEXT([.A320];&quot;ddd&quot;)" table:style-name="ce5">
            <text:p>Fri</text:p>
          </table:table-cell>
          <table:table-cell office:value-type="string" office:string-value="Nov" table:formula="of:=TEXT([.A320];&quot;mmm&quot;)" table:style-name="ce5">
            <text:p>Nov</text:p>
          </table:table-cell>
          <table:table-cell office:value-type="float" office:value="0" table:formula="of:=IF(INDEX([Tracker.$A$1:.$AG$120];6+9*(MONTH([.$A320])-1)+(COLUMN()-4);DAY([.$A320])+2)&lt;&gt;&quot;&quot;;1;0)" table:style-name="ce92"/>
          <table:table-cell office:value-type="float" office:value="0" table:formula="of:=IF(INDEX([Tracker.$A$1:.$AG$120];6+9*(MONTH([.$A320])-1)+(COLUMN()-4);DAY([.$A320])+2)&lt;&gt;&quot;&quot;;1;0)" table:style-name="ce92"/>
          <table:table-cell office:value-type="float" office:value="0" table:formula="of:=IF(INDEX([Tracker.$A$1:.$AG$120];6+9*(MONTH([.$A320])-1)+(COLUMN()-4);DAY([.$A320])+2)&lt;&gt;&quot;&quot;;1;0)" table:style-name="ce92"/>
          <table:table-cell office:value-type="float" office:value="0" table:formula="of:=IF(INDEX([Tracker.$A$1:.$AG$120];6+9*(MONTH([.$A320])-1)+(COLUMN()-4);DAY([.$A320])+2)&lt;&gt;&quot;&quot;;1;0)" table:style-name="ce92"/>
          <table:table-cell office:value-type="float" office:value="0" table:formula="of:=IF(INDEX([Tracker.$A$1:.$AG$120];6+9*(MONTH([.$A320])-1)+(COLUMN()-4);DAY([.$A320])+2)&lt;&gt;&quot;&quot;;1;0)" table:style-name="ce92"/>
          <table:table-cell office:value-type="float" office:value="0" table:formula="of:=IF(INDEX([Tracker.$A$1:.$AG$120];6+9*(MONTH([.$A320])-1)+(COLUMN()-4);DAY([.$A320])+2)&lt;&gt;&quot;&quot;;1;0)" table:style-name="ce92"/>
          <table:table-cell office:value-type="float" office:value="0" table:formula="of:=SUM([.D320:.I320])" table:style-name="ce6"/>
          <table:table-cell office:value-type="percentage" office:value="0" table:formula="of:=[.J320]/6" table:style-name="ce8">
            <text:p>0%</text:p>
          </table:table-cell>
          <table:table-cell table:style-name="ce1"/>
          <table:table-cell office:value-type="float" office:value="0" table:formula="of:=IF([.D320]=1;[.M319]+1;0)" table:style-name="ce1">
            <text:p>0</text:p>
          </table:table-cell>
          <table:table-cell office:value-type="float" office:value="0" table:formula="of:=IF([.E320]=1;[.N319]+1;0)" table:style-name="ce1">
            <text:p>0</text:p>
          </table:table-cell>
          <table:table-cell office:value-type="float" office:value="0" table:formula="of:=IF([.F320]=1;[.O319]+1;0)" table:style-name="ce1">
            <text:p>0</text:p>
          </table:table-cell>
          <table:table-cell office:value-type="float" office:value="0" table:formula="of:=IF([.G320]=1;[.P319]+1;0)" table:style-name="ce1">
            <text:p>0</text:p>
          </table:table-cell>
          <table:table-cell office:value-type="float" office:value="0" table:formula="of:=IF([.H320]=1;[.Q319]+1;0)" table:style-name="ce1">
            <text:p>0</text:p>
          </table:table-cell>
          <table:table-cell office:value-type="float" office:value="0" table:formula="of:=IF([.I320]=1;[.R31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4T00:00:00" table:formula="of:=[.A320]+1" table:style-name="ce10">
            <text:p>Sat, 14 Nov 2026</text:p>
          </table:table-cell>
          <table:table-cell office:value-type="string" office:string-value="Sat" table:formula="of:=TEXT([.A321];&quot;ddd&quot;)" table:style-name="ce5">
            <text:p>Sat</text:p>
          </table:table-cell>
          <table:table-cell office:value-type="string" office:string-value="Nov" table:formula="of:=TEXT([.A321];&quot;mmm&quot;)" table:style-name="ce5">
            <text:p>Nov</text:p>
          </table:table-cell>
          <table:table-cell office:value-type="float" office:value="0" table:formula="of:=IF(INDEX([Tracker.$A$1:.$AG$120];6+9*(MONTH([.$A321])-1)+(COLUMN()-4);DAY([.$A321])+2)&lt;&gt;&quot;&quot;;1;0)" table:style-name="ce92"/>
          <table:table-cell office:value-type="float" office:value="0" table:formula="of:=IF(INDEX([Tracker.$A$1:.$AG$120];6+9*(MONTH([.$A321])-1)+(COLUMN()-4);DAY([.$A321])+2)&lt;&gt;&quot;&quot;;1;0)" table:style-name="ce92"/>
          <table:table-cell office:value-type="float" office:value="0" table:formula="of:=IF(INDEX([Tracker.$A$1:.$AG$120];6+9*(MONTH([.$A321])-1)+(COLUMN()-4);DAY([.$A321])+2)&lt;&gt;&quot;&quot;;1;0)" table:style-name="ce92"/>
          <table:table-cell office:value-type="float" office:value="0" table:formula="of:=IF(INDEX([Tracker.$A$1:.$AG$120];6+9*(MONTH([.$A321])-1)+(COLUMN()-4);DAY([.$A321])+2)&lt;&gt;&quot;&quot;;1;0)" table:style-name="ce92"/>
          <table:table-cell office:value-type="float" office:value="0" table:formula="of:=IF(INDEX([Tracker.$A$1:.$AG$120];6+9*(MONTH([.$A321])-1)+(COLUMN()-4);DAY([.$A321])+2)&lt;&gt;&quot;&quot;;1;0)" table:style-name="ce92"/>
          <table:table-cell office:value-type="float" office:value="0" table:formula="of:=IF(INDEX([Tracker.$A$1:.$AG$120];6+9*(MONTH([.$A321])-1)+(COLUMN()-4);DAY([.$A321])+2)&lt;&gt;&quot;&quot;;1;0)" table:style-name="ce92"/>
          <table:table-cell office:value-type="float" office:value="0" table:formula="of:=SUM([.D321:.I321])" table:style-name="ce6"/>
          <table:table-cell office:value-type="percentage" office:value="0" table:formula="of:=[.J321]/6" table:style-name="ce8">
            <text:p>0%</text:p>
          </table:table-cell>
          <table:table-cell table:style-name="ce1"/>
          <table:table-cell office:value-type="float" office:value="0" table:formula="of:=IF([.D321]=1;[.M320]+1;0)" table:style-name="ce1">
            <text:p>0</text:p>
          </table:table-cell>
          <table:table-cell office:value-type="float" office:value="0" table:formula="of:=IF([.E321]=1;[.N320]+1;0)" table:style-name="ce1">
            <text:p>0</text:p>
          </table:table-cell>
          <table:table-cell office:value-type="float" office:value="0" table:formula="of:=IF([.F321]=1;[.O320]+1;0)" table:style-name="ce1">
            <text:p>0</text:p>
          </table:table-cell>
          <table:table-cell office:value-type="float" office:value="0" table:formula="of:=IF([.G321]=1;[.P320]+1;0)" table:style-name="ce1">
            <text:p>0</text:p>
          </table:table-cell>
          <table:table-cell office:value-type="float" office:value="0" table:formula="of:=IF([.H321]=1;[.Q320]+1;0)" table:style-name="ce1">
            <text:p>0</text:p>
          </table:table-cell>
          <table:table-cell office:value-type="float" office:value="0" table:formula="of:=IF([.I321]=1;[.R32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5T00:00:00" table:formula="of:=[.A321]+1" table:style-name="ce10">
            <text:p>Sun, 15 Nov 2026</text:p>
          </table:table-cell>
          <table:table-cell office:value-type="string" office:string-value="Sun" table:formula="of:=TEXT([.A322];&quot;ddd&quot;)" table:style-name="ce5">
            <text:p>Sun</text:p>
          </table:table-cell>
          <table:table-cell office:value-type="string" office:string-value="Nov" table:formula="of:=TEXT([.A322];&quot;mmm&quot;)" table:style-name="ce5">
            <text:p>Nov</text:p>
          </table:table-cell>
          <table:table-cell office:value-type="float" office:value="0" table:formula="of:=IF(INDEX([Tracker.$A$1:.$AG$120];6+9*(MONTH([.$A322])-1)+(COLUMN()-4);DAY([.$A322])+2)&lt;&gt;&quot;&quot;;1;0)" table:style-name="ce92"/>
          <table:table-cell office:value-type="float" office:value="0" table:formula="of:=IF(INDEX([Tracker.$A$1:.$AG$120];6+9*(MONTH([.$A322])-1)+(COLUMN()-4);DAY([.$A322])+2)&lt;&gt;&quot;&quot;;1;0)" table:style-name="ce92"/>
          <table:table-cell office:value-type="float" office:value="0" table:formula="of:=IF(INDEX([Tracker.$A$1:.$AG$120];6+9*(MONTH([.$A322])-1)+(COLUMN()-4);DAY([.$A322])+2)&lt;&gt;&quot;&quot;;1;0)" table:style-name="ce92"/>
          <table:table-cell office:value-type="float" office:value="0" table:formula="of:=IF(INDEX([Tracker.$A$1:.$AG$120];6+9*(MONTH([.$A322])-1)+(COLUMN()-4);DAY([.$A322])+2)&lt;&gt;&quot;&quot;;1;0)" table:style-name="ce92"/>
          <table:table-cell office:value-type="float" office:value="0" table:formula="of:=IF(INDEX([Tracker.$A$1:.$AG$120];6+9*(MONTH([.$A322])-1)+(COLUMN()-4);DAY([.$A322])+2)&lt;&gt;&quot;&quot;;1;0)" table:style-name="ce92"/>
          <table:table-cell office:value-type="float" office:value="0" table:formula="of:=IF(INDEX([Tracker.$A$1:.$AG$120];6+9*(MONTH([.$A322])-1)+(COLUMN()-4);DAY([.$A322])+2)&lt;&gt;&quot;&quot;;1;0)" table:style-name="ce92"/>
          <table:table-cell office:value-type="float" office:value="0" table:formula="of:=SUM([.D322:.I322])" table:style-name="ce6"/>
          <table:table-cell office:value-type="percentage" office:value="0" table:formula="of:=[.J322]/6" table:style-name="ce8">
            <text:p>0%</text:p>
          </table:table-cell>
          <table:table-cell table:style-name="ce1"/>
          <table:table-cell office:value-type="float" office:value="0" table:formula="of:=IF([.D322]=1;[.M321]+1;0)" table:style-name="ce1">
            <text:p>0</text:p>
          </table:table-cell>
          <table:table-cell office:value-type="float" office:value="0" table:formula="of:=IF([.E322]=1;[.N321]+1;0)" table:style-name="ce1">
            <text:p>0</text:p>
          </table:table-cell>
          <table:table-cell office:value-type="float" office:value="0" table:formula="of:=IF([.F322]=1;[.O321]+1;0)" table:style-name="ce1">
            <text:p>0</text:p>
          </table:table-cell>
          <table:table-cell office:value-type="float" office:value="0" table:formula="of:=IF([.G322]=1;[.P321]+1;0)" table:style-name="ce1">
            <text:p>0</text:p>
          </table:table-cell>
          <table:table-cell office:value-type="float" office:value="0" table:formula="of:=IF([.H322]=1;[.Q321]+1;0)" table:style-name="ce1">
            <text:p>0</text:p>
          </table:table-cell>
          <table:table-cell office:value-type="float" office:value="0" table:formula="of:=IF([.I322]=1;[.R32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6T00:00:00" table:formula="of:=[.A322]+1" table:style-name="ce10">
            <text:p>Mon, 16 Nov 2026</text:p>
          </table:table-cell>
          <table:table-cell office:value-type="string" office:string-value="Mon" table:formula="of:=TEXT([.A323];&quot;ddd&quot;)" table:style-name="ce5">
            <text:p>Mon</text:p>
          </table:table-cell>
          <table:table-cell office:value-type="string" office:string-value="Nov" table:formula="of:=TEXT([.A323];&quot;mmm&quot;)" table:style-name="ce5">
            <text:p>Nov</text:p>
          </table:table-cell>
          <table:table-cell office:value-type="float" office:value="0" table:formula="of:=IF(INDEX([Tracker.$A$1:.$AG$120];6+9*(MONTH([.$A323])-1)+(COLUMN()-4);DAY([.$A323])+2)&lt;&gt;&quot;&quot;;1;0)" table:style-name="ce92"/>
          <table:table-cell office:value-type="float" office:value="0" table:formula="of:=IF(INDEX([Tracker.$A$1:.$AG$120];6+9*(MONTH([.$A323])-1)+(COLUMN()-4);DAY([.$A323])+2)&lt;&gt;&quot;&quot;;1;0)" table:style-name="ce92"/>
          <table:table-cell office:value-type="float" office:value="0" table:formula="of:=IF(INDEX([Tracker.$A$1:.$AG$120];6+9*(MONTH([.$A323])-1)+(COLUMN()-4);DAY([.$A323])+2)&lt;&gt;&quot;&quot;;1;0)" table:style-name="ce92"/>
          <table:table-cell office:value-type="float" office:value="0" table:formula="of:=IF(INDEX([Tracker.$A$1:.$AG$120];6+9*(MONTH([.$A323])-1)+(COLUMN()-4);DAY([.$A323])+2)&lt;&gt;&quot;&quot;;1;0)" table:style-name="ce92"/>
          <table:table-cell office:value-type="float" office:value="0" table:formula="of:=IF(INDEX([Tracker.$A$1:.$AG$120];6+9*(MONTH([.$A323])-1)+(COLUMN()-4);DAY([.$A323])+2)&lt;&gt;&quot;&quot;;1;0)" table:style-name="ce92"/>
          <table:table-cell office:value-type="float" office:value="0" table:formula="of:=IF(INDEX([Tracker.$A$1:.$AG$120];6+9*(MONTH([.$A323])-1)+(COLUMN()-4);DAY([.$A323])+2)&lt;&gt;&quot;&quot;;1;0)" table:style-name="ce92"/>
          <table:table-cell office:value-type="float" office:value="0" table:formula="of:=SUM([.D323:.I323])" table:style-name="ce6"/>
          <table:table-cell office:value-type="percentage" office:value="0" table:formula="of:=[.J323]/6" table:style-name="ce8">
            <text:p>0%</text:p>
          </table:table-cell>
          <table:table-cell table:style-name="ce1"/>
          <table:table-cell office:value-type="float" office:value="0" table:formula="of:=IF([.D323]=1;[.M322]+1;0)" table:style-name="ce1">
            <text:p>0</text:p>
          </table:table-cell>
          <table:table-cell office:value-type="float" office:value="0" table:formula="of:=IF([.E323]=1;[.N322]+1;0)" table:style-name="ce1">
            <text:p>0</text:p>
          </table:table-cell>
          <table:table-cell office:value-type="float" office:value="0" table:formula="of:=IF([.F323]=1;[.O322]+1;0)" table:style-name="ce1">
            <text:p>0</text:p>
          </table:table-cell>
          <table:table-cell office:value-type="float" office:value="0" table:formula="of:=IF([.G323]=1;[.P322]+1;0)" table:style-name="ce1">
            <text:p>0</text:p>
          </table:table-cell>
          <table:table-cell office:value-type="float" office:value="0" table:formula="of:=IF([.H323]=1;[.Q322]+1;0)" table:style-name="ce1">
            <text:p>0</text:p>
          </table:table-cell>
          <table:table-cell office:value-type="float" office:value="0" table:formula="of:=IF([.I323]=1;[.R32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7T00:00:00" table:formula="of:=[.A323]+1" table:style-name="ce10">
            <text:p>Tue, 17 Nov 2026</text:p>
          </table:table-cell>
          <table:table-cell office:value-type="string" office:string-value="Tue" table:formula="of:=TEXT([.A324];&quot;ddd&quot;)" table:style-name="ce5">
            <text:p>Tue</text:p>
          </table:table-cell>
          <table:table-cell office:value-type="string" office:string-value="Nov" table:formula="of:=TEXT([.A324];&quot;mmm&quot;)" table:style-name="ce5">
            <text:p>Nov</text:p>
          </table:table-cell>
          <table:table-cell office:value-type="float" office:value="0" table:formula="of:=IF(INDEX([Tracker.$A$1:.$AG$120];6+9*(MONTH([.$A324])-1)+(COLUMN()-4);DAY([.$A324])+2)&lt;&gt;&quot;&quot;;1;0)" table:style-name="ce92"/>
          <table:table-cell office:value-type="float" office:value="0" table:formula="of:=IF(INDEX([Tracker.$A$1:.$AG$120];6+9*(MONTH([.$A324])-1)+(COLUMN()-4);DAY([.$A324])+2)&lt;&gt;&quot;&quot;;1;0)" table:style-name="ce92"/>
          <table:table-cell office:value-type="float" office:value="0" table:formula="of:=IF(INDEX([Tracker.$A$1:.$AG$120];6+9*(MONTH([.$A324])-1)+(COLUMN()-4);DAY([.$A324])+2)&lt;&gt;&quot;&quot;;1;0)" table:style-name="ce92"/>
          <table:table-cell office:value-type="float" office:value="0" table:formula="of:=IF(INDEX([Tracker.$A$1:.$AG$120];6+9*(MONTH([.$A324])-1)+(COLUMN()-4);DAY([.$A324])+2)&lt;&gt;&quot;&quot;;1;0)" table:style-name="ce92"/>
          <table:table-cell office:value-type="float" office:value="0" table:formula="of:=IF(INDEX([Tracker.$A$1:.$AG$120];6+9*(MONTH([.$A324])-1)+(COLUMN()-4);DAY([.$A324])+2)&lt;&gt;&quot;&quot;;1;0)" table:style-name="ce92"/>
          <table:table-cell office:value-type="float" office:value="0" table:formula="of:=IF(INDEX([Tracker.$A$1:.$AG$120];6+9*(MONTH([.$A324])-1)+(COLUMN()-4);DAY([.$A324])+2)&lt;&gt;&quot;&quot;;1;0)" table:style-name="ce92"/>
          <table:table-cell office:value-type="float" office:value="0" table:formula="of:=SUM([.D324:.I324])" table:style-name="ce6"/>
          <table:table-cell office:value-type="percentage" office:value="0" table:formula="of:=[.J324]/6" table:style-name="ce8">
            <text:p>0%</text:p>
          </table:table-cell>
          <table:table-cell table:style-name="ce1"/>
          <table:table-cell office:value-type="float" office:value="0" table:formula="of:=IF([.D324]=1;[.M323]+1;0)" table:style-name="ce1">
            <text:p>0</text:p>
          </table:table-cell>
          <table:table-cell office:value-type="float" office:value="0" table:formula="of:=IF([.E324]=1;[.N323]+1;0)" table:style-name="ce1">
            <text:p>0</text:p>
          </table:table-cell>
          <table:table-cell office:value-type="float" office:value="0" table:formula="of:=IF([.F324]=1;[.O323]+1;0)" table:style-name="ce1">
            <text:p>0</text:p>
          </table:table-cell>
          <table:table-cell office:value-type="float" office:value="0" table:formula="of:=IF([.G324]=1;[.P323]+1;0)" table:style-name="ce1">
            <text:p>0</text:p>
          </table:table-cell>
          <table:table-cell office:value-type="float" office:value="0" table:formula="of:=IF([.H324]=1;[.Q323]+1;0)" table:style-name="ce1">
            <text:p>0</text:p>
          </table:table-cell>
          <table:table-cell office:value-type="float" office:value="0" table:formula="of:=IF([.I324]=1;[.R32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8T00:00:00" table:formula="of:=[.A324]+1" table:style-name="ce10">
            <text:p>Wed, 18 Nov 2026</text:p>
          </table:table-cell>
          <table:table-cell office:value-type="string" office:string-value="Wed" table:formula="of:=TEXT([.A325];&quot;ddd&quot;)" table:style-name="ce5">
            <text:p>Wed</text:p>
          </table:table-cell>
          <table:table-cell office:value-type="string" office:string-value="Nov" table:formula="of:=TEXT([.A325];&quot;mmm&quot;)" table:style-name="ce5">
            <text:p>Nov</text:p>
          </table:table-cell>
          <table:table-cell office:value-type="float" office:value="0" table:formula="of:=IF(INDEX([Tracker.$A$1:.$AG$120];6+9*(MONTH([.$A325])-1)+(COLUMN()-4);DAY([.$A325])+2)&lt;&gt;&quot;&quot;;1;0)" table:style-name="ce92"/>
          <table:table-cell office:value-type="float" office:value="0" table:formula="of:=IF(INDEX([Tracker.$A$1:.$AG$120];6+9*(MONTH([.$A325])-1)+(COLUMN()-4);DAY([.$A325])+2)&lt;&gt;&quot;&quot;;1;0)" table:style-name="ce92"/>
          <table:table-cell office:value-type="float" office:value="0" table:formula="of:=IF(INDEX([Tracker.$A$1:.$AG$120];6+9*(MONTH([.$A325])-1)+(COLUMN()-4);DAY([.$A325])+2)&lt;&gt;&quot;&quot;;1;0)" table:style-name="ce92"/>
          <table:table-cell office:value-type="float" office:value="0" table:formula="of:=IF(INDEX([Tracker.$A$1:.$AG$120];6+9*(MONTH([.$A325])-1)+(COLUMN()-4);DAY([.$A325])+2)&lt;&gt;&quot;&quot;;1;0)" table:style-name="ce92"/>
          <table:table-cell office:value-type="float" office:value="0" table:formula="of:=IF(INDEX([Tracker.$A$1:.$AG$120];6+9*(MONTH([.$A325])-1)+(COLUMN()-4);DAY([.$A325])+2)&lt;&gt;&quot;&quot;;1;0)" table:style-name="ce92"/>
          <table:table-cell office:value-type="float" office:value="0" table:formula="of:=IF(INDEX([Tracker.$A$1:.$AG$120];6+9*(MONTH([.$A325])-1)+(COLUMN()-4);DAY([.$A325])+2)&lt;&gt;&quot;&quot;;1;0)" table:style-name="ce92"/>
          <table:table-cell office:value-type="float" office:value="0" table:formula="of:=SUM([.D325:.I325])" table:style-name="ce6"/>
          <table:table-cell office:value-type="percentage" office:value="0" table:formula="of:=[.J325]/6" table:style-name="ce8">
            <text:p>0%</text:p>
          </table:table-cell>
          <table:table-cell table:style-name="ce1"/>
          <table:table-cell office:value-type="float" office:value="0" table:formula="of:=IF([.D325]=1;[.M324]+1;0)" table:style-name="ce1">
            <text:p>0</text:p>
          </table:table-cell>
          <table:table-cell office:value-type="float" office:value="0" table:formula="of:=IF([.E325]=1;[.N324]+1;0)" table:style-name="ce1">
            <text:p>0</text:p>
          </table:table-cell>
          <table:table-cell office:value-type="float" office:value="0" table:formula="of:=IF([.F325]=1;[.O324]+1;0)" table:style-name="ce1">
            <text:p>0</text:p>
          </table:table-cell>
          <table:table-cell office:value-type="float" office:value="0" table:formula="of:=IF([.G325]=1;[.P324]+1;0)" table:style-name="ce1">
            <text:p>0</text:p>
          </table:table-cell>
          <table:table-cell office:value-type="float" office:value="0" table:formula="of:=IF([.H325]=1;[.Q324]+1;0)" table:style-name="ce1">
            <text:p>0</text:p>
          </table:table-cell>
          <table:table-cell office:value-type="float" office:value="0" table:formula="of:=IF([.I325]=1;[.R32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19T00:00:00" table:formula="of:=[.A325]+1" table:style-name="ce10">
            <text:p>Thu, 19 Nov 2026</text:p>
          </table:table-cell>
          <table:table-cell office:value-type="string" office:string-value="Thu" table:formula="of:=TEXT([.A326];&quot;ddd&quot;)" table:style-name="ce5">
            <text:p>Thu</text:p>
          </table:table-cell>
          <table:table-cell office:value-type="string" office:string-value="Nov" table:formula="of:=TEXT([.A326];&quot;mmm&quot;)" table:style-name="ce5">
            <text:p>Nov</text:p>
          </table:table-cell>
          <table:table-cell office:value-type="float" office:value="0" table:formula="of:=IF(INDEX([Tracker.$A$1:.$AG$120];6+9*(MONTH([.$A326])-1)+(COLUMN()-4);DAY([.$A326])+2)&lt;&gt;&quot;&quot;;1;0)" table:style-name="ce92"/>
          <table:table-cell office:value-type="float" office:value="0" table:formula="of:=IF(INDEX([Tracker.$A$1:.$AG$120];6+9*(MONTH([.$A326])-1)+(COLUMN()-4);DAY([.$A326])+2)&lt;&gt;&quot;&quot;;1;0)" table:style-name="ce92"/>
          <table:table-cell office:value-type="float" office:value="0" table:formula="of:=IF(INDEX([Tracker.$A$1:.$AG$120];6+9*(MONTH([.$A326])-1)+(COLUMN()-4);DAY([.$A326])+2)&lt;&gt;&quot;&quot;;1;0)" table:style-name="ce92"/>
          <table:table-cell office:value-type="float" office:value="0" table:formula="of:=IF(INDEX([Tracker.$A$1:.$AG$120];6+9*(MONTH([.$A326])-1)+(COLUMN()-4);DAY([.$A326])+2)&lt;&gt;&quot;&quot;;1;0)" table:style-name="ce92"/>
          <table:table-cell office:value-type="float" office:value="0" table:formula="of:=IF(INDEX([Tracker.$A$1:.$AG$120];6+9*(MONTH([.$A326])-1)+(COLUMN()-4);DAY([.$A326])+2)&lt;&gt;&quot;&quot;;1;0)" table:style-name="ce92"/>
          <table:table-cell office:value-type="float" office:value="0" table:formula="of:=IF(INDEX([Tracker.$A$1:.$AG$120];6+9*(MONTH([.$A326])-1)+(COLUMN()-4);DAY([.$A326])+2)&lt;&gt;&quot;&quot;;1;0)" table:style-name="ce92"/>
          <table:table-cell office:value-type="float" office:value="0" table:formula="of:=SUM([.D326:.I326])" table:style-name="ce6"/>
          <table:table-cell office:value-type="percentage" office:value="0" table:formula="of:=[.J326]/6" table:style-name="ce8">
            <text:p>0%</text:p>
          </table:table-cell>
          <table:table-cell table:style-name="ce1"/>
          <table:table-cell office:value-type="float" office:value="0" table:formula="of:=IF([.D326]=1;[.M325]+1;0)" table:style-name="ce1">
            <text:p>0</text:p>
          </table:table-cell>
          <table:table-cell office:value-type="float" office:value="0" table:formula="of:=IF([.E326]=1;[.N325]+1;0)" table:style-name="ce1">
            <text:p>0</text:p>
          </table:table-cell>
          <table:table-cell office:value-type="float" office:value="0" table:formula="of:=IF([.F326]=1;[.O325]+1;0)" table:style-name="ce1">
            <text:p>0</text:p>
          </table:table-cell>
          <table:table-cell office:value-type="float" office:value="0" table:formula="of:=IF([.G326]=1;[.P325]+1;0)" table:style-name="ce1">
            <text:p>0</text:p>
          </table:table-cell>
          <table:table-cell office:value-type="float" office:value="0" table:formula="of:=IF([.H326]=1;[.Q325]+1;0)" table:style-name="ce1">
            <text:p>0</text:p>
          </table:table-cell>
          <table:table-cell office:value-type="float" office:value="0" table:formula="of:=IF([.I326]=1;[.R32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0T00:00:00" table:formula="of:=[.A326]+1" table:style-name="ce10">
            <text:p>Fri, 20 Nov 2026</text:p>
          </table:table-cell>
          <table:table-cell office:value-type="string" office:string-value="Fri" table:formula="of:=TEXT([.A327];&quot;ddd&quot;)" table:style-name="ce5">
            <text:p>Fri</text:p>
          </table:table-cell>
          <table:table-cell office:value-type="string" office:string-value="Nov" table:formula="of:=TEXT([.A327];&quot;mmm&quot;)" table:style-name="ce5">
            <text:p>Nov</text:p>
          </table:table-cell>
          <table:table-cell office:value-type="float" office:value="0" table:formula="of:=IF(INDEX([Tracker.$A$1:.$AG$120];6+9*(MONTH([.$A327])-1)+(COLUMN()-4);DAY([.$A327])+2)&lt;&gt;&quot;&quot;;1;0)" table:style-name="ce92"/>
          <table:table-cell office:value-type="float" office:value="0" table:formula="of:=IF(INDEX([Tracker.$A$1:.$AG$120];6+9*(MONTH([.$A327])-1)+(COLUMN()-4);DAY([.$A327])+2)&lt;&gt;&quot;&quot;;1;0)" table:style-name="ce92"/>
          <table:table-cell office:value-type="float" office:value="0" table:formula="of:=IF(INDEX([Tracker.$A$1:.$AG$120];6+9*(MONTH([.$A327])-1)+(COLUMN()-4);DAY([.$A327])+2)&lt;&gt;&quot;&quot;;1;0)" table:style-name="ce92"/>
          <table:table-cell office:value-type="float" office:value="0" table:formula="of:=IF(INDEX([Tracker.$A$1:.$AG$120];6+9*(MONTH([.$A327])-1)+(COLUMN()-4);DAY([.$A327])+2)&lt;&gt;&quot;&quot;;1;0)" table:style-name="ce92"/>
          <table:table-cell office:value-type="float" office:value="0" table:formula="of:=IF(INDEX([Tracker.$A$1:.$AG$120];6+9*(MONTH([.$A327])-1)+(COLUMN()-4);DAY([.$A327])+2)&lt;&gt;&quot;&quot;;1;0)" table:style-name="ce92"/>
          <table:table-cell office:value-type="float" office:value="0" table:formula="of:=IF(INDEX([Tracker.$A$1:.$AG$120];6+9*(MONTH([.$A327])-1)+(COLUMN()-4);DAY([.$A327])+2)&lt;&gt;&quot;&quot;;1;0)" table:style-name="ce92"/>
          <table:table-cell office:value-type="float" office:value="0" table:formula="of:=SUM([.D327:.I327])" table:style-name="ce6"/>
          <table:table-cell office:value-type="percentage" office:value="0" table:formula="of:=[.J327]/6" table:style-name="ce8">
            <text:p>0%</text:p>
          </table:table-cell>
          <table:table-cell table:style-name="ce1"/>
          <table:table-cell office:value-type="float" office:value="0" table:formula="of:=IF([.D327]=1;[.M326]+1;0)" table:style-name="ce1">
            <text:p>0</text:p>
          </table:table-cell>
          <table:table-cell office:value-type="float" office:value="0" table:formula="of:=IF([.E327]=1;[.N326]+1;0)" table:style-name="ce1">
            <text:p>0</text:p>
          </table:table-cell>
          <table:table-cell office:value-type="float" office:value="0" table:formula="of:=IF([.F327]=1;[.O326]+1;0)" table:style-name="ce1">
            <text:p>0</text:p>
          </table:table-cell>
          <table:table-cell office:value-type="float" office:value="0" table:formula="of:=IF([.G327]=1;[.P326]+1;0)" table:style-name="ce1">
            <text:p>0</text:p>
          </table:table-cell>
          <table:table-cell office:value-type="float" office:value="0" table:formula="of:=IF([.H327]=1;[.Q326]+1;0)" table:style-name="ce1">
            <text:p>0</text:p>
          </table:table-cell>
          <table:table-cell office:value-type="float" office:value="0" table:formula="of:=IF([.I327]=1;[.R32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1T00:00:00" table:formula="of:=[.A327]+1" table:style-name="ce10">
            <text:p>Sat, 21 Nov 2026</text:p>
          </table:table-cell>
          <table:table-cell office:value-type="string" office:string-value="Sat" table:formula="of:=TEXT([.A328];&quot;ddd&quot;)" table:style-name="ce5">
            <text:p>Sat</text:p>
          </table:table-cell>
          <table:table-cell office:value-type="string" office:string-value="Nov" table:formula="of:=TEXT([.A328];&quot;mmm&quot;)" table:style-name="ce5">
            <text:p>Nov</text:p>
          </table:table-cell>
          <table:table-cell office:value-type="float" office:value="0" table:formula="of:=IF(INDEX([Tracker.$A$1:.$AG$120];6+9*(MONTH([.$A328])-1)+(COLUMN()-4);DAY([.$A328])+2)&lt;&gt;&quot;&quot;;1;0)" table:style-name="ce92"/>
          <table:table-cell office:value-type="float" office:value="0" table:formula="of:=IF(INDEX([Tracker.$A$1:.$AG$120];6+9*(MONTH([.$A328])-1)+(COLUMN()-4);DAY([.$A328])+2)&lt;&gt;&quot;&quot;;1;0)" table:style-name="ce92"/>
          <table:table-cell office:value-type="float" office:value="0" table:formula="of:=IF(INDEX([Tracker.$A$1:.$AG$120];6+9*(MONTH([.$A328])-1)+(COLUMN()-4);DAY([.$A328])+2)&lt;&gt;&quot;&quot;;1;0)" table:style-name="ce92"/>
          <table:table-cell office:value-type="float" office:value="0" table:formula="of:=IF(INDEX([Tracker.$A$1:.$AG$120];6+9*(MONTH([.$A328])-1)+(COLUMN()-4);DAY([.$A328])+2)&lt;&gt;&quot;&quot;;1;0)" table:style-name="ce92"/>
          <table:table-cell office:value-type="float" office:value="0" table:formula="of:=IF(INDEX([Tracker.$A$1:.$AG$120];6+9*(MONTH([.$A328])-1)+(COLUMN()-4);DAY([.$A328])+2)&lt;&gt;&quot;&quot;;1;0)" table:style-name="ce92"/>
          <table:table-cell office:value-type="float" office:value="0" table:formula="of:=IF(INDEX([Tracker.$A$1:.$AG$120];6+9*(MONTH([.$A328])-1)+(COLUMN()-4);DAY([.$A328])+2)&lt;&gt;&quot;&quot;;1;0)" table:style-name="ce92"/>
          <table:table-cell office:value-type="float" office:value="0" table:formula="of:=SUM([.D328:.I328])" table:style-name="ce6"/>
          <table:table-cell office:value-type="percentage" office:value="0" table:formula="of:=[.J328]/6" table:style-name="ce8">
            <text:p>0%</text:p>
          </table:table-cell>
          <table:table-cell table:style-name="ce1"/>
          <table:table-cell office:value-type="float" office:value="0" table:formula="of:=IF([.D328]=1;[.M327]+1;0)" table:style-name="ce1">
            <text:p>0</text:p>
          </table:table-cell>
          <table:table-cell office:value-type="float" office:value="0" table:formula="of:=IF([.E328]=1;[.N327]+1;0)" table:style-name="ce1">
            <text:p>0</text:p>
          </table:table-cell>
          <table:table-cell office:value-type="float" office:value="0" table:formula="of:=IF([.F328]=1;[.O327]+1;0)" table:style-name="ce1">
            <text:p>0</text:p>
          </table:table-cell>
          <table:table-cell office:value-type="float" office:value="0" table:formula="of:=IF([.G328]=1;[.P327]+1;0)" table:style-name="ce1">
            <text:p>0</text:p>
          </table:table-cell>
          <table:table-cell office:value-type="float" office:value="0" table:formula="of:=IF([.H328]=1;[.Q327]+1;0)" table:style-name="ce1">
            <text:p>0</text:p>
          </table:table-cell>
          <table:table-cell office:value-type="float" office:value="0" table:formula="of:=IF([.I328]=1;[.R32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2T00:00:00" table:formula="of:=[.A328]+1" table:style-name="ce10">
            <text:p>Sun, 22 Nov 2026</text:p>
          </table:table-cell>
          <table:table-cell office:value-type="string" office:string-value="Sun" table:formula="of:=TEXT([.A329];&quot;ddd&quot;)" table:style-name="ce5">
            <text:p>Sun</text:p>
          </table:table-cell>
          <table:table-cell office:value-type="string" office:string-value="Nov" table:formula="of:=TEXT([.A329];&quot;mmm&quot;)" table:style-name="ce5">
            <text:p>Nov</text:p>
          </table:table-cell>
          <table:table-cell office:value-type="float" office:value="0" table:formula="of:=IF(INDEX([Tracker.$A$1:.$AG$120];6+9*(MONTH([.$A329])-1)+(COLUMN()-4);DAY([.$A329])+2)&lt;&gt;&quot;&quot;;1;0)" table:style-name="ce92"/>
          <table:table-cell office:value-type="float" office:value="0" table:formula="of:=IF(INDEX([Tracker.$A$1:.$AG$120];6+9*(MONTH([.$A329])-1)+(COLUMN()-4);DAY([.$A329])+2)&lt;&gt;&quot;&quot;;1;0)" table:style-name="ce92"/>
          <table:table-cell office:value-type="float" office:value="0" table:formula="of:=IF(INDEX([Tracker.$A$1:.$AG$120];6+9*(MONTH([.$A329])-1)+(COLUMN()-4);DAY([.$A329])+2)&lt;&gt;&quot;&quot;;1;0)" table:style-name="ce92"/>
          <table:table-cell office:value-type="float" office:value="0" table:formula="of:=IF(INDEX([Tracker.$A$1:.$AG$120];6+9*(MONTH([.$A329])-1)+(COLUMN()-4);DAY([.$A329])+2)&lt;&gt;&quot;&quot;;1;0)" table:style-name="ce92"/>
          <table:table-cell office:value-type="float" office:value="0" table:formula="of:=IF(INDEX([Tracker.$A$1:.$AG$120];6+9*(MONTH([.$A329])-1)+(COLUMN()-4);DAY([.$A329])+2)&lt;&gt;&quot;&quot;;1;0)" table:style-name="ce92"/>
          <table:table-cell office:value-type="float" office:value="0" table:formula="of:=IF(INDEX([Tracker.$A$1:.$AG$120];6+9*(MONTH([.$A329])-1)+(COLUMN()-4);DAY([.$A329])+2)&lt;&gt;&quot;&quot;;1;0)" table:style-name="ce92"/>
          <table:table-cell office:value-type="float" office:value="0" table:formula="of:=SUM([.D329:.I329])" table:style-name="ce6"/>
          <table:table-cell office:value-type="percentage" office:value="0" table:formula="of:=[.J329]/6" table:style-name="ce8">
            <text:p>0%</text:p>
          </table:table-cell>
          <table:table-cell table:style-name="ce1"/>
          <table:table-cell office:value-type="float" office:value="0" table:formula="of:=IF([.D329]=1;[.M328]+1;0)" table:style-name="ce1">
            <text:p>0</text:p>
          </table:table-cell>
          <table:table-cell office:value-type="float" office:value="0" table:formula="of:=IF([.E329]=1;[.N328]+1;0)" table:style-name="ce1">
            <text:p>0</text:p>
          </table:table-cell>
          <table:table-cell office:value-type="float" office:value="0" table:formula="of:=IF([.F329]=1;[.O328]+1;0)" table:style-name="ce1">
            <text:p>0</text:p>
          </table:table-cell>
          <table:table-cell office:value-type="float" office:value="0" table:formula="of:=IF([.G329]=1;[.P328]+1;0)" table:style-name="ce1">
            <text:p>0</text:p>
          </table:table-cell>
          <table:table-cell office:value-type="float" office:value="0" table:formula="of:=IF([.H329]=1;[.Q328]+1;0)" table:style-name="ce1">
            <text:p>0</text:p>
          </table:table-cell>
          <table:table-cell office:value-type="float" office:value="0" table:formula="of:=IF([.I329]=1;[.R32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3T00:00:00" table:formula="of:=[.A329]+1" table:style-name="ce10">
            <text:p>Mon, 23 Nov 2026</text:p>
          </table:table-cell>
          <table:table-cell office:value-type="string" office:string-value="Mon" table:formula="of:=TEXT([.A330];&quot;ddd&quot;)" table:style-name="ce5">
            <text:p>Mon</text:p>
          </table:table-cell>
          <table:table-cell office:value-type="string" office:string-value="Nov" table:formula="of:=TEXT([.A330];&quot;mmm&quot;)" table:style-name="ce5">
            <text:p>Nov</text:p>
          </table:table-cell>
          <table:table-cell office:value-type="float" office:value="0" table:formula="of:=IF(INDEX([Tracker.$A$1:.$AG$120];6+9*(MONTH([.$A330])-1)+(COLUMN()-4);DAY([.$A330])+2)&lt;&gt;&quot;&quot;;1;0)" table:style-name="ce92"/>
          <table:table-cell office:value-type="float" office:value="0" table:formula="of:=IF(INDEX([Tracker.$A$1:.$AG$120];6+9*(MONTH([.$A330])-1)+(COLUMN()-4);DAY([.$A330])+2)&lt;&gt;&quot;&quot;;1;0)" table:style-name="ce92"/>
          <table:table-cell office:value-type="float" office:value="0" table:formula="of:=IF(INDEX([Tracker.$A$1:.$AG$120];6+9*(MONTH([.$A330])-1)+(COLUMN()-4);DAY([.$A330])+2)&lt;&gt;&quot;&quot;;1;0)" table:style-name="ce92"/>
          <table:table-cell office:value-type="float" office:value="0" table:formula="of:=IF(INDEX([Tracker.$A$1:.$AG$120];6+9*(MONTH([.$A330])-1)+(COLUMN()-4);DAY([.$A330])+2)&lt;&gt;&quot;&quot;;1;0)" table:style-name="ce92"/>
          <table:table-cell office:value-type="float" office:value="0" table:formula="of:=IF(INDEX([Tracker.$A$1:.$AG$120];6+9*(MONTH([.$A330])-1)+(COLUMN()-4);DAY([.$A330])+2)&lt;&gt;&quot;&quot;;1;0)" table:style-name="ce92"/>
          <table:table-cell office:value-type="float" office:value="0" table:formula="of:=IF(INDEX([Tracker.$A$1:.$AG$120];6+9*(MONTH([.$A330])-1)+(COLUMN()-4);DAY([.$A330])+2)&lt;&gt;&quot;&quot;;1;0)" table:style-name="ce92"/>
          <table:table-cell office:value-type="float" office:value="0" table:formula="of:=SUM([.D330:.I330])" table:style-name="ce6"/>
          <table:table-cell office:value-type="percentage" office:value="0" table:formula="of:=[.J330]/6" table:style-name="ce8">
            <text:p>0%</text:p>
          </table:table-cell>
          <table:table-cell table:style-name="ce1"/>
          <table:table-cell office:value-type="float" office:value="0" table:formula="of:=IF([.D330]=1;[.M329]+1;0)" table:style-name="ce1">
            <text:p>0</text:p>
          </table:table-cell>
          <table:table-cell office:value-type="float" office:value="0" table:formula="of:=IF([.E330]=1;[.N329]+1;0)" table:style-name="ce1">
            <text:p>0</text:p>
          </table:table-cell>
          <table:table-cell office:value-type="float" office:value="0" table:formula="of:=IF([.F330]=1;[.O329]+1;0)" table:style-name="ce1">
            <text:p>0</text:p>
          </table:table-cell>
          <table:table-cell office:value-type="float" office:value="0" table:formula="of:=IF([.G330]=1;[.P329]+1;0)" table:style-name="ce1">
            <text:p>0</text:p>
          </table:table-cell>
          <table:table-cell office:value-type="float" office:value="0" table:formula="of:=IF([.H330]=1;[.Q329]+1;0)" table:style-name="ce1">
            <text:p>0</text:p>
          </table:table-cell>
          <table:table-cell office:value-type="float" office:value="0" table:formula="of:=IF([.I330]=1;[.R32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4T00:00:00" table:formula="of:=[.A330]+1" table:style-name="ce10">
            <text:p>Tue, 24 Nov 2026</text:p>
          </table:table-cell>
          <table:table-cell office:value-type="string" office:string-value="Tue" table:formula="of:=TEXT([.A331];&quot;ddd&quot;)" table:style-name="ce5">
            <text:p>Tue</text:p>
          </table:table-cell>
          <table:table-cell office:value-type="string" office:string-value="Nov" table:formula="of:=TEXT([.A331];&quot;mmm&quot;)" table:style-name="ce5">
            <text:p>Nov</text:p>
          </table:table-cell>
          <table:table-cell office:value-type="float" office:value="0" table:formula="of:=IF(INDEX([Tracker.$A$1:.$AG$120];6+9*(MONTH([.$A331])-1)+(COLUMN()-4);DAY([.$A331])+2)&lt;&gt;&quot;&quot;;1;0)" table:style-name="ce92"/>
          <table:table-cell office:value-type="float" office:value="0" table:formula="of:=IF(INDEX([Tracker.$A$1:.$AG$120];6+9*(MONTH([.$A331])-1)+(COLUMN()-4);DAY([.$A331])+2)&lt;&gt;&quot;&quot;;1;0)" table:style-name="ce92"/>
          <table:table-cell office:value-type="float" office:value="0" table:formula="of:=IF(INDEX([Tracker.$A$1:.$AG$120];6+9*(MONTH([.$A331])-1)+(COLUMN()-4);DAY([.$A331])+2)&lt;&gt;&quot;&quot;;1;0)" table:style-name="ce92"/>
          <table:table-cell office:value-type="float" office:value="0" table:formula="of:=IF(INDEX([Tracker.$A$1:.$AG$120];6+9*(MONTH([.$A331])-1)+(COLUMN()-4);DAY([.$A331])+2)&lt;&gt;&quot;&quot;;1;0)" table:style-name="ce92"/>
          <table:table-cell office:value-type="float" office:value="0" table:formula="of:=IF(INDEX([Tracker.$A$1:.$AG$120];6+9*(MONTH([.$A331])-1)+(COLUMN()-4);DAY([.$A331])+2)&lt;&gt;&quot;&quot;;1;0)" table:style-name="ce92"/>
          <table:table-cell office:value-type="float" office:value="0" table:formula="of:=IF(INDEX([Tracker.$A$1:.$AG$120];6+9*(MONTH([.$A331])-1)+(COLUMN()-4);DAY([.$A331])+2)&lt;&gt;&quot;&quot;;1;0)" table:style-name="ce92"/>
          <table:table-cell office:value-type="float" office:value="0" table:formula="of:=SUM([.D331:.I331])" table:style-name="ce6"/>
          <table:table-cell office:value-type="percentage" office:value="0" table:formula="of:=[.J331]/6" table:style-name="ce8">
            <text:p>0%</text:p>
          </table:table-cell>
          <table:table-cell table:style-name="ce1"/>
          <table:table-cell office:value-type="float" office:value="0" table:formula="of:=IF([.D331]=1;[.M330]+1;0)" table:style-name="ce1">
            <text:p>0</text:p>
          </table:table-cell>
          <table:table-cell office:value-type="float" office:value="0" table:formula="of:=IF([.E331]=1;[.N330]+1;0)" table:style-name="ce1">
            <text:p>0</text:p>
          </table:table-cell>
          <table:table-cell office:value-type="float" office:value="0" table:formula="of:=IF([.F331]=1;[.O330]+1;0)" table:style-name="ce1">
            <text:p>0</text:p>
          </table:table-cell>
          <table:table-cell office:value-type="float" office:value="0" table:formula="of:=IF([.G331]=1;[.P330]+1;0)" table:style-name="ce1">
            <text:p>0</text:p>
          </table:table-cell>
          <table:table-cell office:value-type="float" office:value="0" table:formula="of:=IF([.H331]=1;[.Q330]+1;0)" table:style-name="ce1">
            <text:p>0</text:p>
          </table:table-cell>
          <table:table-cell office:value-type="float" office:value="0" table:formula="of:=IF([.I331]=1;[.R33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5T00:00:00" table:formula="of:=[.A331]+1" table:style-name="ce10">
            <text:p>Wed, 25 Nov 2026</text:p>
          </table:table-cell>
          <table:table-cell office:value-type="string" office:string-value="Wed" table:formula="of:=TEXT([.A332];&quot;ddd&quot;)" table:style-name="ce5">
            <text:p>Wed</text:p>
          </table:table-cell>
          <table:table-cell office:value-type="string" office:string-value="Nov" table:formula="of:=TEXT([.A332];&quot;mmm&quot;)" table:style-name="ce5">
            <text:p>Nov</text:p>
          </table:table-cell>
          <table:table-cell office:value-type="float" office:value="0" table:formula="of:=IF(INDEX([Tracker.$A$1:.$AG$120];6+9*(MONTH([.$A332])-1)+(COLUMN()-4);DAY([.$A332])+2)&lt;&gt;&quot;&quot;;1;0)" table:style-name="ce92"/>
          <table:table-cell office:value-type="float" office:value="0" table:formula="of:=IF(INDEX([Tracker.$A$1:.$AG$120];6+9*(MONTH([.$A332])-1)+(COLUMN()-4);DAY([.$A332])+2)&lt;&gt;&quot;&quot;;1;0)" table:style-name="ce92"/>
          <table:table-cell office:value-type="float" office:value="0" table:formula="of:=IF(INDEX([Tracker.$A$1:.$AG$120];6+9*(MONTH([.$A332])-1)+(COLUMN()-4);DAY([.$A332])+2)&lt;&gt;&quot;&quot;;1;0)" table:style-name="ce92"/>
          <table:table-cell office:value-type="float" office:value="0" table:formula="of:=IF(INDEX([Tracker.$A$1:.$AG$120];6+9*(MONTH([.$A332])-1)+(COLUMN()-4);DAY([.$A332])+2)&lt;&gt;&quot;&quot;;1;0)" table:style-name="ce92"/>
          <table:table-cell office:value-type="float" office:value="0" table:formula="of:=IF(INDEX([Tracker.$A$1:.$AG$120];6+9*(MONTH([.$A332])-1)+(COLUMN()-4);DAY([.$A332])+2)&lt;&gt;&quot;&quot;;1;0)" table:style-name="ce92"/>
          <table:table-cell office:value-type="float" office:value="0" table:formula="of:=IF(INDEX([Tracker.$A$1:.$AG$120];6+9*(MONTH([.$A332])-1)+(COLUMN()-4);DAY([.$A332])+2)&lt;&gt;&quot;&quot;;1;0)" table:style-name="ce92"/>
          <table:table-cell office:value-type="float" office:value="0" table:formula="of:=SUM([.D332:.I332])" table:style-name="ce6"/>
          <table:table-cell office:value-type="percentage" office:value="0" table:formula="of:=[.J332]/6" table:style-name="ce8">
            <text:p>0%</text:p>
          </table:table-cell>
          <table:table-cell table:style-name="ce1"/>
          <table:table-cell office:value-type="float" office:value="0" table:formula="of:=IF([.D332]=1;[.M331]+1;0)" table:style-name="ce1">
            <text:p>0</text:p>
          </table:table-cell>
          <table:table-cell office:value-type="float" office:value="0" table:formula="of:=IF([.E332]=1;[.N331]+1;0)" table:style-name="ce1">
            <text:p>0</text:p>
          </table:table-cell>
          <table:table-cell office:value-type="float" office:value="0" table:formula="of:=IF([.F332]=1;[.O331]+1;0)" table:style-name="ce1">
            <text:p>0</text:p>
          </table:table-cell>
          <table:table-cell office:value-type="float" office:value="0" table:formula="of:=IF([.G332]=1;[.P331]+1;0)" table:style-name="ce1">
            <text:p>0</text:p>
          </table:table-cell>
          <table:table-cell office:value-type="float" office:value="0" table:formula="of:=IF([.H332]=1;[.Q331]+1;0)" table:style-name="ce1">
            <text:p>0</text:p>
          </table:table-cell>
          <table:table-cell office:value-type="float" office:value="0" table:formula="of:=IF([.I332]=1;[.R33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6T00:00:00" table:formula="of:=[.A332]+1" table:style-name="ce10">
            <text:p>Thu, 26 Nov 2026</text:p>
          </table:table-cell>
          <table:table-cell office:value-type="string" office:string-value="Thu" table:formula="of:=TEXT([.A333];&quot;ddd&quot;)" table:style-name="ce5">
            <text:p>Thu</text:p>
          </table:table-cell>
          <table:table-cell office:value-type="string" office:string-value="Nov" table:formula="of:=TEXT([.A333];&quot;mmm&quot;)" table:style-name="ce5">
            <text:p>Nov</text:p>
          </table:table-cell>
          <table:table-cell office:value-type="float" office:value="0" table:formula="of:=IF(INDEX([Tracker.$A$1:.$AG$120];6+9*(MONTH([.$A333])-1)+(COLUMN()-4);DAY([.$A333])+2)&lt;&gt;&quot;&quot;;1;0)" table:style-name="ce92"/>
          <table:table-cell office:value-type="float" office:value="0" table:formula="of:=IF(INDEX([Tracker.$A$1:.$AG$120];6+9*(MONTH([.$A333])-1)+(COLUMN()-4);DAY([.$A333])+2)&lt;&gt;&quot;&quot;;1;0)" table:style-name="ce92"/>
          <table:table-cell office:value-type="float" office:value="0" table:formula="of:=IF(INDEX([Tracker.$A$1:.$AG$120];6+9*(MONTH([.$A333])-1)+(COLUMN()-4);DAY([.$A333])+2)&lt;&gt;&quot;&quot;;1;0)" table:style-name="ce92"/>
          <table:table-cell office:value-type="float" office:value="0" table:formula="of:=IF(INDEX([Tracker.$A$1:.$AG$120];6+9*(MONTH([.$A333])-1)+(COLUMN()-4);DAY([.$A333])+2)&lt;&gt;&quot;&quot;;1;0)" table:style-name="ce92"/>
          <table:table-cell office:value-type="float" office:value="0" table:formula="of:=IF(INDEX([Tracker.$A$1:.$AG$120];6+9*(MONTH([.$A333])-1)+(COLUMN()-4);DAY([.$A333])+2)&lt;&gt;&quot;&quot;;1;0)" table:style-name="ce92"/>
          <table:table-cell office:value-type="float" office:value="0" table:formula="of:=IF(INDEX([Tracker.$A$1:.$AG$120];6+9*(MONTH([.$A333])-1)+(COLUMN()-4);DAY([.$A333])+2)&lt;&gt;&quot;&quot;;1;0)" table:style-name="ce92"/>
          <table:table-cell office:value-type="float" office:value="0" table:formula="of:=SUM([.D333:.I333])" table:style-name="ce6"/>
          <table:table-cell office:value-type="percentage" office:value="0" table:formula="of:=[.J333]/6" table:style-name="ce8">
            <text:p>0%</text:p>
          </table:table-cell>
          <table:table-cell table:style-name="ce1"/>
          <table:table-cell office:value-type="float" office:value="0" table:formula="of:=IF([.D333]=1;[.M332]+1;0)" table:style-name="ce1">
            <text:p>0</text:p>
          </table:table-cell>
          <table:table-cell office:value-type="float" office:value="0" table:formula="of:=IF([.E333]=1;[.N332]+1;0)" table:style-name="ce1">
            <text:p>0</text:p>
          </table:table-cell>
          <table:table-cell office:value-type="float" office:value="0" table:formula="of:=IF([.F333]=1;[.O332]+1;0)" table:style-name="ce1">
            <text:p>0</text:p>
          </table:table-cell>
          <table:table-cell office:value-type="float" office:value="0" table:formula="of:=IF([.G333]=1;[.P332]+1;0)" table:style-name="ce1">
            <text:p>0</text:p>
          </table:table-cell>
          <table:table-cell office:value-type="float" office:value="0" table:formula="of:=IF([.H333]=1;[.Q332]+1;0)" table:style-name="ce1">
            <text:p>0</text:p>
          </table:table-cell>
          <table:table-cell office:value-type="float" office:value="0" table:formula="of:=IF([.I333]=1;[.R33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7T00:00:00" table:formula="of:=[.A333]+1" table:style-name="ce10">
            <text:p>Fri, 27 Nov 2026</text:p>
          </table:table-cell>
          <table:table-cell office:value-type="string" office:string-value="Fri" table:formula="of:=TEXT([.A334];&quot;ddd&quot;)" table:style-name="ce5">
            <text:p>Fri</text:p>
          </table:table-cell>
          <table:table-cell office:value-type="string" office:string-value="Nov" table:formula="of:=TEXT([.A334];&quot;mmm&quot;)" table:style-name="ce5">
            <text:p>Nov</text:p>
          </table:table-cell>
          <table:table-cell office:value-type="float" office:value="0" table:formula="of:=IF(INDEX([Tracker.$A$1:.$AG$120];6+9*(MONTH([.$A334])-1)+(COLUMN()-4);DAY([.$A334])+2)&lt;&gt;&quot;&quot;;1;0)" table:style-name="ce92"/>
          <table:table-cell office:value-type="float" office:value="0" table:formula="of:=IF(INDEX([Tracker.$A$1:.$AG$120];6+9*(MONTH([.$A334])-1)+(COLUMN()-4);DAY([.$A334])+2)&lt;&gt;&quot;&quot;;1;0)" table:style-name="ce92"/>
          <table:table-cell office:value-type="float" office:value="0" table:formula="of:=IF(INDEX([Tracker.$A$1:.$AG$120];6+9*(MONTH([.$A334])-1)+(COLUMN()-4);DAY([.$A334])+2)&lt;&gt;&quot;&quot;;1;0)" table:style-name="ce92"/>
          <table:table-cell office:value-type="float" office:value="0" table:formula="of:=IF(INDEX([Tracker.$A$1:.$AG$120];6+9*(MONTH([.$A334])-1)+(COLUMN()-4);DAY([.$A334])+2)&lt;&gt;&quot;&quot;;1;0)" table:style-name="ce92"/>
          <table:table-cell office:value-type="float" office:value="0" table:formula="of:=IF(INDEX([Tracker.$A$1:.$AG$120];6+9*(MONTH([.$A334])-1)+(COLUMN()-4);DAY([.$A334])+2)&lt;&gt;&quot;&quot;;1;0)" table:style-name="ce92"/>
          <table:table-cell office:value-type="float" office:value="0" table:formula="of:=IF(INDEX([Tracker.$A$1:.$AG$120];6+9*(MONTH([.$A334])-1)+(COLUMN()-4);DAY([.$A334])+2)&lt;&gt;&quot;&quot;;1;0)" table:style-name="ce92"/>
          <table:table-cell office:value-type="float" office:value="0" table:formula="of:=SUM([.D334:.I334])" table:style-name="ce6"/>
          <table:table-cell office:value-type="percentage" office:value="0" table:formula="of:=[.J334]/6" table:style-name="ce8">
            <text:p>0%</text:p>
          </table:table-cell>
          <table:table-cell table:style-name="ce1"/>
          <table:table-cell office:value-type="float" office:value="0" table:formula="of:=IF([.D334]=1;[.M333]+1;0)" table:style-name="ce1">
            <text:p>0</text:p>
          </table:table-cell>
          <table:table-cell office:value-type="float" office:value="0" table:formula="of:=IF([.E334]=1;[.N333]+1;0)" table:style-name="ce1">
            <text:p>0</text:p>
          </table:table-cell>
          <table:table-cell office:value-type="float" office:value="0" table:formula="of:=IF([.F334]=1;[.O333]+1;0)" table:style-name="ce1">
            <text:p>0</text:p>
          </table:table-cell>
          <table:table-cell office:value-type="float" office:value="0" table:formula="of:=IF([.G334]=1;[.P333]+1;0)" table:style-name="ce1">
            <text:p>0</text:p>
          </table:table-cell>
          <table:table-cell office:value-type="float" office:value="0" table:formula="of:=IF([.H334]=1;[.Q333]+1;0)" table:style-name="ce1">
            <text:p>0</text:p>
          </table:table-cell>
          <table:table-cell office:value-type="float" office:value="0" table:formula="of:=IF([.I334]=1;[.R33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8T00:00:00" table:formula="of:=[.A334]+1" table:style-name="ce10">
            <text:p>Sat, 28 Nov 2026</text:p>
          </table:table-cell>
          <table:table-cell office:value-type="string" office:string-value="Sat" table:formula="of:=TEXT([.A335];&quot;ddd&quot;)" table:style-name="ce5">
            <text:p>Sat</text:p>
          </table:table-cell>
          <table:table-cell office:value-type="string" office:string-value="Nov" table:formula="of:=TEXT([.A335];&quot;mmm&quot;)" table:style-name="ce5">
            <text:p>Nov</text:p>
          </table:table-cell>
          <table:table-cell office:value-type="float" office:value="0" table:formula="of:=IF(INDEX([Tracker.$A$1:.$AG$120];6+9*(MONTH([.$A335])-1)+(COLUMN()-4);DAY([.$A335])+2)&lt;&gt;&quot;&quot;;1;0)" table:style-name="ce92"/>
          <table:table-cell office:value-type="float" office:value="0" table:formula="of:=IF(INDEX([Tracker.$A$1:.$AG$120];6+9*(MONTH([.$A335])-1)+(COLUMN()-4);DAY([.$A335])+2)&lt;&gt;&quot;&quot;;1;0)" table:style-name="ce92"/>
          <table:table-cell office:value-type="float" office:value="0" table:formula="of:=IF(INDEX([Tracker.$A$1:.$AG$120];6+9*(MONTH([.$A335])-1)+(COLUMN()-4);DAY([.$A335])+2)&lt;&gt;&quot;&quot;;1;0)" table:style-name="ce92"/>
          <table:table-cell office:value-type="float" office:value="0" table:formula="of:=IF(INDEX([Tracker.$A$1:.$AG$120];6+9*(MONTH([.$A335])-1)+(COLUMN()-4);DAY([.$A335])+2)&lt;&gt;&quot;&quot;;1;0)" table:style-name="ce92"/>
          <table:table-cell office:value-type="float" office:value="0" table:formula="of:=IF(INDEX([Tracker.$A$1:.$AG$120];6+9*(MONTH([.$A335])-1)+(COLUMN()-4);DAY([.$A335])+2)&lt;&gt;&quot;&quot;;1;0)" table:style-name="ce92"/>
          <table:table-cell office:value-type="float" office:value="0" table:formula="of:=IF(INDEX([Tracker.$A$1:.$AG$120];6+9*(MONTH([.$A335])-1)+(COLUMN()-4);DAY([.$A335])+2)&lt;&gt;&quot;&quot;;1;0)" table:style-name="ce92"/>
          <table:table-cell office:value-type="float" office:value="0" table:formula="of:=SUM([.D335:.I335])" table:style-name="ce6"/>
          <table:table-cell office:value-type="percentage" office:value="0" table:formula="of:=[.J335]/6" table:style-name="ce8">
            <text:p>0%</text:p>
          </table:table-cell>
          <table:table-cell table:style-name="ce1"/>
          <table:table-cell office:value-type="float" office:value="0" table:formula="of:=IF([.D335]=1;[.M334]+1;0)" table:style-name="ce1">
            <text:p>0</text:p>
          </table:table-cell>
          <table:table-cell office:value-type="float" office:value="0" table:formula="of:=IF([.E335]=1;[.N334]+1;0)" table:style-name="ce1">
            <text:p>0</text:p>
          </table:table-cell>
          <table:table-cell office:value-type="float" office:value="0" table:formula="of:=IF([.F335]=1;[.O334]+1;0)" table:style-name="ce1">
            <text:p>0</text:p>
          </table:table-cell>
          <table:table-cell office:value-type="float" office:value="0" table:formula="of:=IF([.G335]=1;[.P334]+1;0)" table:style-name="ce1">
            <text:p>0</text:p>
          </table:table-cell>
          <table:table-cell office:value-type="float" office:value="0" table:formula="of:=IF([.H335]=1;[.Q334]+1;0)" table:style-name="ce1">
            <text:p>0</text:p>
          </table:table-cell>
          <table:table-cell office:value-type="float" office:value="0" table:formula="of:=IF([.I335]=1;[.R33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29T00:00:00" table:formula="of:=[.A335]+1" table:style-name="ce10">
            <text:p>Sun, 29 Nov 2026</text:p>
          </table:table-cell>
          <table:table-cell office:value-type="string" office:string-value="Sun" table:formula="of:=TEXT([.A336];&quot;ddd&quot;)" table:style-name="ce5">
            <text:p>Sun</text:p>
          </table:table-cell>
          <table:table-cell office:value-type="string" office:string-value="Nov" table:formula="of:=TEXT([.A336];&quot;mmm&quot;)" table:style-name="ce5">
            <text:p>Nov</text:p>
          </table:table-cell>
          <table:table-cell office:value-type="float" office:value="0" table:formula="of:=IF(INDEX([Tracker.$A$1:.$AG$120];6+9*(MONTH([.$A336])-1)+(COLUMN()-4);DAY([.$A336])+2)&lt;&gt;&quot;&quot;;1;0)" table:style-name="ce92"/>
          <table:table-cell office:value-type="float" office:value="0" table:formula="of:=IF(INDEX([Tracker.$A$1:.$AG$120];6+9*(MONTH([.$A336])-1)+(COLUMN()-4);DAY([.$A336])+2)&lt;&gt;&quot;&quot;;1;0)" table:style-name="ce92"/>
          <table:table-cell office:value-type="float" office:value="0" table:formula="of:=IF(INDEX([Tracker.$A$1:.$AG$120];6+9*(MONTH([.$A336])-1)+(COLUMN()-4);DAY([.$A336])+2)&lt;&gt;&quot;&quot;;1;0)" table:style-name="ce92"/>
          <table:table-cell office:value-type="float" office:value="0" table:formula="of:=IF(INDEX([Tracker.$A$1:.$AG$120];6+9*(MONTH([.$A336])-1)+(COLUMN()-4);DAY([.$A336])+2)&lt;&gt;&quot;&quot;;1;0)" table:style-name="ce92"/>
          <table:table-cell office:value-type="float" office:value="0" table:formula="of:=IF(INDEX([Tracker.$A$1:.$AG$120];6+9*(MONTH([.$A336])-1)+(COLUMN()-4);DAY([.$A336])+2)&lt;&gt;&quot;&quot;;1;0)" table:style-name="ce92"/>
          <table:table-cell office:value-type="float" office:value="0" table:formula="of:=IF(INDEX([Tracker.$A$1:.$AG$120];6+9*(MONTH([.$A336])-1)+(COLUMN()-4);DAY([.$A336])+2)&lt;&gt;&quot;&quot;;1;0)" table:style-name="ce92"/>
          <table:table-cell office:value-type="float" office:value="0" table:formula="of:=SUM([.D336:.I336])" table:style-name="ce6"/>
          <table:table-cell office:value-type="percentage" office:value="0" table:formula="of:=[.J336]/6" table:style-name="ce8">
            <text:p>0%</text:p>
          </table:table-cell>
          <table:table-cell table:style-name="ce1"/>
          <table:table-cell office:value-type="float" office:value="0" table:formula="of:=IF([.D336]=1;[.M335]+1;0)" table:style-name="ce1">
            <text:p>0</text:p>
          </table:table-cell>
          <table:table-cell office:value-type="float" office:value="0" table:formula="of:=IF([.E336]=1;[.N335]+1;0)" table:style-name="ce1">
            <text:p>0</text:p>
          </table:table-cell>
          <table:table-cell office:value-type="float" office:value="0" table:formula="of:=IF([.F336]=1;[.O335]+1;0)" table:style-name="ce1">
            <text:p>0</text:p>
          </table:table-cell>
          <table:table-cell office:value-type="float" office:value="0" table:formula="of:=IF([.G336]=1;[.P335]+1;0)" table:style-name="ce1">
            <text:p>0</text:p>
          </table:table-cell>
          <table:table-cell office:value-type="float" office:value="0" table:formula="of:=IF([.H336]=1;[.Q335]+1;0)" table:style-name="ce1">
            <text:p>0</text:p>
          </table:table-cell>
          <table:table-cell office:value-type="float" office:value="0" table:formula="of:=IF([.I336]=1;[.R33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1-30T00:00:00" table:formula="of:=[.A336]+1" table:style-name="ce10">
            <text:p>Mon, 30 Nov 2026</text:p>
          </table:table-cell>
          <table:table-cell office:value-type="string" office:string-value="Mon" table:formula="of:=TEXT([.A337];&quot;ddd&quot;)" table:style-name="ce5">
            <text:p>Mon</text:p>
          </table:table-cell>
          <table:table-cell office:value-type="string" office:string-value="Nov" table:formula="of:=TEXT([.A337];&quot;mmm&quot;)" table:style-name="ce5">
            <text:p>Nov</text:p>
          </table:table-cell>
          <table:table-cell office:value-type="float" office:value="0" table:formula="of:=IF(INDEX([Tracker.$A$1:.$AG$120];6+9*(MONTH([.$A337])-1)+(COLUMN()-4);DAY([.$A337])+2)&lt;&gt;&quot;&quot;;1;0)" table:style-name="ce92"/>
          <table:table-cell office:value-type="float" office:value="0" table:formula="of:=IF(INDEX([Tracker.$A$1:.$AG$120];6+9*(MONTH([.$A337])-1)+(COLUMN()-4);DAY([.$A337])+2)&lt;&gt;&quot;&quot;;1;0)" table:style-name="ce92"/>
          <table:table-cell office:value-type="float" office:value="0" table:formula="of:=IF(INDEX([Tracker.$A$1:.$AG$120];6+9*(MONTH([.$A337])-1)+(COLUMN()-4);DAY([.$A337])+2)&lt;&gt;&quot;&quot;;1;0)" table:style-name="ce92"/>
          <table:table-cell office:value-type="float" office:value="0" table:formula="of:=IF(INDEX([Tracker.$A$1:.$AG$120];6+9*(MONTH([.$A337])-1)+(COLUMN()-4);DAY([.$A337])+2)&lt;&gt;&quot;&quot;;1;0)" table:style-name="ce92"/>
          <table:table-cell office:value-type="float" office:value="0" table:formula="of:=IF(INDEX([Tracker.$A$1:.$AG$120];6+9*(MONTH([.$A337])-1)+(COLUMN()-4);DAY([.$A337])+2)&lt;&gt;&quot;&quot;;1;0)" table:style-name="ce92"/>
          <table:table-cell office:value-type="float" office:value="0" table:formula="of:=IF(INDEX([Tracker.$A$1:.$AG$120];6+9*(MONTH([.$A337])-1)+(COLUMN()-4);DAY([.$A337])+2)&lt;&gt;&quot;&quot;;1;0)" table:style-name="ce92"/>
          <table:table-cell office:value-type="float" office:value="0" table:formula="of:=SUM([.D337:.I337])" table:style-name="ce6"/>
          <table:table-cell office:value-type="percentage" office:value="0" table:formula="of:=[.J337]/6" table:style-name="ce8">
            <text:p>0%</text:p>
          </table:table-cell>
          <table:table-cell table:style-name="ce1"/>
          <table:table-cell office:value-type="float" office:value="0" table:formula="of:=IF([.D337]=1;[.M336]+1;0)" table:style-name="ce1">
            <text:p>0</text:p>
          </table:table-cell>
          <table:table-cell office:value-type="float" office:value="0" table:formula="of:=IF([.E337]=1;[.N336]+1;0)" table:style-name="ce1">
            <text:p>0</text:p>
          </table:table-cell>
          <table:table-cell office:value-type="float" office:value="0" table:formula="of:=IF([.F337]=1;[.O336]+1;0)" table:style-name="ce1">
            <text:p>0</text:p>
          </table:table-cell>
          <table:table-cell office:value-type="float" office:value="0" table:formula="of:=IF([.G337]=1;[.P336]+1;0)" table:style-name="ce1">
            <text:p>0</text:p>
          </table:table-cell>
          <table:table-cell office:value-type="float" office:value="0" table:formula="of:=IF([.H337]=1;[.Q336]+1;0)" table:style-name="ce1">
            <text:p>0</text:p>
          </table:table-cell>
          <table:table-cell office:value-type="float" office:value="0" table:formula="of:=IF([.I337]=1;[.R33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1T00:00:00" table:formula="of:=[.A337]+1" table:style-name="ce10">
            <text:p>Tue, 01 Dec 2026</text:p>
          </table:table-cell>
          <table:table-cell office:value-type="string" office:string-value="Tue" table:formula="of:=TEXT([.A338];&quot;ddd&quot;)" table:style-name="ce5">
            <text:p>Tue</text:p>
          </table:table-cell>
          <table:table-cell office:value-type="string" office:string-value="Dec" table:formula="of:=TEXT([.A338];&quot;mmm&quot;)" table:style-name="ce5">
            <text:p>Dec</text:p>
          </table:table-cell>
          <table:table-cell office:value-type="float" office:value="0" table:formula="of:=IF(INDEX([Tracker.$A$1:.$AG$120];6+9*(MONTH([.$A338])-1)+(COLUMN()-4);DAY([.$A338])+2)&lt;&gt;&quot;&quot;;1;0)" table:style-name="ce92"/>
          <table:table-cell office:value-type="float" office:value="0" table:formula="of:=IF(INDEX([Tracker.$A$1:.$AG$120];6+9*(MONTH([.$A338])-1)+(COLUMN()-4);DAY([.$A338])+2)&lt;&gt;&quot;&quot;;1;0)" table:style-name="ce92"/>
          <table:table-cell office:value-type="float" office:value="0" table:formula="of:=IF(INDEX([Tracker.$A$1:.$AG$120];6+9*(MONTH([.$A338])-1)+(COLUMN()-4);DAY([.$A338])+2)&lt;&gt;&quot;&quot;;1;0)" table:style-name="ce92"/>
          <table:table-cell office:value-type="float" office:value="0" table:formula="of:=IF(INDEX([Tracker.$A$1:.$AG$120];6+9*(MONTH([.$A338])-1)+(COLUMN()-4);DAY([.$A338])+2)&lt;&gt;&quot;&quot;;1;0)" table:style-name="ce92"/>
          <table:table-cell office:value-type="float" office:value="0" table:formula="of:=IF(INDEX([Tracker.$A$1:.$AG$120];6+9*(MONTH([.$A338])-1)+(COLUMN()-4);DAY([.$A338])+2)&lt;&gt;&quot;&quot;;1;0)" table:style-name="ce92"/>
          <table:table-cell office:value-type="float" office:value="0" table:formula="of:=IF(INDEX([Tracker.$A$1:.$AG$120];6+9*(MONTH([.$A338])-1)+(COLUMN()-4);DAY([.$A338])+2)&lt;&gt;&quot;&quot;;1;0)" table:style-name="ce92"/>
          <table:table-cell office:value-type="float" office:value="0" table:formula="of:=SUM([.D338:.I338])" table:style-name="ce6"/>
          <table:table-cell office:value-type="percentage" office:value="0" table:formula="of:=[.J338]/6" table:style-name="ce8">
            <text:p>0%</text:p>
          </table:table-cell>
          <table:table-cell table:style-name="ce1"/>
          <table:table-cell office:value-type="float" office:value="0" table:formula="of:=IF([.D338]=1;[.M337]+1;0)" table:style-name="ce1">
            <text:p>0</text:p>
          </table:table-cell>
          <table:table-cell office:value-type="float" office:value="0" table:formula="of:=IF([.E338]=1;[.N337]+1;0)" table:style-name="ce1">
            <text:p>0</text:p>
          </table:table-cell>
          <table:table-cell office:value-type="float" office:value="0" table:formula="of:=IF([.F338]=1;[.O337]+1;0)" table:style-name="ce1">
            <text:p>0</text:p>
          </table:table-cell>
          <table:table-cell office:value-type="float" office:value="0" table:formula="of:=IF([.G338]=1;[.P337]+1;0)" table:style-name="ce1">
            <text:p>0</text:p>
          </table:table-cell>
          <table:table-cell office:value-type="float" office:value="0" table:formula="of:=IF([.H338]=1;[.Q337]+1;0)" table:style-name="ce1">
            <text:p>0</text:p>
          </table:table-cell>
          <table:table-cell office:value-type="float" office:value="0" table:formula="of:=IF([.I338]=1;[.R33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2T00:00:00" table:formula="of:=[.A338]+1" table:style-name="ce10">
            <text:p>Wed, 02 Dec 2026</text:p>
          </table:table-cell>
          <table:table-cell office:value-type="string" office:string-value="Wed" table:formula="of:=TEXT([.A339];&quot;ddd&quot;)" table:style-name="ce5">
            <text:p>Wed</text:p>
          </table:table-cell>
          <table:table-cell office:value-type="string" office:string-value="Dec" table:formula="of:=TEXT([.A339];&quot;mmm&quot;)" table:style-name="ce5">
            <text:p>Dec</text:p>
          </table:table-cell>
          <table:table-cell office:value-type="float" office:value="0" table:formula="of:=IF(INDEX([Tracker.$A$1:.$AG$120];6+9*(MONTH([.$A339])-1)+(COLUMN()-4);DAY([.$A339])+2)&lt;&gt;&quot;&quot;;1;0)" table:style-name="ce92"/>
          <table:table-cell office:value-type="float" office:value="0" table:formula="of:=IF(INDEX([Tracker.$A$1:.$AG$120];6+9*(MONTH([.$A339])-1)+(COLUMN()-4);DAY([.$A339])+2)&lt;&gt;&quot;&quot;;1;0)" table:style-name="ce92"/>
          <table:table-cell office:value-type="float" office:value="0" table:formula="of:=IF(INDEX([Tracker.$A$1:.$AG$120];6+9*(MONTH([.$A339])-1)+(COLUMN()-4);DAY([.$A339])+2)&lt;&gt;&quot;&quot;;1;0)" table:style-name="ce92"/>
          <table:table-cell office:value-type="float" office:value="0" table:formula="of:=IF(INDEX([Tracker.$A$1:.$AG$120];6+9*(MONTH([.$A339])-1)+(COLUMN()-4);DAY([.$A339])+2)&lt;&gt;&quot;&quot;;1;0)" table:style-name="ce92"/>
          <table:table-cell office:value-type="float" office:value="0" table:formula="of:=IF(INDEX([Tracker.$A$1:.$AG$120];6+9*(MONTH([.$A339])-1)+(COLUMN()-4);DAY([.$A339])+2)&lt;&gt;&quot;&quot;;1;0)" table:style-name="ce92"/>
          <table:table-cell office:value-type="float" office:value="0" table:formula="of:=IF(INDEX([Tracker.$A$1:.$AG$120];6+9*(MONTH([.$A339])-1)+(COLUMN()-4);DAY([.$A339])+2)&lt;&gt;&quot;&quot;;1;0)" table:style-name="ce92"/>
          <table:table-cell office:value-type="float" office:value="0" table:formula="of:=SUM([.D339:.I339])" table:style-name="ce6"/>
          <table:table-cell office:value-type="percentage" office:value="0" table:formula="of:=[.J339]/6" table:style-name="ce8">
            <text:p>0%</text:p>
          </table:table-cell>
          <table:table-cell table:style-name="ce1"/>
          <table:table-cell office:value-type="float" office:value="0" table:formula="of:=IF([.D339]=1;[.M338]+1;0)" table:style-name="ce1">
            <text:p>0</text:p>
          </table:table-cell>
          <table:table-cell office:value-type="float" office:value="0" table:formula="of:=IF([.E339]=1;[.N338]+1;0)" table:style-name="ce1">
            <text:p>0</text:p>
          </table:table-cell>
          <table:table-cell office:value-type="float" office:value="0" table:formula="of:=IF([.F339]=1;[.O338]+1;0)" table:style-name="ce1">
            <text:p>0</text:p>
          </table:table-cell>
          <table:table-cell office:value-type="float" office:value="0" table:formula="of:=IF([.G339]=1;[.P338]+1;0)" table:style-name="ce1">
            <text:p>0</text:p>
          </table:table-cell>
          <table:table-cell office:value-type="float" office:value="0" table:formula="of:=IF([.H339]=1;[.Q338]+1;0)" table:style-name="ce1">
            <text:p>0</text:p>
          </table:table-cell>
          <table:table-cell office:value-type="float" office:value="0" table:formula="of:=IF([.I339]=1;[.R33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3T00:00:00" table:formula="of:=[.A339]+1" table:style-name="ce10">
            <text:p>Thu, 03 Dec 2026</text:p>
          </table:table-cell>
          <table:table-cell office:value-type="string" office:string-value="Thu" table:formula="of:=TEXT([.A340];&quot;ddd&quot;)" table:style-name="ce5">
            <text:p>Thu</text:p>
          </table:table-cell>
          <table:table-cell office:value-type="string" office:string-value="Dec" table:formula="of:=TEXT([.A340];&quot;mmm&quot;)" table:style-name="ce5">
            <text:p>Dec</text:p>
          </table:table-cell>
          <table:table-cell office:value-type="float" office:value="0" table:formula="of:=IF(INDEX([Tracker.$A$1:.$AG$120];6+9*(MONTH([.$A340])-1)+(COLUMN()-4);DAY([.$A340])+2)&lt;&gt;&quot;&quot;;1;0)" table:style-name="ce92"/>
          <table:table-cell office:value-type="float" office:value="0" table:formula="of:=IF(INDEX([Tracker.$A$1:.$AG$120];6+9*(MONTH([.$A340])-1)+(COLUMN()-4);DAY([.$A340])+2)&lt;&gt;&quot;&quot;;1;0)" table:style-name="ce92"/>
          <table:table-cell office:value-type="float" office:value="0" table:formula="of:=IF(INDEX([Tracker.$A$1:.$AG$120];6+9*(MONTH([.$A340])-1)+(COLUMN()-4);DAY([.$A340])+2)&lt;&gt;&quot;&quot;;1;0)" table:style-name="ce92"/>
          <table:table-cell office:value-type="float" office:value="0" table:formula="of:=IF(INDEX([Tracker.$A$1:.$AG$120];6+9*(MONTH([.$A340])-1)+(COLUMN()-4);DAY([.$A340])+2)&lt;&gt;&quot;&quot;;1;0)" table:style-name="ce92"/>
          <table:table-cell office:value-type="float" office:value="0" table:formula="of:=IF(INDEX([Tracker.$A$1:.$AG$120];6+9*(MONTH([.$A340])-1)+(COLUMN()-4);DAY([.$A340])+2)&lt;&gt;&quot;&quot;;1;0)" table:style-name="ce92"/>
          <table:table-cell office:value-type="float" office:value="0" table:formula="of:=IF(INDEX([Tracker.$A$1:.$AG$120];6+9*(MONTH([.$A340])-1)+(COLUMN()-4);DAY([.$A340])+2)&lt;&gt;&quot;&quot;;1;0)" table:style-name="ce92"/>
          <table:table-cell office:value-type="float" office:value="0" table:formula="of:=SUM([.D340:.I340])" table:style-name="ce6"/>
          <table:table-cell office:value-type="percentage" office:value="0" table:formula="of:=[.J340]/6" table:style-name="ce8">
            <text:p>0%</text:p>
          </table:table-cell>
          <table:table-cell table:style-name="ce1"/>
          <table:table-cell office:value-type="float" office:value="0" table:formula="of:=IF([.D340]=1;[.M339]+1;0)" table:style-name="ce1">
            <text:p>0</text:p>
          </table:table-cell>
          <table:table-cell office:value-type="float" office:value="0" table:formula="of:=IF([.E340]=1;[.N339]+1;0)" table:style-name="ce1">
            <text:p>0</text:p>
          </table:table-cell>
          <table:table-cell office:value-type="float" office:value="0" table:formula="of:=IF([.F340]=1;[.O339]+1;0)" table:style-name="ce1">
            <text:p>0</text:p>
          </table:table-cell>
          <table:table-cell office:value-type="float" office:value="0" table:formula="of:=IF([.G340]=1;[.P339]+1;0)" table:style-name="ce1">
            <text:p>0</text:p>
          </table:table-cell>
          <table:table-cell office:value-type="float" office:value="0" table:formula="of:=IF([.H340]=1;[.Q339]+1;0)" table:style-name="ce1">
            <text:p>0</text:p>
          </table:table-cell>
          <table:table-cell office:value-type="float" office:value="0" table:formula="of:=IF([.I340]=1;[.R33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4T00:00:00" table:formula="of:=[.A340]+1" table:style-name="ce10">
            <text:p>Fri, 04 Dec 2026</text:p>
          </table:table-cell>
          <table:table-cell office:value-type="string" office:string-value="Fri" table:formula="of:=TEXT([.A341];&quot;ddd&quot;)" table:style-name="ce5">
            <text:p>Fri</text:p>
          </table:table-cell>
          <table:table-cell office:value-type="string" office:string-value="Dec" table:formula="of:=TEXT([.A341];&quot;mmm&quot;)" table:style-name="ce5">
            <text:p>Dec</text:p>
          </table:table-cell>
          <table:table-cell office:value-type="float" office:value="0" table:formula="of:=IF(INDEX([Tracker.$A$1:.$AG$120];6+9*(MONTH([.$A341])-1)+(COLUMN()-4);DAY([.$A341])+2)&lt;&gt;&quot;&quot;;1;0)" table:style-name="ce92"/>
          <table:table-cell office:value-type="float" office:value="0" table:formula="of:=IF(INDEX([Tracker.$A$1:.$AG$120];6+9*(MONTH([.$A341])-1)+(COLUMN()-4);DAY([.$A341])+2)&lt;&gt;&quot;&quot;;1;0)" table:style-name="ce92"/>
          <table:table-cell office:value-type="float" office:value="0" table:formula="of:=IF(INDEX([Tracker.$A$1:.$AG$120];6+9*(MONTH([.$A341])-1)+(COLUMN()-4);DAY([.$A341])+2)&lt;&gt;&quot;&quot;;1;0)" table:style-name="ce92"/>
          <table:table-cell office:value-type="float" office:value="0" table:formula="of:=IF(INDEX([Tracker.$A$1:.$AG$120];6+9*(MONTH([.$A341])-1)+(COLUMN()-4);DAY([.$A341])+2)&lt;&gt;&quot;&quot;;1;0)" table:style-name="ce92"/>
          <table:table-cell office:value-type="float" office:value="0" table:formula="of:=IF(INDEX([Tracker.$A$1:.$AG$120];6+9*(MONTH([.$A341])-1)+(COLUMN()-4);DAY([.$A341])+2)&lt;&gt;&quot;&quot;;1;0)" table:style-name="ce92"/>
          <table:table-cell office:value-type="float" office:value="0" table:formula="of:=IF(INDEX([Tracker.$A$1:.$AG$120];6+9*(MONTH([.$A341])-1)+(COLUMN()-4);DAY([.$A341])+2)&lt;&gt;&quot;&quot;;1;0)" table:style-name="ce92"/>
          <table:table-cell office:value-type="float" office:value="0" table:formula="of:=SUM([.D341:.I341])" table:style-name="ce6"/>
          <table:table-cell office:value-type="percentage" office:value="0" table:formula="of:=[.J341]/6" table:style-name="ce8">
            <text:p>0%</text:p>
          </table:table-cell>
          <table:table-cell table:style-name="ce1"/>
          <table:table-cell office:value-type="float" office:value="0" table:formula="of:=IF([.D341]=1;[.M340]+1;0)" table:style-name="ce1">
            <text:p>0</text:p>
          </table:table-cell>
          <table:table-cell office:value-type="float" office:value="0" table:formula="of:=IF([.E341]=1;[.N340]+1;0)" table:style-name="ce1">
            <text:p>0</text:p>
          </table:table-cell>
          <table:table-cell office:value-type="float" office:value="0" table:formula="of:=IF([.F341]=1;[.O340]+1;0)" table:style-name="ce1">
            <text:p>0</text:p>
          </table:table-cell>
          <table:table-cell office:value-type="float" office:value="0" table:formula="of:=IF([.G341]=1;[.P340]+1;0)" table:style-name="ce1">
            <text:p>0</text:p>
          </table:table-cell>
          <table:table-cell office:value-type="float" office:value="0" table:formula="of:=IF([.H341]=1;[.Q340]+1;0)" table:style-name="ce1">
            <text:p>0</text:p>
          </table:table-cell>
          <table:table-cell office:value-type="float" office:value="0" table:formula="of:=IF([.I341]=1;[.R34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5T00:00:00" table:formula="of:=[.A341]+1" table:style-name="ce10">
            <text:p>Sat, 05 Dec 2026</text:p>
          </table:table-cell>
          <table:table-cell office:value-type="string" office:string-value="Sat" table:formula="of:=TEXT([.A342];&quot;ddd&quot;)" table:style-name="ce5">
            <text:p>Sat</text:p>
          </table:table-cell>
          <table:table-cell office:value-type="string" office:string-value="Dec" table:formula="of:=TEXT([.A342];&quot;mmm&quot;)" table:style-name="ce5">
            <text:p>Dec</text:p>
          </table:table-cell>
          <table:table-cell office:value-type="float" office:value="0" table:formula="of:=IF(INDEX([Tracker.$A$1:.$AG$120];6+9*(MONTH([.$A342])-1)+(COLUMN()-4);DAY([.$A342])+2)&lt;&gt;&quot;&quot;;1;0)" table:style-name="ce92"/>
          <table:table-cell office:value-type="float" office:value="0" table:formula="of:=IF(INDEX([Tracker.$A$1:.$AG$120];6+9*(MONTH([.$A342])-1)+(COLUMN()-4);DAY([.$A342])+2)&lt;&gt;&quot;&quot;;1;0)" table:style-name="ce92"/>
          <table:table-cell office:value-type="float" office:value="0" table:formula="of:=IF(INDEX([Tracker.$A$1:.$AG$120];6+9*(MONTH([.$A342])-1)+(COLUMN()-4);DAY([.$A342])+2)&lt;&gt;&quot;&quot;;1;0)" table:style-name="ce92"/>
          <table:table-cell office:value-type="float" office:value="0" table:formula="of:=IF(INDEX([Tracker.$A$1:.$AG$120];6+9*(MONTH([.$A342])-1)+(COLUMN()-4);DAY([.$A342])+2)&lt;&gt;&quot;&quot;;1;0)" table:style-name="ce92"/>
          <table:table-cell office:value-type="float" office:value="0" table:formula="of:=IF(INDEX([Tracker.$A$1:.$AG$120];6+9*(MONTH([.$A342])-1)+(COLUMN()-4);DAY([.$A342])+2)&lt;&gt;&quot;&quot;;1;0)" table:style-name="ce92"/>
          <table:table-cell office:value-type="float" office:value="0" table:formula="of:=IF(INDEX([Tracker.$A$1:.$AG$120];6+9*(MONTH([.$A342])-1)+(COLUMN()-4);DAY([.$A342])+2)&lt;&gt;&quot;&quot;;1;0)" table:style-name="ce92"/>
          <table:table-cell office:value-type="float" office:value="0" table:formula="of:=SUM([.D342:.I342])" table:style-name="ce6"/>
          <table:table-cell office:value-type="percentage" office:value="0" table:formula="of:=[.J342]/6" table:style-name="ce8">
            <text:p>0%</text:p>
          </table:table-cell>
          <table:table-cell table:style-name="ce1"/>
          <table:table-cell office:value-type="float" office:value="0" table:formula="of:=IF([.D342]=1;[.M341]+1;0)" table:style-name="ce1">
            <text:p>0</text:p>
          </table:table-cell>
          <table:table-cell office:value-type="float" office:value="0" table:formula="of:=IF([.E342]=1;[.N341]+1;0)" table:style-name="ce1">
            <text:p>0</text:p>
          </table:table-cell>
          <table:table-cell office:value-type="float" office:value="0" table:formula="of:=IF([.F342]=1;[.O341]+1;0)" table:style-name="ce1">
            <text:p>0</text:p>
          </table:table-cell>
          <table:table-cell office:value-type="float" office:value="0" table:formula="of:=IF([.G342]=1;[.P341]+1;0)" table:style-name="ce1">
            <text:p>0</text:p>
          </table:table-cell>
          <table:table-cell office:value-type="float" office:value="0" table:formula="of:=IF([.H342]=1;[.Q341]+1;0)" table:style-name="ce1">
            <text:p>0</text:p>
          </table:table-cell>
          <table:table-cell office:value-type="float" office:value="0" table:formula="of:=IF([.I342]=1;[.R34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6T00:00:00" table:formula="of:=[.A342]+1" table:style-name="ce10">
            <text:p>Sun, 06 Dec 2026</text:p>
          </table:table-cell>
          <table:table-cell office:value-type="string" office:string-value="Sun" table:formula="of:=TEXT([.A343];&quot;ddd&quot;)" table:style-name="ce5">
            <text:p>Sun</text:p>
          </table:table-cell>
          <table:table-cell office:value-type="string" office:string-value="Dec" table:formula="of:=TEXT([.A343];&quot;mmm&quot;)" table:style-name="ce5">
            <text:p>Dec</text:p>
          </table:table-cell>
          <table:table-cell office:value-type="float" office:value="0" table:formula="of:=IF(INDEX([Tracker.$A$1:.$AG$120];6+9*(MONTH([.$A343])-1)+(COLUMN()-4);DAY([.$A343])+2)&lt;&gt;&quot;&quot;;1;0)" table:style-name="ce92"/>
          <table:table-cell office:value-type="float" office:value="0" table:formula="of:=IF(INDEX([Tracker.$A$1:.$AG$120];6+9*(MONTH([.$A343])-1)+(COLUMN()-4);DAY([.$A343])+2)&lt;&gt;&quot;&quot;;1;0)" table:style-name="ce92"/>
          <table:table-cell office:value-type="float" office:value="0" table:formula="of:=IF(INDEX([Tracker.$A$1:.$AG$120];6+9*(MONTH([.$A343])-1)+(COLUMN()-4);DAY([.$A343])+2)&lt;&gt;&quot;&quot;;1;0)" table:style-name="ce92"/>
          <table:table-cell office:value-type="float" office:value="0" table:formula="of:=IF(INDEX([Tracker.$A$1:.$AG$120];6+9*(MONTH([.$A343])-1)+(COLUMN()-4);DAY([.$A343])+2)&lt;&gt;&quot;&quot;;1;0)" table:style-name="ce92"/>
          <table:table-cell office:value-type="float" office:value="0" table:formula="of:=IF(INDEX([Tracker.$A$1:.$AG$120];6+9*(MONTH([.$A343])-1)+(COLUMN()-4);DAY([.$A343])+2)&lt;&gt;&quot;&quot;;1;0)" table:style-name="ce92"/>
          <table:table-cell office:value-type="float" office:value="0" table:formula="of:=IF(INDEX([Tracker.$A$1:.$AG$120];6+9*(MONTH([.$A343])-1)+(COLUMN()-4);DAY([.$A343])+2)&lt;&gt;&quot;&quot;;1;0)" table:style-name="ce92"/>
          <table:table-cell office:value-type="float" office:value="0" table:formula="of:=SUM([.D343:.I343])" table:style-name="ce6"/>
          <table:table-cell office:value-type="percentage" office:value="0" table:formula="of:=[.J343]/6" table:style-name="ce8">
            <text:p>0%</text:p>
          </table:table-cell>
          <table:table-cell table:style-name="ce1"/>
          <table:table-cell office:value-type="float" office:value="0" table:formula="of:=IF([.D343]=1;[.M342]+1;0)" table:style-name="ce1">
            <text:p>0</text:p>
          </table:table-cell>
          <table:table-cell office:value-type="float" office:value="0" table:formula="of:=IF([.E343]=1;[.N342]+1;0)" table:style-name="ce1">
            <text:p>0</text:p>
          </table:table-cell>
          <table:table-cell office:value-type="float" office:value="0" table:formula="of:=IF([.F343]=1;[.O342]+1;0)" table:style-name="ce1">
            <text:p>0</text:p>
          </table:table-cell>
          <table:table-cell office:value-type="float" office:value="0" table:formula="of:=IF([.G343]=1;[.P342]+1;0)" table:style-name="ce1">
            <text:p>0</text:p>
          </table:table-cell>
          <table:table-cell office:value-type="float" office:value="0" table:formula="of:=IF([.H343]=1;[.Q342]+1;0)" table:style-name="ce1">
            <text:p>0</text:p>
          </table:table-cell>
          <table:table-cell office:value-type="float" office:value="0" table:formula="of:=IF([.I343]=1;[.R34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7T00:00:00" table:formula="of:=[.A343]+1" table:style-name="ce10">
            <text:p>Mon, 07 Dec 2026</text:p>
          </table:table-cell>
          <table:table-cell office:value-type="string" office:string-value="Mon" table:formula="of:=TEXT([.A344];&quot;ddd&quot;)" table:style-name="ce5">
            <text:p>Mon</text:p>
          </table:table-cell>
          <table:table-cell office:value-type="string" office:string-value="Dec" table:formula="of:=TEXT([.A344];&quot;mmm&quot;)" table:style-name="ce5">
            <text:p>Dec</text:p>
          </table:table-cell>
          <table:table-cell office:value-type="float" office:value="0" table:formula="of:=IF(INDEX([Tracker.$A$1:.$AG$120];6+9*(MONTH([.$A344])-1)+(COLUMN()-4);DAY([.$A344])+2)&lt;&gt;&quot;&quot;;1;0)" table:style-name="ce92"/>
          <table:table-cell office:value-type="float" office:value="0" table:formula="of:=IF(INDEX([Tracker.$A$1:.$AG$120];6+9*(MONTH([.$A344])-1)+(COLUMN()-4);DAY([.$A344])+2)&lt;&gt;&quot;&quot;;1;0)" table:style-name="ce92"/>
          <table:table-cell office:value-type="float" office:value="0" table:formula="of:=IF(INDEX([Tracker.$A$1:.$AG$120];6+9*(MONTH([.$A344])-1)+(COLUMN()-4);DAY([.$A344])+2)&lt;&gt;&quot;&quot;;1;0)" table:style-name="ce92"/>
          <table:table-cell office:value-type="float" office:value="0" table:formula="of:=IF(INDEX([Tracker.$A$1:.$AG$120];6+9*(MONTH([.$A344])-1)+(COLUMN()-4);DAY([.$A344])+2)&lt;&gt;&quot;&quot;;1;0)" table:style-name="ce92"/>
          <table:table-cell office:value-type="float" office:value="0" table:formula="of:=IF(INDEX([Tracker.$A$1:.$AG$120];6+9*(MONTH([.$A344])-1)+(COLUMN()-4);DAY([.$A344])+2)&lt;&gt;&quot;&quot;;1;0)" table:style-name="ce92"/>
          <table:table-cell office:value-type="float" office:value="0" table:formula="of:=IF(INDEX([Tracker.$A$1:.$AG$120];6+9*(MONTH([.$A344])-1)+(COLUMN()-4);DAY([.$A344])+2)&lt;&gt;&quot;&quot;;1;0)" table:style-name="ce92"/>
          <table:table-cell office:value-type="float" office:value="0" table:formula="of:=SUM([.D344:.I344])" table:style-name="ce6"/>
          <table:table-cell office:value-type="percentage" office:value="0" table:formula="of:=[.J344]/6" table:style-name="ce8">
            <text:p>0%</text:p>
          </table:table-cell>
          <table:table-cell table:style-name="ce1"/>
          <table:table-cell office:value-type="float" office:value="0" table:formula="of:=IF([.D344]=1;[.M343]+1;0)" table:style-name="ce1">
            <text:p>0</text:p>
          </table:table-cell>
          <table:table-cell office:value-type="float" office:value="0" table:formula="of:=IF([.E344]=1;[.N343]+1;0)" table:style-name="ce1">
            <text:p>0</text:p>
          </table:table-cell>
          <table:table-cell office:value-type="float" office:value="0" table:formula="of:=IF([.F344]=1;[.O343]+1;0)" table:style-name="ce1">
            <text:p>0</text:p>
          </table:table-cell>
          <table:table-cell office:value-type="float" office:value="0" table:formula="of:=IF([.G344]=1;[.P343]+1;0)" table:style-name="ce1">
            <text:p>0</text:p>
          </table:table-cell>
          <table:table-cell office:value-type="float" office:value="0" table:formula="of:=IF([.H344]=1;[.Q343]+1;0)" table:style-name="ce1">
            <text:p>0</text:p>
          </table:table-cell>
          <table:table-cell office:value-type="float" office:value="0" table:formula="of:=IF([.I344]=1;[.R34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8T00:00:00" table:formula="of:=[.A344]+1" table:style-name="ce10">
            <text:p>Tue, 08 Dec 2026</text:p>
          </table:table-cell>
          <table:table-cell office:value-type="string" office:string-value="Tue" table:formula="of:=TEXT([.A345];&quot;ddd&quot;)" table:style-name="ce5">
            <text:p>Tue</text:p>
          </table:table-cell>
          <table:table-cell office:value-type="string" office:string-value="Dec" table:formula="of:=TEXT([.A345];&quot;mmm&quot;)" table:style-name="ce5">
            <text:p>Dec</text:p>
          </table:table-cell>
          <table:table-cell office:value-type="float" office:value="0" table:formula="of:=IF(INDEX([Tracker.$A$1:.$AG$120];6+9*(MONTH([.$A345])-1)+(COLUMN()-4);DAY([.$A345])+2)&lt;&gt;&quot;&quot;;1;0)" table:style-name="ce92"/>
          <table:table-cell office:value-type="float" office:value="0" table:formula="of:=IF(INDEX([Tracker.$A$1:.$AG$120];6+9*(MONTH([.$A345])-1)+(COLUMN()-4);DAY([.$A345])+2)&lt;&gt;&quot;&quot;;1;0)" table:style-name="ce92"/>
          <table:table-cell office:value-type="float" office:value="0" table:formula="of:=IF(INDEX([Tracker.$A$1:.$AG$120];6+9*(MONTH([.$A345])-1)+(COLUMN()-4);DAY([.$A345])+2)&lt;&gt;&quot;&quot;;1;0)" table:style-name="ce92"/>
          <table:table-cell office:value-type="float" office:value="0" table:formula="of:=IF(INDEX([Tracker.$A$1:.$AG$120];6+9*(MONTH([.$A345])-1)+(COLUMN()-4);DAY([.$A345])+2)&lt;&gt;&quot;&quot;;1;0)" table:style-name="ce92"/>
          <table:table-cell office:value-type="float" office:value="0" table:formula="of:=IF(INDEX([Tracker.$A$1:.$AG$120];6+9*(MONTH([.$A345])-1)+(COLUMN()-4);DAY([.$A345])+2)&lt;&gt;&quot;&quot;;1;0)" table:style-name="ce92"/>
          <table:table-cell office:value-type="float" office:value="0" table:formula="of:=IF(INDEX([Tracker.$A$1:.$AG$120];6+9*(MONTH([.$A345])-1)+(COLUMN()-4);DAY([.$A345])+2)&lt;&gt;&quot;&quot;;1;0)" table:style-name="ce92"/>
          <table:table-cell office:value-type="float" office:value="0" table:formula="of:=SUM([.D345:.I345])" table:style-name="ce6"/>
          <table:table-cell office:value-type="percentage" office:value="0" table:formula="of:=[.J345]/6" table:style-name="ce8">
            <text:p>0%</text:p>
          </table:table-cell>
          <table:table-cell table:style-name="ce1"/>
          <table:table-cell office:value-type="float" office:value="0" table:formula="of:=IF([.D345]=1;[.M344]+1;0)" table:style-name="ce1">
            <text:p>0</text:p>
          </table:table-cell>
          <table:table-cell office:value-type="float" office:value="0" table:formula="of:=IF([.E345]=1;[.N344]+1;0)" table:style-name="ce1">
            <text:p>0</text:p>
          </table:table-cell>
          <table:table-cell office:value-type="float" office:value="0" table:formula="of:=IF([.F345]=1;[.O344]+1;0)" table:style-name="ce1">
            <text:p>0</text:p>
          </table:table-cell>
          <table:table-cell office:value-type="float" office:value="0" table:formula="of:=IF([.G345]=1;[.P344]+1;0)" table:style-name="ce1">
            <text:p>0</text:p>
          </table:table-cell>
          <table:table-cell office:value-type="float" office:value="0" table:formula="of:=IF([.H345]=1;[.Q344]+1;0)" table:style-name="ce1">
            <text:p>0</text:p>
          </table:table-cell>
          <table:table-cell office:value-type="float" office:value="0" table:formula="of:=IF([.I345]=1;[.R34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09T00:00:00" table:formula="of:=[.A345]+1" table:style-name="ce10">
            <text:p>Wed, 09 Dec 2026</text:p>
          </table:table-cell>
          <table:table-cell office:value-type="string" office:string-value="Wed" table:formula="of:=TEXT([.A346];&quot;ddd&quot;)" table:style-name="ce5">
            <text:p>Wed</text:p>
          </table:table-cell>
          <table:table-cell office:value-type="string" office:string-value="Dec" table:formula="of:=TEXT([.A346];&quot;mmm&quot;)" table:style-name="ce5">
            <text:p>Dec</text:p>
          </table:table-cell>
          <table:table-cell office:value-type="float" office:value="0" table:formula="of:=IF(INDEX([Tracker.$A$1:.$AG$120];6+9*(MONTH([.$A346])-1)+(COLUMN()-4);DAY([.$A346])+2)&lt;&gt;&quot;&quot;;1;0)" table:style-name="ce92"/>
          <table:table-cell office:value-type="float" office:value="0" table:formula="of:=IF(INDEX([Tracker.$A$1:.$AG$120];6+9*(MONTH([.$A346])-1)+(COLUMN()-4);DAY([.$A346])+2)&lt;&gt;&quot;&quot;;1;0)" table:style-name="ce92"/>
          <table:table-cell office:value-type="float" office:value="0" table:formula="of:=IF(INDEX([Tracker.$A$1:.$AG$120];6+9*(MONTH([.$A346])-1)+(COLUMN()-4);DAY([.$A346])+2)&lt;&gt;&quot;&quot;;1;0)" table:style-name="ce92"/>
          <table:table-cell office:value-type="float" office:value="0" table:formula="of:=IF(INDEX([Tracker.$A$1:.$AG$120];6+9*(MONTH([.$A346])-1)+(COLUMN()-4);DAY([.$A346])+2)&lt;&gt;&quot;&quot;;1;0)" table:style-name="ce92"/>
          <table:table-cell office:value-type="float" office:value="0" table:formula="of:=IF(INDEX([Tracker.$A$1:.$AG$120];6+9*(MONTH([.$A346])-1)+(COLUMN()-4);DAY([.$A346])+2)&lt;&gt;&quot;&quot;;1;0)" table:style-name="ce92"/>
          <table:table-cell office:value-type="float" office:value="0" table:formula="of:=IF(INDEX([Tracker.$A$1:.$AG$120];6+9*(MONTH([.$A346])-1)+(COLUMN()-4);DAY([.$A346])+2)&lt;&gt;&quot;&quot;;1;0)" table:style-name="ce92"/>
          <table:table-cell office:value-type="float" office:value="0" table:formula="of:=SUM([.D346:.I346])" table:style-name="ce6"/>
          <table:table-cell office:value-type="percentage" office:value="0" table:formula="of:=[.J346]/6" table:style-name="ce8">
            <text:p>0%</text:p>
          </table:table-cell>
          <table:table-cell table:style-name="ce1"/>
          <table:table-cell office:value-type="float" office:value="0" table:formula="of:=IF([.D346]=1;[.M345]+1;0)" table:style-name="ce1">
            <text:p>0</text:p>
          </table:table-cell>
          <table:table-cell office:value-type="float" office:value="0" table:formula="of:=IF([.E346]=1;[.N345]+1;0)" table:style-name="ce1">
            <text:p>0</text:p>
          </table:table-cell>
          <table:table-cell office:value-type="float" office:value="0" table:formula="of:=IF([.F346]=1;[.O345]+1;0)" table:style-name="ce1">
            <text:p>0</text:p>
          </table:table-cell>
          <table:table-cell office:value-type="float" office:value="0" table:formula="of:=IF([.G346]=1;[.P345]+1;0)" table:style-name="ce1">
            <text:p>0</text:p>
          </table:table-cell>
          <table:table-cell office:value-type="float" office:value="0" table:formula="of:=IF([.H346]=1;[.Q345]+1;0)" table:style-name="ce1">
            <text:p>0</text:p>
          </table:table-cell>
          <table:table-cell office:value-type="float" office:value="0" table:formula="of:=IF([.I346]=1;[.R34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0T00:00:00" table:formula="of:=[.A346]+1" table:style-name="ce10">
            <text:p>Thu, 10 Dec 2026</text:p>
          </table:table-cell>
          <table:table-cell office:value-type="string" office:string-value="Thu" table:formula="of:=TEXT([.A347];&quot;ddd&quot;)" table:style-name="ce5">
            <text:p>Thu</text:p>
          </table:table-cell>
          <table:table-cell office:value-type="string" office:string-value="Dec" table:formula="of:=TEXT([.A347];&quot;mmm&quot;)" table:style-name="ce5">
            <text:p>Dec</text:p>
          </table:table-cell>
          <table:table-cell office:value-type="float" office:value="0" table:formula="of:=IF(INDEX([Tracker.$A$1:.$AG$120];6+9*(MONTH([.$A347])-1)+(COLUMN()-4);DAY([.$A347])+2)&lt;&gt;&quot;&quot;;1;0)" table:style-name="ce92"/>
          <table:table-cell office:value-type="float" office:value="0" table:formula="of:=IF(INDEX([Tracker.$A$1:.$AG$120];6+9*(MONTH([.$A347])-1)+(COLUMN()-4);DAY([.$A347])+2)&lt;&gt;&quot;&quot;;1;0)" table:style-name="ce92"/>
          <table:table-cell office:value-type="float" office:value="0" table:formula="of:=IF(INDEX([Tracker.$A$1:.$AG$120];6+9*(MONTH([.$A347])-1)+(COLUMN()-4);DAY([.$A347])+2)&lt;&gt;&quot;&quot;;1;0)" table:style-name="ce92"/>
          <table:table-cell office:value-type="float" office:value="0" table:formula="of:=IF(INDEX([Tracker.$A$1:.$AG$120];6+9*(MONTH([.$A347])-1)+(COLUMN()-4);DAY([.$A347])+2)&lt;&gt;&quot;&quot;;1;0)" table:style-name="ce92"/>
          <table:table-cell office:value-type="float" office:value="0" table:formula="of:=IF(INDEX([Tracker.$A$1:.$AG$120];6+9*(MONTH([.$A347])-1)+(COLUMN()-4);DAY([.$A347])+2)&lt;&gt;&quot;&quot;;1;0)" table:style-name="ce92"/>
          <table:table-cell office:value-type="float" office:value="0" table:formula="of:=IF(INDEX([Tracker.$A$1:.$AG$120];6+9*(MONTH([.$A347])-1)+(COLUMN()-4);DAY([.$A347])+2)&lt;&gt;&quot;&quot;;1;0)" table:style-name="ce92"/>
          <table:table-cell office:value-type="float" office:value="0" table:formula="of:=SUM([.D347:.I347])" table:style-name="ce6"/>
          <table:table-cell office:value-type="percentage" office:value="0" table:formula="of:=[.J347]/6" table:style-name="ce8">
            <text:p>0%</text:p>
          </table:table-cell>
          <table:table-cell table:style-name="ce1"/>
          <table:table-cell office:value-type="float" office:value="0" table:formula="of:=IF([.D347]=1;[.M346]+1;0)" table:style-name="ce1">
            <text:p>0</text:p>
          </table:table-cell>
          <table:table-cell office:value-type="float" office:value="0" table:formula="of:=IF([.E347]=1;[.N346]+1;0)" table:style-name="ce1">
            <text:p>0</text:p>
          </table:table-cell>
          <table:table-cell office:value-type="float" office:value="0" table:formula="of:=IF([.F347]=1;[.O346]+1;0)" table:style-name="ce1">
            <text:p>0</text:p>
          </table:table-cell>
          <table:table-cell office:value-type="float" office:value="0" table:formula="of:=IF([.G347]=1;[.P346]+1;0)" table:style-name="ce1">
            <text:p>0</text:p>
          </table:table-cell>
          <table:table-cell office:value-type="float" office:value="0" table:formula="of:=IF([.H347]=1;[.Q346]+1;0)" table:style-name="ce1">
            <text:p>0</text:p>
          </table:table-cell>
          <table:table-cell office:value-type="float" office:value="0" table:formula="of:=IF([.I347]=1;[.R34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1T00:00:00" table:formula="of:=[.A347]+1" table:style-name="ce10">
            <text:p>Fri, 11 Dec 2026</text:p>
          </table:table-cell>
          <table:table-cell office:value-type="string" office:string-value="Fri" table:formula="of:=TEXT([.A348];&quot;ddd&quot;)" table:style-name="ce5">
            <text:p>Fri</text:p>
          </table:table-cell>
          <table:table-cell office:value-type="string" office:string-value="Dec" table:formula="of:=TEXT([.A348];&quot;mmm&quot;)" table:style-name="ce5">
            <text:p>Dec</text:p>
          </table:table-cell>
          <table:table-cell office:value-type="float" office:value="0" table:formula="of:=IF(INDEX([Tracker.$A$1:.$AG$120];6+9*(MONTH([.$A348])-1)+(COLUMN()-4);DAY([.$A348])+2)&lt;&gt;&quot;&quot;;1;0)" table:style-name="ce92"/>
          <table:table-cell office:value-type="float" office:value="0" table:formula="of:=IF(INDEX([Tracker.$A$1:.$AG$120];6+9*(MONTH([.$A348])-1)+(COLUMN()-4);DAY([.$A348])+2)&lt;&gt;&quot;&quot;;1;0)" table:style-name="ce92"/>
          <table:table-cell office:value-type="float" office:value="0" table:formula="of:=IF(INDEX([Tracker.$A$1:.$AG$120];6+9*(MONTH([.$A348])-1)+(COLUMN()-4);DAY([.$A348])+2)&lt;&gt;&quot;&quot;;1;0)" table:style-name="ce92"/>
          <table:table-cell office:value-type="float" office:value="0" table:formula="of:=IF(INDEX([Tracker.$A$1:.$AG$120];6+9*(MONTH([.$A348])-1)+(COLUMN()-4);DAY([.$A348])+2)&lt;&gt;&quot;&quot;;1;0)" table:style-name="ce92"/>
          <table:table-cell office:value-type="float" office:value="0" table:formula="of:=IF(INDEX([Tracker.$A$1:.$AG$120];6+9*(MONTH([.$A348])-1)+(COLUMN()-4);DAY([.$A348])+2)&lt;&gt;&quot;&quot;;1;0)" table:style-name="ce92"/>
          <table:table-cell office:value-type="float" office:value="0" table:formula="of:=IF(INDEX([Tracker.$A$1:.$AG$120];6+9*(MONTH([.$A348])-1)+(COLUMN()-4);DAY([.$A348])+2)&lt;&gt;&quot;&quot;;1;0)" table:style-name="ce92"/>
          <table:table-cell office:value-type="float" office:value="0" table:formula="of:=SUM([.D348:.I348])" table:style-name="ce6"/>
          <table:table-cell office:value-type="percentage" office:value="0" table:formula="of:=[.J348]/6" table:style-name="ce8">
            <text:p>0%</text:p>
          </table:table-cell>
          <table:table-cell table:style-name="ce1"/>
          <table:table-cell office:value-type="float" office:value="0" table:formula="of:=IF([.D348]=1;[.M347]+1;0)" table:style-name="ce1">
            <text:p>0</text:p>
          </table:table-cell>
          <table:table-cell office:value-type="float" office:value="0" table:formula="of:=IF([.E348]=1;[.N347]+1;0)" table:style-name="ce1">
            <text:p>0</text:p>
          </table:table-cell>
          <table:table-cell office:value-type="float" office:value="0" table:formula="of:=IF([.F348]=1;[.O347]+1;0)" table:style-name="ce1">
            <text:p>0</text:p>
          </table:table-cell>
          <table:table-cell office:value-type="float" office:value="0" table:formula="of:=IF([.G348]=1;[.P347]+1;0)" table:style-name="ce1">
            <text:p>0</text:p>
          </table:table-cell>
          <table:table-cell office:value-type="float" office:value="0" table:formula="of:=IF([.H348]=1;[.Q347]+1;0)" table:style-name="ce1">
            <text:p>0</text:p>
          </table:table-cell>
          <table:table-cell office:value-type="float" office:value="0" table:formula="of:=IF([.I348]=1;[.R34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2T00:00:00" table:formula="of:=[.A348]+1" table:style-name="ce10">
            <text:p>Sat, 12 Dec 2026</text:p>
          </table:table-cell>
          <table:table-cell office:value-type="string" office:string-value="Sat" table:formula="of:=TEXT([.A349];&quot;ddd&quot;)" table:style-name="ce5">
            <text:p>Sat</text:p>
          </table:table-cell>
          <table:table-cell office:value-type="string" office:string-value="Dec" table:formula="of:=TEXT([.A349];&quot;mmm&quot;)" table:style-name="ce5">
            <text:p>Dec</text:p>
          </table:table-cell>
          <table:table-cell office:value-type="float" office:value="0" table:formula="of:=IF(INDEX([Tracker.$A$1:.$AG$120];6+9*(MONTH([.$A349])-1)+(COLUMN()-4);DAY([.$A349])+2)&lt;&gt;&quot;&quot;;1;0)" table:style-name="ce92"/>
          <table:table-cell office:value-type="float" office:value="0" table:formula="of:=IF(INDEX([Tracker.$A$1:.$AG$120];6+9*(MONTH([.$A349])-1)+(COLUMN()-4);DAY([.$A349])+2)&lt;&gt;&quot;&quot;;1;0)" table:style-name="ce92"/>
          <table:table-cell office:value-type="float" office:value="0" table:formula="of:=IF(INDEX([Tracker.$A$1:.$AG$120];6+9*(MONTH([.$A349])-1)+(COLUMN()-4);DAY([.$A349])+2)&lt;&gt;&quot;&quot;;1;0)" table:style-name="ce92"/>
          <table:table-cell office:value-type="float" office:value="0" table:formula="of:=IF(INDEX([Tracker.$A$1:.$AG$120];6+9*(MONTH([.$A349])-1)+(COLUMN()-4);DAY([.$A349])+2)&lt;&gt;&quot;&quot;;1;0)" table:style-name="ce92"/>
          <table:table-cell office:value-type="float" office:value="0" table:formula="of:=IF(INDEX([Tracker.$A$1:.$AG$120];6+9*(MONTH([.$A349])-1)+(COLUMN()-4);DAY([.$A349])+2)&lt;&gt;&quot;&quot;;1;0)" table:style-name="ce92"/>
          <table:table-cell office:value-type="float" office:value="0" table:formula="of:=IF(INDEX([Tracker.$A$1:.$AG$120];6+9*(MONTH([.$A349])-1)+(COLUMN()-4);DAY([.$A349])+2)&lt;&gt;&quot;&quot;;1;0)" table:style-name="ce92"/>
          <table:table-cell office:value-type="float" office:value="0" table:formula="of:=SUM([.D349:.I349])" table:style-name="ce6"/>
          <table:table-cell office:value-type="percentage" office:value="0" table:formula="of:=[.J349]/6" table:style-name="ce8">
            <text:p>0%</text:p>
          </table:table-cell>
          <table:table-cell table:style-name="ce1"/>
          <table:table-cell office:value-type="float" office:value="0" table:formula="of:=IF([.D349]=1;[.M348]+1;0)" table:style-name="ce1">
            <text:p>0</text:p>
          </table:table-cell>
          <table:table-cell office:value-type="float" office:value="0" table:formula="of:=IF([.E349]=1;[.N348]+1;0)" table:style-name="ce1">
            <text:p>0</text:p>
          </table:table-cell>
          <table:table-cell office:value-type="float" office:value="0" table:formula="of:=IF([.F349]=1;[.O348]+1;0)" table:style-name="ce1">
            <text:p>0</text:p>
          </table:table-cell>
          <table:table-cell office:value-type="float" office:value="0" table:formula="of:=IF([.G349]=1;[.P348]+1;0)" table:style-name="ce1">
            <text:p>0</text:p>
          </table:table-cell>
          <table:table-cell office:value-type="float" office:value="0" table:formula="of:=IF([.H349]=1;[.Q348]+1;0)" table:style-name="ce1">
            <text:p>0</text:p>
          </table:table-cell>
          <table:table-cell office:value-type="float" office:value="0" table:formula="of:=IF([.I349]=1;[.R34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3T00:00:00" table:formula="of:=[.A349]+1" table:style-name="ce10">
            <text:p>Sun, 13 Dec 2026</text:p>
          </table:table-cell>
          <table:table-cell office:value-type="string" office:string-value="Sun" table:formula="of:=TEXT([.A350];&quot;ddd&quot;)" table:style-name="ce5">
            <text:p>Sun</text:p>
          </table:table-cell>
          <table:table-cell office:value-type="string" office:string-value="Dec" table:formula="of:=TEXT([.A350];&quot;mmm&quot;)" table:style-name="ce5">
            <text:p>Dec</text:p>
          </table:table-cell>
          <table:table-cell office:value-type="float" office:value="0" table:formula="of:=IF(INDEX([Tracker.$A$1:.$AG$120];6+9*(MONTH([.$A350])-1)+(COLUMN()-4);DAY([.$A350])+2)&lt;&gt;&quot;&quot;;1;0)" table:style-name="ce92"/>
          <table:table-cell office:value-type="float" office:value="0" table:formula="of:=IF(INDEX([Tracker.$A$1:.$AG$120];6+9*(MONTH([.$A350])-1)+(COLUMN()-4);DAY([.$A350])+2)&lt;&gt;&quot;&quot;;1;0)" table:style-name="ce92"/>
          <table:table-cell office:value-type="float" office:value="0" table:formula="of:=IF(INDEX([Tracker.$A$1:.$AG$120];6+9*(MONTH([.$A350])-1)+(COLUMN()-4);DAY([.$A350])+2)&lt;&gt;&quot;&quot;;1;0)" table:style-name="ce92"/>
          <table:table-cell office:value-type="float" office:value="0" table:formula="of:=IF(INDEX([Tracker.$A$1:.$AG$120];6+9*(MONTH([.$A350])-1)+(COLUMN()-4);DAY([.$A350])+2)&lt;&gt;&quot;&quot;;1;0)" table:style-name="ce92"/>
          <table:table-cell office:value-type="float" office:value="0" table:formula="of:=IF(INDEX([Tracker.$A$1:.$AG$120];6+9*(MONTH([.$A350])-1)+(COLUMN()-4);DAY([.$A350])+2)&lt;&gt;&quot;&quot;;1;0)" table:style-name="ce92"/>
          <table:table-cell office:value-type="float" office:value="0" table:formula="of:=IF(INDEX([Tracker.$A$1:.$AG$120];6+9*(MONTH([.$A350])-1)+(COLUMN()-4);DAY([.$A350])+2)&lt;&gt;&quot;&quot;;1;0)" table:style-name="ce92"/>
          <table:table-cell office:value-type="float" office:value="0" table:formula="of:=SUM([.D350:.I350])" table:style-name="ce6"/>
          <table:table-cell office:value-type="percentage" office:value="0" table:formula="of:=[.J350]/6" table:style-name="ce8">
            <text:p>0%</text:p>
          </table:table-cell>
          <table:table-cell table:style-name="ce1"/>
          <table:table-cell office:value-type="float" office:value="0" table:formula="of:=IF([.D350]=1;[.M349]+1;0)" table:style-name="ce1">
            <text:p>0</text:p>
          </table:table-cell>
          <table:table-cell office:value-type="float" office:value="0" table:formula="of:=IF([.E350]=1;[.N349]+1;0)" table:style-name="ce1">
            <text:p>0</text:p>
          </table:table-cell>
          <table:table-cell office:value-type="float" office:value="0" table:formula="of:=IF([.F350]=1;[.O349]+1;0)" table:style-name="ce1">
            <text:p>0</text:p>
          </table:table-cell>
          <table:table-cell office:value-type="float" office:value="0" table:formula="of:=IF([.G350]=1;[.P349]+1;0)" table:style-name="ce1">
            <text:p>0</text:p>
          </table:table-cell>
          <table:table-cell office:value-type="float" office:value="0" table:formula="of:=IF([.H350]=1;[.Q349]+1;0)" table:style-name="ce1">
            <text:p>0</text:p>
          </table:table-cell>
          <table:table-cell office:value-type="float" office:value="0" table:formula="of:=IF([.I350]=1;[.R34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4T00:00:00" table:formula="of:=[.A350]+1" table:style-name="ce10">
            <text:p>Mon, 14 Dec 2026</text:p>
          </table:table-cell>
          <table:table-cell office:value-type="string" office:string-value="Mon" table:formula="of:=TEXT([.A351];&quot;ddd&quot;)" table:style-name="ce5">
            <text:p>Mon</text:p>
          </table:table-cell>
          <table:table-cell office:value-type="string" office:string-value="Dec" table:formula="of:=TEXT([.A351];&quot;mmm&quot;)" table:style-name="ce5">
            <text:p>Dec</text:p>
          </table:table-cell>
          <table:table-cell office:value-type="float" office:value="0" table:formula="of:=IF(INDEX([Tracker.$A$1:.$AG$120];6+9*(MONTH([.$A351])-1)+(COLUMN()-4);DAY([.$A351])+2)&lt;&gt;&quot;&quot;;1;0)" table:style-name="ce92"/>
          <table:table-cell office:value-type="float" office:value="0" table:formula="of:=IF(INDEX([Tracker.$A$1:.$AG$120];6+9*(MONTH([.$A351])-1)+(COLUMN()-4);DAY([.$A351])+2)&lt;&gt;&quot;&quot;;1;0)" table:style-name="ce92"/>
          <table:table-cell office:value-type="float" office:value="0" table:formula="of:=IF(INDEX([Tracker.$A$1:.$AG$120];6+9*(MONTH([.$A351])-1)+(COLUMN()-4);DAY([.$A351])+2)&lt;&gt;&quot;&quot;;1;0)" table:style-name="ce92"/>
          <table:table-cell office:value-type="float" office:value="0" table:formula="of:=IF(INDEX([Tracker.$A$1:.$AG$120];6+9*(MONTH([.$A351])-1)+(COLUMN()-4);DAY([.$A351])+2)&lt;&gt;&quot;&quot;;1;0)" table:style-name="ce92"/>
          <table:table-cell office:value-type="float" office:value="0" table:formula="of:=IF(INDEX([Tracker.$A$1:.$AG$120];6+9*(MONTH([.$A351])-1)+(COLUMN()-4);DAY([.$A351])+2)&lt;&gt;&quot;&quot;;1;0)" table:style-name="ce92"/>
          <table:table-cell office:value-type="float" office:value="0" table:formula="of:=IF(INDEX([Tracker.$A$1:.$AG$120];6+9*(MONTH([.$A351])-1)+(COLUMN()-4);DAY([.$A351])+2)&lt;&gt;&quot;&quot;;1;0)" table:style-name="ce92"/>
          <table:table-cell office:value-type="float" office:value="0" table:formula="of:=SUM([.D351:.I351])" table:style-name="ce6"/>
          <table:table-cell office:value-type="percentage" office:value="0" table:formula="of:=[.J351]/6" table:style-name="ce8">
            <text:p>0%</text:p>
          </table:table-cell>
          <table:table-cell table:style-name="ce1"/>
          <table:table-cell office:value-type="float" office:value="0" table:formula="of:=IF([.D351]=1;[.M350]+1;0)" table:style-name="ce1">
            <text:p>0</text:p>
          </table:table-cell>
          <table:table-cell office:value-type="float" office:value="0" table:formula="of:=IF([.E351]=1;[.N350]+1;0)" table:style-name="ce1">
            <text:p>0</text:p>
          </table:table-cell>
          <table:table-cell office:value-type="float" office:value="0" table:formula="of:=IF([.F351]=1;[.O350]+1;0)" table:style-name="ce1">
            <text:p>0</text:p>
          </table:table-cell>
          <table:table-cell office:value-type="float" office:value="0" table:formula="of:=IF([.G351]=1;[.P350]+1;0)" table:style-name="ce1">
            <text:p>0</text:p>
          </table:table-cell>
          <table:table-cell office:value-type="float" office:value="0" table:formula="of:=IF([.H351]=1;[.Q350]+1;0)" table:style-name="ce1">
            <text:p>0</text:p>
          </table:table-cell>
          <table:table-cell office:value-type="float" office:value="0" table:formula="of:=IF([.I351]=1;[.R35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5T00:00:00" table:formula="of:=[.A351]+1" table:style-name="ce10">
            <text:p>Tue, 15 Dec 2026</text:p>
          </table:table-cell>
          <table:table-cell office:value-type="string" office:string-value="Tue" table:formula="of:=TEXT([.A352];&quot;ddd&quot;)" table:style-name="ce5">
            <text:p>Tue</text:p>
          </table:table-cell>
          <table:table-cell office:value-type="string" office:string-value="Dec" table:formula="of:=TEXT([.A352];&quot;mmm&quot;)" table:style-name="ce5">
            <text:p>Dec</text:p>
          </table:table-cell>
          <table:table-cell office:value-type="float" office:value="0" table:formula="of:=IF(INDEX([Tracker.$A$1:.$AG$120];6+9*(MONTH([.$A352])-1)+(COLUMN()-4);DAY([.$A352])+2)&lt;&gt;&quot;&quot;;1;0)" table:style-name="ce92"/>
          <table:table-cell office:value-type="float" office:value="0" table:formula="of:=IF(INDEX([Tracker.$A$1:.$AG$120];6+9*(MONTH([.$A352])-1)+(COLUMN()-4);DAY([.$A352])+2)&lt;&gt;&quot;&quot;;1;0)" table:style-name="ce92"/>
          <table:table-cell office:value-type="float" office:value="0" table:formula="of:=IF(INDEX([Tracker.$A$1:.$AG$120];6+9*(MONTH([.$A352])-1)+(COLUMN()-4);DAY([.$A352])+2)&lt;&gt;&quot;&quot;;1;0)" table:style-name="ce92"/>
          <table:table-cell office:value-type="float" office:value="0" table:formula="of:=IF(INDEX([Tracker.$A$1:.$AG$120];6+9*(MONTH([.$A352])-1)+(COLUMN()-4);DAY([.$A352])+2)&lt;&gt;&quot;&quot;;1;0)" table:style-name="ce92"/>
          <table:table-cell office:value-type="float" office:value="0" table:formula="of:=IF(INDEX([Tracker.$A$1:.$AG$120];6+9*(MONTH([.$A352])-1)+(COLUMN()-4);DAY([.$A352])+2)&lt;&gt;&quot;&quot;;1;0)" table:style-name="ce92"/>
          <table:table-cell office:value-type="float" office:value="0" table:formula="of:=IF(INDEX([Tracker.$A$1:.$AG$120];6+9*(MONTH([.$A352])-1)+(COLUMN()-4);DAY([.$A352])+2)&lt;&gt;&quot;&quot;;1;0)" table:style-name="ce92"/>
          <table:table-cell office:value-type="float" office:value="0" table:formula="of:=SUM([.D352:.I352])" table:style-name="ce6"/>
          <table:table-cell office:value-type="percentage" office:value="0" table:formula="of:=[.J352]/6" table:style-name="ce8">
            <text:p>0%</text:p>
          </table:table-cell>
          <table:table-cell table:style-name="ce1"/>
          <table:table-cell office:value-type="float" office:value="0" table:formula="of:=IF([.D352]=1;[.M351]+1;0)" table:style-name="ce1">
            <text:p>0</text:p>
          </table:table-cell>
          <table:table-cell office:value-type="float" office:value="0" table:formula="of:=IF([.E352]=1;[.N351]+1;0)" table:style-name="ce1">
            <text:p>0</text:p>
          </table:table-cell>
          <table:table-cell office:value-type="float" office:value="0" table:formula="of:=IF([.F352]=1;[.O351]+1;0)" table:style-name="ce1">
            <text:p>0</text:p>
          </table:table-cell>
          <table:table-cell office:value-type="float" office:value="0" table:formula="of:=IF([.G352]=1;[.P351]+1;0)" table:style-name="ce1">
            <text:p>0</text:p>
          </table:table-cell>
          <table:table-cell office:value-type="float" office:value="0" table:formula="of:=IF([.H352]=1;[.Q351]+1;0)" table:style-name="ce1">
            <text:p>0</text:p>
          </table:table-cell>
          <table:table-cell office:value-type="float" office:value="0" table:formula="of:=IF([.I352]=1;[.R35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6T00:00:00" table:formula="of:=[.A352]+1" table:style-name="ce10">
            <text:p>Wed, 16 Dec 2026</text:p>
          </table:table-cell>
          <table:table-cell office:value-type="string" office:string-value="Wed" table:formula="of:=TEXT([.A353];&quot;ddd&quot;)" table:style-name="ce5">
            <text:p>Wed</text:p>
          </table:table-cell>
          <table:table-cell office:value-type="string" office:string-value="Dec" table:formula="of:=TEXT([.A353];&quot;mmm&quot;)" table:style-name="ce5">
            <text:p>Dec</text:p>
          </table:table-cell>
          <table:table-cell office:value-type="float" office:value="0" table:formula="of:=IF(INDEX([Tracker.$A$1:.$AG$120];6+9*(MONTH([.$A353])-1)+(COLUMN()-4);DAY([.$A353])+2)&lt;&gt;&quot;&quot;;1;0)" table:style-name="ce92"/>
          <table:table-cell office:value-type="float" office:value="0" table:formula="of:=IF(INDEX([Tracker.$A$1:.$AG$120];6+9*(MONTH([.$A353])-1)+(COLUMN()-4);DAY([.$A353])+2)&lt;&gt;&quot;&quot;;1;0)" table:style-name="ce92"/>
          <table:table-cell office:value-type="float" office:value="0" table:formula="of:=IF(INDEX([Tracker.$A$1:.$AG$120];6+9*(MONTH([.$A353])-1)+(COLUMN()-4);DAY([.$A353])+2)&lt;&gt;&quot;&quot;;1;0)" table:style-name="ce92"/>
          <table:table-cell office:value-type="float" office:value="0" table:formula="of:=IF(INDEX([Tracker.$A$1:.$AG$120];6+9*(MONTH([.$A353])-1)+(COLUMN()-4);DAY([.$A353])+2)&lt;&gt;&quot;&quot;;1;0)" table:style-name="ce92"/>
          <table:table-cell office:value-type="float" office:value="0" table:formula="of:=IF(INDEX([Tracker.$A$1:.$AG$120];6+9*(MONTH([.$A353])-1)+(COLUMN()-4);DAY([.$A353])+2)&lt;&gt;&quot;&quot;;1;0)" table:style-name="ce92"/>
          <table:table-cell office:value-type="float" office:value="0" table:formula="of:=IF(INDEX([Tracker.$A$1:.$AG$120];6+9*(MONTH([.$A353])-1)+(COLUMN()-4);DAY([.$A353])+2)&lt;&gt;&quot;&quot;;1;0)" table:style-name="ce92"/>
          <table:table-cell office:value-type="float" office:value="0" table:formula="of:=SUM([.D353:.I353])" table:style-name="ce6"/>
          <table:table-cell office:value-type="percentage" office:value="0" table:formula="of:=[.J353]/6" table:style-name="ce8">
            <text:p>0%</text:p>
          </table:table-cell>
          <table:table-cell table:style-name="ce1"/>
          <table:table-cell office:value-type="float" office:value="0" table:formula="of:=IF([.D353]=1;[.M352]+1;0)" table:style-name="ce1">
            <text:p>0</text:p>
          </table:table-cell>
          <table:table-cell office:value-type="float" office:value="0" table:formula="of:=IF([.E353]=1;[.N352]+1;0)" table:style-name="ce1">
            <text:p>0</text:p>
          </table:table-cell>
          <table:table-cell office:value-type="float" office:value="0" table:formula="of:=IF([.F353]=1;[.O352]+1;0)" table:style-name="ce1">
            <text:p>0</text:p>
          </table:table-cell>
          <table:table-cell office:value-type="float" office:value="0" table:formula="of:=IF([.G353]=1;[.P352]+1;0)" table:style-name="ce1">
            <text:p>0</text:p>
          </table:table-cell>
          <table:table-cell office:value-type="float" office:value="0" table:formula="of:=IF([.H353]=1;[.Q352]+1;0)" table:style-name="ce1">
            <text:p>0</text:p>
          </table:table-cell>
          <table:table-cell office:value-type="float" office:value="0" table:formula="of:=IF([.I353]=1;[.R35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7T00:00:00" table:formula="of:=[.A353]+1" table:style-name="ce10">
            <text:p>Thu, 17 Dec 2026</text:p>
          </table:table-cell>
          <table:table-cell office:value-type="string" office:string-value="Thu" table:formula="of:=TEXT([.A354];&quot;ddd&quot;)" table:style-name="ce5">
            <text:p>Thu</text:p>
          </table:table-cell>
          <table:table-cell office:value-type="string" office:string-value="Dec" table:formula="of:=TEXT([.A354];&quot;mmm&quot;)" table:style-name="ce5">
            <text:p>Dec</text:p>
          </table:table-cell>
          <table:table-cell office:value-type="float" office:value="0" table:formula="of:=IF(INDEX([Tracker.$A$1:.$AG$120];6+9*(MONTH([.$A354])-1)+(COLUMN()-4);DAY([.$A354])+2)&lt;&gt;&quot;&quot;;1;0)" table:style-name="ce92"/>
          <table:table-cell office:value-type="float" office:value="0" table:formula="of:=IF(INDEX([Tracker.$A$1:.$AG$120];6+9*(MONTH([.$A354])-1)+(COLUMN()-4);DAY([.$A354])+2)&lt;&gt;&quot;&quot;;1;0)" table:style-name="ce92"/>
          <table:table-cell office:value-type="float" office:value="0" table:formula="of:=IF(INDEX([Tracker.$A$1:.$AG$120];6+9*(MONTH([.$A354])-1)+(COLUMN()-4);DAY([.$A354])+2)&lt;&gt;&quot;&quot;;1;0)" table:style-name="ce92"/>
          <table:table-cell office:value-type="float" office:value="0" table:formula="of:=IF(INDEX([Tracker.$A$1:.$AG$120];6+9*(MONTH([.$A354])-1)+(COLUMN()-4);DAY([.$A354])+2)&lt;&gt;&quot;&quot;;1;0)" table:style-name="ce92"/>
          <table:table-cell office:value-type="float" office:value="0" table:formula="of:=IF(INDEX([Tracker.$A$1:.$AG$120];6+9*(MONTH([.$A354])-1)+(COLUMN()-4);DAY([.$A354])+2)&lt;&gt;&quot;&quot;;1;0)" table:style-name="ce92"/>
          <table:table-cell office:value-type="float" office:value="0" table:formula="of:=IF(INDEX([Tracker.$A$1:.$AG$120];6+9*(MONTH([.$A354])-1)+(COLUMN()-4);DAY([.$A354])+2)&lt;&gt;&quot;&quot;;1;0)" table:style-name="ce92"/>
          <table:table-cell office:value-type="float" office:value="0" table:formula="of:=SUM([.D354:.I354])" table:style-name="ce6"/>
          <table:table-cell office:value-type="percentage" office:value="0" table:formula="of:=[.J354]/6" table:style-name="ce8">
            <text:p>0%</text:p>
          </table:table-cell>
          <table:table-cell table:style-name="ce1"/>
          <table:table-cell office:value-type="float" office:value="0" table:formula="of:=IF([.D354]=1;[.M353]+1;0)" table:style-name="ce1">
            <text:p>0</text:p>
          </table:table-cell>
          <table:table-cell office:value-type="float" office:value="0" table:formula="of:=IF([.E354]=1;[.N353]+1;0)" table:style-name="ce1">
            <text:p>0</text:p>
          </table:table-cell>
          <table:table-cell office:value-type="float" office:value="0" table:formula="of:=IF([.F354]=1;[.O353]+1;0)" table:style-name="ce1">
            <text:p>0</text:p>
          </table:table-cell>
          <table:table-cell office:value-type="float" office:value="0" table:formula="of:=IF([.G354]=1;[.P353]+1;0)" table:style-name="ce1">
            <text:p>0</text:p>
          </table:table-cell>
          <table:table-cell office:value-type="float" office:value="0" table:formula="of:=IF([.H354]=1;[.Q353]+1;0)" table:style-name="ce1">
            <text:p>0</text:p>
          </table:table-cell>
          <table:table-cell office:value-type="float" office:value="0" table:formula="of:=IF([.I354]=1;[.R35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8T00:00:00" table:formula="of:=[.A354]+1" table:style-name="ce10">
            <text:p>Fri, 18 Dec 2026</text:p>
          </table:table-cell>
          <table:table-cell office:value-type="string" office:string-value="Fri" table:formula="of:=TEXT([.A355];&quot;ddd&quot;)" table:style-name="ce5">
            <text:p>Fri</text:p>
          </table:table-cell>
          <table:table-cell office:value-type="string" office:string-value="Dec" table:formula="of:=TEXT([.A355];&quot;mmm&quot;)" table:style-name="ce5">
            <text:p>Dec</text:p>
          </table:table-cell>
          <table:table-cell office:value-type="float" office:value="0" table:formula="of:=IF(INDEX([Tracker.$A$1:.$AG$120];6+9*(MONTH([.$A355])-1)+(COLUMN()-4);DAY([.$A355])+2)&lt;&gt;&quot;&quot;;1;0)" table:style-name="ce92"/>
          <table:table-cell office:value-type="float" office:value="0" table:formula="of:=IF(INDEX([Tracker.$A$1:.$AG$120];6+9*(MONTH([.$A355])-1)+(COLUMN()-4);DAY([.$A355])+2)&lt;&gt;&quot;&quot;;1;0)" table:style-name="ce92"/>
          <table:table-cell office:value-type="float" office:value="0" table:formula="of:=IF(INDEX([Tracker.$A$1:.$AG$120];6+9*(MONTH([.$A355])-1)+(COLUMN()-4);DAY([.$A355])+2)&lt;&gt;&quot;&quot;;1;0)" table:style-name="ce92"/>
          <table:table-cell office:value-type="float" office:value="0" table:formula="of:=IF(INDEX([Tracker.$A$1:.$AG$120];6+9*(MONTH([.$A355])-1)+(COLUMN()-4);DAY([.$A355])+2)&lt;&gt;&quot;&quot;;1;0)" table:style-name="ce92"/>
          <table:table-cell office:value-type="float" office:value="0" table:formula="of:=IF(INDEX([Tracker.$A$1:.$AG$120];6+9*(MONTH([.$A355])-1)+(COLUMN()-4);DAY([.$A355])+2)&lt;&gt;&quot;&quot;;1;0)" table:style-name="ce92"/>
          <table:table-cell office:value-type="float" office:value="0" table:formula="of:=IF(INDEX([Tracker.$A$1:.$AG$120];6+9*(MONTH([.$A355])-1)+(COLUMN()-4);DAY([.$A355])+2)&lt;&gt;&quot;&quot;;1;0)" table:style-name="ce92"/>
          <table:table-cell office:value-type="float" office:value="0" table:formula="of:=SUM([.D355:.I355])" table:style-name="ce6"/>
          <table:table-cell office:value-type="percentage" office:value="0" table:formula="of:=[.J355]/6" table:style-name="ce8">
            <text:p>0%</text:p>
          </table:table-cell>
          <table:table-cell table:style-name="ce1"/>
          <table:table-cell office:value-type="float" office:value="0" table:formula="of:=IF([.D355]=1;[.M354]+1;0)" table:style-name="ce1">
            <text:p>0</text:p>
          </table:table-cell>
          <table:table-cell office:value-type="float" office:value="0" table:formula="of:=IF([.E355]=1;[.N354]+1;0)" table:style-name="ce1">
            <text:p>0</text:p>
          </table:table-cell>
          <table:table-cell office:value-type="float" office:value="0" table:formula="of:=IF([.F355]=1;[.O354]+1;0)" table:style-name="ce1">
            <text:p>0</text:p>
          </table:table-cell>
          <table:table-cell office:value-type="float" office:value="0" table:formula="of:=IF([.G355]=1;[.P354]+1;0)" table:style-name="ce1">
            <text:p>0</text:p>
          </table:table-cell>
          <table:table-cell office:value-type="float" office:value="0" table:formula="of:=IF([.H355]=1;[.Q354]+1;0)" table:style-name="ce1">
            <text:p>0</text:p>
          </table:table-cell>
          <table:table-cell office:value-type="float" office:value="0" table:formula="of:=IF([.I355]=1;[.R35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19T00:00:00" table:formula="of:=[.A355]+1" table:style-name="ce10">
            <text:p>Sat, 19 Dec 2026</text:p>
          </table:table-cell>
          <table:table-cell office:value-type="string" office:string-value="Sat" table:formula="of:=TEXT([.A356];&quot;ddd&quot;)" table:style-name="ce5">
            <text:p>Sat</text:p>
          </table:table-cell>
          <table:table-cell office:value-type="string" office:string-value="Dec" table:formula="of:=TEXT([.A356];&quot;mmm&quot;)" table:style-name="ce5">
            <text:p>Dec</text:p>
          </table:table-cell>
          <table:table-cell office:value-type="float" office:value="0" table:formula="of:=IF(INDEX([Tracker.$A$1:.$AG$120];6+9*(MONTH([.$A356])-1)+(COLUMN()-4);DAY([.$A356])+2)&lt;&gt;&quot;&quot;;1;0)" table:style-name="ce92"/>
          <table:table-cell office:value-type="float" office:value="0" table:formula="of:=IF(INDEX([Tracker.$A$1:.$AG$120];6+9*(MONTH([.$A356])-1)+(COLUMN()-4);DAY([.$A356])+2)&lt;&gt;&quot;&quot;;1;0)" table:style-name="ce92"/>
          <table:table-cell office:value-type="float" office:value="0" table:formula="of:=IF(INDEX([Tracker.$A$1:.$AG$120];6+9*(MONTH([.$A356])-1)+(COLUMN()-4);DAY([.$A356])+2)&lt;&gt;&quot;&quot;;1;0)" table:style-name="ce92"/>
          <table:table-cell office:value-type="float" office:value="0" table:formula="of:=IF(INDEX([Tracker.$A$1:.$AG$120];6+9*(MONTH([.$A356])-1)+(COLUMN()-4);DAY([.$A356])+2)&lt;&gt;&quot;&quot;;1;0)" table:style-name="ce92"/>
          <table:table-cell office:value-type="float" office:value="0" table:formula="of:=IF(INDEX([Tracker.$A$1:.$AG$120];6+9*(MONTH([.$A356])-1)+(COLUMN()-4);DAY([.$A356])+2)&lt;&gt;&quot;&quot;;1;0)" table:style-name="ce92"/>
          <table:table-cell office:value-type="float" office:value="0" table:formula="of:=IF(INDEX([Tracker.$A$1:.$AG$120];6+9*(MONTH([.$A356])-1)+(COLUMN()-4);DAY([.$A356])+2)&lt;&gt;&quot;&quot;;1;0)" table:style-name="ce92"/>
          <table:table-cell office:value-type="float" office:value="0" table:formula="of:=SUM([.D356:.I356])" table:style-name="ce6"/>
          <table:table-cell office:value-type="percentage" office:value="0" table:formula="of:=[.J356]/6" table:style-name="ce8">
            <text:p>0%</text:p>
          </table:table-cell>
          <table:table-cell table:style-name="ce1"/>
          <table:table-cell office:value-type="float" office:value="0" table:formula="of:=IF([.D356]=1;[.M355]+1;0)" table:style-name="ce1">
            <text:p>0</text:p>
          </table:table-cell>
          <table:table-cell office:value-type="float" office:value="0" table:formula="of:=IF([.E356]=1;[.N355]+1;0)" table:style-name="ce1">
            <text:p>0</text:p>
          </table:table-cell>
          <table:table-cell office:value-type="float" office:value="0" table:formula="of:=IF([.F356]=1;[.O355]+1;0)" table:style-name="ce1">
            <text:p>0</text:p>
          </table:table-cell>
          <table:table-cell office:value-type="float" office:value="0" table:formula="of:=IF([.G356]=1;[.P355]+1;0)" table:style-name="ce1">
            <text:p>0</text:p>
          </table:table-cell>
          <table:table-cell office:value-type="float" office:value="0" table:formula="of:=IF([.H356]=1;[.Q355]+1;0)" table:style-name="ce1">
            <text:p>0</text:p>
          </table:table-cell>
          <table:table-cell office:value-type="float" office:value="0" table:formula="of:=IF([.I356]=1;[.R35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0T00:00:00" table:formula="of:=[.A356]+1" table:style-name="ce10">
            <text:p>Sun, 20 Dec 2026</text:p>
          </table:table-cell>
          <table:table-cell office:value-type="string" office:string-value="Sun" table:formula="of:=TEXT([.A357];&quot;ddd&quot;)" table:style-name="ce5">
            <text:p>Sun</text:p>
          </table:table-cell>
          <table:table-cell office:value-type="string" office:string-value="Dec" table:formula="of:=TEXT([.A357];&quot;mmm&quot;)" table:style-name="ce5">
            <text:p>Dec</text:p>
          </table:table-cell>
          <table:table-cell office:value-type="float" office:value="0" table:formula="of:=IF(INDEX([Tracker.$A$1:.$AG$120];6+9*(MONTH([.$A357])-1)+(COLUMN()-4);DAY([.$A357])+2)&lt;&gt;&quot;&quot;;1;0)" table:style-name="ce92"/>
          <table:table-cell office:value-type="float" office:value="0" table:formula="of:=IF(INDEX([Tracker.$A$1:.$AG$120];6+9*(MONTH([.$A357])-1)+(COLUMN()-4);DAY([.$A357])+2)&lt;&gt;&quot;&quot;;1;0)" table:style-name="ce92"/>
          <table:table-cell office:value-type="float" office:value="0" table:formula="of:=IF(INDEX([Tracker.$A$1:.$AG$120];6+9*(MONTH([.$A357])-1)+(COLUMN()-4);DAY([.$A357])+2)&lt;&gt;&quot;&quot;;1;0)" table:style-name="ce92"/>
          <table:table-cell office:value-type="float" office:value="0" table:formula="of:=IF(INDEX([Tracker.$A$1:.$AG$120];6+9*(MONTH([.$A357])-1)+(COLUMN()-4);DAY([.$A357])+2)&lt;&gt;&quot;&quot;;1;0)" table:style-name="ce92"/>
          <table:table-cell office:value-type="float" office:value="0" table:formula="of:=IF(INDEX([Tracker.$A$1:.$AG$120];6+9*(MONTH([.$A357])-1)+(COLUMN()-4);DAY([.$A357])+2)&lt;&gt;&quot;&quot;;1;0)" table:style-name="ce92"/>
          <table:table-cell office:value-type="float" office:value="0" table:formula="of:=IF(INDEX([Tracker.$A$1:.$AG$120];6+9*(MONTH([.$A357])-1)+(COLUMN()-4);DAY([.$A357])+2)&lt;&gt;&quot;&quot;;1;0)" table:style-name="ce92"/>
          <table:table-cell office:value-type="float" office:value="0" table:formula="of:=SUM([.D357:.I357])" table:style-name="ce6"/>
          <table:table-cell office:value-type="percentage" office:value="0" table:formula="of:=[.J357]/6" table:style-name="ce8">
            <text:p>0%</text:p>
          </table:table-cell>
          <table:table-cell table:style-name="ce1"/>
          <table:table-cell office:value-type="float" office:value="0" table:formula="of:=IF([.D357]=1;[.M356]+1;0)" table:style-name="ce1">
            <text:p>0</text:p>
          </table:table-cell>
          <table:table-cell office:value-type="float" office:value="0" table:formula="of:=IF([.E357]=1;[.N356]+1;0)" table:style-name="ce1">
            <text:p>0</text:p>
          </table:table-cell>
          <table:table-cell office:value-type="float" office:value="0" table:formula="of:=IF([.F357]=1;[.O356]+1;0)" table:style-name="ce1">
            <text:p>0</text:p>
          </table:table-cell>
          <table:table-cell office:value-type="float" office:value="0" table:formula="of:=IF([.G357]=1;[.P356]+1;0)" table:style-name="ce1">
            <text:p>0</text:p>
          </table:table-cell>
          <table:table-cell office:value-type="float" office:value="0" table:formula="of:=IF([.H357]=1;[.Q356]+1;0)" table:style-name="ce1">
            <text:p>0</text:p>
          </table:table-cell>
          <table:table-cell office:value-type="float" office:value="0" table:formula="of:=IF([.I357]=1;[.R35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1T00:00:00" table:formula="of:=[.A357]+1" table:style-name="ce10">
            <text:p>Mon, 21 Dec 2026</text:p>
          </table:table-cell>
          <table:table-cell office:value-type="string" office:string-value="Mon" table:formula="of:=TEXT([.A358];&quot;ddd&quot;)" table:style-name="ce5">
            <text:p>Mon</text:p>
          </table:table-cell>
          <table:table-cell office:value-type="string" office:string-value="Dec" table:formula="of:=TEXT([.A358];&quot;mmm&quot;)" table:style-name="ce5">
            <text:p>Dec</text:p>
          </table:table-cell>
          <table:table-cell office:value-type="float" office:value="0" table:formula="of:=IF(INDEX([Tracker.$A$1:.$AG$120];6+9*(MONTH([.$A358])-1)+(COLUMN()-4);DAY([.$A358])+2)&lt;&gt;&quot;&quot;;1;0)" table:style-name="ce92"/>
          <table:table-cell office:value-type="float" office:value="0" table:formula="of:=IF(INDEX([Tracker.$A$1:.$AG$120];6+9*(MONTH([.$A358])-1)+(COLUMN()-4);DAY([.$A358])+2)&lt;&gt;&quot;&quot;;1;0)" table:style-name="ce92"/>
          <table:table-cell office:value-type="float" office:value="0" table:formula="of:=IF(INDEX([Tracker.$A$1:.$AG$120];6+9*(MONTH([.$A358])-1)+(COLUMN()-4);DAY([.$A358])+2)&lt;&gt;&quot;&quot;;1;0)" table:style-name="ce92"/>
          <table:table-cell office:value-type="float" office:value="0" table:formula="of:=IF(INDEX([Tracker.$A$1:.$AG$120];6+9*(MONTH([.$A358])-1)+(COLUMN()-4);DAY([.$A358])+2)&lt;&gt;&quot;&quot;;1;0)" table:style-name="ce92"/>
          <table:table-cell office:value-type="float" office:value="0" table:formula="of:=IF(INDEX([Tracker.$A$1:.$AG$120];6+9*(MONTH([.$A358])-1)+(COLUMN()-4);DAY([.$A358])+2)&lt;&gt;&quot;&quot;;1;0)" table:style-name="ce92"/>
          <table:table-cell office:value-type="float" office:value="0" table:formula="of:=IF(INDEX([Tracker.$A$1:.$AG$120];6+9*(MONTH([.$A358])-1)+(COLUMN()-4);DAY([.$A358])+2)&lt;&gt;&quot;&quot;;1;0)" table:style-name="ce92"/>
          <table:table-cell office:value-type="float" office:value="0" table:formula="of:=SUM([.D358:.I358])" table:style-name="ce6"/>
          <table:table-cell office:value-type="percentage" office:value="0" table:formula="of:=[.J358]/6" table:style-name="ce8">
            <text:p>0%</text:p>
          </table:table-cell>
          <table:table-cell table:style-name="ce1"/>
          <table:table-cell office:value-type="float" office:value="0" table:formula="of:=IF([.D358]=1;[.M357]+1;0)" table:style-name="ce1">
            <text:p>0</text:p>
          </table:table-cell>
          <table:table-cell office:value-type="float" office:value="0" table:formula="of:=IF([.E358]=1;[.N357]+1;0)" table:style-name="ce1">
            <text:p>0</text:p>
          </table:table-cell>
          <table:table-cell office:value-type="float" office:value="0" table:formula="of:=IF([.F358]=1;[.O357]+1;0)" table:style-name="ce1">
            <text:p>0</text:p>
          </table:table-cell>
          <table:table-cell office:value-type="float" office:value="0" table:formula="of:=IF([.G358]=1;[.P357]+1;0)" table:style-name="ce1">
            <text:p>0</text:p>
          </table:table-cell>
          <table:table-cell office:value-type="float" office:value="0" table:formula="of:=IF([.H358]=1;[.Q357]+1;0)" table:style-name="ce1">
            <text:p>0</text:p>
          </table:table-cell>
          <table:table-cell office:value-type="float" office:value="0" table:formula="of:=IF([.I358]=1;[.R357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2T00:00:00" table:formula="of:=[.A358]+1" table:style-name="ce10">
            <text:p>Tue, 22 Dec 2026</text:p>
          </table:table-cell>
          <table:table-cell office:value-type="string" office:string-value="Tue" table:formula="of:=TEXT([.A359];&quot;ddd&quot;)" table:style-name="ce5">
            <text:p>Tue</text:p>
          </table:table-cell>
          <table:table-cell office:value-type="string" office:string-value="Dec" table:formula="of:=TEXT([.A359];&quot;mmm&quot;)" table:style-name="ce5">
            <text:p>Dec</text:p>
          </table:table-cell>
          <table:table-cell office:value-type="float" office:value="0" table:formula="of:=IF(INDEX([Tracker.$A$1:.$AG$120];6+9*(MONTH([.$A359])-1)+(COLUMN()-4);DAY([.$A359])+2)&lt;&gt;&quot;&quot;;1;0)" table:style-name="ce92"/>
          <table:table-cell office:value-type="float" office:value="0" table:formula="of:=IF(INDEX([Tracker.$A$1:.$AG$120];6+9*(MONTH([.$A359])-1)+(COLUMN()-4);DAY([.$A359])+2)&lt;&gt;&quot;&quot;;1;0)" table:style-name="ce92"/>
          <table:table-cell office:value-type="float" office:value="0" table:formula="of:=IF(INDEX([Tracker.$A$1:.$AG$120];6+9*(MONTH([.$A359])-1)+(COLUMN()-4);DAY([.$A359])+2)&lt;&gt;&quot;&quot;;1;0)" table:style-name="ce92"/>
          <table:table-cell office:value-type="float" office:value="0" table:formula="of:=IF(INDEX([Tracker.$A$1:.$AG$120];6+9*(MONTH([.$A359])-1)+(COLUMN()-4);DAY([.$A359])+2)&lt;&gt;&quot;&quot;;1;0)" table:style-name="ce92"/>
          <table:table-cell office:value-type="float" office:value="0" table:formula="of:=IF(INDEX([Tracker.$A$1:.$AG$120];6+9*(MONTH([.$A359])-1)+(COLUMN()-4);DAY([.$A359])+2)&lt;&gt;&quot;&quot;;1;0)" table:style-name="ce92"/>
          <table:table-cell office:value-type="float" office:value="0" table:formula="of:=IF(INDEX([Tracker.$A$1:.$AG$120];6+9*(MONTH([.$A359])-1)+(COLUMN()-4);DAY([.$A359])+2)&lt;&gt;&quot;&quot;;1;0)" table:style-name="ce92"/>
          <table:table-cell office:value-type="float" office:value="0" table:formula="of:=SUM([.D359:.I359])" table:style-name="ce6"/>
          <table:table-cell office:value-type="percentage" office:value="0" table:formula="of:=[.J359]/6" table:style-name="ce8">
            <text:p>0%</text:p>
          </table:table-cell>
          <table:table-cell table:style-name="ce1"/>
          <table:table-cell office:value-type="float" office:value="0" table:formula="of:=IF([.D359]=1;[.M358]+1;0)" table:style-name="ce1">
            <text:p>0</text:p>
          </table:table-cell>
          <table:table-cell office:value-type="float" office:value="0" table:formula="of:=IF([.E359]=1;[.N358]+1;0)" table:style-name="ce1">
            <text:p>0</text:p>
          </table:table-cell>
          <table:table-cell office:value-type="float" office:value="0" table:formula="of:=IF([.F359]=1;[.O358]+1;0)" table:style-name="ce1">
            <text:p>0</text:p>
          </table:table-cell>
          <table:table-cell office:value-type="float" office:value="0" table:formula="of:=IF([.G359]=1;[.P358]+1;0)" table:style-name="ce1">
            <text:p>0</text:p>
          </table:table-cell>
          <table:table-cell office:value-type="float" office:value="0" table:formula="of:=IF([.H359]=1;[.Q358]+1;0)" table:style-name="ce1">
            <text:p>0</text:p>
          </table:table-cell>
          <table:table-cell office:value-type="float" office:value="0" table:formula="of:=IF([.I359]=1;[.R358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3T00:00:00" table:formula="of:=[.A359]+1" table:style-name="ce10">
            <text:p>Wed, 23 Dec 2026</text:p>
          </table:table-cell>
          <table:table-cell office:value-type="string" office:string-value="Wed" table:formula="of:=TEXT([.A360];&quot;ddd&quot;)" table:style-name="ce5">
            <text:p>Wed</text:p>
          </table:table-cell>
          <table:table-cell office:value-type="string" office:string-value="Dec" table:formula="of:=TEXT([.A360];&quot;mmm&quot;)" table:style-name="ce5">
            <text:p>Dec</text:p>
          </table:table-cell>
          <table:table-cell office:value-type="float" office:value="0" table:formula="of:=IF(INDEX([Tracker.$A$1:.$AG$120];6+9*(MONTH([.$A360])-1)+(COLUMN()-4);DAY([.$A360])+2)&lt;&gt;&quot;&quot;;1;0)" table:style-name="ce92"/>
          <table:table-cell office:value-type="float" office:value="0" table:formula="of:=IF(INDEX([Tracker.$A$1:.$AG$120];6+9*(MONTH([.$A360])-1)+(COLUMN()-4);DAY([.$A360])+2)&lt;&gt;&quot;&quot;;1;0)" table:style-name="ce92"/>
          <table:table-cell office:value-type="float" office:value="0" table:formula="of:=IF(INDEX([Tracker.$A$1:.$AG$120];6+9*(MONTH([.$A360])-1)+(COLUMN()-4);DAY([.$A360])+2)&lt;&gt;&quot;&quot;;1;0)" table:style-name="ce92"/>
          <table:table-cell office:value-type="float" office:value="0" table:formula="of:=IF(INDEX([Tracker.$A$1:.$AG$120];6+9*(MONTH([.$A360])-1)+(COLUMN()-4);DAY([.$A360])+2)&lt;&gt;&quot;&quot;;1;0)" table:style-name="ce92"/>
          <table:table-cell office:value-type="float" office:value="0" table:formula="of:=IF(INDEX([Tracker.$A$1:.$AG$120];6+9*(MONTH([.$A360])-1)+(COLUMN()-4);DAY([.$A360])+2)&lt;&gt;&quot;&quot;;1;0)" table:style-name="ce92"/>
          <table:table-cell office:value-type="float" office:value="0" table:formula="of:=IF(INDEX([Tracker.$A$1:.$AG$120];6+9*(MONTH([.$A360])-1)+(COLUMN()-4);DAY([.$A360])+2)&lt;&gt;&quot;&quot;;1;0)" table:style-name="ce92"/>
          <table:table-cell office:value-type="float" office:value="0" table:formula="of:=SUM([.D360:.I360])" table:style-name="ce6"/>
          <table:table-cell office:value-type="percentage" office:value="0" table:formula="of:=[.J360]/6" table:style-name="ce8">
            <text:p>0%</text:p>
          </table:table-cell>
          <table:table-cell table:style-name="ce1"/>
          <table:table-cell office:value-type="float" office:value="0" table:formula="of:=IF([.D360]=1;[.M359]+1;0)" table:style-name="ce1">
            <text:p>0</text:p>
          </table:table-cell>
          <table:table-cell office:value-type="float" office:value="0" table:formula="of:=IF([.E360]=1;[.N359]+1;0)" table:style-name="ce1">
            <text:p>0</text:p>
          </table:table-cell>
          <table:table-cell office:value-type="float" office:value="0" table:formula="of:=IF([.F360]=1;[.O359]+1;0)" table:style-name="ce1">
            <text:p>0</text:p>
          </table:table-cell>
          <table:table-cell office:value-type="float" office:value="0" table:formula="of:=IF([.G360]=1;[.P359]+1;0)" table:style-name="ce1">
            <text:p>0</text:p>
          </table:table-cell>
          <table:table-cell office:value-type="float" office:value="0" table:formula="of:=IF([.H360]=1;[.Q359]+1;0)" table:style-name="ce1">
            <text:p>0</text:p>
          </table:table-cell>
          <table:table-cell office:value-type="float" office:value="0" table:formula="of:=IF([.I360]=1;[.R359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4T00:00:00" table:formula="of:=[.A360]+1" table:style-name="ce10">
            <text:p>Thu, 24 Dec 2026</text:p>
          </table:table-cell>
          <table:table-cell office:value-type="string" office:string-value="Thu" table:formula="of:=TEXT([.A361];&quot;ddd&quot;)" table:style-name="ce5">
            <text:p>Thu</text:p>
          </table:table-cell>
          <table:table-cell office:value-type="string" office:string-value="Dec" table:formula="of:=TEXT([.A361];&quot;mmm&quot;)" table:style-name="ce5">
            <text:p>Dec</text:p>
          </table:table-cell>
          <table:table-cell office:value-type="float" office:value="0" table:formula="of:=IF(INDEX([Tracker.$A$1:.$AG$120];6+9*(MONTH([.$A361])-1)+(COLUMN()-4);DAY([.$A361])+2)&lt;&gt;&quot;&quot;;1;0)" table:style-name="ce92"/>
          <table:table-cell office:value-type="float" office:value="0" table:formula="of:=IF(INDEX([Tracker.$A$1:.$AG$120];6+9*(MONTH([.$A361])-1)+(COLUMN()-4);DAY([.$A361])+2)&lt;&gt;&quot;&quot;;1;0)" table:style-name="ce92"/>
          <table:table-cell office:value-type="float" office:value="0" table:formula="of:=IF(INDEX([Tracker.$A$1:.$AG$120];6+9*(MONTH([.$A361])-1)+(COLUMN()-4);DAY([.$A361])+2)&lt;&gt;&quot;&quot;;1;0)" table:style-name="ce92"/>
          <table:table-cell office:value-type="float" office:value="0" table:formula="of:=IF(INDEX([Tracker.$A$1:.$AG$120];6+9*(MONTH([.$A361])-1)+(COLUMN()-4);DAY([.$A361])+2)&lt;&gt;&quot;&quot;;1;0)" table:style-name="ce92"/>
          <table:table-cell office:value-type="float" office:value="0" table:formula="of:=IF(INDEX([Tracker.$A$1:.$AG$120];6+9*(MONTH([.$A361])-1)+(COLUMN()-4);DAY([.$A361])+2)&lt;&gt;&quot;&quot;;1;0)" table:style-name="ce92"/>
          <table:table-cell office:value-type="float" office:value="0" table:formula="of:=IF(INDEX([Tracker.$A$1:.$AG$120];6+9*(MONTH([.$A361])-1)+(COLUMN()-4);DAY([.$A361])+2)&lt;&gt;&quot;&quot;;1;0)" table:style-name="ce92"/>
          <table:table-cell office:value-type="float" office:value="0" table:formula="of:=SUM([.D361:.I361])" table:style-name="ce6"/>
          <table:table-cell office:value-type="percentage" office:value="0" table:formula="of:=[.J361]/6" table:style-name="ce8">
            <text:p>0%</text:p>
          </table:table-cell>
          <table:table-cell table:style-name="ce1"/>
          <table:table-cell office:value-type="float" office:value="0" table:formula="of:=IF([.D361]=1;[.M360]+1;0)" table:style-name="ce1">
            <text:p>0</text:p>
          </table:table-cell>
          <table:table-cell office:value-type="float" office:value="0" table:formula="of:=IF([.E361]=1;[.N360]+1;0)" table:style-name="ce1">
            <text:p>0</text:p>
          </table:table-cell>
          <table:table-cell office:value-type="float" office:value="0" table:formula="of:=IF([.F361]=1;[.O360]+1;0)" table:style-name="ce1">
            <text:p>0</text:p>
          </table:table-cell>
          <table:table-cell office:value-type="float" office:value="0" table:formula="of:=IF([.G361]=1;[.P360]+1;0)" table:style-name="ce1">
            <text:p>0</text:p>
          </table:table-cell>
          <table:table-cell office:value-type="float" office:value="0" table:formula="of:=IF([.H361]=1;[.Q360]+1;0)" table:style-name="ce1">
            <text:p>0</text:p>
          </table:table-cell>
          <table:table-cell office:value-type="float" office:value="0" table:formula="of:=IF([.I361]=1;[.R360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5T00:00:00" table:formula="of:=[.A361]+1" table:style-name="ce10">
            <text:p>Fri, 25 Dec 2026</text:p>
          </table:table-cell>
          <table:table-cell office:value-type="string" office:string-value="Fri" table:formula="of:=TEXT([.A362];&quot;ddd&quot;)" table:style-name="ce5">
            <text:p>Fri</text:p>
          </table:table-cell>
          <table:table-cell office:value-type="string" office:string-value="Dec" table:formula="of:=TEXT([.A362];&quot;mmm&quot;)" table:style-name="ce5">
            <text:p>Dec</text:p>
          </table:table-cell>
          <table:table-cell office:value-type="float" office:value="0" table:formula="of:=IF(INDEX([Tracker.$A$1:.$AG$120];6+9*(MONTH([.$A362])-1)+(COLUMN()-4);DAY([.$A362])+2)&lt;&gt;&quot;&quot;;1;0)" table:style-name="ce92"/>
          <table:table-cell office:value-type="float" office:value="0" table:formula="of:=IF(INDEX([Tracker.$A$1:.$AG$120];6+9*(MONTH([.$A362])-1)+(COLUMN()-4);DAY([.$A362])+2)&lt;&gt;&quot;&quot;;1;0)" table:style-name="ce92"/>
          <table:table-cell office:value-type="float" office:value="0" table:formula="of:=IF(INDEX([Tracker.$A$1:.$AG$120];6+9*(MONTH([.$A362])-1)+(COLUMN()-4);DAY([.$A362])+2)&lt;&gt;&quot;&quot;;1;0)" table:style-name="ce92"/>
          <table:table-cell office:value-type="float" office:value="0" table:formula="of:=IF(INDEX([Tracker.$A$1:.$AG$120];6+9*(MONTH([.$A362])-1)+(COLUMN()-4);DAY([.$A362])+2)&lt;&gt;&quot;&quot;;1;0)" table:style-name="ce92"/>
          <table:table-cell office:value-type="float" office:value="0" table:formula="of:=IF(INDEX([Tracker.$A$1:.$AG$120];6+9*(MONTH([.$A362])-1)+(COLUMN()-4);DAY([.$A362])+2)&lt;&gt;&quot;&quot;;1;0)" table:style-name="ce92"/>
          <table:table-cell office:value-type="float" office:value="0" table:formula="of:=IF(INDEX([Tracker.$A$1:.$AG$120];6+9*(MONTH([.$A362])-1)+(COLUMN()-4);DAY([.$A362])+2)&lt;&gt;&quot;&quot;;1;0)" table:style-name="ce92"/>
          <table:table-cell office:value-type="float" office:value="0" table:formula="of:=SUM([.D362:.I362])" table:style-name="ce6"/>
          <table:table-cell office:value-type="percentage" office:value="0" table:formula="of:=[.J362]/6" table:style-name="ce8">
            <text:p>0%</text:p>
          </table:table-cell>
          <table:table-cell table:style-name="ce1"/>
          <table:table-cell office:value-type="float" office:value="0" table:formula="of:=IF([.D362]=1;[.M361]+1;0)" table:style-name="ce1">
            <text:p>0</text:p>
          </table:table-cell>
          <table:table-cell office:value-type="float" office:value="0" table:formula="of:=IF([.E362]=1;[.N361]+1;0)" table:style-name="ce1">
            <text:p>0</text:p>
          </table:table-cell>
          <table:table-cell office:value-type="float" office:value="0" table:formula="of:=IF([.F362]=1;[.O361]+1;0)" table:style-name="ce1">
            <text:p>0</text:p>
          </table:table-cell>
          <table:table-cell office:value-type="float" office:value="0" table:formula="of:=IF([.G362]=1;[.P361]+1;0)" table:style-name="ce1">
            <text:p>0</text:p>
          </table:table-cell>
          <table:table-cell office:value-type="float" office:value="0" table:formula="of:=IF([.H362]=1;[.Q361]+1;0)" table:style-name="ce1">
            <text:p>0</text:p>
          </table:table-cell>
          <table:table-cell office:value-type="float" office:value="0" table:formula="of:=IF([.I362]=1;[.R361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6T00:00:00" table:formula="of:=[.A362]+1" table:style-name="ce10">
            <text:p>Sat, 26 Dec 2026</text:p>
          </table:table-cell>
          <table:table-cell office:value-type="string" office:string-value="Sat" table:formula="of:=TEXT([.A363];&quot;ddd&quot;)" table:style-name="ce5">
            <text:p>Sat</text:p>
          </table:table-cell>
          <table:table-cell office:value-type="string" office:string-value="Dec" table:formula="of:=TEXT([.A363];&quot;mmm&quot;)" table:style-name="ce5">
            <text:p>Dec</text:p>
          </table:table-cell>
          <table:table-cell office:value-type="float" office:value="0" table:formula="of:=IF(INDEX([Tracker.$A$1:.$AG$120];6+9*(MONTH([.$A363])-1)+(COLUMN()-4);DAY([.$A363])+2)&lt;&gt;&quot;&quot;;1;0)" table:style-name="ce92"/>
          <table:table-cell office:value-type="float" office:value="0" table:formula="of:=IF(INDEX([Tracker.$A$1:.$AG$120];6+9*(MONTH([.$A363])-1)+(COLUMN()-4);DAY([.$A363])+2)&lt;&gt;&quot;&quot;;1;0)" table:style-name="ce92"/>
          <table:table-cell office:value-type="float" office:value="0" table:formula="of:=IF(INDEX([Tracker.$A$1:.$AG$120];6+9*(MONTH([.$A363])-1)+(COLUMN()-4);DAY([.$A363])+2)&lt;&gt;&quot;&quot;;1;0)" table:style-name="ce92"/>
          <table:table-cell office:value-type="float" office:value="0" table:formula="of:=IF(INDEX([Tracker.$A$1:.$AG$120];6+9*(MONTH([.$A363])-1)+(COLUMN()-4);DAY([.$A363])+2)&lt;&gt;&quot;&quot;;1;0)" table:style-name="ce92"/>
          <table:table-cell office:value-type="float" office:value="0" table:formula="of:=IF(INDEX([Tracker.$A$1:.$AG$120];6+9*(MONTH([.$A363])-1)+(COLUMN()-4);DAY([.$A363])+2)&lt;&gt;&quot;&quot;;1;0)" table:style-name="ce92"/>
          <table:table-cell office:value-type="float" office:value="0" table:formula="of:=IF(INDEX([Tracker.$A$1:.$AG$120];6+9*(MONTH([.$A363])-1)+(COLUMN()-4);DAY([.$A363])+2)&lt;&gt;&quot;&quot;;1;0)" table:style-name="ce92"/>
          <table:table-cell office:value-type="float" office:value="0" table:formula="of:=SUM([.D363:.I363])" table:style-name="ce6"/>
          <table:table-cell office:value-type="percentage" office:value="0" table:formula="of:=[.J363]/6" table:style-name="ce8">
            <text:p>0%</text:p>
          </table:table-cell>
          <table:table-cell table:style-name="ce1"/>
          <table:table-cell office:value-type="float" office:value="0" table:formula="of:=IF([.D363]=1;[.M362]+1;0)" table:style-name="ce1">
            <text:p>0</text:p>
          </table:table-cell>
          <table:table-cell office:value-type="float" office:value="0" table:formula="of:=IF([.E363]=1;[.N362]+1;0)" table:style-name="ce1">
            <text:p>0</text:p>
          </table:table-cell>
          <table:table-cell office:value-type="float" office:value="0" table:formula="of:=IF([.F363]=1;[.O362]+1;0)" table:style-name="ce1">
            <text:p>0</text:p>
          </table:table-cell>
          <table:table-cell office:value-type="float" office:value="0" table:formula="of:=IF([.G363]=1;[.P362]+1;0)" table:style-name="ce1">
            <text:p>0</text:p>
          </table:table-cell>
          <table:table-cell office:value-type="float" office:value="0" table:formula="of:=IF([.H363]=1;[.Q362]+1;0)" table:style-name="ce1">
            <text:p>0</text:p>
          </table:table-cell>
          <table:table-cell office:value-type="float" office:value="0" table:formula="of:=IF([.I363]=1;[.R362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7T00:00:00" table:formula="of:=[.A363]+1" table:style-name="ce10">
            <text:p>Sun, 27 Dec 2026</text:p>
          </table:table-cell>
          <table:table-cell office:value-type="string" office:string-value="Sun" table:formula="of:=TEXT([.A364];&quot;ddd&quot;)" table:style-name="ce5">
            <text:p>Sun</text:p>
          </table:table-cell>
          <table:table-cell office:value-type="string" office:string-value="Dec" table:formula="of:=TEXT([.A364];&quot;mmm&quot;)" table:style-name="ce5">
            <text:p>Dec</text:p>
          </table:table-cell>
          <table:table-cell office:value-type="float" office:value="0" table:formula="of:=IF(INDEX([Tracker.$A$1:.$AG$120];6+9*(MONTH([.$A364])-1)+(COLUMN()-4);DAY([.$A364])+2)&lt;&gt;&quot;&quot;;1;0)" table:style-name="ce92"/>
          <table:table-cell office:value-type="float" office:value="0" table:formula="of:=IF(INDEX([Tracker.$A$1:.$AG$120];6+9*(MONTH([.$A364])-1)+(COLUMN()-4);DAY([.$A364])+2)&lt;&gt;&quot;&quot;;1;0)" table:style-name="ce92"/>
          <table:table-cell office:value-type="float" office:value="0" table:formula="of:=IF(INDEX([Tracker.$A$1:.$AG$120];6+9*(MONTH([.$A364])-1)+(COLUMN()-4);DAY([.$A364])+2)&lt;&gt;&quot;&quot;;1;0)" table:style-name="ce92"/>
          <table:table-cell office:value-type="float" office:value="0" table:formula="of:=IF(INDEX([Tracker.$A$1:.$AG$120];6+9*(MONTH([.$A364])-1)+(COLUMN()-4);DAY([.$A364])+2)&lt;&gt;&quot;&quot;;1;0)" table:style-name="ce92"/>
          <table:table-cell office:value-type="float" office:value="0" table:formula="of:=IF(INDEX([Tracker.$A$1:.$AG$120];6+9*(MONTH([.$A364])-1)+(COLUMN()-4);DAY([.$A364])+2)&lt;&gt;&quot;&quot;;1;0)" table:style-name="ce92"/>
          <table:table-cell office:value-type="float" office:value="0" table:formula="of:=IF(INDEX([Tracker.$A$1:.$AG$120];6+9*(MONTH([.$A364])-1)+(COLUMN()-4);DAY([.$A364])+2)&lt;&gt;&quot;&quot;;1;0)" table:style-name="ce92"/>
          <table:table-cell office:value-type="float" office:value="0" table:formula="of:=SUM([.D364:.I364])" table:style-name="ce6"/>
          <table:table-cell office:value-type="percentage" office:value="0" table:formula="of:=[.J364]/6" table:style-name="ce8">
            <text:p>0%</text:p>
          </table:table-cell>
          <table:table-cell table:style-name="ce1"/>
          <table:table-cell office:value-type="float" office:value="0" table:formula="of:=IF([.D364]=1;[.M363]+1;0)" table:style-name="ce1">
            <text:p>0</text:p>
          </table:table-cell>
          <table:table-cell office:value-type="float" office:value="0" table:formula="of:=IF([.E364]=1;[.N363]+1;0)" table:style-name="ce1">
            <text:p>0</text:p>
          </table:table-cell>
          <table:table-cell office:value-type="float" office:value="0" table:formula="of:=IF([.F364]=1;[.O363]+1;0)" table:style-name="ce1">
            <text:p>0</text:p>
          </table:table-cell>
          <table:table-cell office:value-type="float" office:value="0" table:formula="of:=IF([.G364]=1;[.P363]+1;0)" table:style-name="ce1">
            <text:p>0</text:p>
          </table:table-cell>
          <table:table-cell office:value-type="float" office:value="0" table:formula="of:=IF([.H364]=1;[.Q363]+1;0)" table:style-name="ce1">
            <text:p>0</text:p>
          </table:table-cell>
          <table:table-cell office:value-type="float" office:value="0" table:formula="of:=IF([.I364]=1;[.R363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8T00:00:00" table:formula="of:=[.A364]+1" table:style-name="ce10">
            <text:p>Mon, 28 Dec 2026</text:p>
          </table:table-cell>
          <table:table-cell office:value-type="string" office:string-value="Mon" table:formula="of:=TEXT([.A365];&quot;ddd&quot;)" table:style-name="ce5">
            <text:p>Mon</text:p>
          </table:table-cell>
          <table:table-cell office:value-type="string" office:string-value="Dec" table:formula="of:=TEXT([.A365];&quot;mmm&quot;)" table:style-name="ce5">
            <text:p>Dec</text:p>
          </table:table-cell>
          <table:table-cell office:value-type="float" office:value="0" table:formula="of:=IF(INDEX([Tracker.$A$1:.$AG$120];6+9*(MONTH([.$A365])-1)+(COLUMN()-4);DAY([.$A365])+2)&lt;&gt;&quot;&quot;;1;0)" table:style-name="ce92"/>
          <table:table-cell office:value-type="float" office:value="0" table:formula="of:=IF(INDEX([Tracker.$A$1:.$AG$120];6+9*(MONTH([.$A365])-1)+(COLUMN()-4);DAY([.$A365])+2)&lt;&gt;&quot;&quot;;1;0)" table:style-name="ce92"/>
          <table:table-cell office:value-type="float" office:value="0" table:formula="of:=IF(INDEX([Tracker.$A$1:.$AG$120];6+9*(MONTH([.$A365])-1)+(COLUMN()-4);DAY([.$A365])+2)&lt;&gt;&quot;&quot;;1;0)" table:style-name="ce92"/>
          <table:table-cell office:value-type="float" office:value="0" table:formula="of:=IF(INDEX([Tracker.$A$1:.$AG$120];6+9*(MONTH([.$A365])-1)+(COLUMN()-4);DAY([.$A365])+2)&lt;&gt;&quot;&quot;;1;0)" table:style-name="ce92"/>
          <table:table-cell office:value-type="float" office:value="0" table:formula="of:=IF(INDEX([Tracker.$A$1:.$AG$120];6+9*(MONTH([.$A365])-1)+(COLUMN()-4);DAY([.$A365])+2)&lt;&gt;&quot;&quot;;1;0)" table:style-name="ce92"/>
          <table:table-cell office:value-type="float" office:value="0" table:formula="of:=IF(INDEX([Tracker.$A$1:.$AG$120];6+9*(MONTH([.$A365])-1)+(COLUMN()-4);DAY([.$A365])+2)&lt;&gt;&quot;&quot;;1;0)" table:style-name="ce92"/>
          <table:table-cell office:value-type="float" office:value="0" table:formula="of:=SUM([.D365:.I365])" table:style-name="ce6"/>
          <table:table-cell office:value-type="percentage" office:value="0" table:formula="of:=[.J365]/6" table:style-name="ce8">
            <text:p>0%</text:p>
          </table:table-cell>
          <table:table-cell table:style-name="ce1"/>
          <table:table-cell office:value-type="float" office:value="0" table:formula="of:=IF([.D365]=1;[.M364]+1;0)" table:style-name="ce1">
            <text:p>0</text:p>
          </table:table-cell>
          <table:table-cell office:value-type="float" office:value="0" table:formula="of:=IF([.E365]=1;[.N364]+1;0)" table:style-name="ce1">
            <text:p>0</text:p>
          </table:table-cell>
          <table:table-cell office:value-type="float" office:value="0" table:formula="of:=IF([.F365]=1;[.O364]+1;0)" table:style-name="ce1">
            <text:p>0</text:p>
          </table:table-cell>
          <table:table-cell office:value-type="float" office:value="0" table:formula="of:=IF([.G365]=1;[.P364]+1;0)" table:style-name="ce1">
            <text:p>0</text:p>
          </table:table-cell>
          <table:table-cell office:value-type="float" office:value="0" table:formula="of:=IF([.H365]=1;[.Q364]+1;0)" table:style-name="ce1">
            <text:p>0</text:p>
          </table:table-cell>
          <table:table-cell office:value-type="float" office:value="0" table:formula="of:=IF([.I365]=1;[.R364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29T00:00:00" table:formula="of:=[.A365]+1" table:style-name="ce10">
            <text:p>Tue, 29 Dec 2026</text:p>
          </table:table-cell>
          <table:table-cell office:value-type="string" office:string-value="Tue" table:formula="of:=TEXT([.A366];&quot;ddd&quot;)" table:style-name="ce5">
            <text:p>Tue</text:p>
          </table:table-cell>
          <table:table-cell office:value-type="string" office:string-value="Dec" table:formula="of:=TEXT([.A366];&quot;mmm&quot;)" table:style-name="ce5">
            <text:p>Dec</text:p>
          </table:table-cell>
          <table:table-cell office:value-type="float" office:value="0" table:formula="of:=IF(INDEX([Tracker.$A$1:.$AG$120];6+9*(MONTH([.$A366])-1)+(COLUMN()-4);DAY([.$A366])+2)&lt;&gt;&quot;&quot;;1;0)" table:style-name="ce92"/>
          <table:table-cell office:value-type="float" office:value="0" table:formula="of:=IF(INDEX([Tracker.$A$1:.$AG$120];6+9*(MONTH([.$A366])-1)+(COLUMN()-4);DAY([.$A366])+2)&lt;&gt;&quot;&quot;;1;0)" table:style-name="ce92"/>
          <table:table-cell office:value-type="float" office:value="0" table:formula="of:=IF(INDEX([Tracker.$A$1:.$AG$120];6+9*(MONTH([.$A366])-1)+(COLUMN()-4);DAY([.$A366])+2)&lt;&gt;&quot;&quot;;1;0)" table:style-name="ce92"/>
          <table:table-cell office:value-type="float" office:value="0" table:formula="of:=IF(INDEX([Tracker.$A$1:.$AG$120];6+9*(MONTH([.$A366])-1)+(COLUMN()-4);DAY([.$A366])+2)&lt;&gt;&quot;&quot;;1;0)" table:style-name="ce92"/>
          <table:table-cell office:value-type="float" office:value="0" table:formula="of:=IF(INDEX([Tracker.$A$1:.$AG$120];6+9*(MONTH([.$A366])-1)+(COLUMN()-4);DAY([.$A366])+2)&lt;&gt;&quot;&quot;;1;0)" table:style-name="ce92"/>
          <table:table-cell office:value-type="float" office:value="0" table:formula="of:=IF(INDEX([Tracker.$A$1:.$AG$120];6+9*(MONTH([.$A366])-1)+(COLUMN()-4);DAY([.$A366])+2)&lt;&gt;&quot;&quot;;1;0)" table:style-name="ce92"/>
          <table:table-cell office:value-type="float" office:value="0" table:formula="of:=SUM([.D366:.I366])" table:style-name="ce6"/>
          <table:table-cell office:value-type="percentage" office:value="0" table:formula="of:=[.J366]/6" table:style-name="ce8">
            <text:p>0%</text:p>
          </table:table-cell>
          <table:table-cell table:style-name="ce1"/>
          <table:table-cell office:value-type="float" office:value="0" table:formula="of:=IF([.D366]=1;[.M365]+1;0)" table:style-name="ce1">
            <text:p>0</text:p>
          </table:table-cell>
          <table:table-cell office:value-type="float" office:value="0" table:formula="of:=IF([.E366]=1;[.N365]+1;0)" table:style-name="ce1">
            <text:p>0</text:p>
          </table:table-cell>
          <table:table-cell office:value-type="float" office:value="0" table:formula="of:=IF([.F366]=1;[.O365]+1;0)" table:style-name="ce1">
            <text:p>0</text:p>
          </table:table-cell>
          <table:table-cell office:value-type="float" office:value="0" table:formula="of:=IF([.G366]=1;[.P365]+1;0)" table:style-name="ce1">
            <text:p>0</text:p>
          </table:table-cell>
          <table:table-cell office:value-type="float" office:value="0" table:formula="of:=IF([.H366]=1;[.Q365]+1;0)" table:style-name="ce1">
            <text:p>0</text:p>
          </table:table-cell>
          <table:table-cell office:value-type="float" office:value="0" table:formula="of:=IF([.I366]=1;[.R365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30T00:00:00" table:formula="of:=[.A366]+1" table:style-name="ce10">
            <text:p>Wed, 30 Dec 2026</text:p>
          </table:table-cell>
          <table:table-cell office:value-type="string" office:string-value="Wed" table:formula="of:=TEXT([.A367];&quot;ddd&quot;)" table:style-name="ce5">
            <text:p>Wed</text:p>
          </table:table-cell>
          <table:table-cell office:value-type="string" office:string-value="Dec" table:formula="of:=TEXT([.A367];&quot;mmm&quot;)" table:style-name="ce5">
            <text:p>Dec</text:p>
          </table:table-cell>
          <table:table-cell office:value-type="float" office:value="0" table:formula="of:=IF(INDEX([Tracker.$A$1:.$AG$120];6+9*(MONTH([.$A367])-1)+(COLUMN()-4);DAY([.$A367])+2)&lt;&gt;&quot;&quot;;1;0)" table:style-name="ce92"/>
          <table:table-cell office:value-type="float" office:value="0" table:formula="of:=IF(INDEX([Tracker.$A$1:.$AG$120];6+9*(MONTH([.$A367])-1)+(COLUMN()-4);DAY([.$A367])+2)&lt;&gt;&quot;&quot;;1;0)" table:style-name="ce92"/>
          <table:table-cell office:value-type="float" office:value="0" table:formula="of:=IF(INDEX([Tracker.$A$1:.$AG$120];6+9*(MONTH([.$A367])-1)+(COLUMN()-4);DAY([.$A367])+2)&lt;&gt;&quot;&quot;;1;0)" table:style-name="ce92"/>
          <table:table-cell office:value-type="float" office:value="0" table:formula="of:=IF(INDEX([Tracker.$A$1:.$AG$120];6+9*(MONTH([.$A367])-1)+(COLUMN()-4);DAY([.$A367])+2)&lt;&gt;&quot;&quot;;1;0)" table:style-name="ce92"/>
          <table:table-cell office:value-type="float" office:value="0" table:formula="of:=IF(INDEX([Tracker.$A$1:.$AG$120];6+9*(MONTH([.$A367])-1)+(COLUMN()-4);DAY([.$A367])+2)&lt;&gt;&quot;&quot;;1;0)" table:style-name="ce92"/>
          <table:table-cell office:value-type="float" office:value="0" table:formula="of:=IF(INDEX([Tracker.$A$1:.$AG$120];6+9*(MONTH([.$A367])-1)+(COLUMN()-4);DAY([.$A367])+2)&lt;&gt;&quot;&quot;;1;0)" table:style-name="ce92"/>
          <table:table-cell office:value-type="float" office:value="0" table:formula="of:=SUM([.D367:.I367])" table:style-name="ce6"/>
          <table:table-cell office:value-type="percentage" office:value="0" table:formula="of:=[.J367]/6" table:style-name="ce8">
            <text:p>0%</text:p>
          </table:table-cell>
          <table:table-cell table:style-name="ce1"/>
          <table:table-cell office:value-type="float" office:value="0" table:formula="of:=IF([.D367]=1;[.M366]+1;0)" table:style-name="ce1">
            <text:p>0</text:p>
          </table:table-cell>
          <table:table-cell office:value-type="float" office:value="0" table:formula="of:=IF([.E367]=1;[.N366]+1;0)" table:style-name="ce1">
            <text:p>0</text:p>
          </table:table-cell>
          <table:table-cell office:value-type="float" office:value="0" table:formula="of:=IF([.F367]=1;[.O366]+1;0)" table:style-name="ce1">
            <text:p>0</text:p>
          </table:table-cell>
          <table:table-cell office:value-type="float" office:value="0" table:formula="of:=IF([.G367]=1;[.P366]+1;0)" table:style-name="ce1">
            <text:p>0</text:p>
          </table:table-cell>
          <table:table-cell office:value-type="float" office:value="0" table:formula="of:=IF([.H367]=1;[.Q366]+1;0)" table:style-name="ce1">
            <text:p>0</text:p>
          </table:table-cell>
          <table:table-cell office:value-type="float" office:value="0" table:formula="of:=IF([.I367]=1;[.R366]+1;0)" table:style-name="ce1">
            <text:p>0</text:p>
          </table:table-cell>
          <table:table-cell table:number-columns-repeated="16366"/>
        </table:table-row>
        <table:table-row table:style-name="ro2">
          <table:table-cell office:value-type="date" office:date-value="2026-12-31T00:00:00" table:formula="of:=[.A367]+1" table:style-name="ce10">
            <text:p>Thu, 31 Dec 2026</text:p>
          </table:table-cell>
          <table:table-cell office:value-type="string" office:string-value="Thu" table:formula="of:=TEXT([.A368];&quot;ddd&quot;)" table:style-name="ce5">
            <text:p>Thu</text:p>
          </table:table-cell>
          <table:table-cell office:value-type="string" office:string-value="Dec" table:formula="of:=TEXT([.A368];&quot;mmm&quot;)" table:style-name="ce5">
            <text:p>Dec</text:p>
          </table:table-cell>
          <table:table-cell office:value-type="float" office:value="0" table:formula="of:=IF(INDEX([Tracker.$A$1:.$AG$120];6+9*(MONTH([.$A368])-1)+(COLUMN()-4);DAY([.$A368])+2)&lt;&gt;&quot;&quot;;1;0)" table:style-name="ce92"/>
          <table:table-cell office:value-type="float" office:value="0" table:formula="of:=IF(INDEX([Tracker.$A$1:.$AG$120];6+9*(MONTH([.$A368])-1)+(COLUMN()-4);DAY([.$A368])+2)&lt;&gt;&quot;&quot;;1;0)" table:style-name="ce92"/>
          <table:table-cell office:value-type="float" office:value="0" table:formula="of:=IF(INDEX([Tracker.$A$1:.$AG$120];6+9*(MONTH([.$A368])-1)+(COLUMN()-4);DAY([.$A368])+2)&lt;&gt;&quot;&quot;;1;0)" table:style-name="ce92"/>
          <table:table-cell office:value-type="float" office:value="0" table:formula="of:=IF(INDEX([Tracker.$A$1:.$AG$120];6+9*(MONTH([.$A368])-1)+(COLUMN()-4);DAY([.$A368])+2)&lt;&gt;&quot;&quot;;1;0)" table:style-name="ce92"/>
          <table:table-cell office:value-type="float" office:value="0" table:formula="of:=IF(INDEX([Tracker.$A$1:.$AG$120];6+9*(MONTH([.$A368])-1)+(COLUMN()-4);DAY([.$A368])+2)&lt;&gt;&quot;&quot;;1;0)" table:style-name="ce92"/>
          <table:table-cell office:value-type="float" office:value="0" table:formula="of:=IF(INDEX([Tracker.$A$1:.$AG$120];6+9*(MONTH([.$A368])-1)+(COLUMN()-4);DAY([.$A368])+2)&lt;&gt;&quot;&quot;;1;0)" table:style-name="ce92"/>
          <table:table-cell office:value-type="float" office:value="0" table:formula="of:=SUM([.D368:.I368])" table:style-name="ce6"/>
          <table:table-cell office:value-type="percentage" office:value="0" table:formula="of:=[.J368]/6" table:style-name="ce8">
            <text:p>0%</text:p>
          </table:table-cell>
          <table:table-cell table:style-name="ce1"/>
          <table:table-cell office:value-type="float" office:value="0" table:formula="of:=IF([.D368]=1;[.M367]+1;0)" table:style-name="ce1">
            <text:p>0</text:p>
          </table:table-cell>
          <table:table-cell office:value-type="float" office:value="0" table:formula="of:=IF([.E368]=1;[.N367]+1;0)" table:style-name="ce1">
            <text:p>0</text:p>
          </table:table-cell>
          <table:table-cell office:value-type="float" office:value="0" table:formula="of:=IF([.F368]=1;[.O367]+1;0)" table:style-name="ce1">
            <text:p>0</text:p>
          </table:table-cell>
          <table:table-cell office:value-type="float" office:value="0" table:formula="of:=IF([.G368]=1;[.P367]+1;0)" table:style-name="ce1">
            <text:p>0</text:p>
          </table:table-cell>
          <table:table-cell office:value-type="float" office:value="0" table:formula="of:=IF([.H368]=1;[.Q367]+1;0)" table:style-name="ce1">
            <text:p>0</text:p>
          </table:table-cell>
          <table:table-cell office:value-type="float" office:value="0" table:formula="of:=IF([.I368]=1;[.R367]+1;0)" table:style-name="ce1">
            <text:p>0</text:p>
          </table:table-cell>
          <table:table-cell table:number-columns-repeated="16366"/>
        </table:table-row>
        <table:table-row table:number-rows-repeated="10482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date-style style:name="N36">
      <number:day-of-week/>
      <number:text>, </number:text>
      <number:day number:style="long"/>
      <number:text> </number:text>
      <number:month number:textual="true"/>
      <number:text> </number:text>
      <number:year number:style="long"/>
    </number:date-style>
    <number:number-style style:name="N37P0">
      <number:number number:decimal-places="0" number:min-decimal-places="0" number:min-integer-digits="0"/>
    </number:number-style>
    <number:text-style style:name="N37P1"/>
    <number:text-style style:name="N37">
      <style:map style:condition="value()&gt;0" style:apply-style-name="N37P0"/>
      <style:map style:condition="value()&lt;0" style:apply-style-name="N37P1"/>
    </number:text-style>
    <number:percentage-style style:name="N38">
      <number:number number:decimal-places="1" number:min-decimal-places="1" number:min-integer-digits="1"/>
      <number:text>%</number:text>
    </number:percentage-style>
    <number:date-style style:name="N39">
      <number:month number:textual="true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ext-properties fo:color="#FFFFFF"/>
    </style:style>
    <style:style style:name="cf2" style:family="table-cell">
      <style:text-properties fo:color="#F4F6FB"/>
    </style:style>
    <style:style style:name="cf3" style:family="table-cell">
      <style:table-cell-properties fo:background-color="#63BE7B"/>
      <style:text-properties fo:color="#FFFFFF"/>
    </style:style>
    <style:style style:name="cf4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30026</meta:generator>
    <meta:initial-creator>krunal soni</meta:initial-creator>
    <dc:creator>krunal soni</dc:creator>
    <meta:creation-date>2026-06-14T12:35:22Z</meta:creation-date>
    <dc:date>2026-06-14T13:13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36">
      <number:month number:textual="true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6465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4167in" svg:stroke-color="#2a9d8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465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51.0pt" svg:width="382.0pt" chart:style-name="Crt0">
        <chart:title chart:style-name="CT00">
          <text:p text:style-name="a0" text:class-names="" text:cond-style-name="">Overall Completion % by Month</text:p>
        </chart:title>
        <chart:plot-area chart:style-name="Plt0">
          <chart:axis chart:dimension="x" chart:name="primary-x" chart:style-name="Axs0">
            <chart:categories table:cell-range-address="Dashboard.$A$18:.$A$29"/>
          </chart:axis>
          <chart:axis chart:dimension="y" chart:name="primary-y" chart:style-name="Axs1">
            <chart:grid chart:class="major" chart:style-name="GMa1"/>
          </chart:axis>
          <chart:series chart:label-cell-address="Dashboard.$H$17" chart:values-cell-range-address="Dashboard.$H$18:.$H$29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465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48235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e76f51" draw:opacity="100%" draw:stroke="none"/>
    </style:style>
    <style:style style:family="chart" style:name="G0S0P1">
      <style:graphic-properties draw:fill="solid" draw:fill-color="#2a9d8f" draw:opacity="100%" draw:stroke="none"/>
    </style:style>
    <style:style style:family="chart" style:name="G0S0P2">
      <style:graphic-properties draw:fill="solid" draw:fill-color="#6d597a" draw:opacity="100%" draw:stroke="none"/>
    </style:style>
    <style:style style:family="chart" style:name="G0S0P3">
      <style:graphic-properties draw:fill="solid" draw:fill-color="#457b9d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4">
      <style:graphic-properties draw:fill="solid" draw:fill-color="#e9c46a" draw:opacity="100%" draw:stroke="none"/>
    </style:style>
    <style:style style:family="chart" style:name="G0S0P5">
      <style:graphic-properties draw:fill="solid" draw:fill-color="#81b29a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6465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6.0pt" svg:width="382.0pt" chart:style-name="Crt0">
        <chart:title chart:style-name="CT00">
          <text:p text:style-name="a0" text:class-names="" text:cond-style-name="">Days Completed by Habit</text:p>
        </chart:title>
        <chart:plot-area chart:style-name="Plt0">
          <chart:axis chart:dimension="x" chart:name="primary-x" chart:style-name="Axs0">
            <chart:categories table:cell-range-address="Dashboard.$A$9:.$A$14"/>
          </chart:axis>
          <chart:axis chart:dimension="y" chart:name="primary-y" chart:style-name="Axs1">
            <chart:grid chart:class="major" chart:style-name="GMa1"/>
          </chart:axis>
          <chart:series chart:label-cell-address="Dashboard.$B$8" chart:values-cell-range-address="Dashboard.$B$9:.$B$14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64653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13">
      <style:chart-properties chart:symbol-type="none" chart:connect-bars="false" chart:pie-offset="0" chart:solid-type="cuboid" chart:link-data-style-to-source="false" chart:data-label-number="value" chart:data-label-text="false" chart:data-label-symbol="false" chart:label-position="center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4653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2a9d8f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3e6ea" draw:opacity="100%" draw:stroke="solid" svg:stroke-width="0.02083in" svg:stroke-color="#ffffff" svg:stroke-opacity="100%"/>
    </style:style>
  </office:automatic-styles>
  <office:body>
    <office:chart>
      <chart:chart chart:class="chart:ring" svg:height="232.0pt" svg:width="142.0pt" chart:style-name="Crt0">
        <chart:title chart:style-name="CT00">
          <text:p text:style-name="a0" text:class-names="" text:cond-style-name="">Overall Completion</text:p>
        </chart:title>
        <chart:plot-area chart:style-name="Plt0">
          <chart:axis chart:dimension="x">
            <chart:categories table:cell-range-address="Dashboard.$A$78:.$A$79"/>
          </chart:axis>
          <chart:axis chart:dimension="y"/>
          <chart:series chart:values-cell-range-address="Dashboard.$B$78:.$B$79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6465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2a9d8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465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adar" svg:height="290.0pt" svg:width="485.0pt" chart:style-name="Crt0">
        <chart:title chart:style-name="CT00">
          <text:p text:style-name="a0" text:class-names="" text:cond-style-name="">Habit Balance — Completion Rate</text:p>
        </chart:title>
        <chart:plot-area chart:style-name="Plt0">
          <chart:axis chart:dimension="x" chart:name="primary-x" chart:style-name="Axs0">
            <chart:categories table:cell-range-address="Dashboard.$A$9:.$A$14"/>
          </chart:axis>
          <chart:axis chart:dimension="y" chart:name="primary-y" chart:style-name="Axs1">
            <chart:grid chart:class="major" chart:style-name="GMa1"/>
          </chart:axis>
          <chart:series chart:label-cell-address="Dashboard.$C$8" chart:values-cell-range-address="Dashboard.$C$9:.$C$14" chart:class="chart:rad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36">
      <number:month number:textual="true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6465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e76f5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2a9d8f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6d597a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457b9d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2778in" svg:stroke-color="#e9a93b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2778in" svg:stroke-color="#81b29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465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0pt" svg:width="1041.0pt" chart:style-name="Crt0">
        <chart:title chart:style-name="CT00">
          <text:p text:style-name="a0" text:class-names="" text:cond-style-name="">Each Habit's Monthly Tren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Dashboard.$A$18:.$A$29"/>
          </chart:axis>
          <chart:axis chart:dimension="y" chart:name="primary-y" chart:style-name="Axs1">
            <chart:grid chart:class="major" chart:style-name="GMa1"/>
          </chart:axis>
          <chart:series chart:label-cell-address="Dashboard.$B$17" chart:values-cell-range-address="Dashboard.$B$18:.$B$29" chart:class="chart:line" chart:attached-axis="primary-y" chart:style-name="G0S0">
            <chart:data-point chart:repeated="12"/>
          </chart:series>
          <chart:series chart:label-cell-address="Dashboard.$C$17" chart:values-cell-range-address="Dashboard.$C$18:.$C$29" chart:class="chart:line" chart:attached-axis="primary-y" chart:style-name="G0S1">
            <chart:data-point chart:repeated="12"/>
          </chart:series>
          <chart:series chart:label-cell-address="Dashboard.$D$17" chart:values-cell-range-address="Dashboard.$D$18:.$D$29" chart:class="chart:line" chart:attached-axis="primary-y" chart:style-name="G0S2">
            <chart:data-point chart:repeated="12"/>
          </chart:series>
          <chart:series chart:label-cell-address="Dashboard.$E$17" chart:values-cell-range-address="Dashboard.$E$18:.$E$29" chart:class="chart:line" chart:attached-axis="primary-y" chart:style-name="G0S3">
            <chart:data-point chart:repeated="12"/>
          </chart:series>
          <chart:series chart:label-cell-address="Dashboard.$F$17" chart:values-cell-range-address="Dashboard.$F$18:.$F$29" chart:class="chart:line" chart:attached-axis="primary-y" chart:style-name="G0S4">
            <chart:data-point chart:repeated="12"/>
          </chart:series>
          <chart:series chart:label-cell-address="Dashboard.$G$17" chart:values-cell-range-address="Dashboard.$G$18:.$G$29" chart:class="chart:line" chart:attached-axis="primary-y" chart:style-name="G0S5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